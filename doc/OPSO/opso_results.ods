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1"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hread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246" calcext:value-type="percentage">
            <text:p>32,46%</text:p>
          </table:table-cell>
          <table:table-cell table:style-name="ce3" office:value-type="percentage" office:value="0.2928" calcext:value-type="percentage">
            <text:p>29,28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1841" calcext:value-type="percentage">
            <text:p>18,41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3174" calcext:value-type="percentage">
            <text:p>31,74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449" calcext:value-type="percentage">
            <text:p>24,49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41" calcext:value-type="percentage">
            <text:p>41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2058" calcext:value-type="percentage">
            <text:p>20,58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275" calcext:value-type="percentage">
            <text:p>32,75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754" calcext:value-type="percentage">
            <text:p>17,54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1812" calcext:value-type="percentage">
            <text:p>18,12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217" calcext:value-type="percentage">
            <text:p>22,17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44" calcext:value-type="percentage">
            <text:p>24,40%</text:p>
          </table:table-cell>
          <table:table-cell table:style-name="ce1" table:formula="of:=AVERAGE([.C2:.C11])" office:value-type="percentage" office:value="0.231" calcext:value-type="percentage">
            <text:p>23,1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3826" calcext:value-type="percentage">
            <text:p>23,83%</text:p>
          </table:table-cell>
          <table:table-cell table:style-name="ce1" table:formula="of:=AVERAGE([.G2:.G11])" office:value-type="percentage" office:value="0.2928" calcext:value-type="percentage">
            <text:p>29,2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2" office:value-type="percentage" office:value="0.631" calcext:value-type="percentage">
            <text:p>63,10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2" office:value-type="percentage" office:value="0.043" calcext:value-type="percentage">
            <text:p>4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4241" calcext:value-type="percentage">
            <text:p>42,41%</text:p>
          </table:table-cell>
          <table:table-cell table:style-name="ce2" office:value-type="percentage" office:value="0.469" calcext:value-type="percentage">
            <text:p>46,90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24" calcext:value-type="percentage">
            <text:p>2,4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3586" calcext:value-type="percentage">
            <text:p>35,86%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517" calcext:value-type="percentage">
            <text:p>45,17%</text:p>
          </table:table-cell>
          <table:table-cell table:style-name="ce2" office:value-type="percentage" office:value="0.4828" calcext:value-type="percentage">
            <text:p>48,28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276" calcext:value-type="percentage">
            <text:p>32,76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4759" calcext:value-type="percentage">
            <text:p>47,59%</text:p>
          </table:table-cell>
          <table:table-cell table:style-name="ce2" office:value-type="percentage" office:value="0.5172" calcext:value-type="percentage">
            <text:p>51,72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6414" calcext:value-type="percentage">
            <text:p>64,14%</text:p>
          </table:table-cell>
          <table:table-cell table:style-name="ce2" office:value-type="percentage" office:value="0.6379" calcext:value-type="percentage">
            <text:p>63,79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3" calcext:value-type="percentage">
            <text:p>2,3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4966" calcext:value-type="percentage">
            <text:p>49,66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5034" calcext:value-type="percentage">
            <text:p>50,34%</text:p>
          </table:table-cell>
          <table:table-cell table:style-name="ce2"/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68" calcext:value-type="percentage">
            <text:p>6,80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46275" calcext:value-type="percentage">
            <text:p>46,28%</text:p>
          </table:table-cell>
          <table:table-cell table:style-name="ce1" table:formula="of:=AVERAGE([.C14:.C23])" office:value-type="percentage" office:value="0.5211125" calcext:value-type="percentage">
            <text:p>52,11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28" calcext:value-type="percentage">
            <text:p>4,28%</text:p>
          </table:table-cell>
          <table:table-cell table:style-name="ce1" table:formula="of:=AVERAGE([.G14:.G23])" office:value-type="percentage" office:value="0.0315" calcext:value-type="percentage">
            <text:p>3,15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714" calcext:value-type="percentage">
            <text:p>7,14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1029" calcext:value-type="percentage">
            <text:p>10,2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1457" calcext:value-type="percentage">
            <text:p>14,5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314" calcext:value-type="percentage">
            <text:p>13,14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1057" calcext:value-type="percentage">
            <text:p>10,5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286" calcext:value-type="percentage">
            <text:p>12,86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1343" calcext:value-type="percentage">
            <text:p>13,4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0829" calcext:value-type="percentage">
            <text:p>8,2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27:.B36])" office:value-type="percentage" office:value="0.274" calcext:value-type="percentage">
            <text:p>27,40%</text:p>
          </table:table-cell>
          <table:table-cell table:style-name="ce1" table:formula="of:=AVERAGE([.C27:.C36])" office:value-type="percentage" office:value="0.254" calcext:value-type="percentage">
            <text:p>25,4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10743" calcext:value-type="percentage">
            <text:p>10,74%</text:p>
          </table:table-cell>
          <table:table-cell table:style-name="ce1" table:formula="of:=AVERAGE([.G27:.G3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667" calcext:value-type="percentage">
            <text:p>36,67%</text:p>
          </table:table-cell>
          <table:table-cell table:style-name="ce2" office:value-type="percentage" office:value="0.4212" calcext:value-type="percentage">
            <text:p>42,12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419" calcext:value-type="percentage">
            <text:p>4,19%</text:p>
          </table:table-cell>
          <table:table-cell table:style-name="ce2" office:value-type="percentage" office:value="0.0468" calcext:value-type="percentage">
            <text:p>4,68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061" calcext:value-type="percentage">
            <text:p>40,61%</text:p>
          </table:table-cell>
          <table:table-cell table:style-name="ce2" office:value-type="percentage" office:value="0.4909" calcext:value-type="percentage">
            <text:p>49,09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1048" calcext:value-type="percentage">
            <text:p>10,48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333" calcext:value-type="percentage">
            <text:p>43,33%</text:p>
          </table:table-cell>
          <table:table-cell table:style-name="ce2" office:value-type="percentage" office:value="0.4606" calcext:value-type="percentage">
            <text:p>46,06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871" calcext:value-type="percentage">
            <text:p>8,71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2" office:value-type="percentage" office:value="0.5152" calcext:value-type="percentage">
            <text:p>51,52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5242" calcext:value-type="percentage">
            <text:p>52,42%</text:p>
          </table:table-cell>
          <table:table-cell table:style-name="ce2" office:value-type="percentage" office:value="0.6758" calcext:value-type="percentage">
            <text:p>67,58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2" office:value-type="percentage" office:value="0.6061" calcext:value-type="percentage">
            <text:p>60,61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788" calcext:value-type="percentage">
            <text:p>57,88%</text:p>
          </table:table-cell>
          <table:table-cell table:style-name="ce2" office:value-type="percentage" office:value="0.603" calcext:value-type="percentage">
            <text:p>60,30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0742" calcext:value-type="percentage">
            <text:p>7,42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5152" calcext:value-type="percentage">
            <text:p>51,52%</text:p>
          </table:table-cell>
          <table:table-cell table:style-name="ce2" office:value-type="percentage" office:value="0.5606" calcext:value-type="percentage">
            <text:p>56,06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694" calcext:value-type="percentage">
            <text:p>6,94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4848" calcext:value-type="percentage">
            <text:p>48,48%</text:p>
          </table:table-cell>
          <table:table-cell table:style-name="ce2" office:value-type="percentage" office:value="0.5182" calcext:value-type="percentage">
            <text:p>51,82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4545" calcext:value-type="percentage">
            <text:p>45,45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726" calcext:value-type="percentage">
            <text:p>7,26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40:.B49])" office:value-type="percentage" office:value="0.47666" calcext:value-type="percentage">
            <text:p>47,67%</text:p>
          </table:table-cell>
          <table:table-cell table:style-name="ce1" table:formula="of:=AVERAGE([.C40:.C49])" office:value-type="percentage" office:value="0.539066666666667" calcext:value-type="percentage">
            <text:p>53,91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6887" calcext:value-type="percentage">
            <text:p>6,89%</text:p>
          </table:table-cell>
          <table:table-cell table:style-name="ce1" table:formula="of:=AVERAGE([.G40:.G49])" office:value-type="percentage" office:value="0.0468" calcext:value-type="percentage">
            <text:p>4,68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571" calcext:value-type="percentage">
            <text:p>45,71%</text:p>
          </table:table-cell>
          <table:table-cell table:style-name="ce2" office:value-type="percentage" office:value="0.5667" calcext:value-type="percentage">
            <text:p>56,67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633" calcext:value-type="percentage">
            <text:p>46,33%</text:p>
          </table:table-cell>
          <table:table-cell table:style-name="ce2" office:value-type="percentage" office:value="0.4967" calcext:value-type="percentage">
            <text:p>49,67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681" calcext:value-type="percentage">
            <text:p>68,10%</text:p>
          </table:table-cell>
          <table:table-cell table:style-name="ce2" office:value-type="percentage" office:value="0.7714" calcext:value-type="percentage">
            <text:p>77,14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267" calcext:value-type="percentage">
            <text:p>22,67%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2" office:value-type="percentage" office:value="0.6048" calcext:value-type="percentage">
            <text:p>60,4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619" calcext:value-type="percentage">
            <text:p>56,19%</text:p>
          </table:table-cell>
          <table:table-cell table:style-name="ce2" office:value-type="percentage" office:value="0.6476" calcext:value-type="percentage">
            <text:p>64,7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3933" calcext:value-type="percentage">
            <text:p>39,33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767" calcext:value-type="percentage">
            <text:p>27,67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524" calcext:value-type="percentage">
            <text:p>55,24%</text:p>
          </table:table-cell>
          <table:table-cell table:style-name="ce2" office:value-type="percentage" office:value="0.5762" calcext:value-type="percentage">
            <text:p>57,62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619" calcext:value-type="percentage">
            <text:p>61,9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524" calcext:value-type="percentage">
            <text:p>35,24%</text:p>
          </table:table-cell>
          <table:table-cell table:style-name="ce2"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286" calcext:value-type="percentage">
            <text:p>42,86%</text:p>
          </table:table-cell>
          <table:table-cell table:style-name="ce2"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952" calcext:value-type="percentage">
            <text:p>59,52%</text:p>
          </table:table-cell>
          <table:table-cell table:style-name="ce2" office:value-type="percentage" office:value="0.6857" calcext:value-type="percentage">
            <text:p>68,5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3:.B62])" office:value-type="percentage" office:value="0.29333" calcext:value-type="percentage">
            <text:p>29,33%</text:p>
          </table:table-cell>
          <table:table-cell table:style-name="ce1" table:formula="of:=AVERAGE([.C53:.C62])" office:value-type="percentage" office:value="0.27899" calcext:value-type="percentage">
            <text:p>27,90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2334" calcext:value-type="percentage">
            <text:p>52,33%</text:p>
          </table:table-cell>
          <table:table-cell table:style-name="ce1" table:formula="of:=AVERAGE([.G53:.G62])" office:value-type="percentage" office:value="0.60571" calcext:value-type="percentage">
            <text:p>60,57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519" calcext:value-type="percentage">
            <text:p>25,19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1111" calcext:value-type="percentage">
            <text:p>11,11%</text:p>
          </table:table-cell>
          <table:table-cell table:style-name="ce2"/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/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4692" calcext:value-type="percentage">
            <text:p>46,92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/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2308" calcext:value-type="percentage">
            <text:p>23,08%</text:p>
          </table:table-cell>
          <table:table-cell table:style-name="ce2" office:value-type="percentage" office:value="0.2846" calcext:value-type="percentage">
            <text:p>28,46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2"/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4462" calcext:value-type="percentage">
            <text:p>4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2"/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4692" calcext:value-type="percentage">
            <text:p>46,92%</text:p>
          </table:table-cell>
          <table:table-cell table:style-name="ce2" office:value-type="percentage" office:value="0.3769" calcext:value-type="percentage">
            <text:p>37,69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3259" calcext:value-type="percentage">
            <text:p>32,59%</text:p>
          </table:table-cell>
          <table:table-cell table:style-name="ce2"/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846" calcext:value-type="percentage">
            <text:p>28,46%</text:p>
          </table:table-cell>
          <table:table-cell table:style-name="ce2" office:value-type="percentage" office:value="0.5077" calcext:value-type="percentage">
            <text:p>50,77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2"/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3538" calcext:value-type="percentage">
            <text:p>35,38%</text:p>
          </table:table-cell>
          <table:table-cell table:style-name="ce2" office:value-type="percentage" office:value="0.2231" calcext:value-type="percentage">
            <text:p>22,31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2"/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308" calcext:value-type="percentage">
            <text:p>33,08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2556" calcext:value-type="percentage">
            <text:p>25,56%</text:p>
          </table:table-cell>
          <table:table-cell table:style-name="ce2"/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3538" calcext:value-type="percentage">
            <text:p>35,38%</text:p>
          </table:table-cell>
          <table:table-cell table:style-name="ce2"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6:.B75])" office:value-type="percentage" office:value="0.22075" calcext:value-type="percentage">
            <text:p>22,08%</text:p>
          </table:table-cell>
          <table:table-cell table:style-name="ce1" table:formula="of:=AVERAGE([.C66:.C75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5768" calcext:value-type="percentage">
            <text:p>35,77%</text:p>
          </table:table-cell>
          <table:table-cell table:style-name="ce1" table:formula="of:=AVERAGE([.G66:.G75])" office:value-type="percentage" office:value="0.37385" calcext:value-type="percentage">
            <text:p>37,39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633" calcext:value-type="percentage">
            <text:p>26,3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1933" calcext:value-type="percentage">
            <text:p>19,3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867" calcext:value-type="percentage">
            <text:p>28,6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933" calcext:value-type="percentage">
            <text:p>19,3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79:.B88])" office:value-type="percentage" office:value="0.045" calcext:value-type="percentage">
            <text:p>4,50%</text:p>
          </table:table-cell>
          <table:table-cell table:style-name="ce1" table:formula="of:=AVERAGE([.C79:.C88])" office:value-type="percentage" office:value="0.067" calcext:value-type="percentage">
            <text:p>6,7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3533" calcext:value-type="percentage">
            <text:p>23,53%</text:p>
          </table:table-cell>
          <table:table-cell table:style-name="ce1" table:formula="of:=AVERAGE([.G79:.G8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914" calcext:value-type="percentage">
            <text:p>19,14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971" calcext:value-type="percentage">
            <text:p>9,71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457" calcext:value-type="percentage">
            <text:p>14,5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2"/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/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/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2143" calcext:value-type="percentage">
            <text:p>21,4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/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829" calcext:value-type="percentage">
            <text:p>18,2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/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086" calcext:value-type="percentage">
            <text:p>10,86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348" calcext:value-type="percentage">
            <text:p>3,48%</text:p>
          </table:table-cell>
          <table:table-cell table:style-name="ce2"/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686" calcext:value-type="percentage">
            <text:p>16,86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943" calcext:value-type="percentage">
            <text:p>19,43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93:.B102])" office:value-type="percentage" office:value="0.0761" calcext:value-type="percentage">
            <text:p>7,61%</text:p>
          </table:table-cell>
          <table:table-cell table:style-name="ce1" table:formula="of:=AVERAGE([.C93:.C102])" office:value-type="percentage" office:value="0.0674" calcext:value-type="percentage">
            <text:p>6,74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6572" calcext:value-type="percentage">
            <text:p>16,57%</text:p>
          </table:table-cell>
          <table:table-cell table:style-name="ce1" table:formula="of:=AVERAGE([.G93:.G10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3765" calcext:value-type="percentage">
            <text:p>37,65%</text:p>
          </table:table-cell>
          <table:table-cell table:style-name="ce2" office:value-type="percentage" office:value="0.4735" calcext:value-type="percentage">
            <text:p>47,35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277" calcext:value-type="percentage">
            <text:p>22,7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4147" calcext:value-type="percentage">
            <text:p>41,47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47" calcext:value-type="percentage">
            <text:p>14,7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3647" calcext:value-type="percentage">
            <text:p>36,47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206" calcext:value-type="percentage">
            <text:p>20,6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588" calcext:value-type="percentage">
            <text:p>45,88%</text:p>
          </table:table-cell>
          <table:table-cell table:style-name="ce2" office:value-type="percentage" office:value="0.5118" calcext:value-type="percentage">
            <text:p>51,18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2072" calcext:value-type="percentage">
            <text:p>20,72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676" calcext:value-type="percentage">
            <text:p>26,76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699" calcext:value-type="percentage">
            <text:p>16,9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412" calcext:value-type="percentage">
            <text:p>34,12%</text:p>
          </table:table-cell>
          <table:table-cell table:style-name="ce2"/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2048" calcext:value-type="percentage">
            <text:p>20,48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2"/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699" calcext:value-type="percentage">
            <text:p>16,9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706" calcext:value-type="percentage">
            <text:p>37,06%</text:p>
          </table:table-cell>
          <table:table-cell table:style-name="ce2"/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807" calcext:value-type="percentage">
            <text:p>18,0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059" calcext:value-type="percentage">
            <text:p>30,59%</text:p>
          </table:table-cell>
          <table:table-cell table:style-name="ce2"/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337" calcext:value-type="percentage">
            <text:p>13,37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106:.B115])" office:value-type="percentage" office:value="0.34265" calcext:value-type="percentage">
            <text:p>34,27%</text:p>
          </table:table-cell>
          <table:table-cell table:style-name="ce1" table:formula="of:=AVERAGE([.C106:.C115])" office:value-type="percentage" office:value="0.41942" calcext:value-type="percentage">
            <text:p>41,94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818" calcext:value-type="percentage">
            <text:p>17,82%</text:p>
          </table:table-cell>
          <table:table-cell table:style-name="ce1" table:formula="of:=AVERAGE([.G106:.G11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2" office:value-type="percentage" office:value="0.2632" calcext:value-type="percentage">
            <text:p>26,32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3079" calcext:value-type="percentage">
            <text:p>30,7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3316" calcext:value-type="percentage">
            <text:p>33,16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3039" calcext:value-type="percentage">
            <text:p>30,3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447" calcext:value-type="percentage">
            <text:p>24,4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2"/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2132" calcext:value-type="percentage">
            <text:p>21,32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2"/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737" calcext:value-type="percentage">
            <text:p>27,3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2"/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895" calcext:value-type="percentage">
            <text:p>28,9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2"/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/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566" calcext:value-type="percentage">
            <text:p>35,66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2"/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119:.B128])" office:value-type="percentage" office:value="0.16211" calcext:value-type="percentage">
            <text:p>16,21%</text:p>
          </table:table-cell>
          <table:table-cell table:style-name="ce1" table:formula="of:=AVERAGE([.C119:.C128])" office:value-type="percentage" office:value="0.298266666666667" calcext:value-type="percentage">
            <text:p>29,83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8961" calcext:value-type="percentage">
            <text:p>28,96%</text:p>
          </table:table-cell>
          <table:table-cell table:style-name="ce1" table:formula="of:=AVERAGE([.G119:.G12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1019" calcext:value-type="percentage">
            <text:p>10,19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355" calcext:value-type="percentage">
            <text:p>23,5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944" calcext:value-type="percentage">
            <text:p>9,44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984" calcext:value-type="percentage">
            <text:p>29,84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389" calcext:value-type="percentage">
            <text:p>3,89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871" calcext:value-type="percentage">
            <text:p>28,71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74" calcext:value-type="percentage">
            <text:p>5,74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274" calcext:value-type="percentage">
            <text:p>32,74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759" calcext:value-type="percentage">
            <text:p>7,59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129" calcext:value-type="percentage">
            <text:p>31,2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597" calcext:value-type="percentage">
            <text:p>35,9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04" calcext:value-type="percentage">
            <text:p>7,04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321" calcext:value-type="percentage">
            <text:p>32,1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21" calcext:value-type="percentage">
            <text:p>22,1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2"/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759" calcext:value-type="percentage">
            <text:p>37,59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133:.B142])" office:value-type="percentage" office:value="0.07018" calcext:value-type="percentage">
            <text:p>7,02%</text:p>
          </table:table-cell>
          <table:table-cell table:style-name="ce1" table:formula="of:=AVERAGE([.C133:.C142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30357" calcext:value-type="percentage">
            <text:p>30,36%</text:p>
          </table:table-cell>
          <table:table-cell table:style-name="ce1" table:formula="of:=AVERAGE([.G133:.G14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3087" calcext:value-type="percentage">
            <text:p>30,87%</text:p>
          </table:table-cell>
          <table:table-cell table:style-name="ce2" office:value-type="percentage" office:value="0.2848" calcext:value-type="percentage">
            <text:p>28,48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494" calcext:value-type="percentage">
            <text:p>14,94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2" office:value-type="percentage" office:value="0.2957" calcext:value-type="percentage">
            <text:p>29,57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45" calcext:value-type="percentage">
            <text:p>14,5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304" calcext:value-type="percentage">
            <text:p>43,04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208" calcext:value-type="percentage">
            <text:p>12,08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587" calcext:value-type="percentage">
            <text:p>35,87%</text:p>
          </table:table-cell>
          <table:table-cell table:style-name="ce2"/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528" calcext:value-type="percentage">
            <text:p>15,28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2891" calcext:value-type="percentage">
            <text:p>28,91%</text:p>
          </table:table-cell>
          <table:table-cell table:style-name="ce2"/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1455" calcext:value-type="percentage">
            <text:p>14,5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435" calcext:value-type="percentage">
            <text:p>34,35%</text:p>
          </table:table-cell>
          <table:table-cell table:style-name="ce2"/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385" calcext:value-type="percentage">
            <text:p>13,8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565" calcext:value-type="percentage">
            <text:p>35,65%</text:p>
          </table:table-cell>
          <table:table-cell table:style-name="ce2"/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861" calcext:value-type="percentage">
            <text:p>18,61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652" calcext:value-type="percentage">
            <text:p>36,52%</text:p>
          </table:table-cell>
          <table:table-cell table:style-name="ce2"/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1991" calcext:value-type="percentage">
            <text:p>19,91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2696" calcext:value-type="percentage">
            <text:p>26,96%</text:p>
          </table:table-cell>
          <table:table-cell table:style-name="ce2"/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1818" calcext:value-type="percentage">
            <text:p>18,18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304" calcext:value-type="percentage">
            <text:p>33,04%</text:p>
          </table:table-cell>
          <table:table-cell table:style-name="ce2"/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1732" calcext:value-type="percentage">
            <text:p>17,32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146:.B155])" office:value-type="percentage" office:value="0.33738" calcext:value-type="percentage">
            <text:p>33,74%</text:p>
          </table:table-cell>
          <table:table-cell table:style-name="ce1" table:formula="of:=AVERAGE([.C146:.C155])" office:value-type="percentage" office:value="0.29025" calcext:value-type="percentage">
            <text:p>29,03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5922" calcext:value-type="percentage">
            <text:p>15,92%</text:p>
          </table:table-cell>
          <table:table-cell table:style-name="ce1" table:formula="of:=AVERAGE([.G146:.G15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5145" calcext:value-type="percentage">
            <text:p>51,4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/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225" calcext:value-type="percentage">
            <text:p>42,2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/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414" calcext:value-type="percentage">
            <text:p>41,4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/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4265" calcext:value-type="percentage">
            <text:p>42,6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2"/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2"/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425" calcext:value-type="percentage">
            <text:p>44,2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2"/>
          <table:table-cell table:style-name="ce3"/>
          <table:table-cell table:style-name="ce2" office:value-type="string" calcext:value-type="string">
            <text:p>Spiral_7</text:p>
          </table:table-cell>
          <table:table-cell table:style-name="ce2" office:value-type="percentage" office:value="0.433" calcext:value-type="percentage">
            <text:p>43,3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2"/>
          <table:table-cell table:style-name="ce3"/>
          <table:table-cell table:style-name="ce2" office:value-type="string" calcext:value-type="string">
            <text:p>Spiral_8</text:p>
          </table:table-cell>
          <table:table-cell table:style-name="ce2" office:value-type="percentage" office:value="0.392" calcext:value-type="percentage">
            <text:p>39,2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2"/>
          <table:table-cell table:style-name="ce3"/>
          <table:table-cell table:style-name="ce2" office:value-type="string" calcext:value-type="string">
            <text:p>Spiral_9</text:p>
          </table:table-cell>
          <table:table-cell table:style-name="ce2" office:value-type="percentage" office:value="0.418" calcext:value-type="percentage">
            <text:p>41,8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/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158:.B167])" office:value-type="percentage" office:value="0.2205" calcext:value-type="percentage">
            <text:p>22,05%</text:p>
          </table:table-cell>
          <table:table-cell table:style-name="ce1" table:formula="of:=AVERAGE([.C158:.C167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283" calcext:value-type="percentage">
            <text:p>42,83%</text:p>
          </table:table-cell>
          <table:table-cell table:style-name="ce1" table:formula="of:=AVERAGE([.G158:.G1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2" office:value-type="percentage" office:value="0.085" calcext:value-type="percentage">
            <text:p>8,50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635" calcext:value-type="percentage">
            <text:p>26,35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325" calcext:value-type="percentage">
            <text:p>3,25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14" calcext:value-type="percentage">
            <text:p>25,14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5" calcext:value-type="percentage">
            <text:p>8,50%</text:p>
          </table:table-cell>
          <table:table-cell table:style-name="ce2"/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811" calcext:value-type="percentage">
            <text:p>28,11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/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473" calcext:value-type="percentage">
            <text:p>24,73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85" calcext:value-type="percentage">
            <text:p>8,50%</text:p>
          </table:table-cell>
          <table:table-cell table:style-name="ce2"/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581" calcext:value-type="percentage">
            <text:p>25,81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675" calcext:value-type="percentage">
            <text:p>6,75%</text:p>
          </table:table-cell>
          <table:table-cell table:style-name="ce2"/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865" calcext:value-type="percentage">
            <text:p>28,65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/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635" calcext:value-type="percentage">
            <text:p>26,35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2"/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2014" calcext:value-type="percentage">
            <text:p>20,14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/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57" calcext:value-type="percentage">
            <text:p>22,57%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/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2068" calcext:value-type="percentage">
            <text:p>20,68%</text:p>
          </table:table-cell>
          <table:table-cell table:style-name="ce3"/>
          <table:table-cell/>
        </table:table-row>
        <table:table-row table:style-name="ro1">
          <table:table-cell table:style-name="ce1"/>
          <table:table-cell table:style-name="ce1" table:formula="of:=AVERAGE([.B171:.B180])" office:value-type="percentage" office:value="0.06225" calcext:value-type="percentage">
            <text:p>6,23%</text:p>
          </table:table-cell>
          <table:table-cell table:style-name="ce1" table:formula="of:=AVERAGE([.C171:.C180])" office:value-type="percentage" office:value="0.085" calcext:value-type="percentage">
            <text:p>8,50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4853" calcext:value-type="percentage">
            <text:p>24,85%</text:p>
          </table:table-cell>
          <table:table-cell table:style-name="ce1" table:formula="of:=AVERAGE([.G171:.G1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075" calcext:value-type="percentage">
            <text:p>7,50%</text:p>
          </table:table-cell>
          <table:table-cell table:style-name="ce2"/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/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471" calcext:value-type="percentage">
            <text:p>14,71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089" calcext:value-type="percentage">
            <text:p>10,89%</text:p>
          </table:table-cell>
          <table:table-cell table:style-name="ce2"/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2235" calcext:value-type="percentage">
            <text:p>22,3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214" calcext:value-type="percentage">
            <text:p>2,14%</text:p>
          </table:table-cell>
          <table:table-cell table:style-name="ce2"/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824" calcext:value-type="percentage">
            <text:p>8,24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/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1176" calcext:value-type="percentage">
            <text:p>11,76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/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588" calcext:value-type="percentage">
            <text:p>15,88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/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941" calcext:value-type="percentage">
            <text:p>19,41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589" calcext:value-type="percentage">
            <text:p>5,89%</text:p>
          </table:table-cell>
          <table:table-cell table:style-name="ce2"/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2"/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304" calcext:value-type="percentage">
            <text:p>3,04%</text:p>
          </table:table-cell>
          <table:table-cell table:style-name="ce2"/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183:.B192])" office:value-type="percentage" office:value="0.05571" calcext:value-type="percentage">
            <text:p>5,57%</text:p>
          </table:table-cell>
          <table:table-cell table:style-name="ce1" table:formula="of:=AVERAGE([.C183:.C192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4353" calcext:value-type="percentage">
            <text:p>14,35%</text:p>
          </table:table-cell>
          <table:table-cell table:style-name="ce1" table:formula="of:=AVERAGE([.G183:.G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2233" calcext:value-type="percentage">
            <text:p>22,33%</text:p>
          </table:table-cell>
          <table:table-cell table:style-name="ce3" table:number-columns-repeated="2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1667" calcext:value-type="percentage">
            <text:p>16,67%</text:p>
          </table:table-cell>
          <table:table-cell table:style-name="ce3" table:number-columns-repeated="2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8" calcext:value-type="percentage">
            <text:p>58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5" calcext:value-type="percentage">
            <text:p>15,00%</text:p>
          </table:table-cell>
          <table:table-cell table:style-name="ce3" table:number-columns-repeated="2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02" calcext:value-type="percentage">
            <text:p>60,2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11" calcext:value-type="percentage">
            <text:p>11,00%</text:p>
          </table:table-cell>
          <table:table-cell table:style-name="ce3" table:number-columns-repeated="2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626" calcext:value-type="percentage">
            <text:p>62,6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367" calcext:value-type="percentage">
            <text:p>3,67%</text:p>
          </table:table-cell>
          <table:table-cell table:style-name="ce3" table:number-columns-repeated="2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754" calcext:value-type="percentage">
            <text:p>75,4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767" calcext:value-type="percentage">
            <text:p>7,67%</text:p>
          </table:table-cell>
          <table:table-cell table:style-name="ce3" table:number-columns-repeated="2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632" calcext:value-type="percentage">
            <text:p>63,2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367" calcext:value-type="percentage">
            <text:p>3,67%</text:p>
          </table:table-cell>
          <table:table-cell table:style-name="ce3" table:number-columns-repeated="2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602" calcext:value-type="percentage">
            <text:p>60,2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867" calcext:value-type="percentage">
            <text:p>18,67%</text:p>
          </table:table-cell>
          <table:table-cell table:style-name="ce3" table:number-columns-repeated="2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73" calcext:value-type="percentage">
            <text:p>73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 table:number-columns-repeated="2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63" calcext:value-type="percentage">
            <text:p>63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1367" calcext:value-type="percentage">
            <text:p>13,67%</text:p>
          </table:table-cell>
          <table:table-cell table:style-name="ce2"/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64" calcext:value-type="percentage">
            <text:p>66,40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196:.B205])" office:value-type="percentage" office:value="0.11735" calcext:value-type="percentage">
            <text:p>11,74%</text:p>
          </table:table-cell>
          <table:table-cell table:style-name="ce1" table:formula="of:=AVERAGE([.C196:.C205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6474" calcext:value-type="percentage">
            <text:p>64,74%</text:p>
          </table:table-cell>
          <table:table-cell table:style-name="ce1" table:formula="of:=AVERAGE([.G196:.G20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9" calcext:value-type="percentage">
            <text:p>9,0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52" calcext:value-type="percentage">
            <text:p>5,2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9" calcext:value-type="percentage">
            <text:p>9,0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4" calcext:value-type="percentage">
            <text:p>1,4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138" calcext:value-type="percentage">
            <text:p>13,8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06" calcext:value-type="percentage">
            <text:p>0,6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12" calcext:value-type="percentage">
            <text:p>1,2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124" calcext:value-type="percentage">
            <text:p>12,40%</text:p>
          </table:table-cell>
          <table:table-cell table:style-name="ce2"/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208:.B217])" office:value-type="percentage" office:value="0.0832" calcext:value-type="percentage">
            <text:p>8,32%</text:p>
          </table:table-cell>
          <table:table-cell table:style-name="ce1" table:formula="of:=AVERAGE([.C208:.C217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258" calcext:value-type="percentage">
            <text:p>2,58%</text:p>
          </table:table-cell>
          <table:table-cell table:style-name="ce1" table:formula="of:=AVERAGE([.G208:.G21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3357" calcext:value-type="percentage">
            <text:p>33,5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914" calcext:value-type="percentage">
            <text:p>19,14%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1929" calcext:value-type="percentage">
            <text:p>19,2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357" calcext:value-type="percentage">
            <text:p>33,5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143" calcext:value-type="percentage">
            <text:p>21,4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style-name="ce2" office:value-type="percentage" office:value="0.2979" calcext:value-type="percentage">
            <text:p>29,79%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4143" calcext:value-type="percentage">
            <text:p>41,4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857" calcext:value-type="percentage">
            <text:p>28,57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220:.B229])" office:value-type="percentage" office:value="0.186766666666667" calcext:value-type="percentage">
            <text:p>18,68%</text:p>
          </table:table-cell>
          <table:table-cell table:style-name="ce1" table:formula="of:=AVERAGE([.C220:.C229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6357" calcext:value-type="percentage">
            <text:p>26,36%</text:p>
          </table:table-cell>
          <table:table-cell table:style-name="ce1" table:formula="of:=AVERAGE([.G220:.G22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58" calcext:value-type="percentage">
            <text:p>15,8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556" calcext:value-type="percentage">
            <text:p>25,56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648" calcext:value-type="percentage">
            <text:p>16,48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2407" calcext:value-type="percentage">
            <text:p>24,07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241" calcext:value-type="percentage">
            <text:p>12,41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815" calcext:value-type="percentage">
            <text:p>28,15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259" calcext:value-type="percentage">
            <text:p>12,5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407" calcext:value-type="percentage">
            <text:p>24,07%</text:p>
          </table:table-cell>
          <table:table-cell table:style-name="ce2"/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26" calcext:value-type="percentage">
            <text:p>14,26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233:.B242])" office:value-type="percentage" office:value="0.22482" calcext:value-type="percentage">
            <text:p>22,48%</text:p>
          </table:table-cell>
          <table:table-cell table:style-name="ce1" table:formula="of:=AVERAGE([.C233:.C242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969" calcext:value-type="percentage">
            <text:p>14,97%</text:p>
          </table:table-cell>
          <table:table-cell table:style-name="ce1" table:formula="of:=AVERAGE([.G233:.G24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5294" calcext:value-type="percentage">
            <text:p>52,94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3686" calcext:value-type="percentage">
            <text:p>36,86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587" calcext:value-type="percentage">
            <text:p>5,8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4463" calcext:value-type="percentage">
            <text:p>44,63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3328" calcext:value-type="percentage">
            <text:p>33,28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661" calcext:value-type="percentage">
            <text:p>66,10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6143" calcext:value-type="percentage">
            <text:p>61,43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4246" calcext:value-type="percentage">
            <text:p>42,46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7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4292" calcext:value-type="percentage">
            <text:p>42,92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2815" calcext:value-type="percentage">
            <text:p>28,15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4401" calcext:value-type="percentage">
            <text:p>44,01%</text:p>
          </table:table-cell>
          <table:table-cell table:style-name="ce2"/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804" calcext:value-type="percentage">
            <text:p>8,04%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1" table:formula="of:=AVERAGE([.B245:.B254])" office:value-type="percentage" office:value="0.45278" calcext:value-type="percentage">
            <text:p>45,28%</text:p>
          </table:table-cell>
          <table:table-cell table:style-name="ce1" table:formula="of:=AVERAGE([.C245:.C254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586" calcext:value-type="percentage">
            <text:p>6,59%</text:p>
          </table:table-cell>
          <table:table-cell table:style-name="ce1" table:formula="of:=AVERAGE([.G245:.G2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1" table:number-columns-repeated="2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43.777" calcext:value-type="float">
            <text:p>1443,777</text:p>
          </table:table-cell>
          <table:table-cell table:style-name="ce6" table:number-columns-repeated="2"/>
          <table:table-cell table:style-name="ce6" office:value-type="string" calcext:value-type="string">
            <text:p>BL_1</text:p>
          </table:table-cell>
          <table:table-cell table:style-name="ce10" office:value-type="float" office:value="0.268" calcext:value-type="float">
            <text:p>2,68E-01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44.453" calcext:value-type="float">
            <text:p>1744,453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139" calcext:value-type="float">
            <text:p>1,39E-02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06.259" calcext:value-type="float">
            <text:p>2206,259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814" calcext:value-type="float">
            <text:p>0,81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32.824" calcext:value-type="float">
            <text:p>1832,824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6.007" calcext:value-type="float">
            <text:p>6,01E+00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float" office:value="1878.148" calcext:value-type="float">
            <text:p>1878,148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623" calcext:value-type="float">
            <text:p>6,23E-01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office:value-type="float" office:value="1885.723" calcext:value-type="float">
            <text:p>1885,723</text:p>
          </table:table-cell>
          <table:table-cell table:style-name="ce6" table:number-columns-repeated="2"/>
          <table:table-cell table:style-name="ce6" office:value-type="string" calcext:value-type="string">
            <text:p>BL_6</text:p>
          </table:table-cell>
          <table:table-cell table:style-name="ce10" office:value-type="float" office:value="0.632" calcext:value-type="float">
            <text:p>6,32E-01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office:value-type="float" office:value="1528.211" calcext:value-type="float">
            <text:p>1528,211</text:p>
          </table:table-cell>
          <table:table-cell table:style-name="ce6" table:number-columns-repeated="2"/>
          <table:table-cell table:style-name="ce6" office:value-type="string" calcext:value-type="string">
            <text:p>BL_7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office:value-type="float" office:value="1991.195" calcext:value-type="float">
            <text:p>1991,195</text:p>
          </table:table-cell>
          <table:table-cell table:style-name="ce6" table:number-columns-repeated="2"/>
          <table:table-cell table:style-name="ce6" office:value-type="string" calcext:value-type="string">
            <text:p>BL_8</text:p>
          </table:table-cell>
          <table:table-cell table:style-name="ce10" office:value-type="float" office:value="0.0992" calcext:value-type="float">
            <text:p>9,92E-02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office:value-type="float" office:value="1835.434" calcext:value-type="float">
            <text:p>1835,434</text:p>
          </table:table-cell>
          <table:table-cell table:style-name="ce6" table:number-columns-repeated="2"/>
          <table:table-cell table:style-name="ce6" office:value-type="string" calcext:value-type="string">
            <text:p>BL_9</text:p>
          </table:table-cell>
          <table:table-cell table:style-name="ce10" office:value-type="float" office:value="2.114" calcext:value-type="float">
            <text:p>2,11E+00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office:value-type="float" office:value="1916.83" calcext:value-type="float">
            <text:p>1916,83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style-name="ce6" office:value-type="float" office:value="1.422" calcext:value-type="float">
            <text:p>1,422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258:.B267])" office:value-type="float" office:value="1826.2854" calcext:value-type="float">
            <text:p>1826,2854</text:p>
          </table:table-cell>
          <table:table-cell table:style-name="ce5" table:formula="of:=AVERAGE([.C258:.C2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58:.F267])" office:value-type="float" office:value="1.21601" calcext:value-type="float">
            <text:p>1,21601</text:p>
          </table:table-cell>
          <table:table-cell table:style-name="ce11" table:formula="of:=AVERAGE([.G258:.G26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1"/>
          <table:table-cell table:style-name="ce5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table:number-columns-repeated="2"/>
          <table:table-cell table:style-name="ce6" office:value-type="string" calcext:value-type="string">
            <text:p>Baseball_1</text:p>
          </table:table-cell>
          <table:table-cell table:style-name="ce6" office:value-type="float" office:value="2372.791" calcext:value-type="float">
            <text:p>2372,79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185" calcext:value-type="float">
            <text:p>0,185</text:p>
          </table:table-cell>
          <table:table-cell table:style-name="ce6" table:number-columns-repeated="2"/>
          <table:table-cell table:style-name="ce6" office:value-type="string" calcext:value-type="string">
            <text:p>Baseball_2</text:p>
          </table:table-cell>
          <table:table-cell table:style-name="ce6" office:value-type="float" office:value="1293.914" calcext:value-type="float">
            <text:p>1293,9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203" calcext:value-type="float">
            <text:p>0,203</text:p>
          </table:table-cell>
          <table:table-cell table:style-name="ce6" table:number-columns-repeated="2"/>
          <table:table-cell table:style-name="ce6" office:value-type="string" calcext:value-type="string">
            <text:p>Baseball_3</text:p>
          </table:table-cell>
          <table:table-cell table:style-name="ce6" office:value-type="float" office:value="2336.297" calcext:value-type="float">
            <text:p>2336,2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 table:number-columns-repeated="2"/>
          <table:table-cell table:style-name="ce6" office:value-type="string" calcext:value-type="string">
            <text:p>Baseball_4</text:p>
          </table:table-cell>
          <table:table-cell table:style-name="Default" office:value-type="float" office:value="2735.478" calcext:value-type="float">
            <text:p>2735,47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399" calcext:value-type="float">
            <text:p>0,399</text:p>
          </table:table-cell>
          <table:table-cell table:style-name="ce6" table:number-columns-repeated="2"/>
          <table:table-cell table:style-name="ce6" office:value-type="string" calcext:value-type="string">
            <text:p>Baseball_5</text:p>
          </table:table-cell>
          <table:table-cell table:style-name="ce6" office:value-type="float" office:value="2062.327" calcext:value-type="float">
            <text:p>2062,3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287.657" calcext:value-type="float">
            <text:p>1287,6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752" calcext:value-type="float">
            <text:p>0,0752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2409.456" calcext:value-type="float">
            <text:p>2409,45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2.068" calcext:value-type="float">
            <text:p>2,068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729.485" calcext:value-type="float">
            <text:p>3729,48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629" calcext:value-type="float">
            <text:p>0,629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415.827" calcext:value-type="float">
            <text:p>2415,8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102" calcext:value-type="float">
            <text:p>0,102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2869.867" calcext:value-type="float">
            <text:p>2869,867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70:.B279])" office:value-type="float" office:value="0.41132" calcext:value-type="float">
            <text:p>0,41132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2351.3099" calcext:value-type="float">
            <text:p>2351,3099</text:p>
          </table:table-cell>
          <table:table-cell table:style-name="ce5" table:formula="of:=AVERAGE([.G270:.G27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12.61" calcext:value-type="float">
            <text:p>12,6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7" calcext:value-type="float">
            <text:p>0,177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15.17" calcext:value-type="float">
            <text:p>15,1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57" calcext:value-type="float">
            <text:p>0,157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1.73" calcext:value-type="float">
            <text:p>11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10.91" calcext:value-type="float">
            <text:p>10,9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66" calcext:value-type="float">
            <text:p>0,166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4.03" calcext:value-type="float">
            <text:p>14,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7.66" calcext:value-type="float">
            <text:p>17,6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219" calcext:value-type="float">
            <text:p>0,219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3.09" calcext:value-type="float">
            <text:p>13,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182" calcext:value-type="float">
            <text:p>0,182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13.07" calcext:value-type="float">
            <text:p>13,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73" calcext:value-type="float">
            <text:p>0,173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9.52" calcext:value-type="float">
            <text:p>9,5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47" calcext:value-type="float">
            <text:p>0,147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12.17" calcext:value-type="float">
            <text:p>12,17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82:.B291])" office:value-type="float" office:value="0.1684" calcext:value-type="float">
            <text:p>0,1684</text:p>
          </table:table-cell>
          <table:table-cell table:style-name="ce5" table:formula="of:=AVERAGE([.C282:.C29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82:.F291])" office:value-type="float" office:value="12.996" calcext:value-type="float">
            <text:p>12,996</text:p>
          </table:table-cell>
          <table:table-cell table:style-name="ce5" table:formula="of:=AVERAGE([.G282:.G29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69" calcext:value-type="float">
            <text:p>0,269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497" calcext:value-type="float">
            <text:p>0,4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824" calcext:value-type="float">
            <text:p>0,824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533" calcext:value-type="float">
            <text:p>0,53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67" calcext:value-type="float">
            <text:p>0,367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0.693" calcext:value-type="float">
            <text:p>0,6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264" calcext:value-type="float">
            <text:p>0,264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0.975" calcext:value-type="float">
            <text:p>0,9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263" calcext:value-type="float">
            <text:p>0,263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0.622" calcext:value-type="float">
            <text:p>0,62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593" calcext:value-type="float">
            <text:p>0,593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.424" calcext:value-type="float">
            <text:p>1,42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293" calcext:value-type="float">
            <text:p>0,293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573" calcext:value-type="float">
            <text:p>0,5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33" calcext:value-type="float">
            <text:p>0,233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0.633" calcext:value-type="float">
            <text:p>0,63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93" calcext:value-type="float">
            <text:p>0,293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office:value-type="float" office:value="1.206" calcext:value-type="float">
            <text:p>1,20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187" calcext:value-type="float">
            <text:p>0,187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office:value-type="float" office:value="0.809" calcext:value-type="float">
            <text:p>0,80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95:.B304])" office:value-type="float" office:value="0.3586" calcext:value-type="float">
            <text:p>0,3586</text:p>
          </table:table-cell>
          <table:table-cell table:style-name="ce5" table:formula="of:=AVERAGE([.C295:.C30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5:.F304])" office:value-type="float" office:value="0.7965" calcext:value-type="float">
            <text:p>0,7965</text:p>
          </table:table-cell>
          <table:table-cell table:style-name="ce5" table:formula="of:=AVERAGE([.G295:.G30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1.481" calcext:value-type="float">
            <text:p>1,481</text:p>
          </table:table-cell>
          <table:table-cell table:style-name="ce6" table:number-columns-repeated="2"/>
          <table:table-cell table:style-name="ce6" office:value-type="string" calcext:value-type="string">
            <text:p>Laser_1</text:p>
          </table:table-cell>
          <table:table-cell table:style-name="ce6" office:value-type="float" office:value="0.0404" calcext:value-type="float">
            <text:p>0,040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0.511" calcext:value-type="float">
            <text:p>0,511</text:p>
          </table:table-cell>
          <table:table-cell table:style-name="ce6" table:number-columns-repeated="2"/>
          <table:table-cell table:style-name="ce6" office:value-type="string" calcext:value-type="string">
            <text:p>Laser_2</text:p>
          </table:table-cell>
          <table:table-cell table:style-name="ce6" office:value-type="float" office:value="0.0865" calcext:value-type="float">
            <text:p>0,086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0.8896" calcext:value-type="float">
            <text:p>0,8896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0.137" calcext:value-type="float">
            <text:p>0,13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626" calcext:value-type="float">
            <text:p>1,626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722" calcext:value-type="float">
            <text:p>0,72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40.652" calcext:value-type="float">
            <text:p>40,652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14" calcext:value-type="float">
            <text:p>0,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1.576" calcext:value-type="float">
            <text:p>1,576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345" calcext:value-type="float">
            <text:p>0,34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3.061" calcext:value-type="float">
            <text:p>3,061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1.416" calcext:value-type="float">
            <text:p>1,41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983" calcext:value-type="float">
            <text:p>0,983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53" calcext:value-type="float">
            <text:p>0,05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8.584" calcext:value-type="float">
            <text:p>8,584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6066" calcext:value-type="float">
            <text:p>0,6066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07:.B316])" office:value-type="float" office:value="5.99086" calcext:value-type="float">
            <text:p>5,99086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0.36555" calcext:value-type="float">
            <text:p>0,36555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2255.134" calcext:value-type="float">
            <text:p>2255,134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86.143" calcext:value-type="float">
            <text:p>186,14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1761.36" calcext:value-type="float">
            <text:p>1761,36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186.553" calcext:value-type="float">
            <text:p>186,55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579.345" calcext:value-type="float">
            <text:p>1579,345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167.548" calcext:value-type="float">
            <text:p>167,5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537.119" calcext:value-type="float">
            <text:p>2537,11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70.512" calcext:value-type="float">
            <text:p>170,5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2422.273" calcext:value-type="float">
            <text:p>2422,273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54.505" calcext:value-type="float">
            <text:p>154,50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116.47" calcext:value-type="float">
            <text:p>2116,47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7.74" calcext:value-type="float">
            <text:p>237,7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2105.488" calcext:value-type="float">
            <text:p>2105,488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26.799" calcext:value-type="float">
            <text:p>126,7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2086.366" calcext:value-type="float">
            <text:p>2086,366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57.099" calcext:value-type="float">
            <text:p>157,0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126.786" calcext:value-type="float">
            <text:p>2126,786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217.793" calcext:value-type="float">
            <text:p>217,7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136.88" calcext:value-type="float">
            <text:p>1136,88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67.598" calcext:value-type="float">
            <text:p>167,59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20:.B329])" office:value-type="float" office:value="2012.7221" calcext:value-type="float">
            <text:p>2012,7221</text:p>
          </table:table-cell>
          <table:table-cell table:style-name="ce5" table:formula="of:=AVERAGE([.C320:.C32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20:.F329])" office:value-type="float" office:value="177.229" calcext:value-type="float">
            <text:p>177,229</text:p>
          </table:table-cell>
          <table:table-cell table:style-name="ce5" table:formula="of:=AVERAGE([.G320:.G32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27.596" calcext:value-type="float">
            <text:p>27,596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4.357" calcext:value-type="float">
            <text:p>4,3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5.801" calcext:value-type="float">
            <text:p>5,801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997" calcext:value-type="float">
            <text:p>3,9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7.945" calcext:value-type="float">
            <text:p>7,945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284" calcext:value-type="float">
            <text:p>3,28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192" calcext:value-type="float">
            <text:p>3,19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2.636" calcext:value-type="float">
            <text:p>2,636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757" calcext:value-type="float">
            <text:p>3,7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3.335" calcext:value-type="float">
            <text:p>3,335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955" calcext:value-type="float">
            <text:p>3,95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5.004" calcext:value-type="float">
            <text:p>5,004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713" calcext:value-type="float">
            <text:p>4,71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float" office:value="1.438" calcext:value-type="float">
            <text:p>1,438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549" calcext:value-type="float">
            <text:p>3,54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0.267" calcext:value-type="float">
            <text:p>0,267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367" calcext:value-type="float">
            <text:p>3,3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11.707" calcext:value-type="float">
            <text:p>11,707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4.011" calcext:value-type="float">
            <text:p>4,011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33:.B342])" office:value-type="float" office:value="6.6245" calcext:value-type="float">
            <text:p>6,6245</text:p>
          </table:table-cell>
          <table:table-cell table:style-name="ce5" table:formula="of:=AVERAGE([.C333:.C342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3:.F342])" office:value-type="float" office:value="3.8182" calcext:value-type="float">
            <text:p>3,8182</text:p>
          </table:table-cell>
          <table:table-cell table:style-name="ce5" table:formula="of:=AVERAGE([.G333:.G34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5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8.655" calcext:value-type="float">
            <text:p>8,655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4.843" calcext:value-type="float">
            <text:p>4,84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612" calcext:value-type="float">
            <text:p>7,612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30.447" calcext:value-type="float">
            <text:p>30,44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036" calcext:value-type="float">
            <text:p>9,036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3.22" calcext:value-type="float">
            <text:p>3,22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857" calcext:value-type="float">
            <text:p>7,857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2.205" calcext:value-type="float">
            <text:p>12,205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41" calcext:value-type="float">
            <text:p>7,641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41.826" calcext:value-type="float">
            <text:p>41,826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068" calcext:value-type="float">
            <text:p>8,068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10.187" calcext:value-type="float">
            <text:p>10,18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137" calcext:value-type="float">
            <text:p>9,137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.687" calcext:value-type="float">
            <text:p>1,68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8.026" calcext:value-type="float">
            <text:p>8,026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10.476" calcext:value-type="float">
            <text:p>10,476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22.081" calcext:value-type="float">
            <text:p>22,081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10.852" calcext:value-type="float">
            <text:p>10,852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09" calcext:value-type="float">
            <text:p>7,09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1.766" calcext:value-type="float">
            <text:p>1,766</text:p>
          </table:table-cell>
          <table:table-cell table:style-name="ce6"/>
          <table:table-cell/>
        </table:table-row>
        <table:table-row table:style-name="ro1">
          <table:table-cell table:style-name="ce5"/>
          <table:table-cell table:style-name="ce5" table:formula="of:=AVERAGE([.B346:.B355])" office:value-type="float" office:value="9.5203" calcext:value-type="float">
            <text:p>9,5203</text:p>
          </table:table-cell>
          <table:table-cell table:style-name="ce5" table:formula="of:=AVERAGE([.C346:.C35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6:.F355])" office:value-type="float" office:value="12.7509" calcext:value-type="float">
            <text:p>12,7509</text:p>
          </table:table-cell>
          <table:table-cell table:style-name="ce5" table:formula="of:=AVERAGE([.G346:.G35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8.715" calcext:value-type="float">
            <text:p>148,715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226.177" calcext:value-type="float">
            <text:p>226,17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30.395" calcext:value-type="float">
            <text:p>130,395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float" office:value="281.157" calcext:value-type="float">
            <text:p>281,1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2.494" calcext:value-type="float">
            <text:p>152,494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office:value-type="float" office:value="244.6199" calcext:value-type="float">
            <text:p>244,61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float" office:value="175.762" calcext:value-type="float">
            <text:p>175,762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office:value-type="float" office:value="22.612" calcext:value-type="float">
            <text:p>22,6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office:value-type="float" office:value="147.839" calcext:value-type="float">
            <text:p>147,839</text:p>
          </table:table-cell>
          <table:table-cell table:style-name="ce6" table:number-columns-repeated="2"/>
          <table:table-cell table:style-name="ce2" office:value-type="string" calcext:value-type="string">
            <text:p>Treasury_5</text:p>
          </table:table-cell>
          <table:table-cell table:style-name="ce6" office:value-type="float" office:value="232.871" calcext:value-type="float">
            <text:p>232,87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office:value-type="float" office:value="153.305" calcext:value-type="float">
            <text:p>153,305</text:p>
          </table:table-cell>
          <table:table-cell table:style-name="ce6" table:number-columns-repeated="2"/>
          <table:table-cell table:style-name="ce2" office:value-type="string" calcext:value-type="string">
            <text:p>Treasury_6</text:p>
          </table:table-cell>
          <table:table-cell table:style-name="ce6" office:value-type="float" office:value="289.532" calcext:value-type="float">
            <text:p>289,53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office:value-type="float" office:value="173.197" calcext:value-type="float">
            <text:p>173,197</text:p>
          </table:table-cell>
          <table:table-cell table:style-name="ce6" table:number-columns-repeated="2"/>
          <table:table-cell table:style-name="ce2" office:value-type="string" calcext:value-type="string">
            <text:p>Treasury_7</text:p>
          </table:table-cell>
          <table:table-cell table:style-name="ce6" office:value-type="float" office:value="187.654" calcext:value-type="float">
            <text:p>187,65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office:value-type="float" office:value="15.3003" calcext:value-type="float">
            <text:p>15,3003</text:p>
          </table:table-cell>
          <table:table-cell table:style-name="ce6" table:number-columns-repeated="2"/>
          <table:table-cell table:style-name="ce2" office:value-type="string" calcext:value-type="string">
            <text:p>Treasury_8</text:p>
          </table:table-cell>
          <table:table-cell table:style-name="ce6" office:value-type="float" office:value="245.7198" calcext:value-type="float">
            <text:p>245,719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office:value-type="float" office:value="157.007" calcext:value-type="float">
            <text:p>157,007</text:p>
          </table:table-cell>
          <table:table-cell table:style-name="ce6" table:number-columns-repeated="2"/>
          <table:table-cell table:style-name="ce2" office:value-type="string" calcext:value-type="string">
            <text:p>Treasury_9</text:p>
          </table:table-cell>
          <table:table-cell table:style-name="ce6" office:value-type="float" office:value="156.3297" calcext:value-type="float">
            <text:p>156,32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office:value-type="float" office:value="156.412" calcext:value-type="float">
            <text:p>156,412</text:p>
          </table:table-cell>
          <table:table-cell table:style-name="ce6" table:number-columns-repeated="2"/>
          <table:table-cell table:style-name="ce2" office:value-type="string" calcext:value-type="string">
            <text:p>Treasury_10</text:p>
          </table:table-cell>
          <table:table-cell table:style-name="ce6" office:value-type="float" office:value="315.544" calcext:value-type="float">
            <text:p>315,54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59:.B368])" office:value-type="float" office:value="141.04263" calcext:value-type="float">
            <text:p>141,04263</text:p>
          </table:table-cell>
          <table:table-cell table:style-name="ce5" table:formula="of:=AVERAGE([.C359:.C368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59:.F368])" office:value-type="float" office:value="220.22164" calcext:value-type="float">
            <text:p>220,22164</text:p>
          </table:table-cell>
          <table:table-cell table:style-name="ce5" table:formula="of:=AVERAGE([.G359:.G36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422.327" calcext:value-type="float">
            <text:p>422,327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59.044" calcext:value-type="float">
            <text:p>559,04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426.706" calcext:value-type="float">
            <text:p>426,706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668.33" calcext:value-type="float">
            <text:p>668,33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float" office:value="335.368" calcext:value-type="float">
            <text:p>335,368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803.887" calcext:value-type="float">
            <text:p>803,88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office:value-type="float" office:value="313.465" calcext:value-type="float">
            <text:p>313,465</text:p>
          </table:table-cell>
          <table:table-cell table:style-name="ce6" table:number-columns-repeated="2"/>
          <table:table-cell table:style-name="ce2" office:value-type="string" calcext:value-type="string">
            <text:p>Auto_4</text:p>
          </table:table-cell>
          <table:table-cell table:style-name="ce6" office:value-type="float" office:value="619.725" calcext:value-type="float">
            <text:p>619,72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office:value-type="float" office:value="624.451" calcext:value-type="float">
            <text:p>624,451</text:p>
          </table:table-cell>
          <table:table-cell table:style-name="ce6" table:number-columns-repeated="2"/>
          <table:table-cell table:style-name="ce2" office:value-type="string" calcext:value-type="string">
            <text:p>Auto_5</text:p>
          </table:table-cell>
          <table:table-cell table:style-name="ce6" office:value-type="float" office:value="804.654" calcext:value-type="float">
            <text:p>804,65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6</text:p>
          </table:table-cell>
          <table:table-cell table:style-name="ce6" office:value-type="float" office:value="466.375" calcext:value-type="float">
            <text:p>466,37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office:value-type="float" office:value="534.677" calcext:value-type="float">
            <text:p>534,677</text:p>
          </table:table-cell>
          <table:table-cell table:style-name="ce6" table:number-columns-repeated="2"/>
          <table:table-cell table:style-name="ce2" office:value-type="string" calcext:value-type="string">
            <text:p>Auto_7</text:p>
          </table:table-cell>
          <table:table-cell table:style-name="ce6" office:value-type="float" office:value="868.1098" calcext:value-type="float">
            <text:p>868,109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8</text:p>
          </table:table-cell>
          <table:table-cell table:style-name="ce6" office:value-type="float" office:value="1069.197" calcext:value-type="float">
            <text:p>1069,19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office:value-type="float" office:value="359.401" calcext:value-type="float">
            <text:p>359,401</text:p>
          </table:table-cell>
          <table:table-cell table:style-name="ce6" table:number-columns-repeated="2"/>
          <table:table-cell table:style-name="ce2" office:value-type="string" calcext:value-type="string">
            <text:p>Auto_9</text:p>
          </table:table-cell>
          <table:table-cell table:style-name="ce6" office:value-type="float" office:value="968.514" calcext:value-type="float">
            <text:p>968,51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office:value-type="float" office:value="518.502" calcext:value-type="float">
            <text:p>518,502</text:p>
          </table:table-cell>
          <table:table-cell table:style-name="ce6" table:number-columns-repeated="2"/>
          <table:table-cell table:style-name="ce2" office:value-type="string" calcext:value-type="string">
            <text:p>Auto_10</text:p>
          </table:table-cell>
          <table:table-cell table:style-name="ce6" office:value-type="float" office:value="661.401" calcext:value-type="float">
            <text:p>661,401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72:.B381])" office:value-type="float" office:value="441.862125" calcext:value-type="float">
            <text:p>441,862125</text:p>
          </table:table-cell>
          <table:table-cell table:style-name="ce5" table:formula="of:=AVERAGE([.C372:.C381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2:.F381])" office:value-type="float" office:value="748.92368" calcext:value-type="float">
            <text:p>748,92368</text:p>
          </table:table-cell>
          <table:table-cell table:style-name="ce5" table:formula="of:=AVERAGE([.G372:.G381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330.346" calcext:value-type="float">
            <text:p>330,346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float" office:value="600.255" calcext:value-type="float">
            <text:p>600,255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738" calcext:value-type="float">
            <text:p>0,73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397.407" calcext:value-type="float">
            <text:p>397,407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1998" calcext:value-type="float">
            <text:p>0,199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461.7" calcext:value-type="float">
            <text:p>461,7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219" calcext:value-type="float">
            <text:p>0,21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274" calcext:value-type="float">
            <text:p>479,274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77" calcext:value-type="float">
            <text:p>0,47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581.695" calcext:value-type="float">
            <text:p>581,695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855" calcext:value-type="float">
            <text:p>0,085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23.551" calcext:value-type="float">
            <text:p>323,551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41.401" calcext:value-type="float">
            <text:p>441,401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23.949" calcext:value-type="float">
            <text:p>423,949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10</text:p>
          </table:table-cell>
          <table:table-cell table:style-name="ce6" office:value-type="float" office:value="519.962" calcext:value-type="float">
            <text:p>519,962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85:.B394])" office:value-type="float" office:value="455.954" calcext:value-type="float">
            <text:p>455,954</text:p>
          </table:table-cell>
          <table:table-cell table:style-name="ce5" table:formula="of:=AVERAGE([.C385:.C394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5:.F394])" office:value-type="float" office:value="0.30783" calcext:value-type="float">
            <text:p>0,30783</text:p>
          </table:table-cell>
          <table:table-cell table:style-name="ce5" table:formula="of:=AVERAGE([.G385:.G39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19" calcext:value-type="float">
            <text:p>0,1019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109" calcext:value-type="float">
            <text:p>1,1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82" calcext:value-type="float">
            <text:p>0,0382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28" calcext:value-type="float">
            <text:p>0,22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875" calcext:value-type="float">
            <text:p>0,8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31" calcext:value-type="float">
            <text:p>0,0931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368" calcext:value-type="float">
            <text:p>0,36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7" calcext:value-type="float">
            <text:p>0,043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25" calcext:value-type="float">
            <text:p>0,0625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75" calcext:value-type="float">
            <text:p>0,0375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562" calcext:value-type="float">
            <text:p>0,56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8</text:p>
          </table:table-cell>
          <table:table-cell table:style-name="ce6" office:value-type="float" office:value="0.076" calcext:value-type="float">
            <text:p>0,076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0.556" calcext:value-type="float">
            <text:p>0,55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86" calcext:value-type="float">
            <text:p>0,0986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57" calcext:value-type="float">
            <text:p>0,25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92" calcext:value-type="float">
            <text:p>0,0692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97:.B406])" office:value-type="float" office:value="0.0817" calcext:value-type="float">
            <text:p>0,0817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397:.F406])" office:value-type="float" office:value="0.45587" calcext:value-type="float">
            <text:p>0,45587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1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hreads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2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5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25" office:value-type="percentage" office:value="0.244" calcext:value-type="percentage">
            <text:p>24,40%</text:p>
          </table:table-cell>
          <table:table-cell table:style-name="ce25" office:value-type="percentage" office:value="0.231" calcext:value-type="percentage">
            <text:p>23,10%</text:p>
          </table:table-cell>
          <table:table-cell table:style-name="ce25" table:number-columns-repeated="2"/>
          <table:table-cell/>
        </table:table-row>
        <table:table-row table:style-name="ro3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25" table:number-columns-repeated="4"/>
          <table:table-cell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25" office:value-type="percentage" office:value="0.2383" calcext:value-type="percentage">
            <text:p>23,83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25" office:value-type="percentage" office:value="0.0689" calcext:value-type="percentage">
            <text:p>6,89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25" office:value-type="percentage" office:value="0.0428" calcext:value-type="percentage">
            <text:p>4,28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25" office:value-type="percentage" office:value="0.4628" calcext:value-type="percentage">
            <text:p>46,28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25" office:value-type="percentage" office:value="0.1074" calcext:value-type="percentage">
            <text:p>10,74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25" office:value-type="percentage" office:value="0.4767" calcext:value-type="percentage">
            <text:p>47,67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25" office:value-type="percentage" office:value="0.274" calcext:value-type="percentage">
            <text:p>27,40%</text:p>
          </table:table-cell>
          <table:table-cell table:style-name="ce25" office:value-type="percentage" office:value="0.254" calcext:value-type="percentage">
            <text:p>25,40%</text:p>
          </table:table-cell>
          <table:table-cell table:style-name="ce25" table:number-columns-repeated="2"/>
          <table:table-cell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25" office:value-type="percentage" office:value="0.2933" calcext:value-type="percentage">
            <text:p>29,33%</text:p>
          </table:table-cell>
          <table:table-cell table:style-name="ce25" office:value-type="percentage" office:value="0.279" calcext:value-type="percentage">
            <text:p>27,90%</text:p>
          </table:table-cell>
          <table:table-cell table:style-name="ce25" table:number-columns-repeated="2"/>
          <table:table-cell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25" office:value-type="percentage" office:value="0.3577" calcext:value-type="percentage">
            <text:p>35,77%</text:p>
          </table:table-cell>
          <table:table-cell table:style-name="ce25" office:value-type="percentage" office:value="0.3739" calcext:value-type="percentage">
            <text:p>37,39%</text:p>
          </table:table-cell>
          <table:table-cell table:style-name="ce25" table:number-columns-repeated="2"/>
          <table:table-cell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25" office:value-type="percentage" office:value="0.2208" calcext:value-type="percentage">
            <text:p>22,08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25" office:value-type="percentage" office:value="0.2353" calcext:value-type="percentage">
            <text:p>23,53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25" office:value-type="percentage" office:value="0.0761" calcext:value-type="percentage">
            <text:p>7,61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25" office:value-type="percentage" office:value="0.1657" calcext:value-type="percentage">
            <text:p>16,57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25" office:value-type="percentage" office:value="0.3427" calcext:value-type="percentage">
            <text:p>34,27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25" office:value-type="percentage" office:value="0.2636" calcext:value-type="percentage">
            <text:p>26,36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25" office:value-type="percentage" office:value="0.1782" calcext:value-type="percentage">
            <text:p>17,82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25" office:value-type="percentage" office:value="0.1621" calcext:value-type="percentage">
            <text:p>16,21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25" office:value-type="percentage" office:value="0.1497" calcext:value-type="percentage">
            <text:p>14,97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25" office:value-type="percentage" office:value="0.2896" calcext:value-type="percentage">
            <text:p>28,96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25" office:value-type="percentage" office:value="0.0702" calcext:value-type="percentage">
            <text:p>7,02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25" office:value-type="percentage" office:value="0.3036" calcext:value-type="percentage">
            <text:p>30,36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25" office:value-type="percentage" office:value="0.3374" calcext:value-type="percentage">
            <text:p>33,74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25" office:value-type="percentage" office:value="0.4528" calcext:value-type="percentage">
            <text:p>45,28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25" office:value-type="percentage" office:value="0.1592" calcext:value-type="percentage">
            <text:p>15,92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25" office:value-type="percentage" office:value="0.2205" calcext:value-type="percentage">
            <text:p>22,05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25" office:value-type="percentage" office:value="0.0659" calcext:value-type="percentage">
            <text:p>6,59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25" office:value-type="percentage" office:value="0.4283" calcext:value-type="percentage">
            <text:p>42,83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25" office:value-type="percentage" office:value="0.2248" calcext:value-type="percentage">
            <text:p>22,48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25" office:value-type="percentage" office:value="0.0623" calcext:value-type="percentage">
            <text:p>6,23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25" office:value-type="percentage" office:value="0.2485" calcext:value-type="percentage">
            <text:p>24,85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25" office:value-type="percentage" office:value="0.0557" calcext:value-type="percentage">
            <text:p>5,57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25" office:value-type="percentage" office:value="0.1435" calcext:value-type="percentage">
            <text:p>14,35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25" office:value-type="percentage" office:value="0.1174" calcext:value-type="percentage">
            <text:p>11,74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6481" calcext:value-type="percentage">
            <text:p>64,81%</text:p>
          </table:table-cell>
          <table:table-cell table:style-name="ce25" office:value-type="percentage" office:value="0.6474" calcext:value-type="percentage">
            <text:p>64,74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25" office:value-type="percentage" office:value="0.0832" calcext:value-type="percentage">
            <text:p>8,32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25" office:value-type="percentage" office:value="0.0258" calcext:value-type="percentage">
            <text:p>2,58%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25" office:value-type="percentage" office:value="0.045" calcext:value-type="percentage">
            <text:p>4,50%</text:p>
          </table:table-cell>
          <table:table-cell table:style-name="ce25" office:value-type="percentage" office:value="0.067" calcext:value-type="percentage">
            <text:p>6,70%</text:p>
          </table:table-cell>
          <table:table-cell table:style-name="ce25" table:number-columns-repeated="2"/>
          <table:table-cell/>
        </table:table-row>
        <table:table-row table:style-name="ro4">
          <table:table-cell table:style-name="ce13"/>
          <table:table-cell table:style-name="ce17" table:formula="of:=AVERAGE([.B3:.B41])" office:value-type="percentage" office:value="0.265558974358974" calcext:value-type="percentage">
            <text:p>26,56%</text:p>
          </table:table-cell>
          <table:table-cell table:style-name="ce17" table:formula="of:=AVERAGE([.C3:.C41])" office:value-type="percentage" office:value="0.219505263157895" calcext:value-type="percentage">
            <text:p>21,95%</text:p>
          </table:table-cell>
          <table:table-cell table:style-name="ce17" table:formula="of:=AVERAGE([.D3:.D41])" office:value-type="percentage" office:value="0.24098" calcext:value-type="percentage">
            <text:p>24,10%</text:p>
          </table:table-cell>
          <table:table-cell table:style-name="ce17" table:formula="of:=AVERAGE([.E3:.E41])" office:value-type="string" office:string-value="" calcext:value-type="error">
            <text:p>#DIV/0!</text:p>
          </table:table-cell>
          <table:table-cell table:style-name="ce17" table:formula="of:=AVERAGE([.F3:.F41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2">
          <table:table-cell table:style-name="ce14"/>
          <table:table-cell table:style-name="ce18"/>
          <table:table-cell table:style-name="ce14"/>
          <table:table-cell table:style-name="ce18" table:number-columns-repeated="3"/>
          <table:table-cell/>
        </table:table-row>
        <table:table-row table:style-name="ro3">
          <table:table-cell table:number-columns-repeated="7"/>
        </table:table-row>
        <table:table-row table:style-name="ro2">
          <table:table-cell table:number-columns-repeated="2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14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3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style-name="ce26" table:formula="of:=1826.2854/417" office:value-type="float" office:value="4.37958129496403" calcext:value-type="float">
            <text:p>4,37958129496403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26" table:formula="of:=0.1684/150" office:value-type="float" office:value="0.00112266666666667" calcext:value-type="float">
            <text:p>0,00112266666666667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style-name="ce26" table:formula="of:=748.92368/39" office:value-type="float" office:value="19.2031712820513" calcext:value-type="float">
            <text:p>19,2031712820513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26" table:formula="of:=0.41132/9" office:value-type="float" office:value="0.0457022222222222" calcext:value-type="float">
            <text:p>0,0457022222222222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26" table:formula="of:=1.21601/4" office:value-type="float" office:value="0.3040025" calcext:value-type="float">
            <text:p>0,3040025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26" table:formula="of:=2351.3099/33" office:value-type="float" office:value="71.2518151515152" calcext:value-type="float">
            <text:p>71,2518151515152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26" table:formula="of:=0.3586/103" office:value-type="float" office:value="0.00348155339805825" calcext:value-type="float">
            <text:p>0,00348155339805825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style-name="ce26" table:formula="of:=12.996/36" office:value-type="float" office:value="0.361" calcext:value-type="float">
            <text:p>0,361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style-name="ce26" table:formula="of:=141.04263/120" office:value-type="float" office:value="1.17535525" calcext:value-type="float">
            <text:p>1,17535525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26" table:formula="of:=5.99086/12" office:value-type="float" office:value="0.499238333333333" calcext:value-type="float">
            <text:p>0,499238333333333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style-name="ce26" table:formula="of:=0.7965/50" office:value-type="float" office:value="0.01593" calcext:value-type="float">
            <text:p>0,01593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style-name="ce26" table:formula="of:=2012.7221/50" office:value-type="float" office:value="40.254442" calcext:value-type="float">
            <text:p>40,254442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26" table:formula="of:=0.36555/99" office:value-type="float" office:value="0.00369242424242424" calcext:value-type="float">
            <text:p>0,00369242424242424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26" table:formula="of:=6.6245/18" office:value-type="float" office:value="0.368027777777778" calcext:value-type="float">
            <text:p>0,368027777777778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26" table:formula="of:=0.30783/6" office:value-type="float" office:value="0.051305" calcext:value-type="float">
            <text:p>0,051305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style-name="ce26" table:formula="of:=177.229/104" office:value-type="float" office:value="1.704125" calcext:value-type="float">
            <text:p>1,704125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style-name="ce26" table:formula="of:=0.0817/13" office:value-type="float" office:value="0.00628461538461538" calcext:value-type="float">
            <text:p>0,00628461538461538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26" table:formula="of:=3.8182/165" office:value-type="float" office:value="0.0231406060606061" calcext:value-type="float">
            <text:p>0,0231406060606061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style-name="ce26" table:formula="of:=0.45587/7" office:value-type="float" office:value="0.0651242857142857" calcext:value-type="float">
            <text:p>0,0651242857142857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style-name="ce26" table:formula="of:=455.954/165" office:value-type="float" office:value="2.76335757575758" calcext:value-type="float">
            <text:p>2,76335757575758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26" table:formula="of:=9.5203/217" office:value-type="float" office:value="0.0438723502304148" calcext:value-type="float">
            <text:p>0,0438723502304148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style-name="ce26" table:formula="of:=12.7509/57" office:value-type="float" office:value="0.2237" calcext:value-type="float">
            <text:p>0,2237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style-name="ce26" table:formula="of:=441.862125/95" office:value-type="float" office:value="4.6511802631579" calcext:value-type="float">
            <text:p>4,6511802631579</text:p>
          </table:table-cell>
          <table:table-cell table:style-name="ce26" table:number-columns-repeated="3"/>
          <table:table-cell/>
        </table:table-row>
        <table:table-row table:style-name="ro3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style-name="ce26" table:formula="of:=220.22164/104" office:value-type="float" office:value="2.11751576923077" calcext:value-type="float">
            <text:p>2,11751576923077</text:p>
          </table:table-cell>
          <table:table-cell table:style-name="ce26" table:number-columns-repeated="3"/>
          <table:table-cell/>
        </table:table-row>
        <table:table-row table:style-name="ro3">
          <table:table-cell/>
          <table:table-cell table:style-name="ce20"/>
          <table:table-cell table:number-columns-repeated="5"/>
        </table:table-row>
        <table:table-row table:style-name="ro4">
          <table:table-cell table:style-name="ce13" office:value-type="string" calcext:value-type="string">
            <text:p>AVERAGES</text:p>
          </table:table-cell>
          <table:table-cell table:style-name="ce21" table:formula="of:=AVERAGE([.B48:.B71])" office:value-type="float" office:value="8.1731625" calcext:value-type="float">
            <text:p>8,1731625</text:p>
          </table:table-cell>
          <table:table-cell table:style-name="ce13" table:formula="of:=AVERAGE([.C48:.C71])" office:value-type="float" office:value="6.22984033007113" calcext:value-type="float">
            <text:p>6,22984033007113</text:p>
          </table:table-cell>
          <table:table-cell table:style-name="ce13" table:formula="of:=AVERAGE([.D48:.D71])" office:value-type="string" office:string-value="" calcext:value-type="error">
            <text:p>#DIV/0!</text:p>
          </table:table-cell>
          <table:table-cell table:style-name="ce13" table:formula="of:=AVERAGE([.E48:.E71])" office:value-type="string" office:string-value="" calcext:value-type="error">
            <text:p>#DIV/0!</text:p>
          </table:table-cell>
          <table:table-cell table:style-name="ce13" table:formula="of:=AVERAGE([.F48:.F71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14" office:value-type="string" calcext:value-type="string">
            <text:p>GAIN:</text:p>
          </table:table-cell>
          <table:table-cell table:style-name="ce22"/>
          <table:table-cell table:style-name="ce18" table:formula="of:=([.B73]-[.C73])/[.B73]" office:value-type="percentage" office:value="0.237768693566153" calcext:value-type="percentage">
            <text:p>23,78%</text:p>
          </table:table-cell>
          <table:table-cell table:style-name="ce18" table:formula="of:=([.C73]-[.D73])/[.C73]" office:value-type="string" office:string-value="" calcext:value-type="error">
            <text:p>#DIV/0!</text:p>
          </table:table-cell>
          <table:table-cell table:style-name="ce18" table:formula="of:=([.D73]-[.E73])/[.D73]" office:value-type="string" office:string-value="" calcext:value-type="error">
            <text:p>#DIV/0!</text:p>
          </table:table-cell>
          <table:table-cell table:style-name="ce18" table:formula="of:=([.C73]-[.F73])/[.C73]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/>
          <table:table-cell table:style-name="ce20"/>
          <table:table-cell table:number-columns-repeated="5"/>
        </table:table-row>
        <table:table-row table:style-name="ro3" table:number-rows-repeated="1048500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5">
      <number:number number:decimal-places="3" number:min-decimal-places="3" number:min-integer-digits="1"/>
      <number:text>%</number:text>
    </number:percentage-style>
    <number:percentage-style style:name="N116">
      <number:number number:decimal-places="4" number:min-decimal-places="4" number:min-integer-digits="1"/>
      <number:text>%</number:text>
    </number:percentage-style>
    <number:percentage-style style:name="N117">
      <number:number number:decimal-places="5" number:min-decimal-places="5" number:min-integer-digits="1"/>
      <number:text>%</number:text>
    </number:percentage-style>
    <number:percentage-style style:name="N118">
      <number:number number:decimal-places="6" number:min-decimal-places="6" number:min-integer-digits="1"/>
      <number:text>%</number:text>
    </number:percentage-style>
    <number:percentage-style style:name="N119">
      <number:number number:decimal-places="1" number:min-decimal-places="1" number:min-integer-digits="0"/>
      <number:text>%</number:text>
    </number:percentage-style>
    <number:percentage-style style:name="N120">
      <number:number number:decimal-places="2" number:min-decimal-places="2" number:min-integer-digits="0"/>
      <number:text>%</number:text>
    </number:percentage-style>
    <number:percentage-style style:name="N121">
      <number:number number:decimal-places="3" number:min-decimal-places="3" number:min-integer-digits="0"/>
      <number:text>%</number:text>
    </number:percentage-style>
    <number:percentage-style style:name="N122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9:32:05.396428555</meta:creation-date>
    <dc:date>2026-06-27T15:04:17.997257763</dc:date>
    <meta:editing-duration>PT5H20M6S</meta:editing-duration>
    <meta:editing-cycles>214</meta:editing-cycles>
    <meta:generator>LibreOffice/25.2.3.2$Linux_X86_64 LibreOffice_project/520$Build-2</meta:generator>
    <meta:document-statistic meta:table-count="2" meta:cell-count="1868" meta:object-count="0"/>
  </office:meta>
</office:document-meta>
</file>