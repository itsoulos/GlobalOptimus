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942" calcext:value-type="percentage">
            <text:p>39,42%</text:p>
          </table:table-cell>
          <table:table-cell table:style-name="ce3" office:value-type="percentage" office:value="0.3406" calcext:value-type="percentage">
            <text:p>34,0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229" calcext:value-type="percentage">
            <text:p>22,90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855" calcext:value-type="percentage">
            <text:p>28,55%</text:p>
          </table:table-cell>
          <table:table-cell table:style-name="ce3" office:value-type="percentage" office:value="0.3145" calcext:value-type="percentage">
            <text:p>31,45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office:value-type="percentage" office:value="0.2623" calcext:value-type="percentage">
            <text:p>26,23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725" calcext:value-type="percentage">
            <text:p>27,25%</text:p>
          </table:table-cell>
          <table:table-cell table:style-name="ce3" office:value-type="percentage" office:value="0.2565" calcext:value-type="percentage">
            <text:p>25,65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986" calcext:value-type="percentage">
            <text:p>29,86%</text:p>
          </table:table-cell>
          <table:table-cell table:style-name="ce3" office:value-type="percentage" office:value="0.2725" calcext:value-type="percentage">
            <text:p>27,25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768" calcext:value-type="percentage">
            <text:p>37,68%</text:p>
          </table:table-cell>
          <table:table-cell table:style-name="ce3" office:value-type="percentage" office:value="0.2464" calcext:value-type="percentage">
            <text:p>24,64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2348" calcext:value-type="percentage">
            <text:p>23,48%</text:p>
          </table:table-cell>
          <table:table-cell table:style-name="ce3" office:value-type="percentage" office:value="0.1652" calcext:value-type="percentage">
            <text:p>16,5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971" calcext:value-type="percentage">
            <text:p>29,71%</text:p>
          </table:table-cell>
          <table:table-cell table:style-name="ce3" office:value-type="percentage" office:value="0.2058" calcext:value-type="percentage">
            <text:p>20,5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623" calcext:value-type="percentage">
            <text:p>26,23%</text:p>
          </table:table-cell>
          <table:table-cell table:style-name="ce2" office:value-type="percentage" office:value="0.2522" calcext:value-type="percentage">
            <text:p>25,2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23" calcext:value-type="percentage">
            <text:p>22,30%</text:p>
          </table:table-cell>
          <table:table-cell table:style-name="ce1" table:formula="of:=AVERAGE([.C2:.C11])" office:value-type="percentage" office:value="0.216" calcext:value-type="percentage">
            <text:p>21,6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9566" calcext:value-type="percentage">
            <text:p>29,57%</text:p>
          </table:table-cell>
          <table:table-cell table:style-name="ce1" table:formula="of:=AVERAGE([.G2:.G11])" office:value-type="percentage" office:value="0.2545" calcext:value-type="percentage">
            <text:p>25,4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6621" calcext:value-type="percentage">
            <text:p>66,21%</text:p>
          </table:table-cell>
          <table:table-cell table:style-name="ce2" office:value-type="percentage" office:value="0.6483" calcext:value-type="percentage">
            <text:p>64,83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3" calcext:value-type="percentage">
            <text:p>4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5138" calcext:value-type="percentage">
            <text:p>51,38%</text:p>
          </table:table-cell>
          <table:table-cell table:style-name="ce2" office:value-type="percentage" office:value="0.4586" calcext:value-type="percentage">
            <text:p>45,86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5" calcext:value-type="percentage">
            <text:p>2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5586" calcext:value-type="percentage">
            <text:p>55,86%</text:p>
          </table:table-cell>
          <table:table-cell table:style-name="ce2" office:value-type="percentage" office:value="0.5138" calcext:value-type="percentage">
            <text:p>51,38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7" calcext:value-type="percentage">
            <text:p>6,7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6966" calcext:value-type="percentage">
            <text:p>69,66%</text:p>
          </table:table-cell>
          <table:table-cell table:style-name="ce2" office:value-type="percentage" office:value="0.4897" calcext:value-type="percentage">
            <text:p>48,97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 office:value-type="percentage" office:value="0.066" calcext:value-type="percentage">
            <text:p>6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21" calcext:value-type="percentage">
            <text:p>2,10%</text:p>
          </table:table-cell>
          <table:table-cell table:style-name="ce2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5207" calcext:value-type="percentage">
            <text:p>52,07%</text:p>
          </table:table-cell>
          <table:table-cell table:style-name="ce2" office:value-type="percentage" office:value="0.4069" calcext:value-type="percentage">
            <text:p>40,69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3" calcext:value-type="percentage">
            <text:p>4,3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6379" calcext:value-type="percentage">
            <text:p>63,79%</text:p>
          </table:table-cell>
          <table:table-cell table:style-name="ce2" office:value-type="percentage" office:value="0.5897" calcext:value-type="percentage">
            <text:p>58,97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27" calcext:value-type="percentage">
            <text:p>2,7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793" calcext:value-type="percentage">
            <text:p>47,93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931" calcext:value-type="percentage">
            <text:p>59,31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69" calcext:value-type="percentage">
            <text:p>6,90%</text:p>
          </table:table-cell>
          <table:table-cell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56449" calcext:value-type="percentage">
            <text:p>56,45%</text:p>
          </table:table-cell>
          <table:table-cell table:style-name="ce1" table:formula="of:=AVERAGE([.C14:.C23])" office:value-type="percentage" office:value="0.51517" calcext:value-type="percentage">
            <text:p>51,52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23" calcext:value-type="percentage">
            <text:p>4,23%</text:p>
          </table:table-cell>
          <table:table-cell table:style-name="ce1" table:formula="of:=AVERAGE([.G14:.G23])" office:value-type="percentage" office:value="0.0429" calcext:value-type="percentage">
            <text:p>4,29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514" calcext:value-type="percentage">
            <text:p>15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2029" calcext:value-type="percentage">
            <text:p>20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 office:value-type="percentage" office:value="0.1486" calcext:value-type="percentage">
            <text:p>14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2886" calcext:value-type="percentage">
            <text:p>28,86%</text:p>
          </table:table-cell>
          <table:table-cell table:style-name="ce2" office:value-type="percentage" office:value="0.2429" calcext:value-type="percentage">
            <text:p>24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 office:value-type="percentage" office:value="0.3771" calcext:value-type="percentage">
            <text:p>37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914" calcext:value-type="percentage">
            <text:p>19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 office:value-type="percentage" office:value="0.2371" calcext:value-type="percentage">
            <text:p>23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49" calcext:value-type="percentage">
            <text:p>24,90%</text:p>
          </table:table-cell>
          <table:table-cell table:style-name="ce1" table:formula="of:=AVERAGE([.C27:.C36])" office:value-type="percentage" office:value="0.266" calcext:value-type="percentage">
            <text:p>26,6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21557" calcext:value-type="percentage">
            <text:p>21,56%</text:p>
          </table:table-cell>
          <table:table-cell table:style-name="ce1" table:formula="of:=AVERAGE([.G27:.G36])" office:value-type="percentage" office:value="0.242" calcext:value-type="percentage">
            <text:p>24,2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4545" calcext:value-type="percentage">
            <text:p>45,45%</text:p>
          </table:table-cell>
          <table:table-cell table:style-name="ce2" office:value-type="percentage" office:value="0.4455" calcext:value-type="percentage">
            <text:p>44,5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532" calcext:value-type="percentage">
            <text:p>5,32%</text:p>
          </table:table-cell>
          <table:table-cell table:style-name="ce2" office:value-type="percentage" office:value="0.0403" calcext:value-type="percentage">
            <text:p>4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303" calcext:value-type="percentage">
            <text:p>43,03%</text:p>
          </table:table-cell>
          <table:table-cell table:style-name="ce2" office:value-type="percentage" office:value="0.5788" calcext:value-type="percentage">
            <text:p>57,88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1177" calcext:value-type="percentage">
            <text:p>11,77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number-columns-repeated="2" table:style-name="ce2" office:value-type="percentage" office:value="0.1016" calcext:value-type="percentage">
            <text:p>10,16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number-columns-repeated="2" table:style-name="ce2" office:value-type="percentage" office:value="0.5455" calcext:value-type="percentage">
            <text:p>54,55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823" calcext:value-type="percentage">
            <text:p>8,2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6364" calcext:value-type="percentage">
            <text:p>63,64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45" calcext:value-type="percentage">
            <text:p>6,45%</text:p>
          </table:table-cell>
          <table:table-cell table:style-name="ce2" office:value-type="percentage" office:value="0.0613" calcext:value-type="percentage">
            <text:p>6,1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121" calcext:value-type="percentage">
            <text:p>51,21%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597" calcext:value-type="percentage">
            <text:p>5,97%</text:p>
          </table:table-cell>
          <table:table-cell table:style-name="ce2" office:value-type="percentage" office:value="0.0403" calcext:value-type="percentage">
            <text:p>4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2" office:value-type="percentage" office:value="0.597" calcext:value-type="percentage">
            <text:p>59,70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145" calcext:value-type="percentage">
            <text:p>11,45%</text:p>
          </table:table-cell>
          <table:table-cell table:style-name="ce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6212" calcext:value-type="percentage">
            <text:p>62,12%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number-columns-repeated="2"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6061" calcext:value-type="percentage">
            <text:p>60,61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645" calcext:value-type="percentage">
            <text:p>6,45%</text:p>
          </table:table-cell>
          <table:table-cell table:style-name="ce2" office:value-type="percentage" office:value="0.0903" calcext:value-type="percentage">
            <text:p>9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697" calcext:value-type="percentage">
            <text:p>56,97%</text:p>
          </table:table-cell>
          <table:table-cell table:style-name="ce2" office:value-type="percentage" office:value="0.5909" calcext:value-type="percentage">
            <text:p>59,09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758" calcext:value-type="percentage">
            <text:p>7,5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53758" calcext:value-type="percentage">
            <text:p>53,76%</text:p>
          </table:table-cell>
          <table:table-cell table:style-name="ce1" table:formula="of:=AVERAGE([.C40:.C49])" office:value-type="percentage" office:value="0.52971" calcext:value-type="percentage">
            <text:p>52,97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693" calcext:value-type="percentage">
            <text:p>7,69%</text:p>
          </table:table-cell>
          <table:table-cell table:style-name="ce1" table:formula="of:=AVERAGE([.G40:.G49])" office:value-type="percentage" office:value="0.07677" calcext:value-type="percentage">
            <text:p>7,68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567" calcext:value-type="percentage">
            <text:p>25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6095" calcext:value-type="percentage">
            <text:p>60,95%</text:p>
          </table:table-cell>
          <table:table-cell table:style-name="ce2"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8" calcext:value-type="percentage">
            <text:p>48,00%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7286" calcext:value-type="percentage">
            <text:p>72,86%</text:p>
          </table:table-cell>
          <table:table-cell table:style-name="ce2" office:value-type="percentage" office:value="0.6619" calcext:value-type="percentage">
            <text:p>66,1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6048" calcext:value-type="percentage">
            <text:p>60,48%</text:p>
          </table:table-cell>
          <table:table-cell table:style-name="ce2"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6571" calcext:value-type="percentage">
            <text:p>65,71%</text:p>
          </table:table-cell>
          <table:table-cell table:style-name="ce2" office:value-type="percentage" office:value="0.6095" calcext:value-type="percentage">
            <text:p>60,95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4067" calcext:value-type="percentage">
            <text:p>40,67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6714" calcext:value-type="percentage">
            <text:p>67,14%</text:p>
          </table:table-cell>
          <table:table-cell table:style-name="ce2" office:value-type="percentage" office:value="0.6619" calcext:value-type="percentage">
            <text:p>66,1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81" calcext:value-type="percentage">
            <text:p>58,10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81" calcext:value-type="percentage">
            <text:p>58,10%</text:p>
          </table:table-cell>
          <table:table-cell table:style-name="ce2"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762" calcext:value-type="percentage">
            <text:p>47,62%</text:p>
          </table:table-cell>
          <table:table-cell table:style-name="ce2"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367" calcext:value-type="percentage">
            <text:p>13,67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7238" calcext:value-type="percentage">
            <text:p>72,38%</text:p>
          </table:table-cell>
          <table:table-cell table:style-name="ce2" office:value-type="percentage" office:value="0.7143" calcext:value-type="percentage">
            <text:p>7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7967" calcext:value-type="percentage">
            <text:p>27,97%</text:p>
          </table:table-cell>
          <table:table-cell table:style-name="ce1" table:formula="of:=AVERAGE([.C53:.C62])" office:value-type="percentage" office:value="0.28466" calcext:value-type="percentage">
            <text:p>28,4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62334" calcext:value-type="percentage">
            <text:p>62,33%</text:p>
          </table:table-cell>
          <table:table-cell table:style-name="ce1" table:formula="of:=AVERAGE([.G53:.G62])" office:value-type="percentage" office:value="0.60095" calcext:value-type="percentage">
            <text:p>60,1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3519" calcext:value-type="percentage">
            <text:p>35,19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615" calcext:value-type="percentage">
            <text:p>36,15%</text:p>
          </table:table-cell>
          <table:table-cell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231" calcext:value-type="percentage">
            <text:p>42,31%</text:p>
          </table:table-cell>
          <table:table-cell table:style-name="ce2" office:value-type="percentage" office:value="0.3538" calcext:value-type="percentage">
            <text:p>35,38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154" calcext:value-type="percentage">
            <text:p>31,54%</text:p>
          </table:table-cell>
          <table:table-cell table:style-name="ce2"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2963" calcext:value-type="percentage">
            <text:p>29,63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615" calcext:value-type="percentage">
            <text:p>36,15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number-columns-repeated="2"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222" calcext:value-type="percentage">
            <text:p>32,22%</text:p>
          </table:table-cell>
          <table:table-cell table:style-name="ce2" office:value-type="percentage" office:value="0.3333" calcext:value-type="percentage">
            <text:p>33,33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538" calcext:value-type="percentage">
            <text:p>25,38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615" calcext:value-type="percentage">
            <text:p>26,15%</text:p>
          </table:table-cell>
          <table:table-cell table:style-name="ce2" office:value-type="percentage" office:value="0.2923" calcext:value-type="percentage">
            <text:p>2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4615" calcext:value-type="percentage">
            <text:p>46,1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31371" calcext:value-type="percentage">
            <text:p>31,37%</text:p>
          </table:table-cell>
          <table:table-cell table:style-name="ce1" table:formula="of:=AVERAGE([.C66:.C75])" office:value-type="percentage" office:value="0.2426" calcext:value-type="percentage">
            <text:p>24,26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154" calcext:value-type="percentage">
            <text:p>37,15%</text:p>
          </table:table-cell>
          <table:table-cell table:style-name="ce1" table:formula="of:=AVERAGE([.G66:.G75])" office:value-type="percentage" office:value="0.3546" calcext:value-type="percentage">
            <text:p>35,4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4367" calcext:value-type="percentage">
            <text:p>43,67%</text:p>
          </table:table-cell>
          <table:table-cell table:style-name="ce2" office:value-type="percentage" office:value="0.3567" calcext:value-type="percentage">
            <text:p>35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333" calcext:value-type="percentage">
            <text:p>23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2" office:value-type="percentage" office:value="0.2867" calcext:value-type="percentage">
            <text:p>28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3167" calcext:value-type="percentage">
            <text:p>31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3767" calcext:value-type="percentage">
            <text:p>37,67%</text:p>
          </table:table-cell>
          <table:table-cell table:style-name="ce2"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4167" calcext:value-type="percentage">
            <text:p>41,67%</text:p>
          </table:table-cell>
          <table:table-cell table:style-name="ce2"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3533" calcext:value-type="percentage">
            <text:p>35,33%</text:p>
          </table:table-cell>
          <table:table-cell table:style-name="ce2"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4233" calcext:value-type="percentage">
            <text:p>42,33%</text:p>
          </table:table-cell>
          <table:table-cell table:style-name="ce2" office:value-type="percentage" office:value="0.2533" calcext:value-type="percentage">
            <text:p>25,3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76" calcext:value-type="percentage">
            <text:p>7,60%</text:p>
          </table:table-cell>
          <table:table-cell table:style-name="ce1" table:formula="of:=AVERAGE([.C79:.C88])" office:value-type="percentage" office:value="0.063" calcext:value-type="percentage">
            <text:p>6,3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36034" calcext:value-type="percentage">
            <text:p>36,03%</text:p>
          </table:table-cell>
          <table:table-cell table:style-name="ce1" table:formula="of:=AVERAGE([.G79:.G88])" office:value-type="percentage" office:value="0.26633" calcext:value-type="percentage">
            <text:p>26,63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886" calcext:value-type="percentage">
            <text:p>18,86%</text:p>
          </table:table-cell>
          <table:table-cell table:style-name="ce2" office:value-type="percentage" office:value="0.1629" calcext:value-type="percentage">
            <text:p>16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1086" calcext:value-type="percentage">
            <text:p>10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771" calcext:value-type="percentage">
            <text:p>17,71%</text:p>
          </table:table-cell>
          <table:table-cell table:style-name="ce2" office:value-type="percentage" office:value="0.1314" calcext:value-type="percentage">
            <text:p>13,14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number-columns-repeated="2" table:style-name="ce2" office:value-type="percentage" office:value="0.1971" calcext:value-type="percentage">
            <text:p>19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number-columns-repeated="2"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743" calcext:value-type="percentage">
            <text:p>17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43" calcext:value-type="percentage">
            <text:p>19,43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 office:value-type="percentage" office:value="0.1229" calcext:value-type="percentage">
            <text:p>12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348" calcext:value-type="percentage">
            <text:p>3,48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1657" calcext:value-type="percentage">
            <text:p>16,5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6827" calcext:value-type="percentage">
            <text:p>6,83%</text:p>
          </table:table-cell>
          <table:table-cell table:style-name="ce1" table:formula="of:=AVERAGE([.C93:.C102])" office:value-type="percentage" office:value="0.06739" calcext:value-type="percentage">
            <text:p>6,74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6342" calcext:value-type="percentage">
            <text:p>16,34%</text:p>
          </table:table-cell>
          <table:table-cell table:style-name="ce1" table:formula="of:=AVERAGE([.G93:.G102])" office:value-type="percentage" office:value="0.15429" calcext:value-type="percentage">
            <text:p>15,4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441" calcext:value-type="percentage">
            <text:p>34,41%</text:p>
          </table:table-cell>
          <table:table-cell table:style-name="ce2" office:value-type="percentage" office:value="0.3118" calcext:value-type="percentage">
            <text:p>31,18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2313" calcext:value-type="percentage">
            <text:p>23,1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614" calcext:value-type="percentage">
            <text:p>16,14%</text:p>
          </table:table-cell>
          <table:table-cell table:style-name="ce2" office:value-type="percentage" office:value="0.1602" calcext:value-type="percentage">
            <text:p>16,0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971" calcext:value-type="percentage">
            <text:p>29,71%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2096" calcext:value-type="percentage">
            <text:p>20,96%</text:p>
          </table:table-cell>
          <table:table-cell table:style-name="ce2" office:value-type="percentage" office:value="0.2735" calcext:value-type="percentage">
            <text:p>27,35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235" calcext:value-type="percentage">
            <text:p>42,35%</text:p>
          </table:table-cell>
          <table:table-cell table:style-name="ce2" office:value-type="percentage" office:value="0.4529" calcext:value-type="percentage">
            <text:p>45,29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12" calcext:value-type="percentage">
            <text:p>20,12%</text:p>
          </table:table-cell>
          <table:table-cell table:style-name="ce2" office:value-type="percentage" office:value="0.247" calcext:value-type="percentage">
            <text:p>24,7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029" calcext:value-type="percentage">
            <text:p>30,29%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3529" calcext:value-type="percentage">
            <text:p>35,29%</text:p>
          </table:table-cell>
          <table:table-cell table:style-name="ce2" office:value-type="percentage" office:value="0.2735" calcext:value-type="percentage">
            <text:p>27,35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2108" calcext:value-type="percentage">
            <text:p>21,08%</text:p>
          </table:table-cell>
          <table:table-cell table:style-name="ce2" office:value-type="percentage" office:value="0.253" calcext:value-type="percentage">
            <text:p>25,3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687" calcext:value-type="percentage">
            <text:p>16,87%</text:p>
          </table:table-cell>
          <table:table-cell table:style-name="ce2" office:value-type="percentage" office:value="0.1819" calcext:value-type="percentage">
            <text:p>18,1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206" calcext:value-type="percentage">
            <text:p>20,60%</text:p>
          </table:table-cell>
          <table:table-cell table:style-name="ce2"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588" calcext:value-type="percentage">
            <text:p>35,88%</text:p>
          </table:table-cell>
          <table:table-cell table:style-name="ce2" office:value-type="percentage" office:value="0.3647" calcext:value-type="percentage">
            <text:p>36,47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759" calcext:value-type="percentage">
            <text:p>17,59%</text:p>
          </table:table-cell>
          <table:table-cell table:style-name="ce2" office:value-type="percentage" office:value="0.2133" calcext:value-type="percentage">
            <text:p>21,3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59" calcext:value-type="percentage">
            <text:p>15,90%</text:p>
          </table:table-cell>
          <table:table-cell table:style-name="ce2" office:value-type="percentage" office:value="0.1651" calcext:value-type="percentage">
            <text:p>16,5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5057" calcext:value-type="percentage">
            <text:p>35,06%</text:p>
          </table:table-cell>
          <table:table-cell table:style-name="ce1" table:formula="of:=AVERAGE([.C106:.C115])" office:value-type="percentage" office:value="0.34411" calcext:value-type="percentage">
            <text:p>34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9203" calcext:value-type="percentage">
            <text:p>19,20%</text:p>
          </table:table-cell>
          <table:table-cell table:style-name="ce1" table:formula="of:=AVERAGE([.G106:.G115])" office:value-type="percentage" office:value="0.21434" calcext:value-type="percentage">
            <text:p>21,4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632" calcext:value-type="percentage">
            <text:p>26,32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3289" calcext:value-type="percentage">
            <text:p>32,89%</text:p>
          </table:table-cell>
          <table:table-cell table:style-name="ce2" office:value-type="percentage" office:value="0.2724" calcext:value-type="percentage">
            <text:p>27,24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3105" calcext:value-type="percentage">
            <text:p>31,05%</text:p>
          </table:table-cell>
          <table:table-cell table:style-name="ce2" office:value-type="percentage" office:value="0.2895" calcext:value-type="percentage">
            <text:p>28,95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724" calcext:value-type="percentage">
            <text:p>37,24%</text:p>
          </table:table-cell>
          <table:table-cell table:style-name="ce2" office:value-type="percentage" office:value="0.2671" calcext:value-type="percentage">
            <text:p>26,71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3368" calcext:value-type="percentage">
            <text:p>33,68%</text:p>
          </table:table-cell>
          <table:table-cell table:style-name="ce2" office:value-type="percentage" office:value="0.3316" calcext:value-type="percentage">
            <text:p>3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684" calcext:value-type="percentage">
            <text:p>26,84%</text:p>
          </table:table-cell>
          <table:table-cell table:style-name="ce2" office:value-type="percentage" office:value="0.2408" calcext:value-type="percentage">
            <text:p>24,0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711" calcext:value-type="percentage">
            <text:p>27,11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579" calcext:value-type="percentage">
            <text:p>5,79%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382" calcext:value-type="percentage">
            <text:p>23,8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number-columns-repeated="2"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026" calcext:value-type="percentage">
            <text:p>30,26%</text:p>
          </table:table-cell>
          <table:table-cell table:style-name="ce2" office:value-type="percentage" office:value="0.3092" calcext:value-type="percentage">
            <text:p>30,9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855" calcext:value-type="percentage">
            <text:p>38,55%</text:p>
          </table:table-cell>
          <table:table-cell table:style-name="ce2" office:value-type="percentage" office:value="0.3132" calcext:value-type="percentage">
            <text:p>31,3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342" calcext:value-type="percentage">
            <text:p>33,42%</text:p>
          </table:table-cell>
          <table:table-cell table:style-name="ce2" office:value-type="percentage" office:value="0.2921" calcext:value-type="percentage">
            <text:p>29,2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21105" calcext:value-type="percentage">
            <text:p>21,11%</text:p>
          </table:table-cell>
          <table:table-cell table:style-name="ce1" table:formula="of:=AVERAGE([.C119:.C128])" office:value-type="percentage" office:value="0.19051" calcext:value-type="percentage">
            <text:p>19,05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31394" calcext:value-type="percentage">
            <text:p>31,39%</text:p>
          </table:table-cell>
          <table:table-cell table:style-name="ce1" table:formula="of:=AVERAGE([.G119:.G128])" office:value-type="percentage" office:value="0.27133" calcext:value-type="percentage">
            <text:p>27,13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number-columns-repeated="2" table:style-name="ce2" office:value-type="percentage" office:value="0.0944" calcext:value-type="percentage">
            <text:p>9,44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581" calcext:value-type="percentage">
            <text:p>25,81%</text:p>
          </table:table-cell>
          <table:table-cell table:style-name="ce2" office:value-type="percentage" office:value="0.2887" calcext:value-type="percentage">
            <text:p>28,8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889" calcext:value-type="percentage">
            <text:p>8,89%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565" calcext:value-type="percentage">
            <text:p>25,65%</text:p>
          </table:table-cell>
          <table:table-cell table:style-name="ce2" office:value-type="percentage" office:value="0.279" calcext:value-type="percentage">
            <text:p>27,90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number-columns-repeated="2" table:style-name="ce2"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574" calcext:value-type="percentage">
            <text:p>5,74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number-columns-repeated="2"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435" calcext:value-type="percentage">
            <text:p>34,35%</text:p>
          </table:table-cell>
          <table:table-cell table:style-name="ce2" office:value-type="percentage" office:value="0.3226" calcext:value-type="percentage">
            <text:p>32,26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694" calcext:value-type="percentage">
            <text:p>36,9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78" calcext:value-type="percentage">
            <text:p>7,78%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129" calcext:value-type="percentage">
            <text:p>31,29%</text:p>
          </table:table-cell>
          <table:table-cell table:style-name="ce2" office:value-type="percentage" office:value="0.3145" calcext:value-type="percentage">
            <text:p>31,45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774" calcext:value-type="percentage">
            <text:p>27,74%</text:p>
          </table:table-cell>
          <table:table-cell table:style-name="ce2" office:value-type="percentage" office:value="0.2742" calcext:value-type="percentage">
            <text:p>27,42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444" calcext:value-type="percentage">
            <text:p>4,44%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21" calcext:value-type="percentage">
            <text:p>22,10%</text:p>
          </table:table-cell>
          <table:table-cell table:style-name="ce2" office:value-type="percentage" office:value="0.2323" calcext:value-type="percentage">
            <text:p>2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1074" calcext:value-type="percentage">
            <text:p>10,74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452" calcext:value-type="percentage">
            <text:p>34,52%</text:p>
          </table:table-cell>
          <table:table-cell table:style-name="ce2" office:value-type="percentage" office:value="0.3388" calcext:value-type="percentage">
            <text:p>33,8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852" calcext:value-type="percentage">
            <text:p>6,85%</text:p>
          </table:table-cell>
          <table:table-cell table:style-name="ce1" table:formula="of:=AVERAGE([.C133:.C142])" office:value-type="percentage" office:value="0.06556" calcext:value-type="percentage">
            <text:p>6,56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9517" calcext:value-type="percentage">
            <text:p>29,52%</text:p>
          </table:table-cell>
          <table:table-cell table:style-name="ce1" table:formula="of:=AVERAGE([.G133:.G142])" office:value-type="percentage" office:value="0.29808" calcext:value-type="percentage">
            <text:p>29,8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 office:value-type="percentage" office:value="0.2783" calcext:value-type="percentage">
            <text:p>27,83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2" office:value-type="percentage" office:value="0.1645" calcext:value-type="percentage">
            <text:p>16,4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3242" calcext:value-type="percentage">
            <text:p>32,42%</text:p>
          </table:table-cell>
          <table:table-cell table:style-name="ce2" office:value-type="percentage" office:value="0.3628" calcext:value-type="percentage">
            <text:p>36,2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196" calcext:value-type="percentage">
            <text:p>41,96%</text:p>
          </table:table-cell>
          <table:table-cell table:style-name="ce2" office:value-type="percentage" office:value="0.4326" calcext:value-type="percentage">
            <text:p>43,26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4567" calcext:value-type="percentage">
            <text:p>45,67%</text:p>
          </table:table-cell>
          <table:table-cell table:style-name="ce2" office:value-type="percentage" office:value="0.3173" calcext:value-type="percentage">
            <text:p>31,7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04" calcext:value-type="percentage">
            <text:p>38,04%</text:p>
          </table:table-cell>
          <table:table-cell table:style-name="ce2" office:value-type="percentage" office:value="0.3696" calcext:value-type="percentage">
            <text:p>36,96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3779" calcext:value-type="percentage">
            <text:p>37,79%</text:p>
          </table:table-cell>
          <table:table-cell table:style-name="ce2" office:value-type="percentage" office:value="0.3593" calcext:value-type="percentage">
            <text:p>35,9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2761" calcext:value-type="percentage">
            <text:p>27,61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4377" calcext:value-type="percentage">
            <text:p>43,77%</text:p>
          </table:table-cell>
          <table:table-cell table:style-name="ce2" office:value-type="percentage" office:value="0.2432" calcext:value-type="percentage">
            <text:p>24,32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478" calcext:value-type="percentage">
            <text:p>34,78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 office:value-type="percentage" office:value="0.3413" calcext:value-type="percentage">
            <text:p>34,13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284" calcext:value-type="percentage">
            <text:p>28,40%</text:p>
          </table:table-cell>
          <table:table-cell table:style-name="ce2" office:value-type="percentage" office:value="0.2039" calcext:value-type="percentage">
            <text:p>20,3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935" calcext:value-type="percentage">
            <text:p>39,35%</text:p>
          </table:table-cell>
          <table:table-cell table:style-name="ce2" office:value-type="percentage" office:value="0.3674" calcext:value-type="percentage">
            <text:p>36,74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3212" calcext:value-type="percentage">
            <text:p>32,12%</text:p>
          </table:table-cell>
          <table:table-cell table:style-name="ce2" office:value-type="percentage" office:value="0.2835" calcext:value-type="percentage">
            <text:p>28,3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413" calcext:value-type="percentage">
            <text:p>34,13%</text:p>
          </table:table-cell>
          <table:table-cell table:style-name="ce2" office:value-type="percentage" office:value="0.3565" calcext:value-type="percentage">
            <text:p>35,65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 office:value-type="percentage" office:value="0.2935" calcext:value-type="percentage">
            <text:p>29,3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3261" calcext:value-type="percentage">
            <text:p>32,61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3229" calcext:value-type="percentage">
            <text:p>32,29%</text:p>
          </table:table-cell>
          <table:table-cell table:style-name="ce2" office:value-type="percentage" office:value="0.2753" calcext:value-type="percentage">
            <text:p>27,5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463" calcext:value-type="percentage">
            <text:p>34,63%</text:p>
          </table:table-cell>
          <table:table-cell table:style-name="ce1" table:formula="of:=AVERAGE([.C146:.C155])" office:value-type="percentage" office:value="0.33523" calcext:value-type="percentage">
            <text:p>33,52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32216" calcext:value-type="percentage">
            <text:p>32,22%</text:p>
          </table:table-cell>
          <table:table-cell table:style-name="ce1" table:formula="of:=AVERAGE([.G146:.G155])" office:value-type="percentage" office:value="0.27319" calcext:value-type="percentage">
            <text:p>27,3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875" calcext:value-type="percentage">
            <text:p>48,75%</text:p>
          </table:table-cell>
          <table:table-cell table:style-name="ce2" office:value-type="percentage" office:value="0.487" calcext:value-type="percentage">
            <text:p>48,7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25" calcext:value-type="percentage">
            <text:p>42,50%</text:p>
          </table:table-cell>
          <table:table-cell table:style-name="ce2" office:value-type="percentage" office:value="0.4315" calcext:value-type="percentage">
            <text:p>43,1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office:value-type="percentage" office:value="0.3855" calcext:value-type="percentage">
            <text:p>38,5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445" calcext:value-type="percentage">
            <text:p>44,45%</text:p>
          </table:table-cell>
          <table:table-cell table:style-name="ce2" office:value-type="percentage" office:value="0.405" calcext:value-type="percentage">
            <text:p>40,5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95" calcext:value-type="percentage">
            <text:p>19,5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15" calcext:value-type="percentage">
            <text:p>43,15%</text:p>
          </table:table-cell>
          <table:table-cell table:style-name="ce2" office:value-type="percentage" office:value="0.4505" calcext:value-type="percentage">
            <text:p>45,0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4215" calcext:value-type="percentage">
            <text:p>42,1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2" office:value-type="percentage" office:value="0.424" calcext:value-type="percentage">
            <text:p>42,40%</text:p>
          </table:table-cell>
          <table:table-cell table:style-name="ce2" office:value-type="percentage" office:value="0.408" calcext:value-type="percentage">
            <text:p>40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number-columns-repeated="2"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2" office:value-type="percentage" office:value="0.3905" calcext:value-type="percentage">
            <text:p>39,0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95" calcext:value-type="percentage">
            <text:p>29,5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2" office:value-type="percentage" office:value="0.4265" calcext:value-type="percentage">
            <text:p>42,65%</text:p>
          </table:table-cell>
          <table:table-cell table:style-name="ce2" office:value-type="percentage" office:value="0.4275" calcext:value-type="percentage">
            <text:p>42,7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406" calcext:value-type="percentage">
            <text:p>40,60%</text:p>
          </table:table-cell>
          <table:table-cell table:style-name="ce2" office:value-type="percentage" office:value="0.4085" calcext:value-type="percentage">
            <text:p>40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245" calcext:value-type="percentage">
            <text:p>22,45%</text:p>
          </table:table-cell>
          <table:table-cell table:style-name="ce1" table:formula="of:=AVERAGE([.C158:.C167])" office:value-type="percentage" office:value="0.223" calcext:value-type="percentage">
            <text:p>22,3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315" calcext:value-type="percentage">
            <text:p>43,15%</text:p>
          </table:table-cell>
          <table:table-cell table:style-name="ce1" table:formula="of:=AVERAGE([.G158:.G167])" office:value-type="percentage" office:value="0.42155" calcext:value-type="percentage">
            <text:p>42,16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365" calcext:value-type="percentage">
            <text:p>23,65%</text:p>
          </table:table-cell>
          <table:table-cell table:style-name="ce3" office:value-type="percentage" office:value="0.2419" calcext:value-type="percentage">
            <text:p>24,1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68" calcext:value-type="percentage">
            <text:p>25,68%</text:p>
          </table:table-cell>
          <table:table-cell table:style-name="ce3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 office:value-type="percentage" office:value="0.0975" calcext:value-type="percentage">
            <text:p>9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811" calcext:value-type="percentage">
            <text:p>28,11%</text:p>
          </table:table-cell>
          <table:table-cell table:style-name="ce3" office:value-type="percentage" office:value="0.2689" calcext:value-type="percentage">
            <text:p>26,8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649" calcext:value-type="percentage">
            <text:p>26,49%</text:p>
          </table:table-cell>
          <table:table-cell table:style-name="ce3" office:value-type="percentage" office:value="0.2838" calcext:value-type="percentage">
            <text:p>28,38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95" calcext:value-type="percentage">
            <text:p>9,5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757" calcext:value-type="percentage">
            <text:p>27,57%</text:p>
          </table:table-cell>
          <table:table-cell table:style-name="ce3" office:value-type="percentage" office:value="0.2541" calcext:value-type="percentage">
            <text:p>25,4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959" calcext:value-type="percentage">
            <text:p>29,59%</text:p>
          </table:table-cell>
          <table:table-cell table:style-name="ce3" office:value-type="percentage" office:value="0.2865" calcext:value-type="percentage">
            <text:p>28,65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824" calcext:value-type="percentage">
            <text:p>28,24%</text:p>
          </table:table-cell>
          <table:table-cell table:style-name="ce3" office:value-type="percentage" office:value="0.2716" calcext:value-type="percentage">
            <text:p>27,1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1959" calcext:value-type="percentage">
            <text:p>19,5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97" calcext:value-type="percentage">
            <text:p>22,97%</text:p>
          </table:table-cell>
          <table:table-cell table:style-name="ce3" office:value-type="percentage" office:value="0.223" calcext:value-type="percentage">
            <text:p>22,3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1959" calcext:value-type="percentage">
            <text:p>19,5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65" calcext:value-type="percentage">
            <text:p>6,50%</text:p>
          </table:table-cell>
          <table:table-cell table:style-name="ce1" table:formula="of:=AVERAGE([.C171:.C180])" office:value-type="percentage" office:value="0.05725" calcext:value-type="percentage">
            <text:p>5,73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523" calcext:value-type="percentage">
            <text:p>25,23%</text:p>
          </table:table-cell>
          <table:table-cell table:style-name="ce1" table:formula="of:=AVERAGE([.G171:.G180])" office:value-type="percentage" office:value="0.24716" calcext:value-type="percentage">
            <text:p>24,7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2" office:value-type="percentage" office:value="0.0786" calcext:value-type="percentage">
            <text:p>7,86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2" office:value-type="percentage" office:value="0.2529" calcext:value-type="percentage">
            <text:p>2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304" calcext:value-type="percentage">
            <text:p>3,04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2294" calcext:value-type="percentage">
            <text:p>22,94%</text:p>
          </table:table-cell>
          <table:table-cell table:style-name="ce2" office:value-type="percentage" office:value="0.2882" calcext:value-type="percentage">
            <text:p>28,8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57" calcext:value-type="percentage">
            <text:p>13,57%</text:p>
          </table:table-cell>
          <table:table-cell table:style-name="ce2" office:value-type="percentage" office:value="0.1268" calcext:value-type="percentage">
            <text:p>12,68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059" calcext:value-type="percentage">
            <text:p>20,59%</text:p>
          </table:table-cell>
          <table:table-cell table:style-name="ce2" office:value-type="percentage" office:value="0.2412" calcext:value-type="percentage">
            <text:p>24,1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643" calcext:value-type="percentage">
            <text:p>6,43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number-columns-repeated="2" table:style-name="ce2" office:value-type="percentage" office:value="0.0839" calcext:value-type="percentage">
            <text:p>8,3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2353" calcext:value-type="percentage">
            <text:p>23,53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2353" calcext:value-type="percentage">
            <text:p>2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964" calcext:value-type="percentage">
            <text:p>9,64%</text:p>
          </table:table-cell>
          <table:table-cell table:style-name="ce2" office:value-type="percentage" office:value="0.0929" calcext:value-type="percentage">
            <text:p>9,29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2235" calcext:value-type="percentage">
            <text:p>22,35%</text:p>
          </table:table-cell>
          <table:table-cell table:style-name="ce2" office:value-type="percentage" office:value="0.1824" calcext:value-type="percentage">
            <text:p>18,2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821" calcext:value-type="percentage">
            <text:p>8,21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2" office:value-type="percentage" office:value="0.2647" calcext:value-type="percentage">
            <text:p>2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.1471" calcext:value-type="percentage">
            <text:p>14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8141" calcext:value-type="percentage">
            <text:p>8,14%</text:p>
          </table:table-cell>
          <table:table-cell table:style-name="ce1" table:formula="of:=AVERAGE([.C183:.C192])" office:value-type="percentage" office:value="0.06358" calcext:value-type="percentage">
            <text:p>6,36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23119" calcext:value-type="percentage">
            <text:p>23,12%</text:p>
          </table:table-cell>
          <table:table-cell table:style-name="ce1" table:formula="of:=AVERAGE([.G183:.G192])" office:value-type="percentage" office:value="0.21647" calcext:value-type="percentage">
            <text:p>21,6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2333" calcext:value-type="percentage">
            <text:p>23,33%</text:p>
          </table:table-cell>
          <table:table-cell table:style-name="ce3" office:value-type="percentage" office:value="0.2935" calcext:value-type="percentage">
            <text:p>29,35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678" calcext:value-type="percentage">
            <text:p>67,80%</text:p>
          </table:table-cell>
          <table:table-cell table:style-name="ce2" office:value-type="percentage" office:value="0.638" calcext:value-type="percentage">
            <text:p>63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3033" calcext:value-type="percentage">
            <text:p>30,33%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3467" calcext:value-type="percentage">
            <text:p>34,67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6" calcext:value-type="percentage">
            <text:p>62,6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1767" calcext:value-type="percentage">
            <text:p>17,67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92" calcext:value-type="percentage">
            <text:p>59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43" calcext:value-type="percentage">
            <text:p>43,00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706" calcext:value-type="percentage">
            <text:p>70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16" calcext:value-type="percentage">
            <text:p>16,00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614" calcext:value-type="percentage">
            <text:p>61,4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2433" calcext:value-type="percentage">
            <text:p>24,33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628" calcext:value-type="percentage">
            <text:p>62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21" calcext:value-type="percentage">
            <text:p>2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37" calcext:value-type="percentage">
            <text:p>37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27733" calcext:value-type="percentage">
            <text:p>27,73%</text:p>
          </table:table-cell>
          <table:table-cell table:style-name="ce1" table:formula="of:=AVERAGE([.C196:.C205])" office:value-type="percentage" office:value="0.09234" calcext:value-type="percentage">
            <text:p>9,2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6362" calcext:value-type="percentage">
            <text:p>63,62%</text:p>
          </table:table-cell>
          <table:table-cell table:style-name="ce1" table:formula="of:=AVERAGE([.G196:.G205])" office:value-type="percentage" office:value="0.6348" calcext:value-type="percentage">
            <text:p>63,4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194" calcext:value-type="percentage">
            <text:p>19,4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48" calcext:value-type="percentage">
            <text:p>4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36" calcext:value-type="percentage">
            <text:p>13,6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8" calcext:value-type="percentage">
            <text:p>4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222" calcext:value-type="percentage">
            <text:p>22,20%</text:p>
          </table:table-cell>
          <table:table-cell table:style-name="ce2" office:value-type="percentage" office:value="0.084" calcext:value-type="percentage">
            <text:p>8,4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274" calcext:value-type="percentage">
            <text:p>27,4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42" calcext:value-type="percentage">
            <text:p>4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238" calcext:value-type="percentage">
            <text:p>23,80%</text:p>
          </table:table-cell>
          <table:table-cell table:style-name="ce2" office:value-type="percentage" office:value="0.178" calcext:value-type="percentage">
            <text:p>17,8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12" calcext:value-type="percentage">
            <text:p>1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12" calcext:value-type="percentage">
            <text:p>11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254" calcext:value-type="percentage">
            <text:p>25,40%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226" calcext:value-type="percentage">
            <text:p>22,60%</text:p>
          </table:table-cell>
          <table:table-cell table:style-name="ce2" office:value-type="percentage" office:value="0.166" calcext:value-type="percentage">
            <text:p>16,6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32" calcext:value-type="percentage">
            <text:p>3,2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2156" calcext:value-type="percentage">
            <text:p>21,56%</text:p>
          </table:table-cell>
          <table:table-cell table:style-name="ce1" table:formula="of:=AVERAGE([.C208:.C217])" office:value-type="percentage" office:value="0.0968" calcext:value-type="percentage">
            <text:p>9,68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564" calcext:value-type="percentage">
            <text:p>5,64%</text:p>
          </table:table-cell>
          <table:table-cell table:style-name="ce1" table:formula="of:=AVERAGE([.G208:.G217])" office:value-type="percentage" office:value="0.0352" calcext:value-type="percentage">
            <text:p>3,5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929" calcext:value-type="percentage">
            <text:p>2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214" calcext:value-type="percentage">
            <text:p>22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714" calcext:value-type="percentage">
            <text:p>27,14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571" calcext:value-type="percentage">
            <text:p>35,71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2214" calcext:value-type="percentage">
            <text:p>22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3571" calcext:value-type="percentage">
            <text:p>35,71%</text:p>
          </table:table-cell>
          <table:table-cell table:style-name="ce2"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2929" calcext:value-type="percentage">
            <text:p>2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214" calcext:value-type="percentage">
            <text:p>32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787" calcext:value-type="percentage">
            <text:p>17,87%</text:p>
          </table:table-cell>
          <table:table-cell table:style-name="ce1" table:formula="of:=AVERAGE([.C220:.C229])" office:value-type="percentage" office:value="0.17659" calcext:value-type="percentage">
            <text:p>17,66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7642" calcext:value-type="percentage">
            <text:p>27,64%</text:p>
          </table:table-cell>
          <table:table-cell table:style-name="ce1" table:formula="of:=AVERAGE([.G220:.G229])" office:value-type="percentage" office:value="0.25214" calcext:value-type="percentage">
            <text:p>25,21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3444" calcext:value-type="percentage">
            <text:p>34,44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481" calcext:value-type="percentage">
            <text:p>14,8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3037" calcext:value-type="percentage">
            <text:p>30,37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48" calcext:value-type="percentage">
            <text:p>16,48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3481" calcext:value-type="percentage">
            <text:p>34,81%</text:p>
          </table:table-cell>
          <table:table-cell table:style-name="ce2" office:value-type="percentage" office:value="0.3444" calcext:value-type="percentage">
            <text:p>34,44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852" calcext:value-type="percentage">
            <text:p>28,52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3333" calcext:value-type="percentage">
            <text:p>33,33%</text:p>
          </table:table-cell>
          <table:table-cell table:style-name="ce2" office:value-type="percentage" office:value="0.3148" calcext:value-type="percentage">
            <text:p>31,48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352" calcext:value-type="percentage">
            <text:p>13,5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3778" calcext:value-type="percentage">
            <text:p>37,78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833" calcext:value-type="percentage">
            <text:p>18,3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4037" calcext:value-type="percentage">
            <text:p>40,37%</text:p>
          </table:table-cell>
          <table:table-cell table:style-name="ce2" office:value-type="percentage" office:value="0.3148" calcext:value-type="percentage">
            <text:p>31,48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number-columns-repeated="2" table:style-name="ce2"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33926" calcext:value-type="percentage">
            <text:p>33,93%</text:p>
          </table:table-cell>
          <table:table-cell table:style-name="ce1" table:formula="of:=AVERAGE([.C233:.C242])" office:value-type="percentage" office:value="0.27815" calcext:value-type="percentage">
            <text:p>27,82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5575" calcext:value-type="percentage">
            <text:p>15,58%</text:p>
          </table:table-cell>
          <table:table-cell table:style-name="ce1" table:formula="of:=AVERAGE([.G233:.G242])" office:value-type="percentage" office:value="0.15444" calcext:value-type="percentage">
            <text:p>15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5988" calcext:value-type="percentage">
            <text:p>59,88%</text:p>
          </table:table-cell>
          <table:table-cell table:style-name="ce2" office:value-type="percentage" office:value="0.8196" calcext:value-type="percentage">
            <text:p>81,96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6112" calcext:value-type="percentage">
            <text:p>61,12%</text:p>
          </table:table-cell>
          <table:table-cell table:style-name="ce2" office:value-type="percentage" office:value="0.4635" calcext:value-type="percentage">
            <text:p>46,3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4541" calcext:value-type="percentage">
            <text:p>45,41%</text:p>
          </table:table-cell>
          <table:table-cell table:style-name="ce2" office:value-type="percentage" office:value="0.5008" calcext:value-type="percentage">
            <text:p>50,08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874" calcext:value-type="percentage">
            <text:p>87,40%</text:p>
          </table:table-cell>
          <table:table-cell table:style-name="ce2" office:value-type="percentage" office:value="0.4048" calcext:value-type="percentage">
            <text:p>40,48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5848" calcext:value-type="percentage">
            <text:p>58,48%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number-columns-repeated="2" table:style-name="ce2" office:value-type="percentage" office:value="0.0739" calcext:value-type="percentage">
            <text:p>7,3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437" calcext:value-type="percentage">
            <text:p>43,70%</text:p>
          </table:table-cell>
          <table:table-cell table:style-name="ce2" office:value-type="percentage" office:value="0.4868" calcext:value-type="percentage">
            <text:p>48,68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6952" calcext:value-type="percentage">
            <text:p>69,52%</text:p>
          </table:table-cell>
          <table:table-cell table:style-name="ce2" office:value-type="percentage" office:value="0.4914" calcext:value-type="percentage">
            <text:p>49,14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6376" calcext:value-type="percentage">
            <text:p>63,76%</text:p>
          </table:table-cell>
          <table:table-cell table:style-name="ce2" office:value-type="percentage" office:value="0.8694" calcext:value-type="percentage">
            <text:p>86,94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457" calcext:value-type="percentage">
            <text:p>4,5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7963" calcext:value-type="percentage">
            <text:p>79,63%</text:p>
          </table:table-cell>
          <table:table-cell table:style-name="ce2" office:value-type="percentage" office:value="0.5614" calcext:value-type="percentage">
            <text:p>56,14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818" calcext:value-type="percentage">
            <text:p>81,80%</text:p>
          </table:table-cell>
          <table:table-cell table:style-name="ce2" office:value-type="percentage" office:value="0.8212" calcext:value-type="percentage">
            <text:p>82,12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6507" calcext:value-type="percentage">
            <text:p>65,07%</text:p>
          </table:table-cell>
          <table:table-cell table:style-name="ce1" table:formula="of:=AVERAGE([.C245:.C254])" office:value-type="percentage" office:value="0.58497" calcext:value-type="percentage">
            <text:p>58,50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282" calcext:value-type="percentage">
            <text:p>6,28%</text:p>
          </table:table-cell>
          <table:table-cell table:style-name="ce1" table:formula="of:=AVERAGE([.G245:.G254])" office:value-type="percentage" office:value="0.06565" calcext:value-type="percentage">
            <text:p>6,57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4555" calcext:value-type="percentage">
            <text:p>45,55%</text:p>
          </table:table-cell>
          <table:table-cell table:style-name="ce2" office:value-type="percentage" office:value="0.6157" calcext:value-type="percentage">
            <text:p>61,57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405" calcext:value-type="percentage">
            <text:p>24,05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217" calcext:value-type="percentage">
            <text:p>42,17%</text:p>
          </table:table-cell>
          <table:table-cell table:style-name="ce2" office:value-type="percentage" office:value="0.6068" calcext:value-type="percentage">
            <text:p>60,68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973" calcext:value-type="percentage">
            <text:p>29,73%</text:p>
          </table:table-cell>
          <table:table-cell table:style-name="ce2" office:value-type="percentage" office:value="0.2257" calcext:value-type="percentage">
            <text:p>22,5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911" calcext:value-type="percentage">
            <text:p>49,11%</text:p>
          </table:table-cell>
          <table:table-cell table:style-name="ce2" office:value-type="percentage" office:value="0.3915" calcext:value-type="percentage">
            <text:p>39,15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122" calcext:value-type="percentage">
            <text:p>21,22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2" office:value-type="percentage" office:value="0.6335" calcext:value-type="percentage">
            <text:p>63,35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216" calcext:value-type="percentage">
            <text:p>22,16%</text:p>
          </table:table-cell>
          <table:table-cell table:style-name="ce2" office:value-type="percentage" office:value="0.2811" calcext:value-type="percentage">
            <text:p>28,1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3381" calcext:value-type="percentage">
            <text:p>33,81%</text:p>
          </table:table-cell>
          <table:table-cell table:style-name="ce2" office:value-type="percentage" office:value="0.3505" calcext:value-type="percentage">
            <text:p>35,05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378" calcext:value-type="percentage">
            <text:p>23,78%</text:p>
          </table:table-cell>
          <table:table-cell table:style-name="ce2" office:value-type="percentage" office:value="0.1973" calcext:value-type="percentage">
            <text:p>19,7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2" office:value-type="percentage" office:value="0.4644" calcext:value-type="percentage">
            <text:p>46,44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851" calcext:value-type="percentage">
            <text:p>28,51%</text:p>
          </table:table-cell>
          <table:table-cell table:style-name="ce2" office:value-type="percentage" office:value="0.2568" calcext:value-type="percentage">
            <text:p>25,6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093" calcext:value-type="percentage">
            <text:p>40,93%</text:p>
          </table:table-cell>
          <table:table-cell table:style-name="ce2" office:value-type="percentage" office:value="0.5338" calcext:value-type="percentage">
            <text:p>53,38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919" calcext:value-type="percentage">
            <text:p>29,19%</text:p>
          </table:table-cell>
          <table:table-cell table:style-name="ce2" office:value-type="percentage" office:value="0.1946" calcext:value-type="percentage">
            <text:p>19,4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5356" calcext:value-type="percentage">
            <text:p>53,56%</text:p>
          </table:table-cell>
          <table:table-cell table:style-name="ce2" office:value-type="percentage" office:value="0.7402" calcext:value-type="percentage">
            <text:p>74,02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2932" calcext:value-type="percentage">
            <text:p>29,32%</text:p>
          </table:table-cell>
          <table:table-cell table:style-name="ce2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3683" calcext:value-type="percentage">
            <text:p>36,83%</text:p>
          </table:table-cell>
          <table:table-cell table:style-name="ce2" office:value-type="percentage" office:value="0.7278" calcext:value-type="percentage">
            <text:p>72,78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2446" calcext:value-type="percentage">
            <text:p>24,46%</text:p>
          </table:table-cell>
          <table:table-cell table:style-name="ce2" office:value-type="percentage" office:value="0.1973" calcext:value-type="percentage">
            <text:p>19,7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8256" calcext:value-type="percentage">
            <text:p>82,56%</text:p>
          </table:table-cell>
          <table:table-cell table:style-name="ce2" office:value-type="percentage" office:value="0.4004" calcext:value-type="percentage">
            <text:p>40,04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14" calcext:value-type="percentage">
            <text:p>20,14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7633" calcext:value-type="percentage">
            <text:p>47,63%</text:p>
          </table:table-cell>
          <table:table-cell table:style-name="ce1" table:formula="of:=AVERAGE([.C257:.C266])" office:value-type="percentage" office:value="0.54646" calcext:value-type="percentage">
            <text:p>54,65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5534" calcext:value-type="percentage">
            <text:p>25,53%</text:p>
          </table:table-cell>
          <table:table-cell table:style-name="ce1" table:formula="of:=AVERAGE([.G257:.G266])" office:value-type="percentage" office:value="0.21785" calcext:value-type="percentage">
            <text:p>21,79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43.777" calcext:value-type="float">
            <text:p>1443,777</text:p>
          </table:table-cell>
          <table:table-cell table:style-name="ce6" table:number-columns-repeated="2"/>
          <table:table-cell table:style-name="ce6" office:value-type="string" calcext:value-type="string">
            <text:p>BL_1</text:p>
          </table:table-cell>
          <table:table-cell table:style-name="ce10" office:value-type="float" office:value="0.268" calcext:value-type="float">
            <text:p>2,68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44.453" calcext:value-type="float">
            <text:p>1744,453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139" calcext:value-type="float">
            <text:p>1,39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06.259" calcext:value-type="float">
            <text:p>2206,259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814" calcext:value-type="float">
            <text:p>0,81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32.824" calcext:value-type="float">
            <text:p>1832,824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6.007" calcext:value-type="float">
            <text:p>6,01E+00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float" office:value="1878.148" calcext:value-type="float">
            <text:p>1878,148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623" calcext:value-type="float">
            <text:p>6,23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office:value-type="float" office:value="1885.723" calcext:value-type="float">
            <text:p>1885,723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632" calcext:value-type="float">
            <text:p>6,32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office:value-type="float" office:value="1528.211" calcext:value-type="float">
            <text:p>1528,211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office:value-type="float" office:value="1991.195" calcext:value-type="float">
            <text:p>1991,195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0.0992" calcext:value-type="float">
            <text:p>9,92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office:value-type="float" office:value="1835.434" calcext:value-type="float">
            <text:p>1835,434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2.114" calcext:value-type="float">
            <text:p>2,11E+00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float" office:value="1916.83" calcext:value-type="float">
            <text:p>1916,83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826.2854" calcext:value-type="float">
            <text:p>1826,2854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1.21601" calcext:value-type="float">
            <text:p>1,21601</text:p>
          </table:table-cell>
          <table:table-cell table:style-name="ce11" table:formula="of:=AVERAGE([.G270:.G279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float" office:value="2372.791" calcext:value-type="float">
            <text:p>2372,7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office:value-type="float" office:value="1293.914" calcext:value-type="float">
            <text:p>1293,9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203" calcext:value-type="float">
            <text:p>0,203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office:value-type="float" office:value="2336.297" calcext:value-type="float">
            <text:p>2336,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Default" office:value-type="float" office:value="2735.478" calcext:value-type="float">
            <text:p>2735,47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399" calcext:value-type="float">
            <text:p>0,399</text:p>
          </table:table-cell>
          <table:table-cell table:style-name="ce6" table:number-columns-repeated="2"/>
          <table:table-cell table:style-name="ce6" office:value-type="string" calcext:value-type="string">
            <text:p>Baseball_5</text:p>
          </table:table-cell>
          <table:table-cell table:style-name="ce6" office:value-type="float" office:value="2062.327" calcext:value-type="float">
            <text:p>2062,3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287.657" calcext:value-type="float">
            <text:p>1287,6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752" calcext:value-type="float">
            <text:p>0,0752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409.456" calcext:value-type="float">
            <text:p>2409,4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2.068" calcext:value-type="float">
            <text:p>2,068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729.485" calcext:value-type="float">
            <text:p>3729,4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629" calcext:value-type="float">
            <text:p>0,629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415.827" calcext:value-type="float">
            <text:p>2415,8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869.867" calcext:value-type="float">
            <text:p>2869,867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0.41132" calcext:value-type="float">
            <text:p>0,41132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2351.3099" calcext:value-type="float">
            <text:p>2351,3099</text:p>
          </table:table-cell>
          <table:table-cell table:style-name="ce5" table:formula="of:=AVERAGE([.G282:.G29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2.61" calcext:value-type="float">
            <text:p>12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7" calcext:value-type="float">
            <text:p>0,177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5.17" calcext:value-type="float">
            <text:p>15,1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0.91" calcext:value-type="float">
            <text:p>10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4.03" calcext:value-type="float">
            <text:p>14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7.66" calcext:value-type="float">
            <text:p>17,6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3.09" calcext:value-type="float">
            <text:p>13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82" calcext:value-type="float">
            <text:p>0,182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3.07" calcext:value-type="float">
            <text:p>13,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3" calcext:value-type="float">
            <text:p>0,17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9.52" calcext:value-type="float">
            <text:p>9,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7" calcext:value-type="float">
            <text:p>0,147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12.17" calcext:value-type="float">
            <text:p>12,17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684" calcext:value-type="float">
            <text:p>0,1684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12.996" calcext:value-type="float">
            <text:p>12,996</text:p>
          </table:table-cell>
          <table:table-cell table:style-name="ce5" table:formula="of:=AVERAGE([.G294:.G30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497" calcext:value-type="float">
            <text:p>0,4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824" calcext:value-type="float">
            <text:p>0,824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533" calcext:value-type="float">
            <text:p>0,5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0.693" calcext:value-type="float">
            <text:p>0,6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64" calcext:value-type="float">
            <text:p>0,26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975" calcext:value-type="float">
            <text:p>0,9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593" calcext:value-type="float">
            <text:p>0,593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.424" calcext:value-type="float">
            <text:p>1,4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33" calcext:value-type="float">
            <text:p>0,233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0.633" calcext:value-type="float">
            <text:p>0,6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float" office:value="1.206" calcext:value-type="float">
            <text:p>1,20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87" calcext:value-type="float">
            <text:p>0,187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3586" calcext:value-type="float">
            <text:p>0,3586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0.7965" calcext:value-type="float">
            <text:p>0,7965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481" calcext:value-type="float">
            <text:p>1,481</text:p>
          </table:table-cell>
          <table:table-cell table:style-name="ce6" table:number-columns-repeated="2"/>
          <table:table-cell table:style-name="ce6" office:value-type="string" calcext:value-type="string">
            <text:p>Laser_1</text:p>
          </table:table-cell>
          <table:table-cell table:style-name="ce6" office:value-type="float" office:value="0.0404" calcext:value-type="float">
            <text:p>0,040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0.511" calcext:value-type="float">
            <text:p>0,511</text:p>
          </table:table-cell>
          <table:table-cell table:style-name="ce6" table:number-columns-repeated="2"/>
          <table:table-cell table:style-name="ce6" office:value-type="string" calcext:value-type="string">
            <text:p>Laser_2</text:p>
          </table:table-cell>
          <table:table-cell table:style-name="ce6" office:value-type="float" office:value="0.0865" calcext:value-type="float">
            <text:p>0,08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8896" calcext:value-type="float">
            <text:p>0,8896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37" calcext:value-type="float">
            <text:p>0,1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626" calcext:value-type="float">
            <text:p>1,626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722" calcext:value-type="float">
            <text:p>0,72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40.652" calcext:value-type="float">
            <text:p>40,652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4" calcext:value-type="float">
            <text:p>0,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576" calcext:value-type="float">
            <text:p>1,576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345" calcext:value-type="float">
            <text:p>0,3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061" calcext:value-type="float">
            <text:p>3,061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983" calcext:value-type="float">
            <text:p>0,983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53" calcext:value-type="float">
            <text:p>0,05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8.584" calcext:value-type="float">
            <text:p>8,58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066" calcext:value-type="float">
            <text:p>0,606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5.99086" calcext:value-type="float">
            <text:p>5,99086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0.36555" calcext:value-type="float">
            <text:p>0,36555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2255.134" calcext:value-type="float">
            <text:p>2255,13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86.143" calcext:value-type="float">
            <text:p>186,14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761.36" calcext:value-type="float">
            <text:p>1761,3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186.553" calcext:value-type="float">
            <text:p>186,55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579.345" calcext:value-type="float">
            <text:p>1579,34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167.548" calcext:value-type="float">
            <text:p>167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537.119" calcext:value-type="float">
            <text:p>2537,11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70.512" calcext:value-type="float">
            <text:p>170,5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422.273" calcext:value-type="float">
            <text:p>2422,27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54.505" calcext:value-type="float">
            <text:p>154,50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116.47" calcext:value-type="float">
            <text:p>2116,47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7.74" calcext:value-type="float">
            <text:p>237,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105.488" calcext:value-type="float">
            <text:p>2105,488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26.799" calcext:value-type="float">
            <text:p>126,7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2086.366" calcext:value-type="float">
            <text:p>2086,366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57.099" calcext:value-type="float">
            <text:p>15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126.786" calcext:value-type="float">
            <text:p>2126,786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217.793" calcext:value-type="float">
            <text:p>217,7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136.88" calcext:value-type="float">
            <text:p>1136,88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67.598" calcext:value-type="float">
            <text:p>167,59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012.7221" calcext:value-type="float">
            <text:p>2012,7221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77.229" calcext:value-type="float">
            <text:p>177,229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27.596" calcext:value-type="float">
            <text:p>27,596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4.357" calcext:value-type="float">
            <text:p>4,3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5.801" calcext:value-type="float">
            <text:p>5,801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997" calcext:value-type="float">
            <text:p>3,9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7.945" calcext:value-type="float">
            <text:p>7,94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284" calcext:value-type="float">
            <text:p>3,28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92" calcext:value-type="float">
            <text:p>3,1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636" calcext:value-type="float">
            <text:p>2,636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3.335" calcext:value-type="float">
            <text:p>3,335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955" calcext:value-type="float">
            <text:p>3,9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5.004" calcext:value-type="float">
            <text:p>5,004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13" calcext:value-type="float">
            <text:p>4,71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.438" calcext:value-type="float">
            <text:p>1,43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549" calcext:value-type="float">
            <text:p>3,54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367" calcext:value-type="float">
            <text:p>3,3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1.707" calcext:value-type="float">
            <text:p>11,707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4.011" calcext:value-type="float">
            <text:p>4,01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6.6245" calcext:value-type="float">
            <text:p>6,6245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8182" calcext:value-type="float">
            <text:p>3,8182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655" calcext:value-type="float">
            <text:p>8,65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4.843" calcext:value-type="float">
            <text:p>4,84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612" calcext:value-type="float">
            <text:p>7,612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30.447" calcext:value-type="float">
            <text:p>30,44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36" calcext:value-type="float">
            <text:p>9,03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.22" calcext:value-type="float">
            <text:p>3,2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857" calcext:value-type="float">
            <text:p>7,857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2.205" calcext:value-type="float">
            <text:p>12,20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1" calcext:value-type="float">
            <text:p>7,641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41.826" calcext:value-type="float">
            <text:p>41,82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68" calcext:value-type="float">
            <text:p>8,068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0.187" calcext:value-type="float">
            <text:p>10,18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137" calcext:value-type="float">
            <text:p>9,137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687" calcext:value-type="float">
            <text:p>1,68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26" calcext:value-type="float">
            <text:p>8,026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0.476" calcext:value-type="float">
            <text:p>10,47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22.081" calcext:value-type="float">
            <text:p>22,08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0.852" calcext:value-type="float">
            <text:p>10,85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09" calcext:value-type="float">
            <text:p>7,09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66" calcext:value-type="float">
            <text:p>1,766</text:p>
          </table:table-cell>
          <table:table-cell table:style-name="ce6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9.5203" calcext:value-type="float">
            <text:p>9,5203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2.7509" calcext:value-type="float">
            <text:p>12,7509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715" calcext:value-type="float">
            <text:p>148,71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226.177" calcext:value-type="float">
            <text:p>226,1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30.395" calcext:value-type="float">
            <text:p>130,39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281.157" calcext:value-type="float">
            <text:p>281,1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2.494" calcext:value-type="float">
            <text:p>152,494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244.6199" calcext:value-type="float">
            <text:p>244,61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5.762" calcext:value-type="float">
            <text:p>175,76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22.612" calcext:value-type="float">
            <text:p>22,6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7.839" calcext:value-type="float">
            <text:p>147,839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232.871" calcext:value-type="float">
            <text:p>232,8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53.305" calcext:value-type="float">
            <text:p>153,305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289.532" calcext:value-type="float">
            <text:p>289,5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3.197" calcext:value-type="float">
            <text:p>173,197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float" office:value="187.654" calcext:value-type="float">
            <text:p>187,6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.3003" calcext:value-type="float">
            <text:p>15,3003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office:value-type="float" office:value="245.7198" calcext:value-type="float">
            <text:p>245,719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57.007" calcext:value-type="float">
            <text:p>157,007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office:value-type="float" office:value="156.3297" calcext:value-type="float">
            <text:p>156,3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6.412" calcext:value-type="float">
            <text:p>156,412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float" office:value="315.544" calcext:value-type="float">
            <text:p>315,54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1.04263" calcext:value-type="float">
            <text:p>141,04263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float" office:value="220.22164" calcext:value-type="float">
            <text:p>220,22164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422.327" calcext:value-type="float">
            <text:p>422,327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59.044" calcext:value-type="float">
            <text:p>559,04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426.706" calcext:value-type="float">
            <text:p>426,706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68.33" calcext:value-type="float">
            <text:p>668,33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335.368" calcext:value-type="float">
            <text:p>335,368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803.887" calcext:value-type="float">
            <text:p>803,88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313.465" calcext:value-type="float">
            <text:p>313,465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619.725" calcext:value-type="float">
            <text:p>619,72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624.451" calcext:value-type="float">
            <text:p>624,45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04.654" calcext:value-type="float">
            <text:p>804,65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466.375" calcext:value-type="float">
            <text:p>466,37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534.677" calcext:value-type="float">
            <text:p>534,677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868.1098" calcext:value-type="float">
            <text:p>868,10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069.197" calcext:value-type="float">
            <text:p>1069,19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59.401" calcext:value-type="float">
            <text:p>359,40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968.514" calcext:value-type="float">
            <text:p>968,51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518.502" calcext:value-type="float">
            <text:p>518,502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661.401" calcext:value-type="float">
            <text:p>661,401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441.862125" calcext:value-type="float">
            <text:p>441,862125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748.92368" calcext:value-type="float">
            <text:p>748,92368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330.346" calcext:value-type="float">
            <text:p>330,346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600.255" calcext:value-type="float">
            <text:p>600,255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738" calcext:value-type="float">
            <text:p>0,73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397.407" calcext:value-type="float">
            <text:p>397,40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461.7" calcext:value-type="float">
            <text:p>461,7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274" calcext:value-type="float">
            <text:p>479,274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77" calcext:value-type="float">
            <text:p>0,47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581.695" calcext:value-type="float">
            <text:p>581,695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855" calcext:value-type="float">
            <text:p>0,085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23.551" calcext:value-type="float">
            <text:p>323,551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41.401" calcext:value-type="float">
            <text:p>441,401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23.949" calcext:value-type="float">
            <text:p>423,949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19.962" calcext:value-type="float">
            <text:p>519,962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55.954" calcext:value-type="float">
            <text:p>455,954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0783" calcext:value-type="float">
            <text:p>0,30783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9" calcext:value-type="float">
            <text:p>0,101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109" calcext:value-type="float">
            <text:p>1,1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82" calcext:value-type="float">
            <text:p>0,0382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75" calcext:value-type="float">
            <text:p>0,8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31" calcext:value-type="float">
            <text:p>0,0931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368" calcext:value-type="float">
            <text:p>0,3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25" calcext:value-type="float">
            <text:p>0,0625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75" calcext:value-type="float">
            <text:p>0,0375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76" calcext:value-type="float">
            <text:p>0,076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0.556" calcext:value-type="float">
            <text:p>0,5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86" calcext:value-type="float">
            <text:p>0,0986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92" calcext:value-type="float">
            <text:p>0,0692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817" calcext:value-type="float">
            <text:p>0,0817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45587" calcext:value-type="float">
            <text:p>0,45587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2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4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25" office:value-type="percentage" office:value="0.242" calcext:value-type="percentage">
            <text:p>24,20%</text:p>
          </table:table-cell>
          <table:table-cell table:style-name="ce25" office:value-type="percentage" office:value="0.232" calcext:value-type="percentage">
            <text:p>23,20%</text:p>
          </table:table-cell>
          <table:table-cell table:style-name="ce25" office:value-type="percentage" office:value="0.223" calcext:value-type="percentage">
            <text:p>22,30%</text:p>
          </table:table-cell>
          <table:table-cell table:style-name="ce25" office:value-type="percentage" office:value="0.216" calcext:value-type="percentage">
            <text:p>21,60%</text:p>
          </table:table-cell>
          <table:table-cell/>
        </table:table-row>
        <table:table-row table:style-name="ro3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25" office:value-type="percentage" office:value="0.1726" calcext:value-type="percentage">
            <text:p>17,26%</text:p>
          </table:table-cell>
          <table:table-cell table:style-name="ce25" office:value-type="percentage" office:value="0.1936" calcext:value-type="percentage">
            <text:p>19,36%</text:p>
          </table:table-cell>
          <table:table-cell table:style-name="ce25" office:value-type="percentage" office:value="0.1787" calcext:value-type="percentage">
            <text:p>17,87%</text:p>
          </table:table-cell>
          <table:table-cell table:style-name="ce25" office:value-type="percentage" office:value="0.1766" calcext:value-type="percentage">
            <text:p>17,66%</text:p>
          </table:table-cell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25" office:value-type="percentage" office:value="0.3583" calcext:value-type="percentage">
            <text:p>35,83%</text:p>
          </table:table-cell>
          <table:table-cell table:style-name="ce25" office:value-type="percentage" office:value="0.3361" calcext:value-type="percentage">
            <text:p>33,61%</text:p>
          </table:table-cell>
          <table:table-cell table:style-name="ce25" office:value-type="percentage" office:value="0.2957" calcext:value-type="percentage">
            <text:p>29,57%</text:p>
          </table:table-cell>
          <table:table-cell table:style-name="ce25" office:value-type="percentage" office:value="0.2545" calcext:value-type="percentage">
            <text:p>25,45%</text:p>
          </table:table-cell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25" office:value-type="percentage" office:value="0.0845" calcext:value-type="percentage">
            <text:p>8,45%</text:p>
          </table:table-cell>
          <table:table-cell table:style-name="ce25" office:value-type="percentage" office:value="0.0774" calcext:value-type="percentage">
            <text:p>7,74%</text:p>
          </table:table-cell>
          <table:table-cell table:style-name="ce25" office:value-type="percentage" office:value="0.0769" calcext:value-type="percentage">
            <text:p>7,69%</text:p>
          </table:table-cell>
          <table:table-cell table:style-name="ce25" office:value-type="percentage" office:value="0.0768" calcext:value-type="percentage">
            <text:p>7,68%</text:p>
          </table:table-cell>
          <table:table-cell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25" office:value-type="percentage" office:value="0.0441" calcext:value-type="percentage">
            <text:p>4,41%</text:p>
          </table:table-cell>
          <table:table-cell table:style-name="ce25" office:value-type="percentage" office:value="0.0418" calcext:value-type="percentage">
            <text:p>4,18%</text:p>
          </table:table-cell>
          <table:table-cell table:style-name="ce25" office:value-type="percentage" office:value="0.0423" calcext:value-type="percentage">
            <text:p>4,23%</text:p>
          </table:table-cell>
          <table:table-cell table:style-name="ce25" office:value-type="percentage" office:value="0.0429" calcext:value-type="percentage">
            <text:p>4,29%</text:p>
          </table:table-cell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25" office:value-type="percentage" office:value="0.6603" calcext:value-type="percentage">
            <text:p>66,03%</text:p>
          </table:table-cell>
          <table:table-cell table:style-name="ce25" office:value-type="percentage" office:value="0.5655" calcext:value-type="percentage">
            <text:p>56,55%</text:p>
          </table:table-cell>
          <table:table-cell table:style-name="ce25" office:value-type="percentage" office:value="0.5645" calcext:value-type="percentage">
            <text:p>56,45%</text:p>
          </table:table-cell>
          <table:table-cell table:style-name="ce25" office:value-type="percentage" office:value="0.5152" calcext:value-type="percentage">
            <text:p>51,52%</text:p>
          </table:table-cell>
          <table:table-cell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25" office:value-type="percentage" office:value="0.3586" calcext:value-type="percentage">
            <text:p>35,86%</text:p>
          </table:table-cell>
          <table:table-cell table:style-name="ce25" office:value-type="percentage" office:value="0.2014" calcext:value-type="percentage">
            <text:p>20,14%</text:p>
          </table:table-cell>
          <table:table-cell table:style-name="ce25" office:value-type="percentage" office:value="0.2156" calcext:value-type="percentage">
            <text:p>21,56%</text:p>
          </table:table-cell>
          <table:table-cell table:style-name="ce25" office:value-type="percentage" office:value="0.242" calcext:value-type="percentage">
            <text:p>24,20%</text:p>
          </table:table-cell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25" office:value-type="percentage" office:value="0.6452" calcext:value-type="percentage">
            <text:p>64,52%</text:p>
          </table:table-cell>
          <table:table-cell table:style-name="ce25" office:value-type="percentage" office:value="0.5209" calcext:value-type="percentage">
            <text:p>52,09%</text:p>
          </table:table-cell>
          <table:table-cell table:style-name="ce25" office:value-type="percentage" office:value="0.5376" calcext:value-type="percentage">
            <text:p>53,76%</text:p>
          </table:table-cell>
          <table:table-cell table:style-name="ce25" office:value-type="percentage" office:value="0.5297" calcext:value-type="percentage">
            <text:p>52,97%</text:p>
          </table:table-cell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25" office:value-type="percentage" office:value="0.284" calcext:value-type="percentage">
            <text:p>28,40%</text:p>
          </table:table-cell>
          <table:table-cell table:style-name="ce25" office:value-type="percentage" office:value="0.259" calcext:value-type="percentage">
            <text:p>25,90%</text:p>
          </table:table-cell>
          <table:table-cell table:style-name="ce25" office:value-type="percentage" office:value="0.249" calcext:value-type="percentage">
            <text:p>24,90%</text:p>
          </table:table-cell>
          <table:table-cell table:style-name="ce25" office:value-type="percentage" office:value="0.266" calcext:value-type="percentage">
            <text:p>26,60%</text:p>
          </table:table-cell>
          <table:table-cell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25" office:value-type="percentage" office:value="0.2697" calcext:value-type="percentage">
            <text:p>26,97%</text:p>
          </table:table-cell>
          <table:table-cell table:style-name="ce25" office:value-type="percentage" office:value="0.2724" calcext:value-type="percentage">
            <text:p>27,24%</text:p>
          </table:table-cell>
          <table:table-cell table:style-name="ce25" office:value-type="percentage" office:value="0.2797" calcext:value-type="percentage">
            <text:p>27,97%</text:p>
          </table:table-cell>
          <table:table-cell table:style-name="ce25" office:value-type="percentage" office:value="0.2847" calcext:value-type="percentage">
            <text:p>28,47%</text:p>
          </table:table-cell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25" office:value-type="percentage" office:value="0.4162" calcext:value-type="percentage">
            <text:p>41,62%</text:p>
          </table:table-cell>
          <table:table-cell table:style-name="ce25" office:value-type="percentage" office:value="0.3869" calcext:value-type="percentage">
            <text:p>38,69%</text:p>
          </table:table-cell>
          <table:table-cell table:style-name="ce25" office:value-type="percentage" office:value="0.3715" calcext:value-type="percentage">
            <text:p>37,15%</text:p>
          </table:table-cell>
          <table:table-cell table:style-name="ce25" office:value-type="percentage" office:value="0.3546" calcext:value-type="percentage">
            <text:p>35,46%</text:p>
          </table:table-cell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25" office:value-type="percentage" office:value="0.3489" calcext:value-type="percentage">
            <text:p>34,89%</text:p>
          </table:table-cell>
          <table:table-cell table:style-name="ce25" office:value-type="percentage" office:value="0.3359" calcext:value-type="percentage">
            <text:p>33,59%</text:p>
          </table:table-cell>
          <table:table-cell table:style-name="ce25" office:value-type="percentage" office:value="0.3137" calcext:value-type="percentage">
            <text:p>31,37%</text:p>
          </table:table-cell>
          <table:table-cell table:style-name="ce25" office:value-type="percentage" office:value="0.2426" calcext:value-type="percentage">
            <text:p>24,26%</text:p>
          </table:table-cell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25" office:value-type="percentage" office:value="0.395" calcext:value-type="percentage">
            <text:p>39,50%</text:p>
          </table:table-cell>
          <table:table-cell table:style-name="ce25" office:value-type="percentage" office:value="0.372" calcext:value-type="percentage">
            <text:p>37,20%</text:p>
          </table:table-cell>
          <table:table-cell table:style-name="ce25" office:value-type="percentage" office:value="0.3603" calcext:value-type="percentage">
            <text:p>36,03%</text:p>
          </table:table-cell>
          <table:table-cell table:style-name="ce25" office:value-type="percentage" office:value="0.2663" calcext:value-type="percentage">
            <text:p>26,63%</text:p>
          </table:table-cell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25" office:value-type="percentage" office:value="0.0779" calcext:value-type="percentage">
            <text:p>7,79%</text:p>
          </table:table-cell>
          <table:table-cell table:style-name="ce25" office:value-type="percentage" office:value="0.0748" calcext:value-type="percentage">
            <text:p>7,48%</text:p>
          </table:table-cell>
          <table:table-cell table:style-name="ce25" office:value-type="percentage" office:value="0.0683" calcext:value-type="percentage">
            <text:p>6,83%</text:p>
          </table:table-cell>
          <table:table-cell table:style-name="ce25" office:value-type="percentage" office:value="0.0674" calcext:value-type="percentage">
            <text:p>6,74%</text:p>
          </table:table-cell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25" office:value-type="percentage" office:value="0.1617" calcext:value-type="percentage">
            <text:p>16,17%</text:p>
          </table:table-cell>
          <table:table-cell table:style-name="ce25" office:value-type="percentage" office:value="0.1543" calcext:value-type="percentage">
            <text:p>15,43%</text:p>
          </table:table-cell>
          <table:table-cell table:style-name="ce25" office:value-type="percentage" office:value="0.1634" calcext:value-type="percentage">
            <text:p>16,34%</text:p>
          </table:table-cell>
          <table:table-cell table:style-name="ce25" office:value-type="percentage" office:value="0.1543" calcext:value-type="percentage">
            <text:p>15,43%</text:p>
          </table:table-cell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25" office:value-type="percentage" office:value="0.3315" calcext:value-type="percentage">
            <text:p>33,15%</text:p>
          </table:table-cell>
          <table:table-cell table:style-name="ce25" office:value-type="percentage" office:value="0.3606" calcext:value-type="percentage">
            <text:p>36,06%</text:p>
          </table:table-cell>
          <table:table-cell table:style-name="ce25" office:value-type="percentage" office:value="0.3506" calcext:value-type="percentage">
            <text:p>35,06%</text:p>
          </table:table-cell>
          <table:table-cell table:style-name="ce25" office:value-type="percentage" office:value="0.3441" calcext:value-type="percentage">
            <text:p>34,41%</text:p>
          </table:table-cell>
          <table:table-cell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25" office:value-type="percentage" office:value="0.3114" calcext:value-type="percentage">
            <text:p>31,14%</text:p>
          </table:table-cell>
          <table:table-cell table:style-name="ce25" office:value-type="percentage" office:value="0.3014" calcext:value-type="percentage">
            <text:p>30,14%</text:p>
          </table:table-cell>
          <table:table-cell table:style-name="ce25" office:value-type="percentage" office:value="0.2764" calcext:value-type="percentage">
            <text:p>27,64%</text:p>
          </table:table-cell>
          <table:table-cell table:style-name="ce25" office:value-type="percentage" office:value="0.2521" calcext:value-type="percentage">
            <text:p>25,21%</text:p>
          </table:table-cell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25" office:value-type="percentage" office:value="0.2397" calcext:value-type="percentage">
            <text:p>23,97%</text:p>
          </table:table-cell>
          <table:table-cell table:style-name="ce25" office:value-type="percentage" office:value="0.2266" calcext:value-type="percentage">
            <text:p>22,66%</text:p>
          </table:table-cell>
          <table:table-cell table:style-name="ce25" office:value-type="percentage" office:value="0.192" calcext:value-type="percentage">
            <text:p>19,20%</text:p>
          </table:table-cell>
          <table:table-cell table:style-name="ce25" office:value-type="percentage" office:value="0.2143" calcext:value-type="percentage">
            <text:p>21,43%</text:p>
          </table:table-cell>
          <table:table-cell/>
        </table:table-row>
        <table:table-row table:style-name="ro3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25" office:value-type="percentage" office:value="0.6179" calcext:value-type="percentage">
            <text:p>61,79%</text:p>
          </table:table-cell>
          <table:table-cell table:style-name="ce25" office:value-type="percentage" office:value="0.5648" calcext:value-type="percentage">
            <text:p>56,48%</text:p>
          </table:table-cell>
          <table:table-cell table:style-name="ce25" office:value-type="percentage" office:value="0.4763" calcext:value-type="percentage">
            <text:p>47,63%</text:p>
          </table:table-cell>
          <table:table-cell table:style-name="ce25" office:value-type="percentage" office:value="0.5465" calcext:value-type="percentage">
            <text:p>54,65%</text:p>
          </table:table-cell>
          <table:table-cell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25" office:value-type="percentage" office:value="0.2121" calcext:value-type="percentage">
            <text:p>21,21%</text:p>
          </table:table-cell>
          <table:table-cell table:style-name="ce25" office:value-type="percentage" office:value="0.2179" calcext:value-type="percentage">
            <text:p>21,79%</text:p>
          </table:table-cell>
          <table:table-cell table:style-name="ce25" office:value-type="percentage" office:value="0.2111" calcext:value-type="percentage">
            <text:p>21,11%</text:p>
          </table:table-cell>
          <table:table-cell table:style-name="ce25" office:value-type="percentage" office:value="0.1905" calcext:value-type="percentage">
            <text:p>19,05%</text:p>
          </table:table-cell>
          <table:table-cell/>
        </table:table-row>
        <table:table-row table:style-name="ro3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25" office:value-type="percentage" office:value="0.1578" calcext:value-type="percentage">
            <text:p>15,78%</text:p>
          </table:table-cell>
          <table:table-cell table:style-name="ce25" office:value-type="percentage" office:value="0.153" calcext:value-type="percentage">
            <text:p>15,30%</text:p>
          </table:table-cell>
          <table:table-cell table:style-name="ce25" office:value-type="percentage" office:value="0.1558" calcext:value-type="percentage">
            <text:p>15,58%</text:p>
          </table:table-cell>
          <table:table-cell table:style-name="ce25" office:value-type="percentage" office:value="0.1544" calcext:value-type="percentage">
            <text:p>15,44%</text:p>
          </table:table-cell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25" office:value-type="percentage" office:value="0.3522" calcext:value-type="percentage">
            <text:p>35,22%</text:p>
          </table:table-cell>
          <table:table-cell table:style-name="ce25" office:value-type="percentage" office:value="0.3398" calcext:value-type="percentage">
            <text:p>33,98%</text:p>
          </table:table-cell>
          <table:table-cell table:style-name="ce25" office:value-type="percentage" office:value="0.3139" calcext:value-type="percentage">
            <text:p>31,39%</text:p>
          </table:table-cell>
          <table:table-cell table:style-name="ce25" office:value-type="percentage" office:value="0.2713" calcext:value-type="percentage">
            <text:p>27,13%</text:p>
          </table:table-cell>
          <table:table-cell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25" office:value-type="percentage" office:value="0.0754" calcext:value-type="percentage">
            <text:p>7,54%</text:p>
          </table:table-cell>
          <table:table-cell table:style-name="ce25" office:value-type="percentage" office:value="0.0722" calcext:value-type="percentage">
            <text:p>7,22%</text:p>
          </table:table-cell>
          <table:table-cell table:style-name="ce25" office:value-type="percentage" office:value="0.0685" calcext:value-type="percentage">
            <text:p>6,85%</text:p>
          </table:table-cell>
          <table:table-cell table:style-name="ce25" office:value-type="percentage" office:value="0.0656" calcext:value-type="percentage">
            <text:p>6,56%</text:p>
          </table:table-cell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25" office:value-type="percentage" office:value="0.2905" calcext:value-type="percentage">
            <text:p>29,05%</text:p>
          </table:table-cell>
          <table:table-cell table:style-name="ce25" office:value-type="percentage" office:value="0.3039" calcext:value-type="percentage">
            <text:p>30,39%</text:p>
          </table:table-cell>
          <table:table-cell table:style-name="ce25" office:value-type="percentage" office:value="0.2952" calcext:value-type="percentage">
            <text:p>29,52%</text:p>
          </table:table-cell>
          <table:table-cell table:style-name="ce25" office:value-type="percentage" office:value="0.2981" calcext:value-type="percentage">
            <text:p>29,81%</text:p>
          </table:table-cell>
          <table:table-cell/>
        </table:table-row>
        <table:table-row table:style-name="ro3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25" office:value-type="percentage" office:value="0.3206" calcext:value-type="percentage">
            <text:p>32,06%</text:p>
          </table:table-cell>
          <table:table-cell table:style-name="ce25" office:value-type="percentage" office:value="0.2241" calcext:value-type="percentage">
            <text:p>22,41%</text:p>
          </table:table-cell>
          <table:table-cell table:style-name="ce25" office:value-type="percentage" office:value="0.2553" calcext:value-type="percentage">
            <text:p>25,53%</text:p>
          </table:table-cell>
          <table:table-cell table:style-name="ce25" office:value-type="percentage" office:value="0.2179" calcext:value-type="percentage">
            <text:p>21,79%</text:p>
          </table:table-cell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25" office:value-type="percentage" office:value="0.3448" calcext:value-type="percentage">
            <text:p>34,48%</text:p>
          </table:table-cell>
          <table:table-cell table:style-name="ce25" office:value-type="percentage" office:value="0.343" calcext:value-type="percentage">
            <text:p>34,30%</text:p>
          </table:table-cell>
          <table:table-cell table:style-name="ce25" office:value-type="percentage" office:value="0.3463" calcext:value-type="percentage">
            <text:p>34,63%</text:p>
          </table:table-cell>
          <table:table-cell table:style-name="ce25" office:value-type="percentage" office:value="0.3352" calcext:value-type="percentage">
            <text:p>33,52%</text:p>
          </table:table-cell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25" office:value-type="percentage" office:value="0.6435" calcext:value-type="percentage">
            <text:p>64,35%</text:p>
          </table:table-cell>
          <table:table-cell table:style-name="ce25" office:value-type="percentage" office:value="0.5267" calcext:value-type="percentage">
            <text:p>52,67%</text:p>
          </table:table-cell>
          <table:table-cell table:style-name="ce25" office:value-type="percentage" office:value="0.6507" calcext:value-type="percentage">
            <text:p>65,07%</text:p>
          </table:table-cell>
          <table:table-cell table:style-name="ce25" office:value-type="percentage" office:value="0.585" calcext:value-type="percentage">
            <text:p>58,50%</text:p>
          </table:table-cell>
          <table:table-cell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25" office:value-type="percentage" office:value="0.6203" calcext:value-type="percentage">
            <text:p>62,03%</text:p>
          </table:table-cell>
          <table:table-cell table:style-name="ce25" office:value-type="percentage" office:value="0.3356" calcext:value-type="percentage">
            <text:p>33,56%</text:p>
          </table:table-cell>
          <table:table-cell table:style-name="ce25" office:value-type="percentage" office:value="0.3222" calcext:value-type="percentage">
            <text:p>32,22%</text:p>
          </table:table-cell>
          <table:table-cell table:style-name="ce25" office:value-type="percentage" office:value="0.2732" calcext:value-type="percentage">
            <text:p>27,32%</text:p>
          </table:table-cell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25" office:value-type="percentage" office:value="0.228" calcext:value-type="percentage">
            <text:p>22,80%</text:p>
          </table:table-cell>
          <table:table-cell table:style-name="ce25" office:value-type="percentage" office:value="0.1995" calcext:value-type="percentage">
            <text:p>19,95%</text:p>
          </table:table-cell>
          <table:table-cell table:style-name="ce25" office:value-type="percentage" office:value="0.2245" calcext:value-type="percentage">
            <text:p>22,45%</text:p>
          </table:table-cell>
          <table:table-cell table:style-name="ce25" office:value-type="percentage" office:value="0.223" calcext:value-type="percentage">
            <text:p>22,30%</text:p>
          </table:table-cell>
          <table:table-cell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25" office:value-type="percentage" office:value="0.082" calcext:value-type="percentage">
            <text:p>8,20%</text:p>
          </table:table-cell>
          <table:table-cell table:style-name="ce25" office:value-type="percentage" office:value="0.065" calcext:value-type="percentage">
            <text:p>6,50%</text:p>
          </table:table-cell>
          <table:table-cell table:style-name="ce25" office:value-type="percentage" office:value="0.0628" calcext:value-type="percentage">
            <text:p>6,28%</text:p>
          </table:table-cell>
          <table:table-cell table:style-name="ce25" office:value-type="percentage" office:value="0.0657" calcext:value-type="percentage">
            <text:p>6,57%</text:p>
          </table:table-cell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25" office:value-type="percentage" office:value="0.4546" calcext:value-type="percentage">
            <text:p>45,46%</text:p>
          </table:table-cell>
          <table:table-cell table:style-name="ce25" office:value-type="percentage" office:value="0.445" calcext:value-type="percentage">
            <text:p>44,50%</text:p>
          </table:table-cell>
          <table:table-cell table:style-name="ce25" office:value-type="percentage" office:value="0.4315" calcext:value-type="percentage">
            <text:p>43,15%</text:p>
          </table:table-cell>
          <table:table-cell table:style-name="ce25" office:value-type="percentage" office:value="0.4216" calcext:value-type="percentage">
            <text:p>42,16%</text:p>
          </table:table-cell>
          <table:table-cell/>
        </table:table-row>
        <table:table-row table:style-name="ro3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25" office:value-type="percentage" office:value="0.3618" calcext:value-type="percentage">
            <text:p>36,18%</text:p>
          </table:table-cell>
          <table:table-cell table:style-name="ce25" office:value-type="percentage" office:value="0.3585" calcext:value-type="percentage">
            <text:p>35,85%</text:p>
          </table:table-cell>
          <table:table-cell table:style-name="ce25" office:value-type="percentage" office:value="0.3393" calcext:value-type="percentage">
            <text:p>33,93%</text:p>
          </table:table-cell>
          <table:table-cell table:style-name="ce25" office:value-type="percentage" office:value="0.2782" calcext:value-type="percentage">
            <text:p>27,82%</text:p>
          </table:table-cell>
          <table:table-cell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25" office:value-type="percentage" office:value="0.0628" calcext:value-type="percentage">
            <text:p>6,28%</text:p>
          </table:table-cell>
          <table:table-cell table:style-name="ce25" office:value-type="percentage" office:value="0.0613" calcext:value-type="percentage">
            <text:p>6,13%</text:p>
          </table:table-cell>
          <table:table-cell table:style-name="ce25" office:value-type="percentage" office:value="0.065" calcext:value-type="percentage">
            <text:p>6,50%</text:p>
          </table:table-cell>
          <table:table-cell table:style-name="ce25" office:value-type="percentage" office:value="0.0573" calcext:value-type="percentage">
            <text:p>5,73%</text:p>
          </table:table-cell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25" office:value-type="percentage" office:value="0.2524" calcext:value-type="percentage">
            <text:p>25,24%</text:p>
          </table:table-cell>
          <table:table-cell table:style-name="ce25" office:value-type="percentage" office:value="0.2542" calcext:value-type="percentage">
            <text:p>25,42%</text:p>
          </table:table-cell>
          <table:table-cell table:style-name="ce25" office:value-type="percentage" office:value="0.2523" calcext:value-type="percentage">
            <text:p>25,23%</text:p>
          </table:table-cell>
          <table:table-cell table:style-name="ce25" office:value-type="percentage" office:value="0.2472" calcext:value-type="percentage">
            <text:p>24,72%</text:p>
          </table:table-cell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25" office:value-type="percentage" office:value="0.0909" calcext:value-type="percentage">
            <text:p>9,09%</text:p>
          </table:table-cell>
          <table:table-cell table:style-name="ce25" office:value-type="percentage" office:value="0.0955" calcext:value-type="percentage">
            <text:p>9,55%</text:p>
          </table:table-cell>
          <table:table-cell table:style-name="ce25" office:value-type="percentage" office:value="0.0814" calcext:value-type="percentage">
            <text:p>8,14%</text:p>
          </table:table-cell>
          <table:table-cell table:style-name="ce25" office:value-type="percentage" office:value="0.0636" calcext:value-type="percentage">
            <text:p>6,36%</text:p>
          </table:table-cell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25" office:value-type="percentage" office:value="0.2347" calcext:value-type="percentage">
            <text:p>23,47%</text:p>
          </table:table-cell>
          <table:table-cell table:style-name="ce25" office:value-type="percentage" office:value="0.24" calcext:value-type="percentage">
            <text:p>24,00%</text:p>
          </table:table-cell>
          <table:table-cell table:style-name="ce25" office:value-type="percentage" office:value="0.2312" calcext:value-type="percentage">
            <text:p>23,12%</text:p>
          </table:table-cell>
          <table:table-cell table:style-name="ce25" office:value-type="percentage" office:value="0.2165" calcext:value-type="percentage">
            <text:p>21,65%</text:p>
          </table:table-cell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25" office:value-type="percentage" office:value="0.21" calcext:value-type="percentage">
            <text:p>21,00%</text:p>
          </table:table-cell>
          <table:table-cell table:style-name="ce25" office:value-type="percentage" office:value="0.1793" calcext:value-type="percentage">
            <text:p>17,93%</text:p>
          </table:table-cell>
          <table:table-cell table:style-name="ce25" office:value-type="percentage" office:value="0.1773" calcext:value-type="percentage">
            <text:p>17,73%</text:p>
          </table:table-cell>
          <table:table-cell table:style-name="ce25" office:value-type="percentage" office:value="0.0923" calcext:value-type="percentage">
            <text:p>9,23%</text:p>
          </table:table-cell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25" office:value-type="percentage" office:value="0.25" calcext:value-type="percentage">
            <text:p>25,00%</text:p>
          </table:table-cell>
          <table:table-cell table:style-name="ce25" office:value-type="percentage" office:value="0.208" calcext:value-type="percentage">
            <text:p>20,80%</text:p>
          </table:table-cell>
          <table:table-cell table:style-name="ce25" office:value-type="percentage" office:value="0.2156" calcext:value-type="percentage">
            <text:p>21,56%</text:p>
          </table:table-cell>
          <table:table-cell table:style-name="ce25" office:value-type="percentage" office:value="0.0968" calcext:value-type="percentage">
            <text:p>9,68%</text:p>
          </table:table-cell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25" office:value-type="percentage" office:value="0.0536" calcext:value-type="percentage">
            <text:p>5,36%</text:p>
          </table:table-cell>
          <table:table-cell table:style-name="ce25" office:value-type="percentage" office:value="0.0618" calcext:value-type="percentage">
            <text:p>6,18%</text:p>
          </table:table-cell>
          <table:table-cell table:style-name="ce25" office:value-type="percentage" office:value="0.0564" calcext:value-type="percentage">
            <text:p>5,64%</text:p>
          </table:table-cell>
          <table:table-cell table:style-name="ce25" office:value-type="percentage" office:value="0.0352" calcext:value-type="percentage">
            <text:p>3,52%</text:p>
          </table:table-cell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25" office:value-type="percentage" office:value="0.075" calcext:value-type="percentage">
            <text:p>7,50%</text:p>
          </table:table-cell>
          <table:table-cell table:style-name="ce25" office:value-type="percentage" office:value="0.073" calcext:value-type="percentage">
            <text:p>7,30%</text:p>
          </table:table-cell>
          <table:table-cell table:style-name="ce25" office:value-type="percentage" office:value="0.076" calcext:value-type="percentage">
            <text:p>7,60%</text:p>
          </table:table-cell>
          <table:table-cell table:style-name="ce25" office:value-type="percentage" office:value="0.063" calcext:value-type="percentage">
            <text:p>6,30%</text:p>
          </table:table-cell>
          <table:table-cell/>
        </table:table-row>
        <table:table-row table:style-name="ro4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2848125" calcext:value-type="percentage">
            <text:p>28,48%</text:p>
          </table:table-cell>
          <table:table-cell table:style-name="ce17" table:formula="of:=AVERAGE([.D3:.D42])" office:value-type="percentage" office:value="0.2558675" calcext:value-type="percentage">
            <text:p>25,59%</text:p>
          </table:table-cell>
          <table:table-cell table:style-name="ce17" table:formula="of:=AVERAGE([.E3:.E42])" office:value-type="percentage" office:value="0.251695" calcext:value-type="percentage">
            <text:p>25,17%</text:p>
          </table:table-cell>
          <table:table-cell table:style-name="ce17" table:formula="of:=AVERAGE([.F3:.F42])" office:value-type="percentage" office:value="0.232455" calcext:value-type="percentage">
            <text:p>23,25%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style-name="ce39"/>
          <table:table-cell table:style-name="ce18"/>
          <table:table-cell table:style-name="ce39"/>
          <table:table-cell table:style-name="ce18" table:number-columns-repeated="3"/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9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style-name="ce26" table:number-columns-repeated="4"/>
          <table:table-cell/>
        </table:table-row>
        <table:table-row table:style-name="ro3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style-name="ce26" table:number-columns-repeated="4"/>
          <table:table-cell/>
        </table:table-row>
        <table:table-row table:style-name="ro3">
          <table:table-cell/>
          <table:table-cell table:style-name="ce20"/>
          <table:table-cell table:number-columns-repeated="5"/>
        </table:table-row>
        <table:table-row table:style-name="ro4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string" office:string-value="" calcext:value-type="error">
            <text:p>#DIV/0!</text:p>
          </table:table-cell>
          <table:table-cell table:style-name="ce13" table:formula="of:=AVERAGE([.D49:.D72])" office:value-type="string" office:string-value="" calcext:value-type="error">
            <text:p>#DIV/0!</text:p>
          </table:table-cell>
          <table:table-cell table:style-name="ce13" table:formula="of:=AVERAGE([.E49:.E72])" office:value-type="string" office:string-value="" calcext:value-type="error">
            <text:p>#DIV/0!</text:p>
          </table:table-cell>
          <table:table-cell table:style-name="ce13" table:formula="of:=AVERAGE([.F49:.F72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9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string" office:string-value="" calcext:value-type="error">
            <text:p>#DIV/0!</text:p>
          </table:table-cell>
          <table:table-cell table:style-name="ce18" table:formula="of:=([.C74]-[.D74])/[.C74]" office:value-type="string" office:string-value="" calcext:value-type="error">
            <text:p>#DIV/0!</text:p>
          </table:table-cell>
          <table:table-cell table:style-name="ce18" table:formula="of:=([.D74]-[.E74])/[.D74]" office:value-type="string" office:string-value="" calcext:value-type="error">
            <text:p>#DIV/0!</text:p>
          </table:table-cell>
          <table:table-cell table:style-name="ce18" table:formula="of:=([.C74]-[.F74])/[.C74]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/>
          <table:table-cell table:style-name="ce20"/>
          <table:table-cell table:number-columns-repeated="5"/>
        </table:table-row>
        <table:table-row table:style-name="ro3" table:number-rows-repeated="104849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16:56:47.68114818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6-27T23:26:08.079047216</dc:date>
    <meta:editing-duration>PT11H47M1S</meta:editing-duration>
    <meta:editing-cycles>503</meta:editing-cycles>
    <meta:generator>LibreOffice/25.2.3.2$Linux_X86_64 LibreOffice_project/520$Build-2</meta:generator>
    <meta:document-statistic meta:table-count="2" meta:cell-count="2324" meta:object-count="0"/>
  </office:meta>
</office:document-meta>
</file>