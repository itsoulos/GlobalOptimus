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  <style:style style:name="ce54" style:family="table-cell" style:parent-style-name="Default" style:data-style-name="N11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eads_ips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2927" calcext:value-type="percentage">
            <text:p>29,27%</text:p>
          </table:table-cell>
          <table:table-cell table:style-name="ce3" office:value-type="percentage" office:value="0.3232" calcext:value-type="percentage">
            <text:p>32,3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2" office:value-type="percentage" office:value="0.41" calcext:value-type="percentage">
            <text:p>41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1232" calcext:value-type="percentage">
            <text:p>12,32%</text:p>
          </table:table-cell>
          <table:table-cell table:style-name="ce3" office:value-type="percentage" office:value="0.2029" calcext:value-type="percentage">
            <text:p>2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1768" calcext:value-type="percentage">
            <text:p>17,68%</text:p>
          </table:table-cell>
          <table:table-cell table:style-name="ce3" office:value-type="percentage" office:value="0.2609" calcext:value-type="percentage">
            <text:p>26,0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2971" calcext:value-type="percentage">
            <text:p>29,7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174" calcext:value-type="percentage">
            <text:p>21,74%</text:p>
          </table:table-cell>
          <table:table-cell table:style-name="ce3" office:value-type="percentage" office:value="0.2507" calcext:value-type="percentage">
            <text:p>25,0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565" calcext:value-type="percentage">
            <text:p>15,65%</text:p>
          </table:table-cell>
          <table:table-cell table:style-name="ce3" office:value-type="percentage" office:value="0.2551" calcext:value-type="percentage">
            <text:p>25,5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986" calcext:value-type="percentage">
            <text:p>19,86%</text:p>
          </table:table-cell>
          <table:table-cell table:style-name="ce3" office:value-type="percentage" office:value="0.2246" calcext:value-type="percentage">
            <text:p>22,4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1957" calcext:value-type="percentage">
            <text:p>19,57%</text:p>
          </table:table-cell>
          <table:table-cell table:style-name="ce3" office:value-type="percentage" office:value="0.2348" calcext:value-type="percentage">
            <text:p>23,4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942" calcext:value-type="percentage">
            <text:p>29,42%</text:p>
          </table:table-cell>
          <table:table-cell table:style-name="ce2" office:value-type="percentage" office:value="0.2391" calcext:value-type="percentage">
            <text:p>23,9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17" calcext:value-type="percentage">
            <text:p>21,70%</text:p>
          </table:table-cell>
          <table:table-cell table:style-name="ce1" table:formula="of:=AVERAGE([.C2:.C11])" office:value-type="percentage" office:value="0.225" calcext:value-type="percentage">
            <text:p>22,5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274" calcext:value-type="percentage">
            <text:p>22,74%</text:p>
          </table:table-cell>
          <table:table-cell table:style-name="ce1" table:formula="of:=AVERAGE([.G2:.G11])" office:value-type="percentage" office:value="0.25913" calcext:value-type="percentage">
            <text:p>25,9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483" calcext:value-type="percentage">
            <text:p>54,83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45" calcext:value-type="percentage">
            <text:p>4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483" calcext:value-type="percentage">
            <text:p>34,83%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number-columns-repeated="2"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138" calcext:value-type="percentage">
            <text:p>41,38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7" calcext:value-type="percentage">
            <text:p>6,70%</text:p>
          </table:table-cell>
          <table:table-cell table:style-name="ce2" office:value-type="percentage" office:value="0.062" calcext:value-type="percentage">
            <text:p>6,2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931" calcext:value-type="percentage">
            <text:p>49,31%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4" calcext:value-type="percentage">
            <text:p>2,4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07" calcext:value-type="percentage">
            <text:p>32,07%</text:p>
          </table:table-cell>
          <table:table-cell table:style-name="ce2" office:value-type="percentage" office:value="0.3552" calcext:value-type="percentage">
            <text:p>35,52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5" calcext:value-type="percentage">
            <text:p>3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41" calcext:value-type="percentage">
            <text:p>4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6241" calcext:value-type="percentage">
            <text:p>62,41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number-columns-repeated="2" table:style-name="ce2" office:value-type="percentage" office:value="0.031" calcext:value-type="percentage">
            <text:p>3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68" calcext:value-type="percentage">
            <text:p>6,8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4483" calcext:value-type="percentage">
            <text:p>44,48%</text:p>
          </table:table-cell>
          <table:table-cell table:style-name="ce1" table:formula="of:=AVERAGE([.C14:.C23])" office:value-type="percentage" office:value="0.46138" calcext:value-type="percentage">
            <text:p>46,14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17" calcext:value-type="percentage">
            <text:p>4,17%</text:p>
          </table:table-cell>
          <table:table-cell table:style-name="ce1" table:formula="of:=AVERAGE([.G14:.G23])" office:value-type="percentage" office:value="0.0435" calcext:value-type="percentage">
            <text:p>4,35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 office:value-type="percentage" office:value="0.1257" calcext:value-type="percentage">
            <text:p>12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371" calcext:value-type="percentage">
            <text:p>13,71%</text:p>
          </table:table-cell>
          <table:table-cell table:style-name="ce2"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0514" calcext:value-type="percentage">
            <text:p>5,14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114" calcext:value-type="percentage">
            <text:p>21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743" calcext:value-type="percentage">
            <text:p>7,43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44" calcext:value-type="percentage">
            <text:p>24,40%</text:p>
          </table:table-cell>
          <table:table-cell table:style-name="ce1" table:formula="of:=AVERAGE([.C27:.C36])" office:value-type="percentage" office:value="0.254" calcext:value-type="percentage">
            <text:p>25,4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8314" calcext:value-type="percentage">
            <text:p>8,31%</text:p>
          </table:table-cell>
          <table:table-cell table:style-name="ce1" table:formula="of:=AVERAGE([.G27:.G36])" office:value-type="percentage" office:value="0.12771" calcext:value-type="percentage">
            <text:p>12,77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03" calcext:value-type="percentage">
            <text:p>30,30%</text:p>
          </table:table-cell>
          <table:table-cell table:style-name="ce2" office:value-type="percentage" office:value="0.3455" calcext:value-type="percentage">
            <text:p>34,5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182" calcext:value-type="percentage">
            <text:p>41,82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0952" calcext:value-type="percentage">
            <text:p>9,52%</text:p>
          </table:table-cell>
          <table:table-cell table:style-name="ce2" office:value-type="percentage" office:value="0.0839" calcext:value-type="percentage">
            <text:p>8,3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919" calcext:value-type="percentage">
            <text:p>9,19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939" calcext:value-type="percentage">
            <text:p>49,39%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741" calcext:value-type="percentage">
            <text:p>7,4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403" calcext:value-type="percentage">
            <text:p>40,30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94" calcext:value-type="percentage">
            <text:p>6,94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71" calcext:value-type="percentage">
            <text:p>3,71%</text:p>
          </table:table-cell>
          <table:table-cell table:style-name="ce2" office:value-type="percentage" office:value="0.0355" calcext:value-type="percentage">
            <text:p>3,5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887" calcext:value-type="percentage">
            <text:p>8,87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516" calcext:value-type="percentage">
            <text:p>5,16%</text:p>
          </table:table-cell>
          <table:table-cell table:style-name="ce2" office:value-type="percentage" office:value="0.0742" calcext:value-type="percentage">
            <text:p>7,4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788" calcext:value-type="percentage">
            <text:p>47,88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5697" calcext:value-type="percentage">
            <text:p>56,9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44878" calcext:value-type="percentage">
            <text:p>44,88%</text:p>
          </table:table-cell>
          <table:table-cell table:style-name="ce1" table:formula="of:=AVERAGE([.C40:.C49])" office:value-type="percentage" office:value="0.47758" calcext:value-type="percentage">
            <text:p>47,76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87" calcext:value-type="percentage">
            <text:p>6,87%</text:p>
          </table:table-cell>
          <table:table-cell table:style-name="ce1" table:formula="of:=AVERAGE([.G40:.G49])" office:value-type="percentage" office:value="0.06855" calcext:value-type="percentage">
            <text:p>6,8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095" calcext:value-type="percentage">
            <text:p>40,95%</text:p>
          </table:table-cell>
          <table:table-cell table:style-name="ce2" office:value-type="percentage" office:value="0.419" calcext:value-type="percentage">
            <text:p>41,9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133" calcext:value-type="percentage">
            <text:p>41,33%</text:p>
          </table:table-cell>
          <table:table-cell table:style-name="ce2" office:value-type="percentage" office:value="0.4533" calcext:value-type="percentage">
            <text:p>45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number-columns-repeated="2" table:style-name="ce2" office:value-type="percentage" office:value="0.6143" calcext:value-type="percentage">
            <text:p>61,43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567" calcext:value-type="percentage">
            <text:p>25,67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81" calcext:value-type="percentage">
            <text:p>58,10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2533" calcext:value-type="percentage">
            <text:p>25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481" calcext:value-type="percentage">
            <text:p>48,10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714" calcext:value-type="percentage">
            <text:p>57,1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2633" calcext:value-type="percentage">
            <text:p>26,33%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4905" calcext:value-type="percentage">
            <text:p>49,05%</text:p>
          </table:table-cell>
          <table:table-cell table:style-name="ce2" office:value-type="percentage" office:value="0.5476" calcext:value-type="percentage">
            <text:p>54,7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19" calcext:value-type="percentage">
            <text:p>31,90%</text:p>
          </table:table-cell>
          <table:table-cell table:style-name="ce2" office:value-type="percentage" office:value="0.4048" calcext:value-type="percentage">
            <text:p>40,4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033" calcext:value-type="percentage">
            <text:p>30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429" calcext:value-type="percentage">
            <text:p>4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7332" calcext:value-type="percentage">
            <text:p>27,33%</text:p>
          </table:table-cell>
          <table:table-cell table:style-name="ce1" table:formula="of:=AVERAGE([.C53:.C62])" office:value-type="percentage" office:value="0.28334" calcext:value-type="percentage">
            <text:p>28,33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49286" calcext:value-type="percentage">
            <text:p>49,29%</text:p>
          </table:table-cell>
          <table:table-cell table:style-name="ce1" table:formula="of:=AVERAGE([.G53:.G62])" office:value-type="percentage" office:value="0.51762" calcext:value-type="percentage">
            <text:p>51,7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462" calcext:value-type="percentage">
            <text:p>44,6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1074" calcext:value-type="percentage">
            <text:p>10,7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231" calcext:value-type="percentage">
            <text:p>42,31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923" calcext:value-type="percentage">
            <text:p>29,23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615" calcext:value-type="percentage">
            <text:p>26,15%</text:p>
          </table:table-cell>
          <table:table-cell table:style-name="ce2"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17742" calcext:value-type="percentage">
            <text:p>17,74%</text:p>
          </table:table-cell>
          <table:table-cell table:style-name="ce1" table:formula="of:=AVERAGE([.C66:.C75])" office:value-type="percentage" office:value="0.18148" calcext:value-type="percentage">
            <text:p>18,15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7232" calcext:value-type="percentage">
            <text:p>37,23%</text:p>
          </table:table-cell>
          <table:table-cell table:style-name="ce1" table:formula="of:=AVERAGE([.G66:.G75])" office:value-type="percentage" office:value="0.34001" calcext:value-type="percentage">
            <text:p>34,0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2967" calcext:value-type="percentage">
            <text:p>2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2" calcext:value-type="percentage">
            <text:p>2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1733" calcext:value-type="percentage">
            <text:p>1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467" calcext:value-type="percentage">
            <text:p>24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number-columns-repeated="2"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033" calcext:value-type="percentage">
            <text:p>20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433" calcext:value-type="percentage">
            <text:p>14,33%</text:p>
          </table:table-cell>
          <table:table-cell table:style-name="ce2" office:value-type="percentage" office:value="0.1933" calcext:value-type="percentage">
            <text:p>19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733" calcext:value-type="percentage">
            <text:p>17,33%</text:p>
          </table:table-cell>
          <table:table-cell table:style-name="ce2" office:value-type="percentage" office:value="0.1767" calcext:value-type="percentage">
            <text:p>17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29" calcext:value-type="percentage">
            <text:p>2,90%</text:p>
          </table:table-cell>
          <table:table-cell table:style-name="ce1" table:formula="of:=AVERAGE([.C79:.C88])" office:value-type="percentage" office:value="0.034" calcext:value-type="percentage">
            <text:p>3,4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0565" calcext:value-type="percentage">
            <text:p>20,57%</text:p>
          </table:table-cell>
          <table:table-cell table:style-name="ce1" table:formula="of:=AVERAGE([.G79:.G88])" office:value-type="percentage" office:value="0.224" calcext:value-type="percentage">
            <text:p>22,40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571" calcext:value-type="percentage">
            <text:p>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number-columns-repeated="2"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429" calcext:value-type="percentage">
            <text:p>14,29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7393" calcext:value-type="percentage">
            <text:p>7,39%</text:p>
          </table:table-cell>
          <table:table-cell table:style-name="ce1" table:formula="of:=AVERAGE([.C93:.C102])" office:value-type="percentage" office:value="0.06871" calcext:value-type="percentage">
            <text:p>6,87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627" calcext:value-type="percentage">
            <text:p>14,63%</text:p>
          </table:table-cell>
          <table:table-cell table:style-name="ce1" table:formula="of:=AVERAGE([.G93:.G102])" office:value-type="percentage" office:value="0.15716" calcext:value-type="percentage">
            <text:p>15,72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361" calcext:value-type="percentage">
            <text:p>23,61%</text:p>
          </table:table-cell>
          <table:table-cell table:style-name="ce2" office:value-type="percentage" office:value="0.2181" calcext:value-type="percentage">
            <text:p>21,8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765" calcext:value-type="percentage">
            <text:p>27,65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 office:value-type="percentage" office:value="0.1542" calcext:value-type="percentage">
            <text:p>15,4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2941" calcext:value-type="percentage">
            <text:p>29,41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2048" calcext:value-type="percentage">
            <text:p>20,4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number-columns-repeated="2" table:style-name="ce2" office:value-type="percentage" office:value="0.4735" calcext:value-type="percentage">
            <text:p>47,35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382" calcext:value-type="percentage">
            <text:p>33,82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313" calcext:value-type="percentage">
            <text:p>13,13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2853" calcext:value-type="percentage">
            <text:p>28,53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39" calcext:value-type="percentage">
            <text:p>16,39%</text:p>
          </table:table-cell>
          <table:table-cell table:style-name="ce2" office:value-type="percentage" office:value="0.1566" calcext:value-type="percentage">
            <text:p>15,66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904" calcext:value-type="percentage">
            <text:p>19,04%</text:p>
          </table:table-cell>
          <table:table-cell table:style-name="ce2" office:value-type="percentage" office:value="0.1952" calcext:value-type="percentage">
            <text:p>19,5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1482" calcext:value-type="percentage">
            <text:p>14,82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765" calcext:value-type="percentage">
            <text:p>37,65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67" calcext:value-type="percentage">
            <text:p>18,67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471" calcext:value-type="percentage">
            <text:p>34,71%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13" calcext:value-type="percentage">
            <text:p>13,13%</text:p>
          </table:table-cell>
          <table:table-cell table:style-name="ce2" office:value-type="percentage" office:value="0.1361" calcext:value-type="percentage">
            <text:p>13,6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2499" calcext:value-type="percentage">
            <text:p>32,50%</text:p>
          </table:table-cell>
          <table:table-cell table:style-name="ce1" table:formula="of:=AVERAGE([.C106:.C115])" office:value-type="percentage" office:value="0.33412" calcext:value-type="percentage">
            <text:p>33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446" calcext:value-type="percentage">
            <text:p>17,45%</text:p>
          </table:table-cell>
          <table:table-cell table:style-name="ce1" table:formula="of:=AVERAGE([.G106:.G115])" office:value-type="percentage" office:value="0.17204" calcext:value-type="percentage">
            <text:p>17,20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776" calcext:value-type="percentage">
            <text:p>27,76%</text:p>
          </table:table-cell>
          <table:table-cell table:style-name="ce2"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2" office:value-type="percentage" office:value="0.2316" calcext:value-type="percentage">
            <text:p>23,16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447" calcext:value-type="percentage">
            <text:p>24,4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697" calcext:value-type="percentage">
            <text:p>26,97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697" calcext:value-type="percentage">
            <text:p>16,97%</text:p>
          </table:table-cell>
          <table:table-cell table:style-name="ce2" office:value-type="percentage" office:value="0.1855" calcext:value-type="percentage">
            <text:p>18,5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316" calcext:value-type="percentage">
            <text:p>13,1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684" calcext:value-type="percentage">
            <text:p>26,84%</text:p>
          </table:table-cell>
          <table:table-cell table:style-name="ce2" office:value-type="percentage" office:value="0.2605" calcext:value-type="percentage">
            <text:p>26,0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579" calcext:value-type="percentage">
            <text:p>5,79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382" calcext:value-type="percentage">
            <text:p>23,82%</text:p>
          </table:table-cell>
          <table:table-cell table:style-name="ce2" office:value-type="percentage" office:value="0.2579" calcext:value-type="percentage">
            <text:p>25,7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31" calcext:value-type="percentage">
            <text:p>29,31%</text:p>
          </table:table-cell>
          <table:table-cell table:style-name="ce2" office:value-type="percentage" office:value="0.3066" calcext:value-type="percentage">
            <text:p>30,66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158" calcext:value-type="percentage">
            <text:p>11,58%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3158" calcext:value-type="percentage">
            <text:p>31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3171" calcext:value-type="percentage">
            <text:p>31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4474" calcext:value-type="percentage">
            <text:p>14,47%</text:p>
          </table:table-cell>
          <table:table-cell table:style-name="ce1" table:formula="of:=AVERAGE([.C119:.C128])" office:value-type="percentage" office:value="0.15632" calcext:value-type="percentage">
            <text:p>15,63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5445" calcext:value-type="percentage">
            <text:p>25,45%</text:p>
          </table:table-cell>
          <table:table-cell table:style-name="ce1" table:formula="of:=AVERAGE([.G119:.G128])" office:value-type="percentage" office:value="0.26776" calcext:value-type="percentage">
            <text:p>26,78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 office:value-type="percentage" office:value="0.0926" calcext:value-type="percentage">
            <text:p>9,26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645" calcext:value-type="percentage">
            <text:p>26,45%</text:p>
          </table:table-cell>
          <table:table-cell table:style-name="ce2" office:value-type="percentage" office:value="0.2323" calcext:value-type="percentage">
            <text:p>2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806" calcext:value-type="percentage">
            <text:p>28,06%</text:p>
          </table:table-cell>
          <table:table-cell table:style-name="ce2" office:value-type="percentage" office:value="0.2758" calcext:value-type="percentage">
            <text:p>27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242" calcext:value-type="percentage">
            <text:p>32,42%</text:p>
          </table:table-cell>
          <table:table-cell table:style-name="ce2" office:value-type="percentage" office:value="0.2726" calcext:value-type="percentage">
            <text:p>27,26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percentage" office:value="0.3177" calcext:value-type="percentage">
            <text:p>31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274" calcext:value-type="percentage">
            <text:p>32,74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3161" calcext:value-type="percentage">
            <text:p>31,61%</text:p>
          </table:table-cell>
          <table:table-cell table:style-name="ce2" office:value-type="percentage" office:value="0.2661" calcext:value-type="percentage">
            <text:p>26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2" office:value-type="percentage" office:value="0.2258" calcext:value-type="percentage">
            <text:p>22,5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number-columns-repeated="2"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565" calcext:value-type="percentage">
            <text:p>25,65%</text:p>
          </table:table-cell>
          <table:table-cell table:style-name="ce2" office:value-type="percentage" office:value="0.2161" calcext:value-type="percentage">
            <text:p>21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2" office:value-type="percentage" office:value="0.3516" calcext:value-type="percentage">
            <text:p>35,1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6573" calcext:value-type="percentage">
            <text:p>6,57%</text:p>
          </table:table-cell>
          <table:table-cell table:style-name="ce1" table:formula="of:=AVERAGE([.C133:.C142])" office:value-type="percentage" office:value="0.0689" calcext:value-type="percentage">
            <text:p>6,89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9274" calcext:value-type="percentage">
            <text:p>29,27%</text:p>
          </table:table-cell>
          <table:table-cell table:style-name="ce1" table:formula="of:=AVERAGE([.G133:.G142])" office:value-type="percentage" office:value="0.27531" calcext:value-type="percentage">
            <text:p>27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652" calcext:value-type="percentage">
            <text:p>26,52%</text:p>
          </table:table-cell>
          <table:table-cell table:style-name="ce2" office:value-type="percentage" office:value="0.2696" calcext:value-type="percentage">
            <text:p>26,9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567" calcext:value-type="percentage">
            <text:p>15,6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1909" calcext:value-type="percentage">
            <text:p>19,0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number-columns-repeated="2" table:style-name="ce2" office:value-type="percentage" office:value="0.4043" calcext:value-type="percentage">
            <text:p>40,43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1" office:value-type="percentage" office:value="0.1723" calcext:value-type="percentage">
            <text:p>17,2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7" calcext:value-type="percentage">
            <text:p>38,70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658" calcext:value-type="percentage">
            <text:p>16,5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2783" calcext:value-type="percentage">
            <text:p>27,83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818" calcext:value-type="percentage">
            <text:p>18,18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771" calcext:value-type="percentage">
            <text:p>17,71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number-columns-repeated="2"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15" calcext:value-type="percentage">
            <text:p>16,1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848" calcext:value-type="percentage">
            <text:p>38,48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283" calcext:value-type="percentage">
            <text:p>22,83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/>
          <table:table-cell table:style-name="ce2" office:value-type="percentage" office:value="0.1779" calcext:value-type="percentage">
            <text:p>17,79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082" calcext:value-type="percentage">
            <text:p>20,82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2087" calcext:value-type="percentage">
            <text:p>32,09%</text:p>
          </table:table-cell>
          <table:table-cell table:style-name="ce1" table:formula="of:=AVERAGE([.C146:.C155])" office:value-type="percentage" office:value="0.32784" calcext:value-type="percentage">
            <text:p>32,78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65422222222222" calcext:value-type="percentage">
            <text:p>16,54%</text:p>
          </table:table-cell>
          <table:table-cell table:style-name="ce1" table:formula="of:=AVERAGE([.G146:.G155])" office:value-type="percentage" office:value="0.17827" calcext:value-type="percentage">
            <text:p>17,8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number-columns-repeated="2"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505" calcext:value-type="percentage">
            <text:p>45,05%</text:p>
          </table:table-cell>
          <table:table-cell table:style-name="ce2" office:value-type="percentage" office:value="0.485" calcext:value-type="percentage">
            <text:p>48,5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13" calcext:value-type="percentage">
            <text:p>41,30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45" calcext:value-type="percentage">
            <text:p>38,45%</text:p>
          </table:table-cell>
          <table:table-cell table:style-name="ce2" office:value-type="percentage" office:value="0.3835" calcext:value-type="percentage">
            <text:p>38,3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402" calcext:value-type="percentage">
            <text:p>40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59" calcext:value-type="percentage">
            <text:p>45,90%</text:p>
          </table:table-cell>
          <table:table-cell table:style-name="ce2" office:value-type="percentage" office:value="0.42" calcext:value-type="percentage">
            <text:p>42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65" calcext:value-type="percentage">
            <text:p>41,65%</text:p>
          </table:table-cell>
          <table:table-cell table:style-name="ce2" office:value-type="percentage" office:value="0.4175" calcext:value-type="percentage">
            <text:p>41,7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155" calcext:value-type="percentage">
            <text:p>41,55%</text:p>
          </table:table-cell>
          <table:table-cell table:style-name="ce2" office:value-type="percentage" office:value="0.396" calcext:value-type="percentage">
            <text:p>39,6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73" calcext:value-type="percentage">
            <text:p>37,30%</text:p>
          </table:table-cell>
          <table:table-cell table:style-name="ce2" office:value-type="percentage" office:value="0.39" calcext:value-type="percentage">
            <text:p>39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05" calcext:value-type="percentage">
            <text:p>43,05%</text:p>
          </table:table-cell>
          <table:table-cell table:style-name="ce2" office:value-type="percentage" office:value="0.438" calcext:value-type="percentage">
            <text:p>43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2" office:value-type="percentage" office:value="0.3885" calcext:value-type="percentage">
            <text:p>38,8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125" calcext:value-type="percentage">
            <text:p>21,25%</text:p>
          </table:table-cell>
          <table:table-cell table:style-name="ce1" table:formula="of:=AVERAGE([.C158:.C167])" office:value-type="percentage" office:value="0.199" calcext:value-type="percentage">
            <text:p>19,9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125" calcext:value-type="percentage">
            <text:p>41,13%</text:p>
          </table:table-cell>
          <table:table-cell table:style-name="ce1" table:formula="of:=AVERAGE([.G158:.G167])" office:value-type="percentage" office:value="0.41485" calcext:value-type="percentage">
            <text:p>41,49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35" calcext:value-type="percentage">
            <text:p>3,50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41" calcext:value-type="percentage">
            <text:p>25,41%</text:p>
          </table:table-cell>
          <table:table-cell table:style-name="ce3"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925" calcext:value-type="percentage">
            <text:p>9,2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486" calcext:value-type="percentage">
            <text:p>24,86%</text:p>
          </table:table-cell>
          <table:table-cell table:style-name="ce3" office:value-type="percentage" office:value="0.2649" calcext:value-type="percentage">
            <text:p>26,4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257" calcext:value-type="percentage">
            <text:p>22,57%</text:p>
          </table:table-cell>
          <table:table-cell table:style-name="ce3" office:value-type="percentage" office:value="0.2446" calcext:value-type="percentage">
            <text:p>24,4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number-columns-repeated="2" table:style-name="ce2" office:value-type="percentage" office:value="0.085" calcext:value-type="percentage">
            <text:p>8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24" calcext:value-type="percentage">
            <text:p>23,24%</text:p>
          </table:table-cell>
          <table:table-cell table:style-name="ce3" office:value-type="percentage" office:value="0.2392" calcext:value-type="percentage">
            <text:p>23,9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25" calcext:value-type="percentage">
            <text:p>6,25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703" calcext:value-type="percentage">
            <text:p>27,03%</text:p>
          </table:table-cell>
          <table:table-cell table:style-name="ce3" office:value-type="percentage" office:value="0.273" calcext:value-type="percentage">
            <text:p>27,3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473" calcext:value-type="percentage">
            <text:p>24,73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78" calcext:value-type="percentage">
            <text:p>18,78%</text:p>
          </table:table-cell>
          <table:table-cell table:style-name="ce3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32" calcext:value-type="percentage">
            <text:p>19,32%</text:p>
          </table:table-cell>
          <table:table-cell table:style-name="ce3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57" calcext:value-type="percentage">
            <text:p>5,70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3486" calcext:value-type="percentage">
            <text:p>23,49%</text:p>
          </table:table-cell>
          <table:table-cell table:style-name="ce1" table:formula="of:=AVERAGE([.G171:.G180])" office:value-type="percentage" office:value="0.23961" calcext:value-type="percentage">
            <text:p>23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number-columns-repeated="2"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0706" calcext:value-type="percentage">
            <text:p>7,0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143" calcext:value-type="percentage">
            <text:p>1,43%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57" calcext:value-type="percentage">
            <text:p>13,57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2"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25" calcext:value-type="percentage">
            <text:p>1,25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number-columns-repeated="2" table:style-name="ce2" office:value-type="percentage" office:value="0.0054" calcext:value-type="percentage">
            <text:p>0,5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647" calcext:value-type="percentage">
            <text:p>16,47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765" calcext:value-type="percentage">
            <text:p>17,65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706" calcext:value-type="percentage">
            <text:p>7,06%</text:p>
          </table:table-cell>
          <table:table-cell table:style-name="ce2"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214" calcext:value-type="percentage">
            <text:p>2,14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294" calcext:value-type="percentage">
            <text:p>12,94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232" calcext:value-type="percentage">
            <text:p>2,32%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824" calcext:value-type="percentage">
            <text:p>8,24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3999" calcext:value-type="percentage">
            <text:p>4,00%</text:p>
          </table:table-cell>
          <table:table-cell table:style-name="ce1" table:formula="of:=AVERAGE([.C183:.C192])" office:value-type="percentage" office:value="0.04108" calcext:value-type="percentage">
            <text:p>4,11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589" calcext:value-type="percentage">
            <text:p>11,59%</text:p>
          </table:table-cell>
          <table:table-cell table:style-name="ce1" table:formula="of:=AVERAGE([.G183:.G192])"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number-columns-repeated="2" table:style-name="ce3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number-columns-repeated="2"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233" calcext:value-type="percentage">
            <text:p>2,33%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3" calcext:value-type="percentage">
            <text:p>3,00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67" calcext:value-type="percentage">
            <text:p>7,67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08" calcext:value-type="percentage">
            <text:p>8,00%</text:p>
          </table:table-cell>
          <table:table-cell table:style-name="ce1" table:formula="of:=AVERAGE([.C196:.C205])" office:value-type="percentage" office:value="0.07267" calcext:value-type="percentage">
            <text:p>7,27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2">
          <table:table-cell table:style-name="ce2" office:value-type="string" calcext:value-type="string">
            <text:p>zo_nf_s_3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8" calcext:value-type="percentage">
            <text:p>5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6" calcext:value-type="percentage">
            <text:p>7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02" calcext:value-type="percentage">
            <text:p>0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08" calcext:value-type="percentage">
            <text:p>0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44" calcext:value-type="percentage">
            <text:p>4,4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 office:value-type="percentage" office:value="0.036" calcext:value-type="percentage">
            <text:p>3,6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0562" calcext:value-type="percentage">
            <text:p>5,62%</text:p>
          </table:table-cell>
          <table:table-cell table:style-name="ce1" table:formula="of:=AVERAGE([.C208:.C217])" office:value-type="percentage" office:value="0.0502" calcext:value-type="percentage">
            <text:p>5,0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38" calcext:value-type="percentage">
            <text:p>2,38%</text:p>
          </table:table-cell>
          <table:table-cell table:style-name="ce1" table:formula="of:=AVERAGE([.G208:.G217])" office:value-type="percentage" office:value="0.0286" calcext:value-type="percentage">
            <text:p>2,8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2929" calcext:value-type="percentage">
            <text:p>29,29%</text:p>
          </table:table-cell>
          <table:table-cell table:style-name="ce2"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929" calcext:value-type="percentage">
            <text:p>19,29%</text:p>
          </table:table-cell>
          <table:table-cell table:style-name="ce2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number-columns-repeated="2" table:style-name="ce2"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786" calcext:value-type="percentage">
            <text:p>27,86%</text:p>
          </table:table-cell>
          <table:table-cell table:style-name="ce2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857" calcext:value-type="percentage">
            <text:p>28,57%</text:p>
          </table:table-cell>
          <table:table-cell table:style-name="ce2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14" calcext:value-type="percentage">
            <text:p>37,14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6383" calcext:value-type="percentage">
            <text:p>16,38%</text:p>
          </table:table-cell>
          <table:table-cell table:style-name="ce1" table:formula="of:=AVERAGE([.C220:.C229])" office:value-type="percentage" office:value="0.15957" calcext:value-type="percentage">
            <text:p>15,96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572" calcext:value-type="percentage">
            <text:p>25,57%</text:p>
          </table:table-cell>
          <table:table-cell table:style-name="ce1" table:formula="of:=AVERAGE([.G220:.G229])" office:value-type="percentage" office:value="0.26072" calcext:value-type="percentage">
            <text:p>26,07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481" calcext:value-type="percentage">
            <text:p>14,8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1889" calcext:value-type="percentage">
            <text:p>18,89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number-columns-repeated="2"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15" calcext:value-type="percentage">
            <text:p>13,15%</text:p>
          </table:table-cell>
          <table:table-cell table:style-name="ce2"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number-columns-repeated="2" table:style-name="ce2" office:value-type="percentage" office:value="0.1593" calcext:value-type="percentage">
            <text:p>15,9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37" calcext:value-type="percentage">
            <text:p>15,3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556" calcext:value-type="percentage">
            <text:p>15,5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19407" calcext:value-type="percentage">
            <text:p>19,41%</text:p>
          </table:table-cell>
          <table:table-cell table:style-name="ce1" table:formula="of:=AVERAGE([.C233:.C242])" office:value-type="percentage" office:value="0.20333" calcext:value-type="percentage">
            <text:p>20,33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871" calcext:value-type="percentage">
            <text:p>14,87%</text:p>
          </table:table-cell>
          <table:table-cell table:style-name="ce1" table:formula="of:=AVERAGE([.G233:.G242])" office:value-type="percentage" office:value="0.15278" calcext:value-type="percentage">
            <text:p>15,2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2644" calcext:value-type="percentage">
            <text:p>26,44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413" calcext:value-type="percentage">
            <text:p>4,1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375" calcext:value-type="percentage">
            <text:p>33,75%</text:p>
          </table:table-cell>
          <table:table-cell table:style-name="ce2" office:value-type="percentage" office:value="0.2955" calcext:value-type="percentage">
            <text:p>29,5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2924" calcext:value-type="percentage">
            <text:p>29,24%</text:p>
          </table:table-cell>
          <table:table-cell table:style-name="ce1" office:value-type="percentage" office:value="0.3173" calcext:value-type="percentage">
            <text:p>31,7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 office:value-type="percentage" office:value="0.2877" calcext:value-type="percentage">
            <text:p>28,77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323" calcext:value-type="percentage">
            <text:p>43,23%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761" calcext:value-type="percentage">
            <text:p>7,61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3017" calcext:value-type="percentage">
            <text:p>30,17%</text:p>
          </table:table-cell>
          <table:table-cell table:style-name="ce2" office:value-type="percentage" office:value="0.3281" calcext:value-type="percentage">
            <text:p>32,81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09" calcext:value-type="percentage">
            <text:p>6,09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number-columns-repeated="2" table:style-name="ce2" office:value-type="percentage" office:value="0.2939" calcext:value-type="percentage">
            <text:p>29,39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number-columns-repeated="2"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3374" calcext:value-type="percentage">
            <text:p>33,74%</text:p>
          </table:table-cell>
          <table:table-cell table:style-name="ce2" office:value-type="percentage" office:value="0.325" calcext:value-type="percentage">
            <text:p>32,50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311" calcext:value-type="percentage">
            <text:p>31,10%</text:p>
          </table:table-cell>
          <table:table-cell table:style-name="ce2" office:value-type="percentage" office:value="0.3468" calcext:value-type="percentage">
            <text:p>34,6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587" calcext:value-type="percentage">
            <text:p>5,8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number-columns-repeated="2"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32766" calcext:value-type="percentage">
            <text:p>32,77%</text:p>
          </table:table-cell>
          <table:table-cell table:style-name="ce1" table:formula="of:=AVERAGE([.C245:.C254])" office:value-type="percentage" office:value="0.3157" calcext:value-type="percentage">
            <text:p>31,5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03" calcext:value-type="percentage">
            <text:p>6,30%</text:p>
          </table:table-cell>
          <table:table-cell table:style-name="ce1" table:formula="of:=AVERAGE([.G245:.G254])" office:value-type="percentage" office:value="0.0613" calcext:value-type="percentage">
            <text:p>6,1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363" calcext:value-type="percentage">
            <text:p>36,30%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1986" calcext:value-type="percentage">
            <text:p>19,8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4502" calcext:value-type="percentage">
            <text:p>45,02%</text:p>
          </table:table-cell>
          <table:table-cell table:style-name="ce2" office:value-type="percentage" office:value="0.5409" calcext:value-type="percentage">
            <text:p>54,09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7" calcext:value-type="percentage">
            <text:p>22,70%</text:p>
          </table:table-cell>
          <table:table-cell table:style-name="ce2" office:value-type="percentage" office:value="0.2243" calcext:value-type="percentage">
            <text:p>22,43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2" office:value-type="percentage" office:value="0.5249" calcext:value-type="percentage">
            <text:p>52,49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274" calcext:value-type="percentage">
            <text:p>27,40%</text:p>
          </table:table-cell>
          <table:table-cell table:style-name="ce2" office:value-type="percentage" office:value="0.5018" calcext:value-type="percentage">
            <text:p>50,18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095" calcext:value-type="percentage">
            <text:p>20,9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68" calcext:value-type="percentage">
            <text:p>46,80%</text:p>
          </table:table-cell>
          <table:table-cell table:style-name="ce2" office:value-type="percentage" office:value="0.3256" calcext:value-type="percentage">
            <text:p>32,5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68" calcext:value-type="percentage">
            <text:p>20,68%</text:p>
          </table:table-cell>
          <table:table-cell table:style-name="ce2" office:value-type="percentage" office:value="0.1851" calcext:value-type="percentage">
            <text:p>18,51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2" office:value-type="percentage" office:value="0.5036" calcext:value-type="percentage">
            <text:p>50,36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22" calcext:value-type="percentage">
            <text:p>21,22%</text:p>
          </table:table-cell>
          <table:table-cell table:style-name="ce2" office:value-type="percentage" office:value="0.2216" calcext:value-type="percentage">
            <text:p>22,16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42" calcext:value-type="percentage">
            <text:p>43,42%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973" calcext:value-type="percentage">
            <text:p>19,73%</text:p>
          </table:table-cell>
          <table:table-cell table:style-name="ce2" office:value-type="percentage" office:value="0.2108" calcext:value-type="percentage">
            <text:p>21,0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2" office:value-type="percentage" office:value="0.5267" calcext:value-type="percentage">
            <text:p>52,67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946" calcext:value-type="percentage">
            <text:p>19,46%</text:p>
          </table:table-cell>
          <table:table-cell table:style-name="ce2" office:value-type="percentage" office:value="0.1905" calcext:value-type="percentage">
            <text:p>19,05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516" calcext:value-type="percentage">
            <text:p>55,16%</text:p>
          </table:table-cell>
          <table:table-cell table:style-name="ce2" office:value-type="percentage" office:value="0.452" calcext:value-type="percentage">
            <text:p>45,20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757" calcext:value-type="percentage">
            <text:p>17,57%</text:p>
          </table:table-cell>
          <table:table-cell table:style-name="ce2" office:value-type="percentage" office:value="0.1838" calcext:value-type="percentage">
            <text:p>18,3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4395" calcext:value-type="percentage">
            <text:p>43,9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4466" calcext:value-type="percentage">
            <text:p>44,47%</text:p>
          </table:table-cell>
          <table:table-cell table:style-name="ce1" table:formula="of:=AVERAGE([.C257:.C266])" office:value-type="percentage" office:value="0.47082" calcext:value-type="percentage">
            <text:p>47,08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244" calcext:value-type="percentage">
            <text:p>20,24%</text:p>
          </table:table-cell>
          <table:table-cell table:style-name="ce1" table:formula="of:=AVERAGE([.G257:.G266])" office:value-type="percentage" office:value="0.20431" calcext:value-type="percentage">
            <text:p>20,4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2.11" calcext:value-type="float">
            <text:p>1422,1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185" calcext:value-type="float">
            <text:p>1,85E-02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59.859" calcext:value-type="float">
            <text:p>1759,859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846" calcext:value-type="float">
            <text:p>8,46E-03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11.908" calcext:value-type="float">
            <text:p>2211,908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0415" calcext:value-type="float">
            <text:p>0,0415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83.513" calcext:value-type="float">
            <text:p>1883,513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0.0123" calcext:value-type="float">
            <text:p>1,23E-02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0364" calcext:value-type="float">
            <text:p>3,64E-02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006" calcext:value-type="float">
            <text:p>6,00E-03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00593" calcext:value-type="float">
            <text:p>0,0059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00492" calcext:value-type="float">
            <text:p>4,92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0.0017" calcext:value-type="float">
            <text:p>1,70E-03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0.0087" calcext:value-type="float">
            <text:p>0,0087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819.3475" calcext:value-type="float">
            <text:p>1819,3475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0.014441" calcext:value-type="float">
            <text:p>0,014441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199.284" calcext:value-type="float">
            <text:p>2199,28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678.09" calcext:value-type="float">
            <text:p>1678,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811.234" calcext:value-type="float">
            <text:p>2811,2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5.16" calcext:value-type="float">
            <text:p>5,16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233.788" calcext:value-type="float">
            <text:p>2233,78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88.665" calcext:value-type="float">
            <text:p>1988,6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9.47" calcext:value-type="float">
            <text:p>9,47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04.554" calcext:value-type="float">
            <text:p>1504,55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2141.989" calcext:value-type="float">
            <text:p>2141,9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6.473" calcext:value-type="float">
            <text:p>6,473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350.27" calcext:value-type="float">
            <text:p>3350,2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11.76" calcext:value-type="float">
            <text:p>11,76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190.907" calcext:value-type="float">
            <text:p>2190,9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2694.859" calcext:value-type="float">
            <text:p>2694,8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3.6547" calcext:value-type="float">
            <text:p>3,6547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2279.364" calcext:value-type="float">
            <text:p>2279,364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6.35" calcext:value-type="float">
            <text:p>6,35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7.505" calcext:value-type="float">
            <text:p>7,50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61" calcext:value-type="float">
            <text:p>9,6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7.85" calcext:value-type="float">
            <text:p>7,8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8.73" calcext:value-type="float">
            <text:p>8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1" calcext:value-type="float">
            <text:p>0,131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0.86" calcext:value-type="float">
            <text:p>10,8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2" calcext:value-type="float">
            <text:p>6,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73" calcext:value-type="float">
            <text:p>7,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732" calcext:value-type="float">
            <text:p>0,1732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8.05277777777778" calcext:value-type="float">
            <text:p>8,05277777777778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363" calcext:value-type="float">
            <text:p>0,363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91" calcext:value-type="float">
            <text:p>0,39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202" calcext:value-type="float">
            <text:p>1,2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22.91" calcext:value-type="float">
            <text:p>22,9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0.118" calcext:value-type="float">
            <text:p>10,11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7.494" calcext:value-type="float">
            <text:p>7,49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2663" calcext:value-type="float">
            <text:p>0,2663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6.18785714285714" calcext:value-type="float">
            <text:p>6,18785714285714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2.638" calcext:value-type="float">
            <text:p>2,638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389" calcext:value-type="float">
            <text:p>0,03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1.067" calcext:value-type="float">
            <text:p>1,06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895" calcext:value-type="float">
            <text:p>0,89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195" calcext:value-type="float">
            <text:p>1,195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74" calcext:value-type="float">
            <text:p>26,74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045" calcext:value-type="float">
            <text:p>1,045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0777" calcext:value-type="float">
            <text:p>0,07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1.599" calcext:value-type="float">
            <text:p>1,599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4.818" calcext:value-type="float">
            <text:p>4,818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26" calcext:value-type="float">
            <text:p>0,032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3.44" calcext:value-type="float">
            <text:p>3,44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614" calcext:value-type="float">
            <text:p>0,61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4.435" calcext:value-type="float">
            <text:p>4,435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30062" calcext:value-type="float">
            <text:p>0,30062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3193.454" calcext:value-type="float">
            <text:p>3193,45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45.03" calcext:value-type="float">
            <text:p>145,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099.26" calcext:value-type="float">
            <text:p>2099,26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930.611" calcext:value-type="float">
            <text:p>1930,611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984.029" calcext:value-type="float">
            <text:p>2984,02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3426.247" calcext:value-type="float">
            <text:p>3426,247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879.72" calcext:value-type="float">
            <text:p>2879,72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2925.37" calcext:value-type="float">
            <text:p>2925,37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658.05888888889" calcext:value-type="float">
            <text:p>2658,05888888889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8.893875" calcext:value-type="float">
            <text:p>158,893875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36.123" calcext:value-type="float">
            <text:p>36,123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52" calcext:value-type="float">
            <text:p>3,75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7.657" calcext:value-type="float">
            <text:p>7,657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48" calcext:value-type="float">
            <text:p>3,5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302" calcext:value-type="float">
            <text:p>3,30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.296" calcext:value-type="float">
            <text:p>1,29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189" calcext:value-type="float">
            <text:p>3,18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2.724" calcext:value-type="float">
            <text:p>2,724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32" calcext:value-type="float">
            <text:p>3,83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4.677" calcext:value-type="float">
            <text:p>4,677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268" calcext:value-type="float">
            <text:p>3,26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4.669" calcext:value-type="float">
            <text:p>4,669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737" calcext:value-type="float">
            <text:p>4,73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float" office:value="16.418" calcext:value-type="float">
            <text:p>16,418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624" calcext:value-type="float">
            <text:p>3,62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5.865" calcext:value-type="float">
            <text:p>5,865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493" calcext:value-type="float">
            <text:p>3,4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19.851" calcext:value-type="float">
            <text:p>19,851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096" calcext:value-type="float">
            <text:p>3,096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10.263" calcext:value-type="float">
            <text:p>10,263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5841" calcext:value-type="float">
            <text:p>3,5841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21.093" calcext:value-type="float">
            <text:p>21,093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1.633" calcext:value-type="float">
            <text:p>1,633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9.88" calcext:value-type="float">
            <text:p>9,88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.516" calcext:value-type="float">
            <text:p>2,51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406" calcext:value-type="float">
            <text:p>9,406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1.744" calcext:value-type="float">
            <text:p>1,74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534" calcext:value-type="float">
            <text:p>7,534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.7" calcext:value-type="float">
            <text:p>1,7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82" calcext:value-type="float">
            <text:p>7,682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9.627" calcext:value-type="float">
            <text:p>9,627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8.975" calcext:value-type="float">
            <text:p>8,975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039" calcext:value-type="float">
            <text:p>8,039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7.583" calcext:value-type="float">
            <text:p>7,58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8.775" calcext:value-type="float">
            <text:p>8,775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9.8594" calcext:value-type="float">
            <text:p>9,8594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1.89825" calcext:value-type="float">
            <text:p>1,89825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8.305" calcext:value-type="float">
            <text:p>148,305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56" calcext:value-type="float">
            <text:p>128,556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1.403" calcext:value-type="float">
            <text:p>151,403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table:number-columns-repeated="3"/>
          <table:table-cell table:style-name="ce2" office:value-type="string" calcext:value-type="string">
            <text:p>Treasur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table:number-columns-repeated="3"/>
          <table:table-cell table:style-name="ce2" office:value-type="string" calcext:value-type="string">
            <text:p>Treasur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table:number-columns-repeated="3"/>
          <table:table-cell table:style-name="ce2" office:value-type="string" calcext:value-type="string">
            <text:p>Treasury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table:number-columns-repeated="3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table:number-columns-repeated="3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table:number-columns-repeated="3"/>
          <table:table-cell table:style-name="ce2" office:value-type="string" calcext:value-type="string">
            <text:p>Treasury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42.754666666667" calcext:value-type="float">
            <text:p>142,754666666667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string" office:string-value="" calcext:value-type="error">
            <text:p>#DIV/0!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299.504" calcext:value-type="float">
            <text:p>2299,504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table:number-columns-repeated="3"/>
          <table:table-cell table:style-name="ce2" office:value-type="string" calcext:value-type="string">
            <text:p>Auto_3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table:number-columns-repeated="3"/>
          <table:table-cell table:style-name="ce2" office:value-type="string" calcext:value-type="string">
            <text:p>Auto_4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table:number-columns-repeated="3"/>
          <table:table-cell table:style-name="ce2" office:value-type="string" calcext:value-type="string">
            <text:p>Auto_5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table:number-columns-repeated="3"/>
          <table:table-cell table:style-name="ce2" office:value-type="string" calcext:value-type="string">
            <text:p>Auto_6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table:number-columns-repeated="3"/>
          <table:table-cell table:style-name="ce2" office:value-type="string" calcext:value-type="string">
            <text:p>Auto_7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table:number-columns-repeated="3"/>
          <table:table-cell table:style-name="ce2" office:value-type="string" calcext:value-type="string">
            <text:p>Auto_8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table:number-columns-repeated="3"/>
          <table:table-cell table:style-name="ce2" office:value-type="string" calcext:value-type="string">
            <text:p>Auto_9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table:number-columns-repeated="3"/>
          <table:table-cell table:style-name="ce2" office:value-type="string" calcext:value-type="string">
            <text:p>Auto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2299.504" calcext:value-type="float">
            <text:p>2299,50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535" calcext:value-type="float">
            <text:p>535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85.801" calcext:value-type="float">
            <text:p>485,801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9" calcext:value-type="float">
            <text:p>0,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566" calcext:value-type="float">
            <text:p>0,56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555" calcext:value-type="float">
            <text:p>0,55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302" calcext:value-type="float">
            <text:p>0,302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65.263" calcext:value-type="float">
            <text:p>465,263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996" calcext:value-type="float">
            <text:p>0,3996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099" calcext:value-type="float">
            <text:p>0,099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11" calcext:value-type="float">
            <text:p>0,0311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2" calcext:value-type="float">
            <text:p>0,09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09" calcext:value-type="float">
            <text:p>0,070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59" calcext:value-type="float">
            <text:p>0,35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770777777777778" calcext:value-type="float">
            <text:p>0,0770777777777778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5366" calcext:value-type="float">
            <text:p>0,536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ipso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36" calcext:value-type="percentage">
            <text:p>23,60%</text:p>
          </table:table-cell>
          <table:table-cell table:style-name="ce48" office:value-type="percentage" office:value="0.217" calcext:value-type="percentage">
            <text:p>21,70%</text:p>
          </table:table-cell>
          <table:table-cell table:style-name="ce48" office:value-type="percentage" office:value="0.225" calcext:value-type="percentage">
            <text:p>22,5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style-name="ce48" office:value-type="percentage" office:value="0.1596" calcext:value-type="percentage">
            <text:p>15,96%</text:p>
          </table:table-cell>
          <table:table-cell table:style-name="ce48" office:value-type="percentage" office:value="0.1638" calcext:value-type="percentage">
            <text:p>16,38%</text:p>
          </table:table-cell>
          <table:table-cell table:style-name="ce48" office:value-type="percentage" office:value="0.1596" calcext:value-type="percentage">
            <text:p>15,96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1942" calcext:value-type="percentage">
            <text:p>19,42%</text:p>
          </table:table-cell>
          <table:table-cell table:style-name="ce48" office:value-type="percentage" office:value="0.2168" calcext:value-type="percentage">
            <text:p>21,68%</text:p>
          </table:table-cell>
          <table:table-cell table:style-name="ce48" office:value-type="percentage" office:value="0.2274" calcext:value-type="percentage">
            <text:p>22,74%</text:p>
          </table:table-cell>
          <table:table-cell table:style-name="ce48" office:value-type="percentage" office:value="0.2591" calcext:value-type="percentage">
            <text:p>25,9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6" calcext:value-type="percentage">
            <text:p>6,60%</text:p>
          </table:table-cell>
          <table:table-cell table:style-name="ce48" office:value-type="percentage" office:value="0.0702" calcext:value-type="percentage">
            <text:p>7,02%</text:p>
          </table:table-cell>
          <table:table-cell table:style-name="ce48" office:value-type="percentage" office:value="0.0687" calcext:value-type="percentage">
            <text:p>6,87%</text:p>
          </table:table-cell>
          <table:table-cell table:style-name="ce48" office:value-type="percentage" office:value="0.0686" calcext:value-type="percentage">
            <text:p>6,86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1" calcext:value-type="percentage">
            <text:p>4,31%</text:p>
          </table:table-cell>
          <table:table-cell table:style-name="ce48" office:value-type="percentage" office:value="0.0427" calcext:value-type="percentage">
            <text:p>4,27%</text:p>
          </table:table-cell>
          <table:table-cell table:style-name="ce48" office:value-type="percentage" office:value="0.0417" calcext:value-type="percentage">
            <text:p>4,17%</text:p>
          </table:table-cell>
          <table:table-cell table:style-name="ce48" office:value-type="percentage" office:value="0.0435" calcext:value-type="percentage">
            <text:p>4,35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914" calcext:value-type="percentage">
            <text:p>49,14%</text:p>
          </table:table-cell>
          <table:table-cell table:style-name="ce48" office:value-type="percentage" office:value="0.4793" calcext:value-type="percentage">
            <text:p>47,93%</text:p>
          </table:table-cell>
          <table:table-cell table:style-name="ce48" office:value-type="percentage" office:value="0.4448" calcext:value-type="percentage">
            <text:p>44,48%</text:p>
          </table:table-cell>
          <table:table-cell table:style-name="ce48" office:value-type="percentage" office:value="0.4614" calcext:value-type="percentage">
            <text:p>46,14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786" calcext:value-type="percentage">
            <text:p>7,86%</text:p>
          </table:table-cell>
          <table:table-cell table:style-name="ce48" office:value-type="percentage" office:value="0.102" calcext:value-type="percentage">
            <text:p>10,20%</text:p>
          </table:table-cell>
          <table:table-cell table:style-name="ce48" office:value-type="percentage" office:value="0.0831" calcext:value-type="percentage">
            <text:p>8,31%</text:p>
          </table:table-cell>
          <table:table-cell table:style-name="ce48" office:value-type="percentage" office:value="0.1277" calcext:value-type="percentage">
            <text:p>12,77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444" calcext:value-type="percentage">
            <text:p>44,40%</text:p>
          </table:table-cell>
          <table:table-cell table:style-name="ce48" office:value-type="percentage" office:value="0.4624" calcext:value-type="percentage">
            <text:p>46,24%</text:p>
          </table:table-cell>
          <table:table-cell table:style-name="ce48" office:value-type="percentage" office:value="0.4488" calcext:value-type="percentage">
            <text:p>44,88%</text:p>
          </table:table-cell>
          <table:table-cell table:style-name="ce48" office:value-type="percentage" office:value="0.4776" calcext:value-type="percentage">
            <text:p>47,76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38" calcext:value-type="percentage">
            <text:p>23,80%</text:p>
          </table:table-cell>
          <table:table-cell table:style-name="ce48" office:value-type="percentage" office:value="0.252" calcext:value-type="percentage">
            <text:p>25,20%</text:p>
          </table:table-cell>
          <table:table-cell table:style-name="ce48" office:value-type="percentage" office:value="0.244" calcext:value-type="percentage">
            <text:p>24,40%</text:p>
          </table:table-cell>
          <table:table-cell table:style-name="ce48" office:value-type="percentage" office:value="0.254" calcext:value-type="percentage">
            <text:p>25,4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793" calcext:value-type="percentage">
            <text:p>27,93%</text:p>
          </table:table-cell>
          <table:table-cell table:style-name="ce48" office:value-type="percentage" office:value="0.278" calcext:value-type="percentage">
            <text:p>27,80%</text:p>
          </table:table-cell>
          <table:table-cell table:style-name="ce48" office:value-type="percentage" office:value="0.2733" calcext:value-type="percentage">
            <text:p>27,33%</text:p>
          </table:table-cell>
          <table:table-cell table:style-name="ce48" office:value-type="percentage" office:value="0.2833" calcext:value-type="percentage">
            <text:p>28,33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815" calcext:value-type="percentage">
            <text:p>38,15%</text:p>
          </table:table-cell>
          <table:table-cell table:style-name="ce48" office:value-type="percentage" office:value="0.3869" calcext:value-type="percentage">
            <text:p>38,69%</text:p>
          </table:table-cell>
          <table:table-cell table:style-name="ce48" office:value-type="percentage" office:value="0.3723" calcext:value-type="percentage">
            <text:p>37,23%</text:p>
          </table:table-cell>
          <table:table-cell table:style-name="ce48" office:value-type="percentage" office:value="0.34" calcext:value-type="percentage">
            <text:p>34,00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81" calcext:value-type="percentage">
            <text:p>21,81%</text:p>
          </table:table-cell>
          <table:table-cell table:style-name="ce48" office:value-type="percentage" office:value="0.1789" calcext:value-type="percentage">
            <text:p>17,89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1815" calcext:value-type="percentage">
            <text:p>18,15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216" calcext:value-type="percentage">
            <text:p>21,60%</text:p>
          </table:table-cell>
          <table:table-cell table:style-name="ce48" office:value-type="percentage" office:value="0.2057" calcext:value-type="percentage">
            <text:p>20,57%</text:p>
          </table:table-cell>
          <table:table-cell table:style-name="ce48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26" calcext:value-type="percentage">
            <text:p>7,26%</text:p>
          </table:table-cell>
          <table:table-cell table:style-name="ce48" office:value-type="percentage" office:value="0.0678" calcext:value-type="percentage">
            <text:p>6,78%</text:p>
          </table:table-cell>
          <table:table-cell table:style-name="ce48" office:value-type="percentage" office:value="0.0739" calcext:value-type="percentage">
            <text:p>7,39%</text:p>
          </table:table-cell>
          <table:table-cell table:style-name="ce48" office:value-type="percentage" office:value="0.0687" calcext:value-type="percentage">
            <text:p>6,87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43" calcext:value-type="percentage">
            <text:p>15,43%</text:p>
          </table:table-cell>
          <table:table-cell table:style-name="ce48" office:value-type="percentage" office:value="0.1392" calcext:value-type="percentage">
            <text:p>13,92%</text:p>
          </table:table-cell>
          <table:table-cell table:style-name="ce48" office:value-type="percentage" office:value="0.1463" calcext:value-type="percentage">
            <text:p>14,63%</text:p>
          </table:table-cell>
          <table:table-cell table:style-name="ce48" office:value-type="percentage" office:value="0.1572" calcext:value-type="percentage">
            <text:p>15,72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79" calcext:value-type="percentage">
            <text:p>31,79%</text:p>
          </table:table-cell>
          <table:table-cell table:style-name="ce48" office:value-type="percentage" office:value="0.325" calcext:value-type="percentage">
            <text:p>32,50%</text:p>
          </table:table-cell>
          <table:table-cell table:style-name="ce48" office:value-type="percentage" office:value="0.3341" calcext:value-type="percentage">
            <text:p>33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743" calcext:value-type="percentage">
            <text:p>27,43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557" calcext:value-type="percentage">
            <text:p>25,57%</text:p>
          </table:table-cell>
          <table:table-cell table:style-name="ce48" office:value-type="percentage" office:value="0.2607" calcext:value-type="percentage">
            <text:p>26,07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853" calcext:value-type="percentage">
            <text:p>18,53%</text:p>
          </table:table-cell>
          <table:table-cell table:style-name="ce48" office:value-type="percentage" office:value="0.1727" calcext:value-type="percentage">
            <text:p>17,27%</text:p>
          </table:table-cell>
          <table:table-cell table:style-name="ce48" office:value-type="percentage" office:value="0.1745" calcext:value-type="percentage">
            <text:p>17,45%</text:p>
          </table:table-cell>
          <table:table-cell table:style-name="ce48" office:value-type="percentage" office:value="0.172" calcext:value-type="percentage">
            <text:p>17,20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3839" calcext:value-type="percentage">
            <text:p>38,39%</text:p>
          </table:table-cell>
          <table:table-cell table:style-name="ce48" office:value-type="percentage" office:value="0.41" calcext:value-type="percentage">
            <text:p>41,00%</text:p>
          </table:table-cell>
          <table:table-cell table:style-name="ce48" office:value-type="percentage" office:value="0.4447" calcext:value-type="percentage">
            <text:p>44,47%</text:p>
          </table:table-cell>
          <table:table-cell table:style-name="ce48" office:value-type="percentage" office:value="0.4708" calcext:value-type="percentage">
            <text:p>47,08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505" calcext:value-type="percentage">
            <text:p>15,05%</text:p>
          </table:table-cell>
          <table:table-cell table:style-name="ce48" office:value-type="percentage" office:value="0.1663" calcext:value-type="percentage">
            <text:p>16,63%</text:p>
          </table:table-cell>
          <table:table-cell table:style-name="ce48" office:value-type="percentage" office:value="0.1447" calcext:value-type="percentage">
            <text:p>14,47%</text:p>
          </table:table-cell>
          <table:table-cell table:style-name="ce48" office:value-type="percentage" office:value="0.1563" calcext:value-type="percentage">
            <text:p>15,63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15" calcext:value-type="percentage">
            <text:p>15,15%</text:p>
          </table:table-cell>
          <table:table-cell table:style-name="ce48" office:value-type="percentage" office:value="0.1496" calcext:value-type="percentage">
            <text:p>14,96%</text:p>
          </table:table-cell>
          <table:table-cell table:style-name="ce48" office:value-type="percentage" office:value="0.1487" calcext:value-type="percentage">
            <text:p>14,87%</text:p>
          </table:table-cell>
          <table:table-cell table:style-name="ce48" office:value-type="percentage" office:value="0.1528" calcext:value-type="percentage">
            <text:p>15,28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551" calcext:value-type="percentage">
            <text:p>25,51%</text:p>
          </table:table-cell>
          <table:table-cell table:style-name="ce48" office:value-type="percentage" office:value="0.2596" calcext:value-type="percentage">
            <text:p>25,96%</text:p>
          </table:table-cell>
          <table:table-cell table:style-name="ce48" office:value-type="percentage" office:value="0.2545" calcext:value-type="percentage">
            <text:p>25,45%</text:p>
          </table:table-cell>
          <table:table-cell table:style-name="ce48" office:value-type="percentage" office:value="0.2678" calcext:value-type="percentage">
            <text:p>26,78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44" calcext:value-type="percentage">
            <text:p>6,44%</text:p>
          </table:table-cell>
          <table:table-cell table:style-name="ce48" office:value-type="percentage" office:value="0.0657" calcext:value-type="percentage">
            <text:p>6,57%</text:p>
          </table:table-cell>
          <table:table-cell table:style-name="ce48" office:value-type="percentage" office:value="0.0689" calcext:value-type="percentage">
            <text:p>6,89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2785" calcext:value-type="percentage">
            <text:p>27,85%</text:p>
          </table:table-cell>
          <table:table-cell table:style-name="ce48" office:value-type="percentage" office:value="0.2871" calcext:value-type="percentage">
            <text:p>28,71%</text:p>
          </table:table-cell>
          <table:table-cell table:style-name="ce48" office:value-type="percentage" office:value="0.2927" calcext:value-type="percentage">
            <text:p>29,27%</text:p>
          </table:table-cell>
          <table:table-cell table:style-name="ce48" office:value-type="percentage" office:value="0.2753" calcext:value-type="percentage">
            <text:p>27,53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95" calcext:value-type="percentage">
            <text:p>20,95%</text:p>
          </table:table-cell>
          <table:table-cell table:style-name="ce48" office:value-type="percentage" office:value="0.2107" calcext:value-type="percentage">
            <text:p>21,07%</text:p>
          </table:table-cell>
          <table:table-cell table:style-name="ce48" office:value-type="percentage" office:value="0.2024" calcext:value-type="percentage">
            <text:p>20,24%</text:p>
          </table:table-cell>
          <table:table-cell table:style-name="ce48" office:value-type="percentage" office:value="0.2043" calcext:value-type="percentage">
            <text:p>20,43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217" calcext:value-type="percentage">
            <text:p>32,17%</text:p>
          </table:table-cell>
          <table:table-cell table:style-name="ce48" office:value-type="percentage" office:value="0.3317" calcext:value-type="percentage">
            <text:p>33,17%</text:p>
          </table:table-cell>
          <table:table-cell table:style-name="ce48" office:value-type="percentage" office:value="0.3209" calcext:value-type="percentage">
            <text:p>32,09%</text:p>
          </table:table-cell>
          <table:table-cell table:style-name="ce48" office:value-type="percentage" office:value="0.3278" calcext:value-type="percentage">
            <text:p>32,78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3226" calcext:value-type="percentage">
            <text:p>32,26%</text:p>
          </table:table-cell>
          <table:table-cell table:style-name="ce48" office:value-type="percentage" office:value="0.31" calcext:value-type="percentage">
            <text:p>31,00%</text:p>
          </table:table-cell>
          <table:table-cell table:style-name="ce48" office:value-type="percentage" office:value="0.3277" calcext:value-type="percentage">
            <text:p>32,77%</text:p>
          </table:table-cell>
          <table:table-cell table:style-name="ce48" office:value-type="percentage" office:value="0.3157" calcext:value-type="percentage">
            <text:p>31,57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377" calcext:value-type="percentage">
            <text:p>13,77%</text:p>
          </table:table-cell>
          <table:table-cell table:style-name="ce48" office:value-type="percentage" office:value="0.1558" calcext:value-type="percentage">
            <text:p>15,58%</text:p>
          </table:table-cell>
          <table:table-cell table:style-name="ce48" office:value-type="percentage" office:value="0.1654" calcext:value-type="percentage">
            <text:p>16,54%</text:p>
          </table:table-cell>
          <table:table-cell table:style-name="ce48" office:value-type="percentage" office:value="0.1783" calcext:value-type="percentage">
            <text:p>17,83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1" calcext:value-type="percentage">
            <text:p>19,1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125" calcext:value-type="percentage">
            <text:p>21,25%</text:p>
          </table:table-cell>
          <table:table-cell table:style-name="ce48" office:value-type="percentage" office:value="0.199" calcext:value-type="percentage">
            <text:p>19,9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style-name="ce48" office:value-type="percentage" office:value="0.0613" calcext:value-type="percentage">
            <text:p>6,13%</text:p>
          </table:table-cell>
          <table:table-cell table:style-name="ce48" office:value-type="percentage" office:value="0.063" calcext:value-type="percentage">
            <text:p>6,30%</text:p>
          </table:table-cell>
          <table:table-cell table:style-name="ce48" office:value-type="percentage" office:value="0.0613" calcext:value-type="percentage">
            <text:p>6,13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252" calcext:value-type="percentage">
            <text:p>42,52%</text:p>
          </table:table-cell>
          <table:table-cell table:style-name="ce48" office:value-type="percentage" office:value="0.4084" calcext:value-type="percentage">
            <text:p>40,84%</text:p>
          </table:table-cell>
          <table:table-cell table:style-name="ce48" office:value-type="percentage" office:value="0.4113" calcext:value-type="percentage">
            <text:p>41,13%</text:p>
          </table:table-cell>
          <table:table-cell table:style-name="ce48" office:value-type="percentage" office:value="0.4149" calcext:value-type="percentage">
            <text:p>41,49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159" calcext:value-type="percentage">
            <text:p>21,59%</text:p>
          </table:table-cell>
          <table:table-cell table:style-name="ce48" office:value-type="percentage" office:value="0.1941" calcext:value-type="percentage">
            <text:p>19,41%</text:p>
          </table:table-cell>
          <table:table-cell table:style-name="ce48" office:value-type="percentage" office:value="0.2033" calcext:value-type="percentage">
            <text:p>20,33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3" calcext:value-type="percentage">
            <text:p>5,63%</text:p>
          </table:table-cell>
          <table:table-cell table:style-name="ce48" office:value-type="percentage" office:value="0.0588" calcext:value-type="percentage">
            <text:p>5,88%</text:p>
          </table:table-cell>
          <table:table-cell table:style-name="ce48" office:value-type="percentage" office:value="0.057" calcext:value-type="percentage">
            <text:p>5,70%</text:p>
          </table:table-cell>
          <table:table-cell table:style-name="ce48" office:value-type="percentage" office:value="0.059" calcext:value-type="percentage">
            <text:p>5,90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256" calcext:value-type="percentage">
            <text:p>22,56%</text:p>
          </table:table-cell>
          <table:table-cell table:style-name="ce48" office:value-type="percentage" office:value="0.2293" calcext:value-type="percentage">
            <text:p>22,93%</text:p>
          </table:table-cell>
          <table:table-cell table:style-name="ce48" office:value-type="percentage" office:value="0.2349" calcext:value-type="percentage">
            <text:p>23,49%</text:p>
          </table:table-cell>
          <table:table-cell table:style-name="ce48" office:value-type="percentage" office:value="0.2396" calcext:value-type="percentage">
            <text:p>23,96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37" calcext:value-type="percentage">
            <text:p>4,37%</text:p>
          </table:table-cell>
          <table:table-cell table:style-name="ce48" office:value-type="percentage" office:value="0.0461" calcext:value-type="percentage">
            <text:p>4,61%</text:p>
          </table:table-cell>
          <table:table-cell table:style-name="ce48" office:value-type="percentage" office:value="0.04" calcext:value-type="percentage">
            <text:p>4,00%</text:p>
          </table:table-cell>
          <table:table-cell table:style-name="ce48" office:value-type="percentage" office:value="0.0411" calcext:value-type="percentage">
            <text:p>4,11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53" calcext:value-type="percentage">
            <text:p>11,53%</text:p>
          </table:table-cell>
          <table:table-cell table:style-name="ce48" office:value-type="percentage" office:value="0.0982" calcext:value-type="percentage">
            <text:p>9,82%</text:p>
          </table:table-cell>
          <table:table-cell table:style-name="ce48" office:value-type="percentage" office:value="0.1159" calcext:value-type="percentage">
            <text:p>11,59%</text:p>
          </table:table-cell>
          <table:table-cell table:style-name="ce48" office:value-type="percentage" office:value="0.1053" calcext:value-type="percentage">
            <text:p>10,53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63" calcext:value-type="percentage">
            <text:p>9,63%</text:p>
          </table:table-cell>
          <table:table-cell table:style-name="ce48" office:value-type="percentage" office:value="0.0857" calcext:value-type="percentage">
            <text:p>8,57%</text:p>
          </table:table-cell>
          <table:table-cell table:style-name="ce48" office:value-type="percentage" office:value="0.08" calcext:value-type="percentage">
            <text:p>8,00%</text:p>
          </table:table-cell>
          <table:table-cell table:style-name="ce48" office:value-type="percentage" office:value="0.0727" calcext:value-type="percentage">
            <text:p>7,27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0475" calcext:value-type="percentage">
            <text:p>4,75%</text:p>
          </table:table-cell>
          <table:table-cell table:style-name="ce48" office:value-type="percentage" office:value="0.0508" calcext:value-type="percentage">
            <text:p>5,08%</text:p>
          </table:table-cell>
          <table:table-cell table:style-name="ce48" office:value-type="percentage" office:value="0.0562" calcext:value-type="percentage">
            <text:p>5,62%</text:p>
          </table:table-cell>
          <table:table-cell table:style-name="ce48" office:value-type="percentage" office:value="0.0502" calcext:value-type="percentage">
            <text:p>5,02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75" calcext:value-type="percentage">
            <text:p>2,75%</text:p>
          </table:table-cell>
          <table:table-cell table:style-name="ce48" office:value-type="percentage" office:value="0.0288" calcext:value-type="percentage">
            <text:p>2,88%</text:p>
          </table:table-cell>
          <table:table-cell table:style-name="ce48" office:value-type="percentage" office:value="0.0238" calcext:value-type="percentage">
            <text:p>2,38%</text:p>
          </table:table-cell>
          <table:table-cell table:style-name="ce48" office:value-type="percentage" office:value="0.0286" calcext:value-type="percentage">
            <text:p>2,8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5" calcext:value-type="percentage">
            <text:p>3,50%</text:p>
          </table:table-cell>
          <table:table-cell table:style-name="ce48" office:value-type="percentage" office:value="0.027" calcext:value-type="percentage">
            <text:p>2,70%</text:p>
          </table:table-cell>
          <table:table-cell table:style-name="ce48" office:value-type="percentage" office:value="0.029" calcext:value-type="percentage">
            <text:p>2,90%</text:p>
          </table:table-cell>
          <table:table-cell table:style-name="ce48" office:value-type="percentage" office:value="0.034" calcext:value-type="percentage">
            <text:p>3,4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19784" calcext:value-type="percentage">
            <text:p>19,78%</text:p>
          </table:table-cell>
          <table:table-cell table:style-name="ce17" table:formula="of:=AVERAGE([.D3:.D42])" office:value-type="percentage" office:value="0.196905" calcext:value-type="percentage">
            <text:p>19,69%</text:p>
          </table:table-cell>
          <table:table-cell table:style-name="ce17" table:formula="of:=AVERAGE([.E3:.E42])" office:value-type="percentage" office:value="0.1957125" calcext:value-type="percentage">
            <text:p>19,57%</text:p>
          </table:table-cell>
          <table:table-cell table:style-name="ce17" table:formula="of:=AVERAGE([.F3:.F42])" office:value-type="percentage" office:value="0.200625" calcext:value-type="percentage">
            <text:p>20,0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3]-[.C43])/[.B43]" office:value-type="percentage" office:value="0.252220584344408" calcext:value-type="percentage">
            <text:p>25,22%</text:p>
          </table:table-cell>
          <table:table-cell table:style-name="ce18" table:formula="of:=([.B43]-[.D43])/[.B43]" office:value-type="percentage" office:value="0.255754620705296" calcext:value-type="percentage">
            <text:p>25,58%</text:p>
          </table:table-cell>
          <table:table-cell table:style-name="ce18" table:formula="of:=([.B43]-[.E43])/[.B43]" office:value-type="percentage" office:value="0.260261934459689" calcext:value-type="percentage">
            <text:p>26,03%</text:p>
          </table:table-cell>
          <table:table-cell table:style-name="ce18" table:formula="of:=([.B43]-[.F43])/[.B43]" office:value-type="percentage" office:value="0.241694069622406" calcext:value-type="percentage">
            <text:p>24,17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8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number-columns-repeated="4" table:style-name="ce51" office:value-type="float" office:value="7.17" calcext:value-type="float">
            <text:p>7,17</text:p>
          </table:table-cell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3" table:formula="of:=0.1732/150" office:value-type="float" office:value="0.00115466666666667" calcext:value-type="float">
            <text:p>0,00115466666666667</text:p>
          </table:table-cell>
          <table:table-cell table:number-columns-repeated="3" table:style-name="ce51" office:value-type="float" office:value="0.003" calcext:value-type="float">
            <text:p>0,003</text:p>
          </table:table-cell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number-columns-repeated="4" table:style-name="ce51" office:value-type="float" office:value="12.18" calcext:value-type="float">
            <text:p>12,18</text:p>
          </table:table-cell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3" table:formula="of:=3.6547/9" office:value-type="float" office:value="0.406077777777778" calcext:value-type="float">
            <text:p>0,406077777777778</text:p>
          </table:table-cell>
          <table:table-cell table:number-columns-repeated="3" table:style-name="ce51" office:value-type="float" office:value="0.03" calcext:value-type="float">
            <text:p>0,03</text:p>
          </table:table-cell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3" table:formula="of:=0.014441/4" office:value-type="float" office:value="0.00361025" calcext:value-type="float">
            <text:p>0,00361025</text:p>
          </table:table-cell>
          <table:table-cell table:number-columns-repeated="3" table:style-name="ce51" office:value-type="float" office:value="5.74" calcext:value-type="float">
            <text:p>5,74</text:p>
          </table:table-cell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style-name="ce53" table:formula="of:=2279.364/33" office:value-type="float" office:value="69.0716363636364" calcext:value-type="float">
            <text:p>69,0716363636364</text:p>
          </table:table-cell>
          <table:table-cell table:number-columns-repeated="3" table:style-name="ce51" office:value-type="float" office:value="103.6" calcext:value-type="float">
            <text:p>103,6</text:p>
          </table:table-cell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3" table:formula="of:=0.2663/103" office:value-type="float" office:value="0.00258543689320388" calcext:value-type="float">
            <text:p>0,00258543689320388</text:p>
          </table:table-cell>
          <table:table-cell table:number-columns-repeated="3" table:style-name="ce51" office:value-type="float" office:value="0.0099" calcext:value-type="float">
            <text:p>0,0099</text:p>
          </table:table-cell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number-columns-repeated="4" table:style-name="ce51" office:value-type="float" office:value="1.013" calcext:value-type="float">
            <text:p>1,013</text:p>
          </table:table-cell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number-columns-repeated="4" table:style-name="ce51" office:value-type="float" office:value="1.249" calcext:value-type="float">
            <text:p>1,249</text:p>
          </table:table-cell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3" table:formula="of:=4.435/12" office:value-type="float" office:value="0.369583333333333" calcext:value-type="float">
            <text:p>0,369583333333333</text:p>
          </table:table-cell>
          <table:table-cell table:number-columns-repeated="3" table:style-name="ce51" office:value-type="float" office:value="0.65" calcext:value-type="float">
            <text:p>0,65</text:p>
          </table:table-cell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number-columns-repeated="4" table:style-name="ce51" office:value-type="float" office:value="2.78" calcext:value-type="float">
            <text:p>2,78</text:p>
          </table:table-cell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number-columns-repeated="4" table:style-name="ce51" office:value-type="float" office:value="43.26" calcext:value-type="float">
            <text:p>43,26</text:p>
          </table:table-cell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3" table:formula="of:=0.30062/99" office:value-type="float" office:value="0.00303656565656566" calcext:value-type="float">
            <text:p>0,00303656565656566</text:p>
          </table:table-cell>
          <table:table-cell table:number-columns-repeated="3" table:style-name="ce51" office:value-type="float" office:value="0.59" calcext:value-type="float">
            <text:p>0,59</text:p>
          </table:table-cell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style-name="ce53" table:formula="of:=10.263/18" office:value-type="float" office:value="0.570166666666667" calcext:value-type="float">
            <text:p>0,570166666666667</text:p>
          </table:table-cell>
          <table:table-cell table:number-columns-repeated="3" table:style-name="ce51" office:value-type="float" office:value="1.9" calcext:value-type="float">
            <text:p>1,9</text:p>
          </table:table-cell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53" table:formula="of:=0.3996/6" office:value-type="float" office:value="0.0666" calcext:value-type="float">
            <text:p>0,0666</text:p>
          </table:table-cell>
          <table:table-cell table:number-columns-repeated="3" table:style-name="ce51" office:value-type="float" office:value="0.051" calcext:value-type="float">
            <text:p>0,051</text:p>
          </table:table-cell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4" table:style-name="ce51" office:value-type="float" office:value="2.41" calcext:value-type="float">
            <text:p>2,41</text:p>
          </table:table-cell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number-columns-repeated="4" table:style-name="ce51" office:value-type="float" office:value="0.006" calcext:value-type="float">
            <text:p>0,006</text:p>
          </table:table-cell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style-name="ce53" table:formula="of:=3.5841/165" office:value-type="float" office:value="0.0217218181818182" calcext:value-type="float">
            <text:p>0,0217218181818182</text:p>
          </table:table-cell>
          <table:table-cell table:number-columns-repeated="3" table:style-name="ce51" office:value-type="float" office:value="0.28" calcext:value-type="float">
            <text:p>0,28</text:p>
          </table:table-cell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number-columns-repeated="4" table:style-name="ce51" office:value-type="float" office:value="0.564" calcext:value-type="float">
            <text:p>0,564</text:p>
          </table:table-cell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number-columns-repeated="4" table:style-name="ce51" office:value-type="float" office:value="2.791" calcext:value-type="float">
            <text:p>2,791</text:p>
          </table:table-cell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3" table:formula="of:=9.8594/217" office:value-type="float" office:value="0.0454350230414747" calcext:value-type="float">
            <text:p>0,0454350230414747</text:p>
          </table:table-cell>
          <table:table-cell table:number-columns-repeated="3" table:style-name="ce51" office:value-type="float" office:value="0.12" calcext:value-type="float">
            <text:p>0,12</text:p>
          </table:table-cell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number-columns-repeated="4" table:style-name="ce51" office:value-type="float" office:value="2.95" calcext:value-type="float">
            <text:p>2,95</text:p>
          </table:table-cell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number-columns-repeated="4" table:style-name="ce51" office:value-type="float" office:value="3.88" calcext:value-type="float">
            <text:p>3,88</text:p>
          </table:table-cell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number-columns-repeated="4" table:style-name="ce51" office:value-type="float" office:value="2.929" calcext:value-type="float">
            <text:p>2,929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6.40598366257725" calcext:value-type="float">
            <text:p>6,40598366257725</text:p>
          </table:table-cell>
          <table:table-cell table:style-name="ce13" table:formula="of:=AVERAGE([.D49:.D72])" office:value-type="float" office:value="8.1731625" calcext:value-type="float">
            <text:p>8,1731625</text:p>
          </table:table-cell>
          <table:table-cell table:style-name="ce13" table:formula="of:=AVERAGE([.E49:.E72])" office:value-type="float" office:value="8.1731625" calcext:value-type="float">
            <text:p>8,1731625</text:p>
          </table:table-cell>
          <table:table-cell table:style-name="ce13" table:formula="of:=AVERAGE([.F49:.F72])" office:value-type="float" office:value="8.1731625" calcext:value-type="float">
            <text:p>8,1731625</text:p>
          </table:table-cell>
          <table:table-cell/>
        </table:table-row>
        <table:table-row table:style-name="ro3">
          <table:table-cell table:style-name="ce38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0.216217264421545" calcext:value-type="percentage">
            <text:p>21,62%</text:p>
          </table:table-cell>
          <table:table-cell table:style-name="ce18" table:formula="of:=([.B74]-[.D74])/[.B74]" office:value-type="percentage" office:value="0" calcext:value-type="percentage">
            <text:p>0,00%</text:p>
          </table:table-cell>
          <table:table-cell table:style-name="ce18" table:formula="of:=([.B74]-[.E74])/[.B74]" office:value-type="percentage" office:value="0" calcext:value-type="percentage">
            <text:p>0,00%</text:p>
          </table:table-cell>
          <table:table-cell table:style-name="ce18" table:formula="of:=([.B74]-[.F74])/[.B74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threads_dynam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116" calcext:value-type="percentage">
            <text:p>31,16%</text:p>
          </table:table-cell>
          <table:table-cell table:style-name="ce3" office:value-type="percentage" office:value="0.3087" calcext:value-type="percentage">
            <text:p>30,8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13" calcext:value-type="percentage">
            <text:p>21,30%</text:p>
          </table:table-cell>
          <table:table-cell table:style-name="ce3" office:value-type="percentage" office:value="0.1812" calcext:value-type="percentage">
            <text:p>18,1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3261" calcext:value-type="percentage">
            <text:p>32,61%</text:p>
          </table:table-cell>
          <table:table-cell table:style-name="ce3" office:value-type="percentage" office:value="0.2725" calcext:value-type="percentage">
            <text:p>27,2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493" calcext:value-type="percentage">
            <text:p>24,93%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187" calcext:value-type="percentage">
            <text:p>18,70%</text:p>
          </table:table-cell>
          <table:table-cell table:style-name="ce3" office:value-type="percentage" office:value="0.1681" calcext:value-type="percentage">
            <text:p>16,8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043" calcext:value-type="percentage">
            <text:p>20,43%</text:p>
          </table:table-cell>
          <table:table-cell table:style-name="ce3" office:value-type="percentage" office:value="0.2246" calcext:value-type="percentage">
            <text:p>22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391" calcext:value-type="percentage">
            <text:p>33,91%</text:p>
          </table:table-cell>
          <table:table-cell table:style-name="ce3" office:value-type="percentage" office:value="0.2478" calcext:value-type="percentage">
            <text:p>24,7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number-columns-repeated="2"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2058" calcext:value-type="percentage">
            <text:p>20,58%</text:p>
          </table:table-cell>
          <table:table-cell table:style-name="ce3" office:value-type="percentage" office:value="0.158" calcext:value-type="percentage">
            <text:p>15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13" calcext:value-type="percentage">
            <text:p>21,30%</text:p>
          </table:table-cell>
          <table:table-cell table:style-name="ce3" office:value-type="percentage" office:value="0.158" calcext:value-type="percentage">
            <text:p>15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number-columns-repeated="2"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1942" calcext:value-type="percentage">
            <text:p>19,42%</text:p>
          </table:table-cell>
          <table:table-cell table:style-name="ce2" office:value-type="percentage" office:value="0.1986" calcext:value-type="percentage">
            <text:p>19,8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:.B11])" office:value-type="percentage" office:value="0.225555555555556" calcext:value-type="percentage">
            <text:p>22,56%</text:p>
          </table:table-cell>
          <table:table-cell table:style-name="ce1" table:formula="of:=AVERAGE([.C2:.C11])" office:value-type="percentage" office:value="0.23" calcext:value-type="percentage">
            <text:p>23,0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4434" calcext:value-type="percentage">
            <text:p>24,43%</text:p>
          </table:table-cell>
          <table:table-cell table:style-name="ce1" table:formula="of:=AVERAGE([.G2:.G11])" office:value-type="percentage" office:value="0.21175" calcext:value-type="percentage">
            <text:p>21,18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345" calcext:value-type="percentage">
            <text:p>53,45%</text:p>
          </table:table-cell>
          <table:table-cell table:style-name="ce2" office:value-type="percentage" office:value="0.5552" calcext:value-type="percentage">
            <text:p>55,52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2" office:value-type="percentage" office:value="0.049" calcext:value-type="percentage">
            <text:p>4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4103" calcext:value-type="percentage">
            <text:p>41,03%</text:p>
          </table:table-cell>
          <table:table-cell table:style-name="ce2" office:value-type="percentage" office:value="0.4241" calcext:value-type="percentage">
            <text:p>42,41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2" calcext:value-type="percentage">
            <text:p>2,2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138" calcext:value-type="percentage">
            <text:p>41,38%</text:p>
          </table:table-cell>
          <table:table-cell table:style-name="ce2" office:value-type="percentage" office:value="0.4655" calcext:value-type="percentage">
            <text:p>46,55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 office:value-type="percentage" office:value="0.064" calcext:value-type="percentage">
            <text:p>6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3655" calcext:value-type="percentage">
            <text:p>36,55%</text:p>
          </table:table-cell>
          <table:table-cell table:style-name="ce2" office:value-type="percentage" office:value="0.4276" calcext:value-type="percentage">
            <text:p>42,76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 office:value-type="percentage" office:value="0.062" calcext:value-type="percentage">
            <text:p>6,2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345" calcext:value-type="percentage">
            <text:p>43,45%</text:p>
          </table:table-cell>
          <table:table-cell table:style-name="ce2" office:value-type="percentage" office:value="0.4552" calcext:value-type="percentage">
            <text:p>45,52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6" calcext:value-type="percentage">
            <text:p>2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414" calcext:value-type="percentage">
            <text:p>34,14%</text:p>
          </table:table-cell>
          <table:table-cell table:style-name="ce2" office:value-type="percentage" office:value="0.4793" calcext:value-type="percentage">
            <text:p>47,93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35" calcext:value-type="percentage">
            <text:p>3,5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655" calcext:value-type="percentage">
            <text:p>46,55%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8" calcext:value-type="percentage">
            <text:p>4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number-columns-repeated="2" table:style-name="ce2" office:value-type="percentage" office:value="0.5966" calcext:value-type="percentage">
            <text:p>59,66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number-columns-repeated="2" table:style-name="ce2" office:value-type="percentage" office:value="0.029" calcext:value-type="percentage">
            <text:p>2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172" calcext:value-type="percentage">
            <text:p>51,72%</text:p>
          </table:table-cell>
          <table:table-cell table:style-name="ce2" office:value-type="percentage" office:value="0.5414" calcext:value-type="percentage">
            <text:p>54,14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37" calcext:value-type="percentage">
            <text:p>3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4897" calcext:value-type="percentage">
            <text:p>48,97%</text:p>
          </table:table-cell>
          <table:table-cell table:style-name="ce2" office:value-type="percentage" office:value="0.5138" calcext:value-type="percentage">
            <text:p>51,38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2" office:value-type="percentage" office:value="0.07" calcext:value-type="percentage">
            <text:p>7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4:.B23])" office:value-type="percentage" office:value="0.4569" calcext:value-type="percentage">
            <text:p>45,69%</text:p>
          </table:table-cell>
          <table:table-cell table:style-name="ce1" table:formula="of:=AVERAGE([.C14:.C23])" office:value-type="percentage" office:value="0.49656" calcext:value-type="percentage">
            <text:p>49,66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34" calcext:value-type="percentage">
            <text:p>4,34%</text:p>
          </table:table-cell>
          <table:table-cell table:style-name="ce1" table:formula="of:=AVERAGE([.G14:.G23])" office:value-type="percentage" office:value="0.0442" calcext:value-type="percentage">
            <text:p>4,4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686" calcext:value-type="percentage">
            <text:p>6,86%</text:p>
          </table:table-cell>
          <table:table-cell table:style-name="ce2" office:value-type="percentage" office:value="0.0629" calcext:value-type="percentage">
            <text:p>6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457" calcext:value-type="percentage">
            <text:p>14,5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1486" calcext:value-type="percentage">
            <text:p>14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0743" calcext:value-type="percentage">
            <text:p>7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029" calcext:value-type="percentage">
            <text:p>10,29%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029" calcext:value-type="percentage">
            <text:p>10,29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1343" calcext:value-type="percentage">
            <text:p>13,43%</text:p>
          </table:table-cell>
          <table:table-cell table:style-name="ce2" office:value-type="percentage" office:value="0.1686" calcext:value-type="percentage">
            <text:p>16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0714" calcext:value-type="percentage">
            <text:p>7,14%</text:p>
          </table:table-cell>
          <table:table-cell table:style-name="ce2" office:value-type="percentage" office:value="0.0629" calcext:value-type="percentage">
            <text:p>6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0943" calcext:value-type="percentage">
            <text:p>9,43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7:.B36])" office:value-type="percentage" office:value="0.255" calcext:value-type="percentage">
            <text:p>25,50%</text:p>
          </table:table-cell>
          <table:table-cell table:style-name="ce1" table:formula="of:=AVERAGE([.C27:.C36])" office:value-type="percentage" office:value="0.236" calcext:value-type="percentage">
            <text:p>23,6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9971" calcext:value-type="percentage">
            <text:p>9,97%</text:p>
          </table:table-cell>
          <table:table-cell table:style-name="ce1" table:formula="of:=AVERAGE([.G27:.G36])" office:value-type="percentage" office:value="0.11516" calcext:value-type="percentage">
            <text:p>11,5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909" calcext:value-type="percentage">
            <text:p>39,09%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2" office:value-type="percentage" office:value="0.0452" calcext:value-type="percentage">
            <text:p>4,5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182" calcext:value-type="percentage">
            <text:p>41,82%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0919" calcext:value-type="percentage">
            <text:p>9,19%</text:p>
          </table:table-cell>
          <table:table-cell table:style-name="ce2" office:value-type="percentage" office:value="0.1113" calcext:value-type="percentage">
            <text:p>11,1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667" calcext:value-type="percentage">
            <text:p>46,67%</text:p>
          </table:table-cell>
          <table:table-cell table:style-name="ce2" office:value-type="percentage" office:value="0.5727" calcext:value-type="percentage">
            <text:p>57,27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823" calcext:value-type="percentage">
            <text:p>8,23%</text:p>
          </table:table-cell>
          <table:table-cell table:style-name="ce2" office:value-type="percentage" office:value="0.1032" calcext:value-type="percentage">
            <text:p>10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94" calcext:value-type="percentage">
            <text:p>6,94%</text:p>
          </table:table-cell>
          <table:table-cell table:style-name="ce2" office:value-type="percentage" office:value="0.0774" calcext:value-type="percentage">
            <text:p>7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2" office:value-type="percentage" office:value="0.5758" calcext:value-type="percentage">
            <text:p>57,58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597" calcext:value-type="percentage">
            <text:p>5,9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515" calcext:value-type="percentage">
            <text:p>55,15%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2" office:value-type="percentage" office:value="0.0419" calcext:value-type="percentage">
            <text:p>4,1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727" calcext:value-type="percentage">
            <text:p>57,27%</text:p>
          </table:table-cell>
          <table:table-cell table:style-name="ce2" office:value-type="percentage" office:value="0.5818" calcext:value-type="percentage">
            <text:p>58,18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1065" calcext:value-type="percentage">
            <text:p>10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694" calcext:value-type="percentage">
            <text:p>6,9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5182" calcext:value-type="percentage">
            <text:p>51,82%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19" calcext:value-type="percentage">
            <text:p>9,1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758" calcext:value-type="percentage">
            <text:p>57,58%</text:p>
          </table:table-cell>
          <table:table-cell table:style-name="ce2" office:value-type="percentage" office:value="0.4727" calcext:value-type="percentage">
            <text:p>47,2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597" calcext:value-type="percentage">
            <text:p>5,97%</text:p>
          </table:table-cell>
          <table:table-cell table:style-name="ce2" office:value-type="percentage" office:value="0.0565" calcext:value-type="percentage">
            <text:p>5,65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40:.B49])" office:value-type="percentage" office:value="0.50667" calcext:value-type="percentage">
            <text:p>50,67%</text:p>
          </table:table-cell>
          <table:table-cell table:style-name="ce1" table:formula="of:=AVERAGE([.C40:.C49])" office:value-type="percentage" office:value="0.53515" calcext:value-type="percentage">
            <text:p>53,52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6936" calcext:value-type="percentage">
            <text:p>6,94%</text:p>
          </table:table-cell>
          <table:table-cell table:style-name="ce1" table:formula="of:=AVERAGE([.G40:.G49])" office:value-type="percentage" office:value="0.0763" calcext:value-type="percentage">
            <text:p>7,63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714" calcext:value-type="percentage">
            <text:p>47,14%</text:p>
          </table:table-cell>
          <table:table-cell table:style-name="ce2" office:value-type="percentage" office:value="0.5524" calcext:value-type="percentage">
            <text:p>55,24%</text:p>
          </table:table-cell>
          <table:table-cell office:value-type="float" office:value="54.71" calcext:value-type="float">
            <text:p>54,71</text:p>
          </table:table-cell>
          <table:table-cell office:value-type="float" office:value="53.14" calcext:value-type="float">
            <text:p>53,14</text:p>
          </table:table-cell>
          <table:table-cell office:value-type="float" office:value="50.57" calcext:value-type="float">
            <text:p>50,57</text:p>
          </table:table-cell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267" calcext:value-type="percentage">
            <text:p>42,67%</text:p>
          </table:table-cell>
          <table:table-cell table:style-name="ce2" office:value-type="percentage" office:value="0.4767" calcext:value-type="percentage">
            <text:p>47,67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2" office:value-type="percentage" office:value="0.6476" calcext:value-type="percentage">
            <text:p>64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6476" calcext:value-type="percentage">
            <text:p>64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571" calcext:value-type="percentage">
            <text:p>55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number-columns-repeated="2"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681" calcext:value-type="percentage">
            <text:p>68,1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429" calcext:value-type="percentage">
            <text:p>54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4952" calcext:value-type="percentage">
            <text:p>49,52%</text:p>
          </table:table-cell>
          <table:table-cell table:style-name="ce2" office:value-type="percentage" office:value="0.6238" calcext:value-type="percentage">
            <text:p>62,3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3429" calcext:value-type="percentage">
            <text:p>34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095" calcext:value-type="percentage">
            <text:p>40,9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133" calcext:value-type="percentage">
            <text:p>11,33%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381" calcext:value-type="percentage">
            <text:p>53,81%</text:p>
          </table:table-cell>
          <table:table-cell table:style-name="ce2" office:value-type="percentage" office:value="0.619" calcext:value-type="percentage">
            <text:p>61,9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53:.B62])" office:value-type="percentage" office:value="0.28967" calcext:value-type="percentage">
            <text:p>28,97%</text:p>
          </table:table-cell>
          <table:table-cell table:style-name="ce1" table:formula="of:=AVERAGE([.C53:.C62])" office:value-type="percentage" office:value="0.27467" calcext:value-type="percentage">
            <text:p>27,47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0571" calcext:value-type="percentage">
            <text:p>50,57%</text:p>
          </table:table-cell>
          <table:table-cell table:style-name="ce1" table:formula="of:=AVERAGE([.G53:.G62])" office:value-type="percentage" office:value="0.56238" calcext:value-type="percentage">
            <text:p>56,24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4308" calcext:value-type="percentage">
            <text:p>43,0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111" calcext:value-type="percentage">
            <text:p>11,11%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3923" calcext:value-type="percentage">
            <text:p>39,2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2769" calcext:value-type="percentage">
            <text:p>27,69%</text:p>
          </table:table-cell>
          <table:table-cell table:style-name="ce2" office:value-type="percentage" office:value="0.2231" calcext:value-type="percentage">
            <text:p>22,3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3692" calcext:value-type="percentage">
            <text:p>36,9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385" calcext:value-type="percentage">
            <text:p>33,8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2" office:value-type="percentage" office:value="0.3333" calcext:value-type="percentage">
            <text:p>33,33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692" calcext:value-type="percentage">
            <text:p>26,92%</text:p>
          </table:table-cell>
          <table:table-cell table:style-name="ce2" office:value-type="percentage" office:value="0.3923" calcext:value-type="percentage">
            <text:p>39,2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2" office:value-type="percentage" office:value="0.3407" calcext:value-type="percentage">
            <text:p>34,07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3077" calcext:value-type="percentage">
            <text:p>30,77%</text:p>
          </table:table-cell>
          <table:table-cell table:style-name="ce2" office:value-type="percentage" office:value="0.4692" calcext:value-type="percentage">
            <text:p>46,9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556" calcext:value-type="percentage">
            <text:p>25,56%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385" calcext:value-type="percentage">
            <text:p>23,85%</text:p>
          </table:table-cell>
          <table:table-cell table:style-name="ce2" office:value-type="percentage" office:value="0.2154" calcext:value-type="percentage">
            <text:p>21,5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385" calcext:value-type="percentage">
            <text:p>43,85%</text:p>
          </table:table-cell>
          <table:table-cell table:style-name="ce2" office:value-type="percentage" office:value="0.3615" calcext:value-type="percentage">
            <text:p>36,15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66:.B75])" office:value-type="percentage" office:value="0.21111" calcext:value-type="percentage">
            <text:p>21,11%</text:p>
          </table:table-cell>
          <table:table-cell table:style-name="ce1" table:formula="of:=AVERAGE([.C66:.C75])" office:value-type="percentage" office:value="0.286" calcext:value-type="percentage">
            <text:p>28,60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5001" calcext:value-type="percentage">
            <text:p>35,00%</text:p>
          </table:table-cell>
          <table:table-cell table:style-name="ce1" table:formula="of:=AVERAGE([.G66:.G75])" office:value-type="percentage" office:value="0.35923" calcext:value-type="percentage">
            <text:p>35,9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333" calcext:value-type="percentage">
            <text:p>3,3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39" calcext:value-type="percentage">
            <text:p>39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267" calcext:value-type="percentage">
            <text:p>32,6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6" calcext:value-type="percentage">
            <text:p>26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3333" calcext:value-type="percentage">
            <text:p>33,3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433" calcext:value-type="percentage">
            <text:p>14,33%</text:p>
          </table:table-cell>
          <table:table-cell table:style-name="ce2" office:value-type="percentage" office:value="0.2567" calcext:value-type="percentage">
            <text:p>25,6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567" calcext:value-type="percentage">
            <text:p>15,67%</text:p>
          </table:table-cell>
          <table:table-cell table:style-name="ce2" office:value-type="percentage" office:value="0.31" calcext:value-type="percentage">
            <text:p>31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79:.B88])" office:value-type="percentage" office:value="0.039" calcext:value-type="percentage">
            <text:p>3,90%</text:p>
          </table:table-cell>
          <table:table-cell table:style-name="ce1" table:formula="of:=AVERAGE([.C79:.C88])" office:value-type="percentage" office:value="0.034" calcext:value-type="percentage">
            <text:p>3,4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19933" calcext:value-type="percentage">
            <text:p>19,93%</text:p>
          </table:table-cell>
          <table:table-cell table:style-name="ce1" table:formula="of:=AVERAGE([.G79:.G88])" office:value-type="percentage" office:value="0.26267" calcext:value-type="percentage">
            <text:p>26,27%</text:p>
          </table:table-cell>
          <table:table-cell table:number-columns-repeated="3"/>
        </table:table-row>
        <table:table-row table:style-name="ro1" table:number-rows-repeated="2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0943" calcext:value-type="percentage">
            <text:p>9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343" calcext:value-type="percentage">
            <text:p>13,43%</text:p>
          </table:table-cell>
          <table:table-cell table:style-name="ce2" office:value-type="percentage" office:value="0.1457" calcext:value-type="percentage">
            <text:p>14,5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number-columns-repeated="2" table:style-name="ce2" office:value-type="percentage" office:value="0.1743" calcext:value-type="percentage">
            <text:p>17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314" calcext:value-type="percentage">
            <text:p>13,14%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number-columns-repeated="2"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486" calcext:value-type="percentage">
            <text:p>14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771" calcext:value-type="percentage">
            <text:p>17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286" calcext:value-type="percentage">
            <text:p>12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2114" calcext:value-type="percentage">
            <text:p>21,14%</text:p>
          </table:table-cell>
          <table:table-cell table:style-name="ce2" office:value-type="percentage" office:value="0.1686" calcext:value-type="percentage">
            <text:p>16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629" calcext:value-type="percentage">
            <text:p>16,2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93:.B102])" office:value-type="percentage" office:value="0.06957" calcext:value-type="percentage">
            <text:p>6,96%</text:p>
          </table:table-cell>
          <table:table-cell table:style-name="ce1" table:formula="of:=AVERAGE([.C93:.C102])" office:value-type="percentage" office:value="0.06654" calcext:value-type="percentage">
            <text:p>6,65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856" calcext:value-type="percentage">
            <text:p>14,86%</text:p>
          </table:table-cell>
          <table:table-cell table:style-name="ce1" table:formula="of:=AVERAGE([.G93:.G102])" office:value-type="percentage" office:value="0.14487" calcext:value-type="percentage">
            <text:p>14,49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2" office:value-type="percentage" office:value="0.3412" calcext:value-type="percentage">
            <text:p>34,12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2181" calcext:value-type="percentage">
            <text:p>21,8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554" calcext:value-type="percentage">
            <text:p>15,54%</text:p>
          </table:table-cell>
          <table:table-cell table:style-name="ce2" office:value-type="percentage" office:value="0.1542" calcext:value-type="percentage">
            <text:p>15,4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2" office:value-type="percentage" office:value="0.3353" calcext:value-type="percentage">
            <text:p>33,53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16" calcext:value-type="percentage">
            <text:p>19,16%</text:p>
          </table:table-cell>
          <table:table-cell table:style-name="ce2" office:value-type="percentage" office:value="0.1988" calcext:value-type="percentage">
            <text:p>19,8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4382" calcext:value-type="percentage">
            <text:p>43,82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72" calcext:value-type="percentage">
            <text:p>20,72%</text:p>
          </table:table-cell>
          <table:table-cell table:style-name="ce2" office:value-type="percentage" office:value="0.2036" calcext:value-type="percentage">
            <text:p>20,3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2971" calcext:value-type="percentage">
            <text:p>29,71%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25" calcext:value-type="percentage">
            <text:p>13,25%</text:p>
          </table:table-cell>
          <table:table-cell table:style-name="ce2" office:value-type="percentage" office:value="0.1289" calcext:value-type="percentage">
            <text:p>12,8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676" calcext:value-type="percentage">
            <text:p>26,76%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number-columns-repeated="2" table:style-name="ce2" office:value-type="percentage" office:value="0.1566" calcext:value-type="percentage">
            <text:p>15,6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29" calcext:value-type="percentage">
            <text:p>35,29%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807" calcext:value-type="percentage">
            <text:p>18,07%</text:p>
          </table:table-cell>
          <table:table-cell table:style-name="ce2" office:value-type="percentage" office:value="0.1904" calcext:value-type="percentage">
            <text:p>19,0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482" calcext:value-type="percentage">
            <text:p>14,82%</text:p>
          </table:table-cell>
          <table:table-cell table:style-name="ce2" office:value-type="percentage" office:value="0.1446" calcext:value-type="percentage">
            <text:p>14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529" calcext:value-type="percentage">
            <text:p>35,29%</text:p>
          </table:table-cell>
          <table:table-cell table:style-name="ce2" office:value-type="percentage" office:value="0.3676" calcext:value-type="percentage">
            <text:p>36,76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55" calcext:value-type="percentage">
            <text:p>18,55%</text:p>
          </table:table-cell>
          <table:table-cell table:style-name="ce2" office:value-type="percentage" office:value="0.1831" calcext:value-type="percentage">
            <text:p>18,3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2" office:value-type="percentage" office:value="0.3735" calcext:value-type="percentage">
            <text:p>37,35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277" calcext:value-type="percentage">
            <text:p>12,77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06:.B115])" office:value-type="percentage" office:value="0.3194" calcext:value-type="percentage">
            <text:p>31,94%</text:p>
          </table:table-cell>
          <table:table-cell table:style-name="ce1" table:formula="of:=AVERAGE([.C106:.C115])" office:value-type="percentage" office:value="0.33412" calcext:value-type="percentage">
            <text:p>33,4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059" calcext:value-type="percentage">
            <text:p>17,06%</text:p>
          </table:table-cell>
          <table:table-cell table:style-name="ce1" table:formula="of:=AVERAGE([.G106:.G115])" office:value-type="percentage" office:value="0.1706" calcext:value-type="percentage">
            <text:p>17,06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2" office:value-type="percentage" office:value="0.2132" calcext:value-type="percentage">
            <text:p>21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934" calcext:value-type="percentage">
            <text:p>29,34%</text:p>
          </table:table-cell>
          <table:table-cell table:style-name="ce2" office:value-type="percentage" office:value="0.2566" calcext:value-type="percentage">
            <text:p>25,6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789" calcext:value-type="percentage">
            <text:p>27,89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2934" calcext:value-type="percentage">
            <text:p>29,3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105" calcext:value-type="percentage">
            <text:p>11,05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539" calcext:value-type="percentage">
            <text:p>25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2" office:value-type="percentage" office:value="0.2039" calcext:value-type="percentage">
            <text:p>20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474" calcext:value-type="percentage">
            <text:p>14,74%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697" calcext:value-type="percentage">
            <text:p>26,97%</text:p>
          </table:table-cell>
          <table:table-cell table:style-name="ce2" office:value-type="percentage" office:value="0.2711" calcext:value-type="percentage">
            <text:p>27,1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474" calcext:value-type="percentage">
            <text:p>24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08" calcext:value-type="percentage">
            <text:p>29,08%</text:p>
          </table:table-cell>
          <table:table-cell table:style-name="ce2" office:value-type="percentage" office:value="0.3039" calcext:value-type="percentage">
            <text:p>30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3039" calcext:value-type="percentage">
            <text:p>30,3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947" calcext:value-type="percentage">
            <text:p>9,47%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908" calcext:value-type="percentage">
            <text:p>29,08%</text:p>
          </table:table-cell>
          <table:table-cell table:style-name="ce2" office:value-type="percentage" office:value="0.2961" calcext:value-type="percentage">
            <text:p>29,61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19:.B128])" office:value-type="percentage" office:value="0.16367" calcext:value-type="percentage">
            <text:p>16,37%</text:p>
          </table:table-cell>
          <table:table-cell table:style-name="ce1" table:formula="of:=AVERAGE([.C119:.C128])" office:value-type="percentage" office:value="0.16317" calcext:value-type="percentage">
            <text:p>16,32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7882" calcext:value-type="percentage">
            <text:p>27,88%</text:p>
          </table:table-cell>
          <table:table-cell table:style-name="ce1" table:formula="of:=AVERAGE([.G119:.G128])" office:value-type="percentage" office:value="0.26434" calcext:value-type="percentage">
            <text:p>26,43%</text:p>
          </table:table-cell>
          <table:table-cell table:number-columns-repeated="3"/>
        </table:table-row>
        <table:table-row table:style-name="ro1" table:number-rows-repeated="2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13" calcext:value-type="percentage">
            <text:p>11,30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3048" calcext:value-type="percentage">
            <text:p>30,48%</text:p>
          </table:table-cell>
          <table:table-cell table:style-name="ce2" office:value-type="percentage" office:value="0.2355" calcext:value-type="percentage">
            <text:p>23,5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3274" calcext:value-type="percentage">
            <text:p>32,74%</text:p>
          </table:table-cell>
          <table:table-cell table:style-name="ce2" office:value-type="percentage" office:value="0.2935" calcext:value-type="percentage">
            <text:p>29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2758" calcext:value-type="percentage">
            <text:p>27,5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2758" calcext:value-type="percentage">
            <text:p>27,58%</text:p>
          </table:table-cell>
          <table:table-cell table:style-name="ce2" office:value-type="percentage" office:value="0.329" calcext:value-type="percentage">
            <text:p>32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2871" calcext:value-type="percentage">
            <text:p>28,71%</text:p>
          </table:table-cell>
          <table:table-cell table:style-name="ce2" office:value-type="percentage" office:value="0.3097" calcext:value-type="percentage">
            <text:p>30,9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648" calcext:value-type="percentage">
            <text:p>6,48%</text:p>
          </table:table-cell>
          <table:table-cell table:style-name="ce2" office:value-type="percentage" office:value="0.0778" calcext:value-type="percentage">
            <text:p>7,78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726" calcext:value-type="percentage">
            <text:p>37,26%</text:p>
          </table:table-cell>
          <table:table-cell table:style-name="ce2" office:value-type="percentage" office:value="0.3645" calcext:value-type="percentage">
            <text:p>36,4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694" calcext:value-type="percentage">
            <text:p>26,94%</text:p>
          </table:table-cell>
          <table:table-cell table:style-name="ce2" office:value-type="percentage" office:value="0.3032" calcext:value-type="percentage">
            <text:p>30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number-columns-repeated="2" table:style-name="ce2" office:value-type="percentage" office:value="0.0574" calcext:value-type="percentage">
            <text:p>5,74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3306" calcext:value-type="percentage">
            <text:p>33,06%</text:p>
          </table:table-cell>
          <table:table-cell table:style-name="ce2" office:value-type="percentage" office:value="0.2258" calcext:value-type="percentage">
            <text:p>22,5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484" calcext:value-type="percentage">
            <text:p>24,84%</text:p>
          </table:table-cell>
          <table:table-cell table:style-name="ce2" office:value-type="percentage" office:value="0.2129" calcext:value-type="percentage">
            <text:p>21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1019" calcext:value-type="percentage">
            <text:p>10,19%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806" calcext:value-type="percentage">
            <text:p>38,06%</text:p>
          </table:table-cell>
          <table:table-cell table:style-name="ce2" office:value-type="percentage" office:value="0.3823" calcext:value-type="percentage">
            <text:p>38,23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33:.B142])" office:value-type="percentage" office:value="0.06834" calcext:value-type="percentage">
            <text:p>6,83%</text:p>
          </table:table-cell>
          <table:table-cell table:style-name="ce1" table:formula="of:=AVERAGE([.C133:.C142])" office:value-type="percentage" office:value="0.07425" calcext:value-type="percentage">
            <text:p>7,43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1112" calcext:value-type="percentage">
            <text:p>31,11%</text:p>
          </table:table-cell>
          <table:table-cell table:style-name="ce1" table:formula="of:=AVERAGE([.G133:.G142])" office:value-type="percentage" office:value="0.29322" calcext:value-type="percentage">
            <text:p>29,32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3152" calcext:value-type="percentage">
            <text:p>31,52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437" calcext:value-type="percentage">
            <text:p>14,3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2957" calcext:value-type="percentage">
            <text:p>29,57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645" calcext:value-type="percentage">
            <text:p>26,4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348" calcext:value-type="percentage">
            <text:p>43,48%</text:p>
          </table:table-cell>
          <table:table-cell table:style-name="ce2" office:value-type="percentage" office:value="0.4522" calcext:value-type="percentage">
            <text:p>45,22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359" calcext:value-type="percentage">
            <text:p>13,59%</text:p>
          </table:table-cell>
          <table:table-cell table:style-name="ce1" office:value-type="percentage" office:value="0.1779" calcext:value-type="percentage">
            <text:p>17,7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587" calcext:value-type="percentage">
            <text:p>35,87%</text:p>
          </table:table-cell>
          <table:table-cell table:style-name="ce2" office:value-type="percentage" office:value="0.3957" calcext:value-type="percentage">
            <text:p>39,57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688" calcext:value-type="percentage">
            <text:p>16,88%</text:p>
          </table:table-cell>
          <table:table-cell table:style-name="ce2" office:value-type="percentage" office:value="0.3242" calcext:value-type="percentage">
            <text:p>32,4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2216" calcext:value-type="percentage">
            <text:p>22,16%</text:p>
          </table:table-cell>
          <table:table-cell table:style-name="ce2" office:value-type="percentage" office:value="0.2602" calcext:value-type="percentage">
            <text:p>26,0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587" calcext:value-type="percentage">
            <text:p>35,87%</text:p>
          </table:table-cell>
          <table:table-cell table:style-name="ce2" office:value-type="percentage" office:value="0.4065" calcext:value-type="percentage">
            <text:p>40,65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727" calcext:value-type="percentage">
            <text:p>17,27%</text:p>
          </table:table-cell>
          <table:table-cell table:style-name="ce2" office:value-type="percentage" office:value="0.2234" calcext:value-type="percentage">
            <text:p>22,3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609" calcext:value-type="percentage">
            <text:p>36,09%</text:p>
          </table:table-cell>
          <table:table-cell table:style-name="ce2" office:value-type="percentage" office:value="0.3478" calcext:value-type="percentage">
            <text:p>34,78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918" calcext:value-type="percentage">
            <text:p>29,1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674" calcext:value-type="percentage">
            <text:p>36,74%</text:p>
          </table:table-cell>
          <table:table-cell table:style-name="ce2" office:value-type="percentage" office:value="0.3565" calcext:value-type="percentage">
            <text:p>35,65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147" calcext:value-type="percentage">
            <text:p>21,47%</text:p>
          </table:table-cell>
          <table:table-cell table:style-name="ce2" office:value-type="percentage" office:value="0.2338" calcext:value-type="percentage">
            <text:p>23,3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739" calcext:value-type="percentage">
            <text:p>27,39%</text:p>
          </table:table-cell>
          <table:table-cell table:style-name="ce2" office:value-type="percentage" office:value="0.3304" calcext:value-type="percentage">
            <text:p>33,04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1983" calcext:value-type="percentage">
            <text:p>19,83%</text:p>
          </table:table-cell>
          <table:table-cell table:style-name="ce2" office:value-type="percentage" office:value="0.2632" calcext:value-type="percentage">
            <text:p>26,3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1416" calcext:value-type="percentage">
            <text:p>14,16%</text:p>
          </table:table-cell>
          <table:table-cell table:style-name="ce2" office:value-type="percentage" office:value="0.219" calcext:value-type="percentage">
            <text:p>21,9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46:.B155])" office:value-type="percentage" office:value="0.3387" calcext:value-type="percentage">
            <text:p>33,87%</text:p>
          </table:table-cell>
          <table:table-cell table:style-name="ce1" table:formula="of:=AVERAGE([.C146:.C155])" office:value-type="percentage" office:value="0.35588" calcext:value-type="percentage">
            <text:p>35,59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7744" calcext:value-type="percentage">
            <text:p>17,74%</text:p>
          </table:table-cell>
          <table:table-cell table:style-name="ce1" table:formula="of:=AVERAGE([.G146:.G155])" office:value-type="percentage" office:value="0.24017" calcext:value-type="percentage">
            <text:p>24,02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5005" calcext:value-type="percentage">
            <text:p>50,05%</text:p>
          </table:table-cell>
          <table:table-cell table:style-name="ce2" office:value-type="percentage" office:value="0.488" calcext:value-type="percentage">
            <text:p>48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365" calcext:value-type="percentage">
            <text:p>43,65%</text:p>
          </table:table-cell>
          <table:table-cell table:style-name="ce2" office:value-type="percentage" office:value="0.413" calcext:value-type="percentage">
            <text:p>41,3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15" calcext:value-type="percentage">
            <text:p>38,15%</text:p>
          </table:table-cell>
          <table:table-cell table:style-name="ce2" office:value-type="percentage" office:value="0.397" calcext:value-type="percentage">
            <text:p>39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15" calcext:value-type="percentage">
            <text:p>21,50%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3965" calcext:value-type="percentage">
            <text:p>39,65%</text:p>
          </table:table-cell>
          <table:table-cell table:style-name="ce2" office:value-type="percentage" office:value="0.4065" calcext:value-type="percentage">
            <text:p>40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04" calcext:value-type="percentage">
            <text:p>40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8" calcext:value-type="percentage">
            <text:p>41,80%</text:p>
          </table:table-cell>
          <table:table-cell table:style-name="ce2" office:value-type="percentage" office:value="0.405" calcext:value-type="percentage">
            <text:p>40,5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265" calcext:value-type="percentage">
            <text:p>42,65%</text:p>
          </table:table-cell>
          <table:table-cell table:style-name="ce2" office:value-type="percentage" office:value="0.441" calcext:value-type="percentage">
            <text:p>44,1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77" calcext:value-type="percentage">
            <text:p>37,70%</text:p>
          </table:table-cell>
          <table:table-cell table:style-name="ce2" office:value-type="percentage" office:value="0.405" calcext:value-type="percentage">
            <text:p>40,5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335" calcext:value-type="percentage">
            <text:p>43,35%</text:p>
          </table:table-cell>
          <table:table-cell table:style-name="ce2" office:value-type="percentage" office:value="0.44" calcext:value-type="percentage">
            <text:p>44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35" calcext:value-type="percentage">
            <text:p>23,5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95" calcext:value-type="percentage">
            <text:p>38,95%</text:p>
          </table:table-cell>
          <table:table-cell table:style-name="ce2" office:value-type="percentage" office:value="0.4015" calcext:value-type="percentage">
            <text:p>40,15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58:.B167])" office:value-type="percentage" office:value="0.198" calcext:value-type="percentage">
            <text:p>19,80%</text:p>
          </table:table-cell>
          <table:table-cell table:style-name="ce1" table:formula="of:=AVERAGE([.C158:.C167])" office:value-type="percentage" office:value="0.2195" calcext:value-type="percentage">
            <text:p>21,95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905" calcext:value-type="percentage">
            <text:p>41,91%</text:p>
          </table:table-cell>
          <table:table-cell table:style-name="ce1" table:formula="of:=AVERAGE([.G158:.G167])" office:value-type="percentage" office:value="0.4201" calcext:value-type="percentage">
            <text:p>42,01%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825" calcext:value-type="percentage">
            <text:p>8,25%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77" calcext:value-type="percentage">
            <text:p>27,70%</text:p>
          </table:table-cell>
          <table:table-cell table:style-name="ce3" office:value-type="percentage" office:value="0.2716" calcext:value-type="percentage">
            <text:p>27,1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41" calcext:value-type="percentage">
            <text:p>25,41%</text:p>
          </table:table-cell>
          <table:table-cell table:style-name="ce3" office:value-type="percentage" office:value="0.2568" calcext:value-type="percentage">
            <text:p>25,6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25" calcext:value-type="percentage">
            <text:p>8,25%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73" calcext:value-type="percentage">
            <text:p>27,30%</text:p>
          </table:table-cell>
          <table:table-cell table:style-name="ce3" office:value-type="percentage" office:value="0.2676" calcext:value-type="percentage">
            <text:p>26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425" calcext:value-type="percentage">
            <text:p>4,2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149" calcext:value-type="percentage">
            <text:p>21,49%</text:p>
          </table:table-cell>
          <table:table-cell table:style-name="ce3" office:value-type="percentage" office:value="0.2446" calcext:value-type="percentage">
            <text:p>24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65" calcext:value-type="percentage">
            <text:p>23,65%</text:p>
          </table:table-cell>
          <table:table-cell table:style-name="ce3" office:value-type="percentage" office:value="0.2446" calcext:value-type="percentage">
            <text:p>24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number-columns-repeated="2"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959" calcext:value-type="percentage">
            <text:p>29,59%</text:p>
          </table:table-cell>
          <table:table-cell table:style-name="ce3" office:value-type="percentage" office:value="0.2662" calcext:value-type="percentage">
            <text:p>26,6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851" calcext:value-type="percentage">
            <text:p>28,51%</text:p>
          </table:table-cell>
          <table:table-cell table:style-name="ce3" office:value-type="percentage" office:value="0.2486" calcext:value-type="percentage">
            <text:p>24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38" calcext:value-type="percentage">
            <text:p>18,38%</text:p>
          </table:table-cell>
          <table:table-cell table:style-name="ce3" office:value-type="percentage" office:value="0.2014" calcext:value-type="percentage">
            <text:p>20,1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7" calcext:value-type="percentage">
            <text:p>22,70%</text:p>
          </table:table-cell>
          <table:table-cell table:style-name="ce3" office:value-type="percentage" office:value="0.2203" calcext:value-type="percentage">
            <text:p>22,0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73" calcext:value-type="percentage">
            <text:p>19,73%</text:p>
          </table:table-cell>
          <table:table-cell table:style-name="ce3" office:value-type="percentage" office:value="0.1919" calcext:value-type="percentage">
            <text:p>19,1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71:.B180])" office:value-type="percentage" office:value="0.05675" calcext:value-type="percentage">
            <text:p>5,68%</text:p>
          </table:table-cell>
          <table:table-cell table:style-name="ce1" table:formula="of:=AVERAGE([.C171:.C180])" office:value-type="percentage" office:value="0.0535" calcext:value-type="percentage">
            <text:p>5,35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446" calcext:value-type="percentage">
            <text:p>24,45%</text:p>
          </table:table-cell>
          <table:table-cell table:style-name="ce1" table:formula="of:=AVERAGE([.G171:.G180])" office:value-type="percentage" office:value="0.24136" calcext:value-type="percentage">
            <text:p>24,14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 office:value-type="percentage" office:value="0.0946" calcext:value-type="percentage">
            <text:p>9,46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number-columns-repeated="2" table:style-name="ce2" office:value-type="percentage" office:value="0.1882" calcext:value-type="percentage">
            <text:p>18,8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964" calcext:value-type="percentage">
            <text:p>9,64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 office:value-type="percentage" office:value="0.1464" calcext:value-type="percentage">
            <text:p>14,64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765" calcext:value-type="percentage">
            <text:p>17,65%</text:p>
          </table:table-cell>
          <table:table-cell table:style-name="ce2" office:value-type="percentage" office:value="0.2118" calcext:value-type="percentage">
            <text:p>21,1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125" calcext:value-type="percentage">
            <text:p>1,25%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1235" calcext:value-type="percentage">
            <text:p>12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1179" calcext:value-type="percentage">
            <text:p>11,79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647" calcext:value-type="percentage">
            <text:p>6,47%</text:p>
          </table:table-cell>
          <table:table-cell table:style-name="ce2" office:value-type="percentage" office:value="0.1118" calcext:value-type="percentage">
            <text:p>11,18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2294" calcext:value-type="percentage">
            <text:p>22,9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982" calcext:value-type="percentage">
            <text:p>9,82%</text:p>
          </table:table-cell>
          <table:table-cell table:style-name="ce2" office:value-type="percentage" office:value="0.1446" calcext:value-type="percentage">
            <text:p>14,46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647" calcext:value-type="percentage">
            <text:p>16,47%</text:p>
          </table:table-cell>
          <table:table-cell table:style-name="ce2" office:value-type="percentage" office:value="0.2235" calcext:value-type="percentage">
            <text:p>22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647" calcext:value-type="percentage">
            <text:p>6,47%</text:p>
          </table:table-cell>
          <table:table-cell table:style-name="ce2" office:value-type="percentage" office:value="0.0765" calcext:value-type="percentage">
            <text:p>7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939" calcext:value-type="percentage">
            <text:p>9,39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235" calcext:value-type="percentage">
            <text:p>12,35%</text:p>
          </table:table-cell>
          <table:table-cell table:style-name="ce2" office:value-type="percentage" office:value="0.1471" calcext:value-type="percentage">
            <text:p>14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529" calcext:value-type="percentage">
            <text:p>5,29%</text:p>
          </table:table-cell>
          <table:table-cell table:style-name="ce2" office:value-type="percentage" office:value="0.0882" calcext:value-type="percentage">
            <text:p>8,82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83:.B192])" office:value-type="percentage" office:value="0.04946" calcext:value-type="percentage">
            <text:p>4,95%</text:p>
          </table:table-cell>
          <table:table-cell table:style-name="ce1" table:formula="of:=AVERAGE([.C183:.C192])" office:value-type="percentage" office:value="0.11081" calcext:value-type="percentage">
            <text:p>11,08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823" calcext:value-type="percentage">
            <text:p>11,82%</text:p>
          </table:table-cell>
          <table:table-cell table:style-name="ce1" table:formula="of:=AVERAGE([.G183:.G192])" office:value-type="percentage" office:value="0.155555555555556" calcext:value-type="percentage">
            <text:p>15,56%</text:p>
          </table:table-cell>
          <table:table-cell table:number-columns-repeated="3"/>
        </table:table-row>
        <table:table-row table:style-name="ro1">
          <table:table-cell table:style-name="ce3" table:number-columns-repeated="7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333" calcext:value-type="percentage">
            <text:p>13,33%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733" calcext:value-type="percentage">
            <text:p>7,33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533" calcext:value-type="percentage">
            <text:p>5,33%</text:p>
          </table:table-cell>
          <table:table-cell table:style-name="ce3" office:value-type="percentage" office:value="0.0867" calcext:value-type="percentage">
            <text:p>8,67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633" calcext:value-type="percentage">
            <text:p>6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867" calcext:value-type="percentage">
            <text:p>8,67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467" calcext:value-type="percentage">
            <text:p>4,67%</text:p>
          </table:table-cell>
          <table:table-cell table:style-name="ce3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196:.B205])" office:value-type="percentage" office:value="0.08999" calcext:value-type="percentage">
            <text:p>9,00%</text:p>
          </table:table-cell>
          <table:table-cell table:style-name="ce1" table:formula="of:=AVERAGE([.C196:.C205])" office:value-type="percentage" office:value="0.11534" calcext:value-type="percentage">
            <text:p>11,5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54" calcext:value-type="percentage">
            <text:p>5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16" calcext:value-type="percentage">
            <text:p>1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118" calcext:value-type="percentage">
            <text:p>11,80%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48" calcext:value-type="percentage">
            <text:p>4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54" calcext:value-type="percentage">
            <text:p>15,4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14" calcext:value-type="percentage">
            <text:p>1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88" calcext:value-type="percentage">
            <text:p>18,80%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18" calcext:value-type="percentage">
            <text:p>1,8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6" calcext:value-type="percentage">
            <text:p>0,60%</text:p>
          </table:table-cell>
          <table:table-cell table:style-name="ce2" office:value-type="percentage" office:value="0.004" calcext:value-type="percentage">
            <text:p>0,4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136" calcext:value-type="percentage">
            <text:p>1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06" calcext:value-type="percentage">
            <text:p>0,6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2" office:value-type="percentage" office:value="0.104" calcext:value-type="percentage">
            <text:p>10,4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08:.B217])" office:value-type="percentage" office:value="0.1008" calcext:value-type="percentage">
            <text:p>10,08%</text:p>
          </table:table-cell>
          <table:table-cell table:style-name="ce1" table:formula="of:=AVERAGE([.C208:.C217])" office:value-type="percentage" office:value="0.08" calcext:value-type="percentage">
            <text:p>8,00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68" calcext:value-type="percentage">
            <text:p>2,68%</text:p>
          </table:table-cell>
          <table:table-cell table:style-name="ce1" table:formula="of:=AVERAGE([.G208:.G217])" office:value-type="percentage" office:value="0.029" calcext:value-type="percentage">
            <text:p>2,9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2929" calcext:value-type="percentage">
            <text:p>29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2979" calcext:value-type="percentage">
            <text:p>29,7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643" calcext:value-type="percentage">
            <text:p>26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1643" calcext:value-type="percentage">
            <text:p>16,43%</text:p>
          </table:table-cell>
          <table:table-cell table:style-name="ce2" office:value-type="percentage" office:value="0.2571" calcext:value-type="percentage">
            <text:p>25,7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2786" calcext:value-type="percentage">
            <text:p>27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234" calcext:value-type="percentage">
            <text:p>23,40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2286" calcext:value-type="percentage">
            <text:p>22,8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571" calcext:value-type="percentage">
            <text:p>25,71%</text:p>
          </table:table-cell>
          <table:table-cell table:style-name="ce2" office:value-type="percentage" office:value="0.1857" calcext:value-type="percentage">
            <text:p>18,5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number-columns-repeated="2" table:style-name="ce2" office:value-type="percentage" office:value="0.2143" calcext:value-type="percentage">
            <text:p>21,4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style-name="ce2" office:value-type="percentage" office:value="0.2979" calcext:value-type="percentage">
            <text:p>29,79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2786" calcext:value-type="percentage">
            <text:p>27,86%</text:p>
          </table:table-cell>
          <table:table-cell table:style-name="ce2" office:value-type="percentage" office:value="0.3929" calcext:value-type="percentage">
            <text:p>39,2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20:.B229])" office:value-type="percentage" office:value="0.22128" calcext:value-type="percentage">
            <text:p>22,13%</text:p>
          </table:table-cell>
          <table:table-cell table:style-name="ce1" table:formula="of:=AVERAGE([.C220:.C229])" office:value-type="percentage" office:value="0.1617" calcext:value-type="percentage">
            <text:p>16,17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4929" calcext:value-type="percentage">
            <text:p>24,93%</text:p>
          </table:table-cell>
          <table:table-cell table:style-name="ce1" table:formula="of:=AVERAGE([.G220:.G229])" office:value-type="percentage" office:value="0.257155555555556" calcext:value-type="percentage">
            <text:p>25,72%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3111" calcext:value-type="percentage">
            <text:p>31,11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463" calcext:value-type="percentage">
            <text:p>14,6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74" calcext:value-type="percentage">
            <text:p>15,74%</text:p>
          </table:table-cell>
          <table:table-cell table:style-name="ce2" office:value-type="percentage" office:value="0.187" calcext:value-type="percentage">
            <text:p>18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2" office:value-type="percentage" office:value="0.1611" calcext:value-type="percentage">
            <text:p>16,1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2" office:value-type="percentage" office:value="0.4556" calcext:value-type="percentage">
            <text:p>45,56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407" calcext:value-type="percentage">
            <text:p>14,0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389" calcext:value-type="percentage">
            <text:p>13,8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3852" calcext:value-type="percentage">
            <text:p>38,52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number-columns-repeated="2" table:style-name="ce2" office:value-type="percentage" office:value="0.1537" calcext:value-type="percentage">
            <text:p>15,3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3111" calcext:value-type="percentage">
            <text:p>31,11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352" calcext:value-type="percentage">
            <text:p>13,5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815" calcext:value-type="percentage">
            <text:p>18,1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.3519" calcext:value-type="percentage">
            <text:p>35,19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481" calcext:value-type="percentage">
            <text:p>14,81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33:.B242])" office:value-type="percentage" office:value="0.22223" calcext:value-type="percentage">
            <text:p>22,22%</text:p>
          </table:table-cell>
          <table:table-cell table:style-name="ce1" table:formula="of:=AVERAGE([.C233:.C242])" office:value-type="percentage" office:value="0.3215" calcext:value-type="percentage">
            <text:p>32,15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5464" calcext:value-type="percentage">
            <text:p>15,46%</text:p>
          </table:table-cell>
          <table:table-cell table:style-name="ce1" table:formula="of:=AVERAGE([.G233:.G242])" office:value-type="percentage" office:value="0.15258" calcext:value-type="percentage">
            <text:p>15,2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4355" calcext:value-type="percentage">
            <text:p>43,55%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674" calcext:value-type="percentage">
            <text:p>6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5894" calcext:value-type="percentage">
            <text:p>58,94%</text:p>
          </table:table-cell>
          <table:table-cell table:style-name="ce2" office:value-type="percentage" office:value="0.3795" calcext:value-type="percentage">
            <text:p>37,95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09" calcext:value-type="percentage">
            <text:p>6,0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4168" calcext:value-type="percentage">
            <text:p>41,68%</text:p>
          </table:table-cell>
          <table:table-cell table:style-name="ce2" office:value-type="percentage" office:value="0.4075" calcext:value-type="percentage">
            <text:p>40,75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 office:value-type="percentage" office:value="0.0696" calcext:value-type="percentage">
            <text:p>6,9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3546" calcext:value-type="percentage">
            <text:p>35,46%</text:p>
          </table:table-cell>
          <table:table-cell table:style-name="ce2" office:value-type="percentage" office:value="0.4432" calcext:value-type="percentage">
            <text:p>44,32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61" calcext:value-type="percentage">
            <text:p>7,61%</text:p>
          </table:table-cell>
          <table:table-cell table:style-name="ce2" office:value-type="percentage" office:value="0.0652" calcext:value-type="percentage">
            <text:p>6,5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5614" calcext:value-type="percentage">
            <text:p>56,14%</text:p>
          </table:table-cell>
          <table:table-cell table:style-name="ce2" office:value-type="percentage" office:value="0.4557" calcext:value-type="percentage">
            <text:p>45,57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674" calcext:value-type="percentage">
            <text:p>6,7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594" calcext:value-type="percentage">
            <text:p>59,40%</text:p>
          </table:table-cell>
          <table:table-cell table:style-name="ce2" office:value-type="percentage" office:value="0.4914" calcext:value-type="percentage">
            <text:p>49,14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3" calcext:value-type="percentage">
            <text:p>6,3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5132" calcext:value-type="percentage">
            <text:p>51,32%</text:p>
          </table:table-cell>
          <table:table-cell table:style-name="ce2" office:value-type="percentage" office:value="0.3919" calcext:value-type="percentage">
            <text:p>39,19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435" calcext:value-type="percentage">
            <text:p>4,3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4448" calcext:value-type="percentage">
            <text:p>44,48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09" calcext:value-type="percentage">
            <text:p>6,0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4215" calcext:value-type="percentage">
            <text:p>42,15%</text:p>
          </table:table-cell>
          <table:table-cell table:style-name="ce2" office:value-type="percentage" office:value="0.4666" calcext:value-type="percentage">
            <text:p>46,66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543" calcext:value-type="percentage">
            <text:p>5,43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45:.B254])" office:value-type="percentage" office:value="0.474677777777778" calcext:value-type="percentage">
            <text:p>47,47%</text:p>
          </table:table-cell>
          <table:table-cell table:style-name="ce1" table:formula="of:=AVERAGE([.C245:.C254])" office:value-type="percentage" office:value="0.43266" calcext:value-type="percentage">
            <text:p>43,27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194" calcext:value-type="percentage">
            <text:p>6,19%</text:p>
          </table:table-cell>
          <table:table-cell table:style-name="ce1" table:formula="of:=AVERAGE([.G245:.G254])" office:value-type="percentage" office:value="0.06022" calcext:value-type="percentage">
            <text:p>6,02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5463" calcext:value-type="percentage">
            <text:p>54,63%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257" calcext:value-type="percentage">
            <text:p>22,57%</text:p>
          </table:table-cell>
          <table:table-cell table:style-name="ce2" office:value-type="percentage" office:value="0.1959" calcext:value-type="percentage">
            <text:p>19,5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5943" calcext:value-type="percentage">
            <text:p>59,43%</text:p>
          </table:table-cell>
          <table:table-cell table:style-name="ce2" office:value-type="percentage" office:value="0.5142" calcext:value-type="percentage">
            <text:p>51,42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43" calcext:value-type="percentage">
            <text:p>22,43%</text:p>
          </table:table-cell>
          <table:table-cell table:style-name="ce2" office:value-type="percentage" office:value="0.2176" calcext:value-type="percentage">
            <text:p>21,7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591" calcext:value-type="percentage">
            <text:p>45,91%</text:p>
          </table:table-cell>
          <table:table-cell table:style-name="ce2" office:value-type="percentage" office:value="0.6993" calcext:value-type="percentage">
            <text:p>69,93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081" calcext:value-type="percentage">
            <text:p>20,81%</text:p>
          </table:table-cell>
          <table:table-cell table:style-name="ce2" office:value-type="percentage" office:value="0.2324" calcext:value-type="percentage">
            <text:p>23,24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number-columns-repeated="2" table:style-name="ce2" office:value-type="percentage" office:value="0.5747" calcext:value-type="percentage">
            <text:p>57,47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014" calcext:value-type="percentage">
            <text:p>20,14%</text:p>
          </table:table-cell>
          <table:table-cell table:style-name="ce2" office:value-type="percentage" office:value="0.2041" calcext:value-type="percentage">
            <text:p>20,4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822" calcext:value-type="percentage">
            <text:p>48,22%</text:p>
          </table:table-cell>
          <table:table-cell table:style-name="ce2" office:value-type="percentage" office:value="0.5089" calcext:value-type="percentage">
            <text:p>50,89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162" calcext:value-type="percentage">
            <text:p>21,62%</text:p>
          </table:table-cell>
          <table:table-cell table:style-name="ce2" office:value-type="percentage" office:value="0.2081" calcext:value-type="percentage">
            <text:p>20,8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4217" calcext:value-type="percentage">
            <text:p>42,17%</text:p>
          </table:table-cell>
          <table:table-cell table:style-name="ce2" office:value-type="percentage" office:value="0.4875" calcext:value-type="percentage">
            <text:p>48,75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176" calcext:value-type="percentage">
            <text:p>21,76%</text:p>
          </table:table-cell>
          <table:table-cell table:style-name="ce2" office:value-type="percentage" office:value="0.1865" calcext:value-type="percentage">
            <text:p>18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59" calcext:value-type="percentage">
            <text:p>43,59%</text:p>
          </table:table-cell>
          <table:table-cell table:style-name="ce2" office:value-type="percentage" office:value="0.5374" calcext:value-type="percentage">
            <text:p>53,74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027" calcext:value-type="percentage">
            <text:p>20,27%</text:p>
          </table:table-cell>
          <table:table-cell table:style-name="ce2" office:value-type="percentage" office:value="0.1865" calcext:value-type="percentage">
            <text:p>18,65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733" calcext:value-type="percentage">
            <text:p>47,33%</text:p>
          </table:table-cell>
          <table:table-cell table:style-name="ce2" office:value-type="percentage" office:value="0.4235" calcext:value-type="percentage">
            <text:p>42,35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2081" calcext:value-type="percentage">
            <text:p>20,8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ptdigits_9</text:p>
          </table:table-cell>
          <table:table-cell table:style-name="ce2" office:value-type="percentage" office:value="0.4964" calcext:value-type="percentage">
            <text:p>49,64%</text:p>
          </table:table-cell>
          <table:table-cell table:style-name="ce2" office:value-type="percentage" office:value="0.5587" calcext:value-type="percentage">
            <text:p>55,87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905" calcext:value-type="percentage">
            <text:p>19,05%</text:p>
          </table:table-cell>
          <table:table-cell table:style-name="ce2" office:value-type="percentage" office:value="0.1946" calcext:value-type="percentage">
            <text:p>19,4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4555" calcext:value-type="percentage">
            <text:p>45,55%</text:p>
          </table:table-cell>
          <table:table-cell table:style-name="ce54" office:value-type="percentage" office:value="0.605" calcext:value-type="percentage">
            <text:p>60,50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number-columns-repeated="2" table:style-name="ce2" office:value-type="percentage" office:value="0.2068" calcext:value-type="percentage">
            <text:p>20,68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57:.B266])" office:value-type="percentage" office:value="0.49394" calcext:value-type="percentage">
            <text:p>49,39%</text:p>
          </table:table-cell>
          <table:table-cell table:style-name="ce1" table:formula="of:=AVERAGE([.C257:.C266])" office:value-type="percentage" office:value="0.54074" calcext:value-type="percentage">
            <text:p>54,07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757" calcext:value-type="percentage">
            <text:p>20,76%</text:p>
          </table:table-cell>
          <table:table-cell table:style-name="ce1" table:formula="of:=AVERAGE([.G257:.G266])" office:value-type="percentage" office:value="0.20406" calcext:value-type="percentage">
            <text:p>20,41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3"/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1</text:p>
          </table:table-cell>
          <table:table-cell table:style-name="ce2" office:value-type="percentage" office:value="0.3338" calcext:value-type="percentage">
            <text:p>33,38%</text:p>
          </table:table-cell>
          <table:table-cell table:style-name="ce2" office:value-type="percentage" office:value="0.3425" calcext:value-type="percentage">
            <text:p>34,25%</text:p>
          </table:table-cell>
          <table:table-cell table:style-name="ce3"/>
          <table:table-cell table:style-name="ce2" office:value-type="string" calcext:value-type="string">
            <text:p>pir_1</text:p>
          </table:table-cell>
          <table:table-cell table:style-name="ce2" office:value-type="percentage" office:value="0.0987" calcext:value-type="percentage">
            <text:p>9,87%</text:p>
          </table:table-cell>
          <table:table-cell table:style-name="ce2" office:value-type="percentage" office:value="0.1516" calcext:value-type="percentage">
            <text:p>15,16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2</text:p>
          </table:table-cell>
          <table:table-cell table:style-name="ce2" office:value-type="percentage" office:value="0.3788" calcext:value-type="percentage">
            <text:p>37,88%</text:p>
          </table:table-cell>
          <table:table-cell table:style-name="ce2" office:value-type="percentage" office:value="0.4263" calcext:value-type="percentage">
            <text:p>42,63%</text:p>
          </table:table-cell>
          <table:table-cell table:style-name="ce3"/>
          <table:table-cell table:style-name="ce2" office:value-type="string" calcext:value-type="string">
            <text:p>pir_2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 office:value-type="percentage" office:value="0.0941" calcext:value-type="percentage">
            <text:p>9,4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3</text:p>
          </table:table-cell>
          <table:table-cell table:style-name="ce2" office:value-type="percentage" office:value="0.3788" calcext:value-type="percentage">
            <text:p>37,88%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3"/>
          <table:table-cell table:style-name="ce2" office:value-type="string" calcext:value-type="string">
            <text:p>pir_3</text:p>
          </table:table-cell>
          <table:table-cell table:style-name="ce2" office:value-type="percentage" office:value="0.083" calcext:value-type="percentage">
            <text:p>8,30%</text:p>
          </table:table-cell>
          <table:table-cell table:style-name="ce2" office:value-type="percentage" office:value="0.1569" calcext:value-type="percentage">
            <text:p>15,69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4</text:p>
          </table:table-cell>
          <table:table-cell table:style-name="ce2" office:value-type="percentage" office:value="0.405" calcext:value-type="percentage">
            <text:p>40,50%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3"/>
          <table:table-cell table:style-name="ce2" office:value-type="string" calcext:value-type="string">
            <text:p>pir_4</text:p>
          </table:table-cell>
          <table:table-cell table:style-name="ce2" office:value-type="percentage" office:value="0.0719" calcext:value-type="percentage">
            <text:p>7,19%</text:p>
          </table:table-cell>
          <table:table-cell table:style-name="ce2" office:value-type="percentage" office:value="0.117" calcext:value-type="percentage">
            <text:p>11,7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5</text:p>
          </table:table-cell>
          <table:table-cell table:style-name="ce2" office:value-type="percentage" office:value="0.385" calcext:value-type="percentage">
            <text:p>38,50%</text:p>
          </table:table-cell>
          <table:table-cell table:style-name="ce2" office:value-type="percentage" office:value="0.3738" calcext:value-type="percentage">
            <text:p>37,38%</text:p>
          </table:table-cell>
          <table:table-cell table:style-name="ce3"/>
          <table:table-cell table:style-name="ce2" office:value-type="string" calcext:value-type="string">
            <text:p>pir_5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791" calcext:value-type="percentage">
            <text:p>7,91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6</text:p>
          </table:table-cell>
          <table:table-cell table:style-name="ce2" office:value-type="percentage" office:value="0.4088" calcext:value-type="percentage">
            <text:p>40,88%</text:p>
          </table:table-cell>
          <table:table-cell table:style-name="ce2" office:value-type="percentage" office:value="0.4538" calcext:value-type="percentage">
            <text:p>45,38%</text:p>
          </table:table-cell>
          <table:table-cell table:style-name="ce3"/>
          <table:table-cell table:style-name="ce2" office:value-type="string" calcext:value-type="string">
            <text:p>pir_6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1072" calcext:value-type="percentage">
            <text:p>10,7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7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515" calcext:value-type="percentage">
            <text:p>51,50%</text:p>
          </table:table-cell>
          <table:table-cell table:style-name="ce3"/>
          <table:table-cell table:style-name="ce2" office:value-type="string" calcext:value-type="string">
            <text:p>pir_7</text:p>
          </table:table-cell>
          <table:table-cell table:style-name="ce2" office:value-type="percentage" office:value="0.1464" calcext:value-type="percentage">
            <text:p>14,64%</text:p>
          </table:table-cell>
          <table:table-cell table:style-name="ce2" office:value-type="percentage" office:value="0.1392" calcext:value-type="percentage">
            <text:p>13,92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8</text:p>
          </table:table-cell>
          <table:table-cell table:style-name="ce2" office:value-type="percentage" office:value="0.425" calcext:value-type="percentage">
            <text:p>42,50%</text:p>
          </table:table-cell>
          <table:table-cell table:style-name="ce2" office:value-type="percentage" office:value="0.3975" calcext:value-type="percentage">
            <text:p>39,75%</text:p>
          </table:table-cell>
          <table:table-cell table:style-name="ce3"/>
          <table:table-cell table:style-name="ce2" office:value-type="string" calcext:value-type="string">
            <text:p>pir_8</text:p>
          </table:table-cell>
          <table:table-cell table:style-name="ce2" office:value-type="percentage" office:value="0.0993" calcext:value-type="percentage">
            <text:p>9,93%</text:p>
          </table:table-cell>
          <table:table-cell table:style-name="ce2" office:value-type="percentage" office:value="0.149" calcext:value-type="percentage">
            <text:p>14,9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9</text:p>
          </table:table-cell>
          <table:table-cell table:style-name="ce2" office:value-type="percentage" office:value="0.345" calcext:value-type="percentage">
            <text:p>34,50%</text:p>
          </table:table-cell>
          <table:table-cell table:style-name="ce2" office:value-type="percentage" office:value="0.3313" calcext:value-type="percentage">
            <text:p>33,13%</text:p>
          </table:table-cell>
          <table:table-cell table:style-name="ce3"/>
          <table:table-cell table:style-name="ce2" office:value-type="string" calcext:value-type="string">
            <text:p>pir_9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0797" calcext:value-type="percentage">
            <text:p>7,97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d_10</text:p>
          </table:table-cell>
          <table:table-cell table:style-name="ce2" office:value-type="percentage" office:value="0.3875" calcext:value-type="percentage">
            <text:p>38,75%</text:p>
          </table:table-cell>
          <table:table-cell table:style-name="ce54" office:value-type="percentage" office:value="0.32" calcext:value-type="percentage">
            <text:p>32,00%</text:p>
          </table:table-cell>
          <table:table-cell table:style-name="ce3"/>
          <table:table-cell table:style-name="ce2" office:value-type="string" calcext:value-type="string">
            <text:p>pir_10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2" office:value-type="percentage" office:value="0.1124" calcext:value-type="percentage">
            <text:p>11,24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AVERAGE([.B269:.B278])" office:value-type="percentage" office:value="0.38765" calcext:value-type="percentage">
            <text:p>38,77%</text:p>
          </table:table-cell>
          <table:table-cell table:style-name="ce1" table:formula="of:=AVERAGE([.C269:.C278])" office:value-type="percentage" office:value="0.4024" calcext:value-type="percentage">
            <text:p>40,24%</text:p>
          </table:table-cell>
          <table:table-cell table:style-name="ce3"/>
          <table:table-cell table:style-name="ce1"/>
          <table:table-cell table:style-name="ce1" table:formula="of:=AVERAGE([.F269:.F278])" office:value-type="percentage" office:value="0.09071" calcext:value-type="percentage">
            <text:p>9,07%</text:p>
          </table:table-cell>
          <table:table-cell table:style-name="ce1" table:formula="of:=AVERAGE([.G269:.G278])" office:value-type="percentage" office:value="0.11862" calcext:value-type="percentage">
            <text:p>11,8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 table:number-columns-repeated="2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9.394" calcext:value-type="float">
            <text:p>1429,39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11.087" calcext:value-type="float">
            <text:p>1,11E+01</text:p>
          </table:table-cell>
          <table:table-cell table:style-name="ce10" office:value-type="float" office:value="1.368" calcext:value-type="float">
            <text:p>1,37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28.248" calcext:value-type="float">
            <text:p>1728,248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10" office:value-type="float" office:value="1.398" calcext:value-type="float">
            <text:p>1,40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72.592" calcext:value-type="float">
            <text:p>2272,592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5.202" calcext:value-type="float">
            <text:p>15,2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09.332" calcext:value-type="float">
            <text:p>1809,33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1.084" calcext:value-type="float">
            <text:p>2,11E+01</text:p>
          </table:table-cell>
          <table:table-cell table:style-name="ce10" office:value-type="float" office:value="0.68" calcext:value-type="float">
            <text:p>6,80E-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342" calcext:value-type="float">
            <text:p>3,42E-01</text:p>
          </table:table-cell>
          <table:table-cell table:style-name="ce10" office:value-type="float" office:value="0.113" calcext:value-type="float">
            <text:p>1,13E-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12.423" calcext:value-type="float">
            <text:p>1,24E+01</text:p>
          </table:table-cell>
          <table:table-cell table:style-name="ce10" office:value-type="float" office:value="6.195" calcext:value-type="float">
            <text:p>6,20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0844" calcext:value-type="float">
            <text:p>0,08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295" calcext:value-type="float">
            <text:p>2,95E-01</text:p>
          </table:table-cell>
          <table:table-cell table:style-name="ce10" office:value-type="float" office:value="1.241" calcext:value-type="float">
            <text:p>1,24E+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2.2" calcext:value-type="float">
            <text:p>2,20E+00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number-columns-repeated="2" table:style-name="ce6" office:value-type="float" office:value="0.827" calcext:value-type="float">
            <text:p>0,82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formula="of:=AVERAGE([.B282:.B291])" office:value-type="float" office:value="1809.8915" calcext:value-type="float">
            <text:p>1809,8915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4.89063" calcext:value-type="float">
            <text:p>4,89063</text:p>
          </table:table-cell>
          <table:table-cell table:style-name="ce11" table:formula="of:=AVERAGE([.G282:.G291])" office:value-type="float" office:value="3.01204444444444" calcext:value-type="float">
            <text:p>3,01E+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=5</text:p>
          </table:table-cell>
          <table:table-cell table:style-name="ce1" office:value-type="string" calcext:value-type="string">
            <text:p>T=10</text:p>
          </table:table-cell>
          <table:table-cell table:style-name="ce1"/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0691" calcext:value-type="float">
            <text:p>0,0691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239.904" calcext:value-type="float">
            <text:p>2239,904</text:p>
          </table:table-cell>
          <table:table-cell table:style-name="ce6" office:value-type="float" office:value="3446.277" calcext:value-type="float">
            <text:p>3446,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205" calcext:value-type="float">
            <text:p>0,205</text:p>
          </table:table-cell>
          <table:table-cell table:style-name="ce6" office:value-type="float" office:value="0.195" calcext:value-type="float">
            <text:p>0,19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533.338" calcext:value-type="float">
            <text:p>1533,33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575.821" calcext:value-type="float">
            <text:p>2575,82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727.179" calcext:value-type="float">
            <text:p>2727,17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08.427" calcext:value-type="float">
            <text:p>1908,42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99" calcext:value-type="float">
            <text:p>0,109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427.756" calcext:value-type="float">
            <text:p>1427,75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676" calcext:value-type="float">
            <text:p>0,0676</text:p>
          </table:table-cell>
          <table:table-cell table:style-name="ce6" office:value-type="float" office:value="0.0747" calcext:value-type="float">
            <text:p>0,074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421.882" calcext:value-type="float">
            <text:p>2421,88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241.85" calcext:value-type="float">
            <text:p>3241,8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97.465" calcext:value-type="float">
            <text:p>2397,46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961" calcext:value-type="float">
            <text:p>0,0961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837.778" calcext:value-type="float">
            <text:p>2837,77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294:.B303])" office:value-type="float" office:value="0.18217" calcext:value-type="float">
            <text:p>0,18217</text:p>
          </table:table-cell>
          <table:table-cell table:style-name="ce5" table:formula="of:=AVERAGE([.C294:.C303])" office:value-type="float" office:value="0.18027" calcext:value-type="float">
            <text:p>0,18027</text:p>
          </table:table-cell>
          <table:table-cell table:style-name="ce5" table:number-columns-repeated="2"/>
          <table:table-cell table:style-name="ce5" table:formula="of:=AVERAGE([.F294:.F303])" office:value-type="float" office:value="2331.14" calcext:value-type="float">
            <text:p>2331,14</text:p>
          </table:table-cell>
          <table:table-cell table:style-name="ce5" table:formula="of:=AVERAGE([.G294:.G303])" office:value-type="float" office:value="3446.277" calcext:value-type="float">
            <text:p>3446,27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1.39" calcext:value-type="float">
            <text:p>11,39</text:p>
          </table:table-cell>
          <table:table-cell table:style-name="ce6" office:value-type="float" office:value="9.81" calcext:value-type="float">
            <text:p>9,8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0.97" calcext:value-type="float">
            <text:p>10,97</text:p>
          </table:table-cell>
          <table:table-cell table:style-name="ce6" office:value-type="float" office:value="11.44" calcext:value-type="float">
            <text:p>11,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68" calcext:value-type="float">
            <text:p>11,68</text:p>
          </table:table-cell>
          <table:table-cell table:style-name="ce6" office:value-type="float" office:value="11.23" calcext:value-type="float">
            <text:p>11,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 office:value-type="float" office:value="9.62" calcext:value-type="float">
            <text:p>9,6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0.63" calcext:value-type="float">
            <text:p>10,63</text:p>
          </table:table-cell>
          <table:table-cell table:style-name="ce6" office:value-type="float" office:value="11.15" calcext:value-type="float">
            <text:p>11,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6.42" calcext:value-type="float">
            <text:p>16,42</text:p>
          </table:table-cell>
          <table:table-cell table:style-name="ce6" office:value-type="float" office:value="14.35" calcext:value-type="float">
            <text:p>14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0.27" calcext:value-type="float">
            <text:p>10,27</text:p>
          </table:table-cell>
          <table:table-cell table:style-name="ce6"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0.74" calcext:value-type="float">
            <text:p>10,74</text:p>
          </table:table-cell>
          <table:table-cell table:style-name="ce6" office:value-type="float" office:value="10.902" calcext:value-type="float">
            <text:p>10,9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1.17" calcext:value-type="float">
            <text:p>11,17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number-columns-repeated="2" table:style-name="ce6" office:value-type="float" office:value="14.02" calcext:value-type="float">
            <text:p>14,0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formula="of:=AVERAGE([.B306:.B315])" office:value-type="float" office:value="0.17636" calcext:value-type="float">
            <text:p>0,17636</text:p>
          </table:table-cell>
          <table:table-cell table:style-name="ce5" table:formula="of:=AVERAGE([.C306:.C31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6:.F315])" office:value-type="float" office:value="11.902" calcext:value-type="float">
            <text:p>11,902</text:p>
          </table:table-cell>
          <table:table-cell table:style-name="ce5" table:formula="of:=AVERAGE([.G306:.G315])" office:value-type="float" office:value="11.2357777777778" calcext:value-type="float">
            <text:p>11,2357777777778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55" calcext:value-type="float">
            <text:p>0,255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1.208" calcext:value-type="float">
            <text:p>1,208</text:p>
          </table:table-cell>
          <table:table-cell table:style-name="ce6" office:value-type="float" office:value="0.705" calcext:value-type="float">
            <text:p>0,7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 office:value-type="float" office:value="0.707" calcext:value-type="float">
            <text:p>0,7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373" calcext:value-type="float">
            <text:p>1,373</text:p>
          </table:table-cell>
          <table:table-cell table:style-name="ce6" office:value-type="float" office:value="1.229" calcext:value-type="float">
            <text:p>1,22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2.081" calcext:value-type="float">
            <text:p>2,081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number-columns-repeated="2" table:style-name="ce6" office:value-type="float" office:value="0.774" calcext:value-type="float">
            <text:p>0,77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number-columns-repeated="2" table:style-name="ce6" office:value-type="float" office:value="1.461" calcext:value-type="float">
            <text:p>1,4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477" calcext:value-type="float">
            <text:p>1,477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number-columns-repeated="2" table:style-name="ce6" office:value-type="float" office:value="0.854" calcext:value-type="float">
            <text:p>0,8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number-columns-repeated="2" table:style-name="ce6" office:value-type="float" office:value="0.731" calcext:value-type="float">
            <text:p>0,73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formula="of:=AVERAGE([.B319:.B328])" office:value-type="float" office:value="0.331" calcext:value-type="float">
            <text:p>0,331</text:p>
          </table:table-cell>
          <table:table-cell table:style-name="ce5" table:formula="of:=AVERAGE([.C319:.C328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19:.F328])" office:value-type="float" office:value="1.1879" calcext:value-type="float">
            <text:p>1,1879</text:p>
          </table:table-cell>
          <table:table-cell table:style-name="ce5" table:formula="of:=AVERAGE([.G319:.G328])" office:value-type="float" office:value="0.923" calcext:value-type="float">
            <text:p>0,92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4.263" calcext:value-type="float">
            <text:p>4,26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3.069" calcext:value-type="float">
            <text:p>3,069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0766" calcext:value-type="float">
            <text:p>0,076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717" calcext:value-type="float">
            <text:p>0,717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485" calcext:value-type="float">
            <text:p>0,48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549" calcext:value-type="float">
            <text:p>1,549</text:p>
          </table:table-cell>
          <table:table-cell table:style-name="ce6" office:value-type="float" office:value="1.557" calcext:value-type="float">
            <text:p>1,557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375" calcext:value-type="float">
            <text:p>26,375</text:p>
          </table:table-cell>
          <table:table-cell table:style-name="ce6" office:value-type="float" office:value="10.519" calcext:value-type="float">
            <text:p>10,519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1.664" calcext:value-type="float">
            <text:p>1,664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53" calcext:value-type="float">
            <text:p>0,53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0708" calcext:value-type="float">
            <text:p>0,070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595" calcext:value-type="float">
            <text:p>3,595</text:p>
          </table:table-cell>
          <table:table-cell table:style-name="ce6" office:value-type="float" office:value="0.995" calcext:value-type="float">
            <text:p>0,995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528" calcext:value-type="float">
            <text:p>0,52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049" calcext:value-type="float">
            <text:p>0,04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number-columns-repeated="2" table:style-name="ce6" office:value-type="float" office:value="8.943" calcext:value-type="float">
            <text:p>8,943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31:.B340])" office:value-type="float" office:value="4.7041" calcext:value-type="float">
            <text:p>4,7041</text:p>
          </table:table-cell>
          <table:table-cell table:style-name="ce5" table:formula="of:=AVERAGE([.C331:.C340])" office:value-type="float" office:value="3.39933333333333" calcext:value-type="float">
            <text:p>3,39933333333333</text:p>
          </table:table-cell>
          <table:table-cell table:style-name="ce5" table:number-columns-repeated="2"/>
          <table:table-cell table:style-name="ce5" table:formula="of:=AVERAGE([.F331:.F340])" office:value-type="float" office:value="0.30648" calcext:value-type="float">
            <text:p>0,30648</text:p>
          </table:table-cell>
          <table:table-cell table:style-name="ce5" table:formula="of:=AVERAGE([.G331:.G34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1531.152" calcext:value-type="float">
            <text:p>1531,152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71.581" calcext:value-type="float">
            <text:p>71,58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889.658" calcext:value-type="float">
            <text:p>1889,658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77.662" calcext:value-type="float">
            <text:p>77,66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729.495" calcext:value-type="float">
            <text:p>1729,49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53.501" calcext:value-type="float">
            <text:p>53,50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174.749" calcext:value-type="float">
            <text:p>2174,74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50.093" calcext:value-type="float">
            <text:p>50,09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949.023" calcext:value-type="float">
            <text:p>2949,02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48.444" calcext:value-type="float">
            <text:p>48,44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644.596" calcext:value-type="float">
            <text:p>2644,59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52.499" calcext:value-type="float">
            <text:p>52,49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1994.929" calcext:value-type="float">
            <text:p>1994,929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65.453" calcext:value-type="float">
            <text:p>65,45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1596.418" calcext:value-type="float">
            <text:p>1596,418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424.44" calcext:value-type="float">
            <text:p>2424,4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592.307" calcext:value-type="float">
            <text:p>1592,307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68.069" calcext:value-type="float">
            <text:p>68,06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44:.B353])" office:value-type="float" office:value="2052.6767" calcext:value-type="float">
            <text:p>2052,6767</text:p>
          </table:table-cell>
          <table:table-cell table:style-name="ce5" table:formula="of:=AVERAGE([.C344:.C35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4:.F353])" office:value-type="float" office:value="60.91275" calcext:value-type="float">
            <text:p>60,91275</text:p>
          </table:table-cell>
          <table:table-cell table:style-name="ce5" table:formula="of:=AVERAGE([.G344:.G35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 office:value-type="float" office:value="2.672" calcext:value-type="float">
            <text:p>2,672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687" calcext:value-type="float">
            <text:p>3,68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0.3799" calcext:value-type="float">
            <text:p>0,3799</text:p>
          </table:table-cell>
          <table:table-cell table:style-name="ce6" office:value-type="float" office:value="2.759" calcext:value-type="float">
            <text:p>2,759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537" calcext:value-type="float">
            <text:p>3,53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6.071" calcext:value-type="float">
            <text:p>6,071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289" calcext:value-type="float">
            <text:p>3,28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3.288" calcext:value-type="float">
            <text:p>13,288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" calcext:value-type="float">
            <text:p>3,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196" calcext:value-type="float">
            <text:p>3,1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number-columns-repeated="2" table:style-name="ce6" office:value-type="float" office:value="0.1898" calcext:value-type="float">
            <text:p>0,1898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1.691" calcext:value-type="float">
            <text:p>11,69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number-columns-repeated="2" table:style-name="ce6" office:value-type="float" office:value="0.292" calcext:value-type="float">
            <text:p>0,292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541" calcext:value-type="float">
            <text:p>3,54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number-columns-repeated="2" table:style-name="ce6" office:value-type="float" office:value="0.442" calcext:value-type="float">
            <text:p>0,44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393" calcext:value-type="float">
            <text:p>3,39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number-columns-repeated="2" table:style-name="ce6" office:value-type="float" office:value="0.447" calcext:value-type="float">
            <text:p>0,447</text:p>
          </table:table-cell>
          <table:table-cell table:style-name="ce6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57:.B366])" office:value-type="float" office:value="2.19967" calcext:value-type="float">
            <text:p>2,19967</text:p>
          </table:table-cell>
          <table:table-cell table:style-name="ce5" table:formula="of:=AVERAGE([.C357:.C366])" office:value-type="float" office:value="0.819088888888889" calcext:value-type="float">
            <text:p>0,819088888888889</text:p>
          </table:table-cell>
          <table:table-cell table:style-name="ce5" table:number-columns-repeated="2"/>
          <table:table-cell table:style-name="ce5" table:formula="of:=AVERAGE([.F357:.F366])" office:value-type="float" office:value="4.2399" calcext:value-type="float">
            <text:p>4,2399</text:p>
          </table:table-cell>
          <table:table-cell table:style-name="ce5" table:formula="of:=AVERAGE([.G357:.G36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 table:number-columns-repeated="2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41.615" calcext:value-type="float">
            <text:p>41,61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2.342" calcext:value-type="float">
            <text:p>2,342</text:p>
          </table:table-cell>
          <table:table-cell table:style-name="ce6" office:value-type="float" office:value="3.755" calcext:value-type="float">
            <text:p>3,75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219" calcext:value-type="float">
            <text:p>7,219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8.251" calcext:value-type="float">
            <text:p>28,251</text:p>
          </table:table-cell>
          <table:table-cell table:style-name="ce6" office:value-type="float" office:value="50.634" calcext:value-type="float">
            <text:p>50,63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229" calcext:value-type="float">
            <text:p>9,22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2.363" calcext:value-type="float">
            <text:p>32,363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99" calcext:value-type="float">
            <text:p>7,699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5.159" calcext:value-type="float">
            <text:p>15,15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6" calcext:value-type="float">
            <text:p>7,64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52.542" calcext:value-type="float">
            <text:p>52,54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193" calcext:value-type="float">
            <text:p>8,19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7.1298" calcext:value-type="float">
            <text:p>7,129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8" calcext:value-type="float">
            <text:p>9,8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2.96" calcext:value-type="float">
            <text:p>12,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54" calcext:value-type="float">
            <text:p>7,54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2.821" calcext:value-type="float">
            <text:p>12,82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671" calcext:value-type="float">
            <text:p>6,67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28.96" calcext:value-type="float">
            <text:p>28,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33" calcext:value-type="float">
            <text:p>7,33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98" calcext:value-type="float">
            <text:p>1,79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5"/>
          <table:table-cell table:style-name="ce5" table:formula="of:=AVERAGE([.B370:.B379])" office:value-type="float" office:value="11.2942" calcext:value-type="float">
            <text:p>11,2942</text:p>
          </table:table-cell>
          <table:table-cell table:style-name="ce5" table:formula="of:=AVERAGE([.C370:.C3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70:.F379])" office:value-type="float" office:value="19.43258" calcext:value-type="float">
            <text:p>19,43258</text:p>
          </table:table-cell>
          <table:table-cell table:style-name="ce5" table:formula="of:=AVERAGE([.G370:.G379])" office:value-type="float" office:value="27.1945" calcext:value-type="float">
            <text:p>27,1945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39.503" calcext:value-type="float">
            <text:p>139,503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111.674" calcext:value-type="float">
            <text:p>111,67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85" calcext:value-type="float">
            <text:p>128,58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72.466" calcext:value-type="float">
            <text:p>72,46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6.388" calcext:value-type="float">
            <text:p>156,388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79.677" calcext:value-type="float">
            <text:p>79,67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0.322" calcext:value-type="float">
            <text:p>170,32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3.203" calcext:value-type="float">
            <text:p>13,20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3.555" calcext:value-type="float">
            <text:p>143,55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127.55" calcext:value-type="float">
            <text:p>127,5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30.076" calcext:value-type="float">
            <text:p>130,076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146.318" calcext:value-type="float">
            <text:p>146,31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6.348" calcext:value-type="float">
            <text:p>176,348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1.831" calcext:value-type="float">
            <text:p>151,831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46.662" calcext:value-type="float">
            <text:p>146,662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5.141" calcext:value-type="float">
            <text:p>155,141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83:.B392])" office:value-type="float" office:value="149.8411" calcext:value-type="float">
            <text:p>149,8411</text:p>
          </table:table-cell>
          <table:table-cell table:style-name="ce5" table:formula="of:=AVERAGE([.C383:.C392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3:.F392])" office:value-type="float" office:value="91.8146666666667" calcext:value-type="float">
            <text:p>91,8146666666667</text:p>
          </table:table-cell>
          <table:table-cell table:style-name="ce5" table:formula="of:=AVERAGE([.G383:.G39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065.133" calcext:value-type="float">
            <text:p>2065,133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61.361" calcext:value-type="float">
            <text:p>561,361</text:p>
          </table:table-cell>
          <table:table-cell table:style-name="ce6" office:value-type="float" office:value="1000.15" calcext:value-type="float">
            <text:p>1000,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3199.82" calcext:value-type="float">
            <text:p>3199,82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92.377" calcext:value-type="float">
            <text:p>692,377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2894.846" calcext:value-type="float">
            <text:p>2894,846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1084.323" calcext:value-type="float">
            <text:p>1084,32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032.966" calcext:value-type="float">
            <text:p>4032,966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85.605" calcext:value-type="float">
            <text:p>985,60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4066.631" calcext:value-type="float">
            <text:p>4066,63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14.788" calcext:value-type="float">
            <text:p>814,78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3072.138" calcext:value-type="float">
            <text:p>3072,138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625.878" calcext:value-type="float">
            <text:p>625,87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3865.951" calcext:value-type="float">
            <text:p>3865,95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1053.257" calcext:value-type="float">
            <text:p>1053,25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float" office:value="2996.765" calcext:value-type="float">
            <text:p>2996,765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140.693" calcext:value-type="float">
            <text:p>1140,69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997.511" calcext:value-type="float">
            <text:p>3997,51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5.241" calcext:value-type="float">
            <text:p>855,24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3876.217" calcext:value-type="float">
            <text:p>3876,217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703.881" calcext:value-type="float">
            <text:p>703,88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396:.B405])" office:value-type="float" office:value="3406.7978" calcext:value-type="float">
            <text:p>3406,7978</text:p>
          </table:table-cell>
          <table:table-cell table:style-name="ce5" table:formula="of:=AVERAGE([.C396:.C405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6:.F405])" office:value-type="float" office:value="851.7404" calcext:value-type="float">
            <text:p>851,7404</text:p>
          </table:table-cell>
          <table:table-cell table:style-name="ce5" table:formula="of:=AVERAGE([.G396:.G405])" office:value-type="float" office:value="1000.15" calcext:value-type="float">
            <text:p>1000,15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style-name="ce5"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49.523" calcext:value-type="float">
            <text:p>449,523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539.473" calcext:value-type="float">
            <text:p>539,473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67" calcext:value-type="float">
            <text:p>0,6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577.137" calcext:value-type="float">
            <text:p>577,13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604.078" calcext:value-type="float">
            <text:p>604,078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548.497" calcext:value-type="float">
            <text:p>548,497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782" calcext:value-type="float">
            <text:p>0,078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table:number-columns-repeated="3"/>
          <table:table-cell table:style-name="ce2" office:value-type="string" calcext:value-type="string">
            <text:p>MB_7</text:p>
          </table:table-cell>
          <table:table-cell table:style-name="ce6" office:value-type="float" office:value="0.291" calcext:value-type="float">
            <text:p>0,29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730.782" calcext:value-type="float">
            <text:p>730,782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85.224" calcext:value-type="float">
            <text:p>585,22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409:.B418])" office:value-type="float" office:value="576.387714285714" calcext:value-type="float">
            <text:p>576,387714285714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409:.F418])" office:value-type="float" office:value="0.28482" calcext:value-type="float">
            <text:p>0,28482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/>
          <table:table-cell table:style-name="ce1"/>
          <table:table-cell table:style-name="ce5" office:value-type="string" calcext:value-type="string">
            <text:p>T=5</text:p>
          </table:table-cell>
          <table:table-cell table:style-name="ce5" office:value-type="string" calcext:value-type="string">
            <text:p>T=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53" calcext:value-type="float">
            <text:p>1,25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3.835" calcext:value-type="float">
            <text:p>3,83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848" calcext:value-type="float">
            <text:p>0,0848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1.115" calcext:value-type="float">
            <text:p>1,11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style-name="ce5" table:formula="of:=AVERAGE([.B421:.B430])" office:value-type="float" office:value="0.08156" calcext:value-type="float">
            <text:p>0,08156</text:p>
          </table:table-cell>
          <table:table-cell table:style-name="ce5" table:formula="of:=AVERAGE([.C421:.C43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21:.F430])" office:value-type="float" office:value="0.82937" calcext:value-type="float">
            <text:p>0,82937</text:p>
          </table:table-cell>
          <table:table-cell table:style-name="ce5" table:formula="of:=AVERAGE([.G421:.G4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1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reads_dynamic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5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233" calcext:value-type="percentage">
            <text:p>23,30%</text:p>
          </table:table-cell>
          <table:table-cell table:style-name="ce48" office:value-type="percentage" office:value="0.228" calcext:value-type="percentage">
            <text:p>22,80%</text:p>
          </table:table-cell>
          <table:table-cell table:style-name="ce48" office:value-type="percentage" office:value="0.23" calcext:value-type="percentage">
            <text:p>23,0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1766" calcext:value-type="percentage">
            <text:p>17,66%</text:p>
          </table:table-cell>
          <table:table-cell table:style-name="ce48" office:value-type="percentage" office:value="0.2021" calcext:value-type="percentage">
            <text:p>20,21%</text:p>
          </table:table-cell>
          <table:table-cell table:style-name="ce48" office:value-type="percentage" office:value="0.2213" calcext:value-type="percentage">
            <text:p>22,13%</text:p>
          </table:table-cell>
          <table:table-cell table:style-name="ce48" office:value-type="percentage" office:value="0.1617" calcext:value-type="percentage">
            <text:p>16,17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2941" calcext:value-type="percentage">
            <text:p>29,41%</text:p>
          </table:table-cell>
          <table:table-cell table:style-name="ce48" office:value-type="percentage" office:value="0.2738" calcext:value-type="percentage">
            <text:p>27,38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118" calcext:value-type="percentage">
            <text:p>21,18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79" calcext:value-type="percentage">
            <text:p>7,90%</text:p>
          </table:table-cell>
          <table:table-cell table:style-name="ce48" office:value-type="percentage" office:value="0.0732" calcext:value-type="percentage">
            <text:p>7,32%</text:p>
          </table:table-cell>
          <table:table-cell table:style-name="ce48" office:value-type="percentage" office:value="0.0694" calcext:value-type="percentage">
            <text:p>6,94%</text:p>
          </table:table-cell>
          <table:table-cell table:style-name="ce48" office:value-type="percentage" office:value="0.0763" calcext:value-type="percentage">
            <text:p>7,63%</text:p>
          </table:table-cell>
          <table:table-cell/>
        </table:table-row>
        <table:table-row table:style-name="ro4">
          <table:table-cell office:value-type="string" calcext:value-type="string">
            <text:p>Beed</text:p>
          </table:table-cell>
          <table:table-cell office:value-type="percentage" office:value="0.4619" calcext:value-type="percentage">
            <text:p>46,19%</text:p>
          </table:table-cell>
          <table:table-cell table:style-name="ce16" office:value-type="percentage" office:value="0.4738" calcext:value-type="percentage">
            <text:p>47,38%</text:p>
          </table:table-cell>
          <table:table-cell table:style-name="ce16" office:value-type="percentage" office:value="0.3903" calcext:value-type="percentage">
            <text:p>39,03%</text:p>
          </table:table-cell>
          <table:table-cell table:style-name="ce16" office:value-type="percentage" office:value="0.3877" calcext:value-type="percentage">
            <text:p>38,77%</text:p>
          </table:table-cell>
          <table:table-cell table:style-name="ce16" office:value-type="percentage" office:value="0.4024" calcext:value-type="percentage">
            <text:p>40,24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2" calcext:value-type="percentage">
            <text:p>4,20%</text:p>
          </table:table-cell>
          <table:table-cell table:style-name="ce48" office:value-type="percentage" office:value="0.0436" calcext:value-type="percentage">
            <text:p>4,36%</text:p>
          </table:table-cell>
          <table:table-cell table:style-name="ce48" office:value-type="percentage" office:value="0.0434" calcext:value-type="percentage">
            <text:p>4,34%</text:p>
          </table:table-cell>
          <table:table-cell table:style-name="ce48" office:value-type="percentage" office:value="0.0442" calcext:value-type="percentage">
            <text:p>4,42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5079" calcext:value-type="percentage">
            <text:p>50,79%</text:p>
          </table:table-cell>
          <table:table-cell table:style-name="ce48" office:value-type="percentage" office:value="0.4614" calcext:value-type="percentage">
            <text:p>46,14%</text:p>
          </table:table-cell>
          <table:table-cell table:style-name="ce48" office:value-type="percentage" office:value="0.4569" calcext:value-type="percentage">
            <text:p>45,69%</text:p>
          </table:table-cell>
          <table:table-cell table:style-name="ce48" office:value-type="percentage" office:value="0.4966" calcext:value-type="percentage">
            <text:p>49,66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96" calcext:value-type="percentage">
            <text:p>9,60%</text:p>
          </table:table-cell>
          <table:table-cell table:style-name="ce48" office:value-type="percentage" office:value="0.1008" calcext:value-type="percentage">
            <text:p>10,08%</text:p>
          </table:table-cell>
          <table:table-cell table:style-name="ce48" office:value-type="percentage" office:value="0.0997" calcext:value-type="percentage">
            <text:p>9,97%</text:p>
          </table:table-cell>
          <table:table-cell table:style-name="ce48" office:value-type="percentage" office:value="0.1152" calcext:value-type="percentage">
            <text:p>11,52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5173" calcext:value-type="percentage">
            <text:p>51,73%</text:p>
          </table:table-cell>
          <table:table-cell table:style-name="ce48" office:value-type="percentage" office:value="0.5197" calcext:value-type="percentage">
            <text:p>51,97%</text:p>
          </table:table-cell>
          <table:table-cell table:style-name="ce48" office:value-type="percentage" office:value="0.5067" calcext:value-type="percentage">
            <text:p>50,67%</text:p>
          </table:table-cell>
          <table:table-cell table:style-name="ce48" office:value-type="percentage" office:value="0.5352" calcext:value-type="percentage">
            <text:p>53,52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57" calcext:value-type="percentage">
            <text:p>25,70%</text:p>
          </table:table-cell>
          <table:table-cell table:style-name="ce48" office:value-type="percentage" office:value="0.249" calcext:value-type="percentage">
            <text:p>24,90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36" calcext:value-type="percentage">
            <text:p>23,6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3013" calcext:value-type="percentage">
            <text:p>30,13%</text:p>
          </table:table-cell>
          <table:table-cell table:style-name="ce48" office:value-type="percentage" office:value="0.295" calcext:value-type="percentage">
            <text:p>29,50%</text:p>
          </table:table-cell>
          <table:table-cell table:style-name="ce48" office:value-type="percentage" office:value="0.2897" calcext:value-type="percentage">
            <text:p>28,97%</text:p>
          </table:table-cell>
          <table:table-cell table:style-name="ce48" office:value-type="percentage" office:value="0.2747" calcext:value-type="percentage">
            <text:p>27,47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48" office:value-type="percentage" office:value="0.3292" calcext:value-type="percentage">
            <text:p>32,92%</text:p>
          </table:table-cell>
          <table:table-cell table:style-name="ce48" office:value-type="percentage" office:value="0.3485" calcext:value-type="percentage">
            <text:p>34,85%</text:p>
          </table:table-cell>
          <table:table-cell table:style-name="ce48" office:value-type="percentage" office:value="0.35" calcext:value-type="percentage">
            <text:p>35,00%</text:p>
          </table:table-cell>
          <table:table-cell table:style-name="ce48" office:value-type="percentage" office:value="0.3592" calcext:value-type="percentage">
            <text:p>35,92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733" calcext:value-type="percentage">
            <text:p>27,33%</text:p>
          </table:table-cell>
          <table:table-cell table:style-name="ce48" office:value-type="percentage" office:value="0.2311" calcext:value-type="percentage">
            <text:p>23,11%</text:p>
          </table:table-cell>
          <table:table-cell table:style-name="ce48" office:value-type="percentage" office:value="0.2111" calcext:value-type="percentage">
            <text:p>21,11%</text:p>
          </table:table-cell>
          <table:table-cell table:style-name="ce48" office:value-type="percentage" office:value="0.2334" calcext:value-type="percentage">
            <text:p>23,34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3243" calcext:value-type="percentage">
            <text:p>32,43%</text:p>
          </table:table-cell>
          <table:table-cell table:style-name="ce48" office:value-type="percentage" office:value="0.241" calcext:value-type="percentage">
            <text:p>24,10%</text:p>
          </table:table-cell>
          <table:table-cell table:style-name="ce48" office:value-type="percentage" office:value="0.1993" calcext:value-type="percentage">
            <text:p>19,93%</text:p>
          </table:table-cell>
          <table:table-cell table:style-name="ce48" office:value-type="percentage" office:value="0.2627" calcext:value-type="percentage">
            <text:p>26,27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709" calcext:value-type="percentage">
            <text:p>7,09%</text:p>
          </table:table-cell>
          <table:table-cell table:style-name="ce48" office:value-type="percentage" office:value="0.0591" calcext:value-type="percentage">
            <text:p>5,91%</text:p>
          </table:table-cell>
          <table:table-cell table:style-name="ce48" office:value-type="percentage" office:value="0.0696" calcext:value-type="percentage">
            <text:p>6,96%</text:p>
          </table:table-cell>
          <table:table-cell table:style-name="ce48" office:value-type="percentage" office:value="0.0665" calcext:value-type="percentage">
            <text:p>6,65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514" calcext:value-type="percentage">
            <text:p>15,14%</text:p>
          </table:table-cell>
          <table:table-cell table:style-name="ce48" office:value-type="percentage" office:value="0.1503" calcext:value-type="percentage">
            <text:p>15,03%</text:p>
          </table:table-cell>
          <table:table-cell table:style-name="ce48" office:value-type="percentage" office:value="0.1486" calcext:value-type="percentage">
            <text:p>14,86%</text:p>
          </table:table-cell>
          <table:table-cell table:style-name="ce48" office:value-type="percentage" office:value="0.1449" calcext:value-type="percentage">
            <text:p>14,49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571" calcext:value-type="percentage">
            <text:p>35,71%</text:p>
          </table:table-cell>
          <table:table-cell table:style-name="ce48" office:value-type="percentage" office:value="0.3238" calcext:value-type="percentage">
            <text:p>32,38%</text:p>
          </table:table-cell>
          <table:table-cell table:style-name="ce48" office:value-type="percentage" office:value="0.3194" calcext:value-type="percentage">
            <text:p>31,94%</text:p>
          </table:table-cell>
          <table:table-cell table:style-name="ce48" office:value-type="percentage" office:value="0.3341" calcext:value-type="percentage">
            <text:p>33,4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622" calcext:value-type="percentage">
            <text:p>26,22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493" calcext:value-type="percentage">
            <text:p>24,93%</text:p>
          </table:table-cell>
          <table:table-cell table:style-name="ce48" office:value-type="percentage" office:value="0.2572" calcext:value-type="percentage">
            <text:p>25,72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705" calcext:value-type="percentage">
            <text:p>17,05%</text:p>
          </table:table-cell>
          <table:table-cell table:style-name="ce48" office:value-type="percentage" office:value="0.1702" calcext:value-type="percentage">
            <text:p>17,02%</text:p>
          </table:table-cell>
          <table:table-cell table:number-columns-repeated="2" table:style-name="ce48" office:value-type="percentage" office:value="0.1706" calcext:value-type="percentage">
            <text:p>17,06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5678" calcext:value-type="percentage">
            <text:p>56,78%</text:p>
          </table:table-cell>
          <table:table-cell table:style-name="ce48" office:value-type="percentage" office:value="0.4849" calcext:value-type="percentage">
            <text:p>48,49%</text:p>
          </table:table-cell>
          <table:table-cell table:style-name="ce48" office:value-type="percentage" office:value="0.4939" calcext:value-type="percentage">
            <text:p>49,39%</text:p>
          </table:table-cell>
          <table:table-cell table:style-name="ce48" office:value-type="percentage" office:value="0.5407" calcext:value-type="percentage">
            <text:p>54,07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721" calcext:value-type="percentage">
            <text:p>17,21%</text:p>
          </table:table-cell>
          <table:table-cell table:style-name="ce48" office:value-type="percentage" office:value="0.1558" calcext:value-type="percentage">
            <text:p>15,58%</text:p>
          </table:table-cell>
          <table:table-cell table:style-name="ce48" office:value-type="percentage" office:value="0.1637" calcext:value-type="percentage">
            <text:p>16,37%</text:p>
          </table:table-cell>
          <table:table-cell table:style-name="ce48" office:value-type="percentage" office:value="0.1632" calcext:value-type="percentage">
            <text:p>16,32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493" calcext:value-type="percentage">
            <text:p>14,93%</text:p>
          </table:table-cell>
          <table:table-cell table:style-name="ce48" office:value-type="percentage" office:value="0.1511" calcext:value-type="percentage">
            <text:p>15,11%</text:p>
          </table:table-cell>
          <table:table-cell table:style-name="ce48" office:value-type="percentage" office:value="0.1546" calcext:value-type="percentage">
            <text:p>15,46%</text:p>
          </table:table-cell>
          <table:table-cell table:style-name="ce48" office:value-type="percentage" office:value="0.1526" calcext:value-type="percentage">
            <text:p>15,26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3312" calcext:value-type="percentage">
            <text:p>33,12%</text:p>
          </table:table-cell>
          <table:table-cell table:style-name="ce48" office:value-type="percentage" office:value="0.3047" calcext:value-type="percentage">
            <text:p>30,47%</text:p>
          </table:table-cell>
          <table:table-cell table:style-name="ce48" office:value-type="percentage" office:value="0.2788" calcext:value-type="percentage">
            <text:p>27,88%</text:p>
          </table:table-cell>
          <table:table-cell table:style-name="ce48" office:value-type="percentage" office:value="0.2643" calcext:value-type="percentage">
            <text:p>26,43%</text:p>
          </table:table-cell>
          <table:table-cell/>
        </table:table-row>
        <table:table-row table:style-name="ro4">
          <table:table-cell office:value-type="string" calcext:value-type="string">
            <text:p>Pirvision</text:p>
          </table:table-cell>
          <table:table-cell office:value-type="percentage" office:value="0.1431" calcext:value-type="percentage">
            <text:p>14,31%</text:p>
          </table:table-cell>
          <table:table-cell table:style-name="ce16" office:value-type="percentage" office:value="0.0931" calcext:value-type="percentage">
            <text:p>9,31%</text:p>
          </table:table-cell>
          <table:table-cell table:style-name="ce16" office:value-type="percentage" office:value="0.1054" calcext:value-type="percentage">
            <text:p>10,54%</text:p>
          </table:table-cell>
          <table:table-cell table:style-name="ce16" office:value-type="percentage" office:value="0.0907" calcext:value-type="percentage">
            <text:p>9,07%</text:p>
          </table:table-cell>
          <table:table-cell table:style-name="ce16" office:value-type="percentage" office:value="0.1186" calcext:value-type="percentage">
            <text:p>11,86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787" calcext:value-type="percentage">
            <text:p>7,87%</text:p>
          </table:table-cell>
          <table:table-cell table:style-name="ce48" office:value-type="percentage" office:value="0.0692" calcext:value-type="percentage">
            <text:p>6,92%</text:p>
          </table:table-cell>
          <table:table-cell table:style-name="ce48" office:value-type="percentage" office:value="0.0683" calcext:value-type="percentage">
            <text:p>6,83%</text:p>
          </table:table-cell>
          <table:table-cell table:style-name="ce48" office:value-type="percentage" office:value="0.0743" calcext:value-type="percentage">
            <text:p>7,43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301" calcext:value-type="percentage">
            <text:p>30,10%</text:p>
          </table:table-cell>
          <table:table-cell table:style-name="ce48" office:value-type="percentage" office:value="0.3013" calcext:value-type="percentage">
            <text:p>30,13%</text:p>
          </table:table-cell>
          <table:table-cell table:style-name="ce48" office:value-type="percentage" office:value="0.3111" calcext:value-type="percentage">
            <text:p>31,11%</text:p>
          </table:table-cell>
          <table:table-cell table:style-name="ce48" office:value-type="percentage" office:value="0.2932" calcext:value-type="percentage">
            <text:p>29,32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346" calcext:value-type="percentage">
            <text:p>23,46%</text:p>
          </table:table-cell>
          <table:table-cell table:style-name="ce48" office:value-type="percentage" office:value="0.2157" calcext:value-type="percentage">
            <text:p>21,57%</text:p>
          </table:table-cell>
          <table:table-cell table:style-name="ce48" office:value-type="percentage" office:value="0.2076" calcext:value-type="percentage">
            <text:p>20,76%</text:p>
          </table:table-cell>
          <table:table-cell table:style-name="ce48" office:value-type="percentage" office:value="0.2041" calcext:value-type="percentage">
            <text:p>20,41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563" calcext:value-type="percentage">
            <text:p>35,63%</text:p>
          </table:table-cell>
          <table:table-cell table:style-name="ce48" office:value-type="percentage" office:value="0.3441" calcext:value-type="percentage">
            <text:p>34,41%</text:p>
          </table:table-cell>
          <table:table-cell table:style-name="ce48" office:value-type="percentage" office:value="0.3387" calcext:value-type="percentage">
            <text:p>33,87%</text:p>
          </table:table-cell>
          <table:table-cell table:style-name="ce48" office:value-type="percentage" office:value="0.3559" calcext:value-type="percentage">
            <text:p>35,59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4758" calcext:value-type="percentage">
            <text:p>47,58%</text:p>
          </table:table-cell>
          <table:table-cell table:style-name="ce48" office:value-type="percentage" office:value="0.4001" calcext:value-type="percentage">
            <text:p>40,01%</text:p>
          </table:table-cell>
          <table:table-cell table:style-name="ce48" office:value-type="percentage" office:value="0.4747" calcext:value-type="percentage">
            <text:p>47,47%</text:p>
          </table:table-cell>
          <table:table-cell table:style-name="ce48" office:value-type="percentage" office:value="0.4327" calcext:value-type="percentage">
            <text:p>43,27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2235" calcext:value-type="percentage">
            <text:p>22,35%</text:p>
          </table:table-cell>
          <table:table-cell table:style-name="ce48" office:value-type="percentage" office:value="0.1521" calcext:value-type="percentage">
            <text:p>15,21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2402" calcext:value-type="percentage">
            <text:p>24,0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231" calcext:value-type="percentage">
            <text:p>23,10%</text:p>
          </table:table-cell>
          <table:table-cell table:style-name="ce48" office:value-type="percentage" office:value="0.221" calcext:value-type="percentage">
            <text:p>22,1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195" calcext:value-type="percentage">
            <text:p>21,95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5" calcext:value-type="percentage">
            <text:p>6,50%</text:p>
          </table:table-cell>
          <table:table-cell table:style-name="ce48" office:value-type="percentage" office:value="0.0659" calcext:value-type="percentage">
            <text:p>6,59%</text:p>
          </table:table-cell>
          <table:table-cell table:style-name="ce48" office:value-type="percentage" office:value="0.0619" calcext:value-type="percentage">
            <text:p>6,19%</text:p>
          </table:table-cell>
          <table:table-cell table:style-name="ce48" office:value-type="percentage" office:value="0.0602" calcext:value-type="percentage">
            <text:p>6,02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481" calcext:value-type="percentage">
            <text:p>44,81%</text:p>
          </table:table-cell>
          <table:table-cell table:style-name="ce48" office:value-type="percentage" office:value="0.4301" calcext:value-type="percentage">
            <text:p>43,01%</text:p>
          </table:table-cell>
          <table:table-cell table:style-name="ce48" office:value-type="percentage" office:value="0.4191" calcext:value-type="percentage">
            <text:p>41,91%</text:p>
          </table:table-cell>
          <table:table-cell table:style-name="ce48" office:value-type="percentage" office:value="0.4201" calcext:value-type="percentage">
            <text:p>42,01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804" calcext:value-type="percentage">
            <text:p>28,04%</text:p>
          </table:table-cell>
          <table:table-cell table:style-name="ce48" office:value-type="percentage" office:value="0.2389" calcext:value-type="percentage">
            <text:p>23,89%</text:p>
          </table:table-cell>
          <table:table-cell table:style-name="ce48" office:value-type="percentage" office:value="0.2222" calcext:value-type="percentage">
            <text:p>22,22%</text:p>
          </table:table-cell>
          <table:table-cell table:style-name="ce48" office:value-type="percentage" office:value="0.3215" calcext:value-type="percentage">
            <text:p>32,15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6" calcext:value-type="percentage">
            <text:p>6,00%</text:p>
          </table:table-cell>
          <table:table-cell table:number-columns-repeated="2" table:style-name="ce48" office:value-type="percentage" office:value="0.0568" calcext:value-type="percentage">
            <text:p>5,68%</text:p>
          </table:table-cell>
          <table:table-cell table:style-name="ce48" office:value-type="percentage" office:value="0.0535" calcext:value-type="percentage">
            <text:p>5,35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435" calcext:value-type="percentage">
            <text:p>24,35%</text:p>
          </table:table-cell>
          <table:table-cell table:style-name="ce48" office:value-type="percentage" office:value="0.2492" calcext:value-type="percentage">
            <text:p>24,92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414" calcext:value-type="percentage">
            <text:p>24,14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813" calcext:value-type="percentage">
            <text:p>8,13%</text:p>
          </table:table-cell>
          <table:table-cell table:style-name="ce48" office:value-type="percentage" office:value="0.058" calcext:value-type="percentage">
            <text:p>5,80%</text:p>
          </table:table-cell>
          <table:table-cell table:style-name="ce48" office:value-type="percentage" office:value="0.0495" calcext:value-type="percentage">
            <text:p>4,95%</text:p>
          </table:table-cell>
          <table:table-cell table:style-name="ce48" office:value-type="percentage" office:value="0.1108" calcext:value-type="percentage">
            <text:p>11,08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223" calcext:value-type="percentage">
            <text:p>22,30%</text:p>
          </table:table-cell>
          <table:table-cell table:style-name="ce48" office:value-type="percentage" office:value="0.1577" calcext:value-type="percentage">
            <text:p>15,77%</text:p>
          </table:table-cell>
          <table:table-cell table:style-name="ce48" office:value-type="percentage" office:value="0.1182" calcext:value-type="percentage">
            <text:p>11,82%</text:p>
          </table:table-cell>
          <table:table-cell table:style-name="ce48" office:value-type="percentage" office:value="0.1856" calcext:value-type="percentage">
            <text:p>18,56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1984" calcext:value-type="percentage">
            <text:p>19,84%</text:p>
          </table:table-cell>
          <table:table-cell table:style-name="ce48" office:value-type="percentage" office:value="0.1417" calcext:value-type="percentage">
            <text:p>14,17%</text:p>
          </table:table-cell>
          <table:table-cell table:style-name="ce48" office:value-type="percentage" office:value="0.09" calcext:value-type="percentage">
            <text:p>9,00%</text:p>
          </table:table-cell>
          <table:table-cell table:style-name="ce48" office:value-type="percentage" office:value="0.1153" calcext:value-type="percentage">
            <text:p>11,53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2198" calcext:value-type="percentage">
            <text:p>21,98%</text:p>
          </table:table-cell>
          <table:table-cell table:style-name="ce48" office:value-type="percentage" office:value="0.1244" calcext:value-type="percentage">
            <text:p>12,44%</text:p>
          </table:table-cell>
          <table:table-cell table:style-name="ce48" office:value-type="percentage" office:value="0.1008" calcext:value-type="percentage">
            <text:p>10,08%</text:p>
          </table:table-cell>
          <table:table-cell table:style-name="ce48" office:value-type="percentage" office:value="0.08" calcext:value-type="percentage">
            <text:p>8,00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366" calcext:value-type="percentage">
            <text:p>3,66%</text:p>
          </table:table-cell>
          <table:table-cell table:style-name="ce48" office:value-type="percentage" office:value="0.0302" calcext:value-type="percentage">
            <text:p>3,02%</text:p>
          </table:table-cell>
          <table:table-cell table:style-name="ce48" office:value-type="percentage" office:value="0.0268" calcext:value-type="percentage">
            <text:p>2,68%</text:p>
          </table:table-cell>
          <table:table-cell table:style-name="ce48" office:value-type="percentage" office:value="0.029" calcext:value-type="percentage">
            <text:p>2,90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48" calcext:value-type="percentage">
            <text:p>4,80%</text:p>
          </table:table-cell>
          <table:table-cell table:style-name="ce48" office:value-type="percentage" office:value="0.034" calcext:value-type="percentage">
            <text:p>3,40%</text:p>
          </table:table-cell>
          <table:table-cell table:style-name="ce48" office:value-type="percentage" office:value="0.039" calcext:value-type="percentage">
            <text:p>3,90%</text:p>
          </table:table-cell>
          <table:table-cell table:style-name="ce48" office:value-type="percentage" office:value="0.034" calcext:value-type="percentage">
            <text:p>3,4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4])" office:value-type="percentage" office:value="0.26637619047619" calcext:value-type="percentage">
            <text:p>26,64%</text:p>
          </table:table-cell>
          <table:table-cell table:style-name="ce17" table:formula="of:=AVERAGE([.C3:.C44])" office:value-type="percentage" office:value="0.2387" calcext:value-type="percentage">
            <text:p>23,87%</text:p>
          </table:table-cell>
          <table:table-cell table:style-name="ce17" table:formula="of:=AVERAGE([.D3:.D44])" office:value-type="percentage" office:value="0.216980952380952" calcext:value-type="percentage">
            <text:p>21,70%</text:p>
          </table:table-cell>
          <table:table-cell table:style-name="ce17" table:formula="of:=AVERAGE([.E3:.E44])" office:value-type="percentage" office:value="0.212054761904762" calcext:value-type="percentage">
            <text:p>21,21%</text:p>
          </table:table-cell>
          <table:table-cell table:style-name="ce17" table:formula="of:=AVERAGE([.F3:.F44])" office:value-type="percentage" office:value="0.221985714285714" calcext:value-type="percentage">
            <text:p>22,20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5]-[.C45])/[.B45]" office:value-type="percentage" office:value="0.103898889862171" calcext:value-type="percentage">
            <text:p>10,39%</text:p>
          </table:table-cell>
          <table:table-cell table:style-name="ce18" table:formula="of:=([.B45]-[.D45])/[.B45]" office:value-type="percentage" office:value="0.185434133609825" calcext:value-type="percentage">
            <text:p>18,54%</text:p>
          </table:table-cell>
          <table:table-cell table:style-name="ce18" table:formula="of:=([.B45]-[.E45])/[.B45]" office:value-type="percentage" office:value="0.20392749244713" calcext:value-type="percentage">
            <text:p>20,39%</text:p>
          </table:table-cell>
          <table:table-cell table:style-name="ce18" table:formula="of:=([.B45]-[.F45])/[.B45]" office:value-type="percentage" office:value="0.166645810615134" calcext:value-type="percentage">
            <text:p>16,6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8" table:number-columns-spanned="5" table:number-rows-spanned="1"/>
          <table:covered-table-cell table:number-columns-repeated="3" table:style-name="ce38"/>
          <table:covered-table-cell/>
        </table:table-row>
        <table:table-row table:style-name="ro1">
          <table:table-cell table:style-name="ce12"/>
          <table:table-cell table:style-name="ce19"/>
          <table:table-cell table:style-name="ce12" table:number-columns-repeated="4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 table:number-rows-repeated="2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3" table:number-columns-repeated="2"/>
          <table:table-cell table:style-name="ce51" table:number-columns-repeated="2"/>
          <table:table-cell/>
        </table:table-row>
        <table:table-row table:style-name="ro4" table:number-rows-repeated="11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 table:number-rows-repeated="3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 table:number-rows-repeated="3">
          <table:table-cell/>
          <table:table-cell table:style-name="ce20"/>
          <table:table-cell table:style-name="ce53"/>
          <table:table-cell table:style-name="ce51" table:number-columns-repeated="3"/>
          <table:table-cell/>
        </table:table-row>
        <table:table-row table:style-name="ro4">
          <table:table-cell/>
          <table:table-cell table:style-name="ce20"/>
          <table:table-cell table:style-name="ce51" table:number-columns-repeated="4"/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/>
          <table:table-cell table:style-name="ce21"/>
          <table:table-cell table:style-name="ce13" table:number-columns-repeated="4"/>
          <table:table-cell/>
        </table:table-row>
        <table:table-row table:style-name="ro3">
          <table:table-cell table:style-name="ce38"/>
          <table:table-cell table:style-name="ce22"/>
          <table:table-cell table:style-name="ce18" table:number-columns-repeated="4"/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propaga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145" calcext:value-type="percentage">
            <text:p>31,45%</text:p>
          </table:table-cell>
          <table:table-cell table:style-name="ce3" office:value-type="percentage" office:value="0.2826" calcext:value-type="percentage">
            <text:p>28,26%</text:p>
          </table:table-cell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48" calcext:value-type="percentage">
            <text:p>48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058" calcext:value-type="percentage">
            <text:p>20,58%</text:p>
          </table:table-cell>
          <table:table-cell table:style-name="ce3" office:value-type="percentage" office:value="0.1826" calcext:value-type="percentage">
            <text:p>18,26%</text:p>
          </table:table-cell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2362" calcext:value-type="percentage">
            <text:p>23,62%</text:p>
          </table:table-cell>
          <table:table-cell table:style-name="ce3" office:value-type="percentage" office:value="0.2391" calcext:value-type="percentage">
            <text:p>23,91%</text:p>
          </table:table-cell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217" calcext:value-type="percentage">
            <text:p>22,17%</text:p>
          </table:table-cell>
          <table:table-cell table:style-name="ce3" office:value-type="percentage" office:value="0.2522" calcext:value-type="percentage">
            <text:p>25,22%</text:p>
          </table:table-cell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2116" calcext:value-type="percentage">
            <text:p>21,16%</text:p>
          </table:table-cell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1783" calcext:value-type="percentage">
            <text:p>17,83%</text:p>
          </table:table-cell>
          <table:table-cell table:style-name="ce3" office:value-type="percentage" office:value="0.2464" calcext:value-type="percentage">
            <text:p>24,64%</text:p>
          </table:table-cell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number-columns-repeated="2"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2783" calcext:value-type="percentage">
            <text:p>27,83%</text:p>
          </table:table-cell>
          <table:table-cell table:style-name="ce3" office:value-type="percentage" office:value="0.3667" calcext:value-type="percentage">
            <text:p>36,67%</text:p>
          </table:table-cell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884" calcext:value-type="percentage">
            <text:p>18,84%</text:p>
          </table:table-cell>
          <table:table-cell table:style-name="ce3" office:value-type="percentage" office:value="0.2029" calcext:value-type="percentage">
            <text:p>20,29%</text:p>
          </table:table-cell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29" calcext:value-type="percentage">
            <text:p>22,90%</text:p>
          </table:table-cell>
          <table:table-cell table:style-name="ce3" office:value-type="percentage" office:value="0.313" calcext:value-type="percentage">
            <text:p>31,30%</text:p>
          </table:table-cell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1565" calcext:value-type="percentage">
            <text:p>15,65%</text:p>
          </table:table-cell>
          <table:table-cell table:style-name="ce2" office:value-type="percentage" office:value="0.2217" calcext:value-type="percentage">
            <text:p>22,17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236" calcext:value-type="percentage">
            <text:p>23,60%</text:p>
          </table:table-cell>
          <table:table-cell table:style-name="ce1" table:formula="of:=AVERAGE([.C2:.C11])" office:value-type="percentage" office:value="0.233" calcext:value-type="percentage">
            <text:p>23,3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2319" calcext:value-type="percentage">
            <text:p>22,32%</text:p>
          </table:table-cell>
          <table:table-cell table:style-name="ce1" table:formula="of:=AVERAGE([.G2:.G11])" office:value-type="percentage" office:value="0.25188" calcext:value-type="percentage">
            <text:p>25,1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207" calcext:value-type="percentage">
            <text:p>52,07%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number-columns-repeated="2" table:style-name="ce2" office:value-type="percentage" office:value="0.043" calcext:value-type="percentage">
            <text:p>4,30%</text:p>
          </table:table-cell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469" calcext:value-type="percentage">
            <text:p>46,90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27" calcext:value-type="percentage">
            <text:p>2,70%</text:p>
          </table:table-cell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241" calcext:value-type="percentage">
            <text:p>42,41%</text:p>
          </table:table-cell>
          <table:table-cell table:style-name="ce2" office:value-type="percentage" office:value="0.5586" calcext:value-type="percentage">
            <text:p>55,86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7" calcext:value-type="percentage">
            <text:p>7,00%</text:p>
          </table:table-cell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483" calcext:value-type="percentage">
            <text:p>44,83%</text:p>
          </table:table-cell>
          <table:table-cell table:style-name="ce2" office:value-type="percentage" office:value="0.331" calcext:value-type="percentage">
            <text:p>33,10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number-columns-repeated="2" table:style-name="ce2" office:value-type="percentage" office:value="0.067" calcext:value-type="percentage">
            <text:p>6,70%</text:p>
          </table:table-cell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5172" calcext:value-type="percentage">
            <text:p>51,72%</text:p>
          </table:table-cell>
          <table:table-cell table:style-name="ce2" office:value-type="percentage" office:value="0.4724" calcext:value-type="percentage">
            <text:p>47,24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27" calcext:value-type="percentage">
            <text:p>2,70%</text:p>
          </table:table-cell>
          <table:table-cell table:style-name="ce2" office:value-type="percentage" office:value="0.022" calcext:value-type="percentage">
            <text:p>2,20%</text:p>
          </table:table-cell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241" calcext:value-type="percentage">
            <text:p>32,41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number-columns-repeated="2" table:style-name="ce2" office:value-type="percentage" office:value="0.031" calcext:value-type="percentage">
            <text:p>3,10%</text:p>
          </table:table-cell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3966" calcext:value-type="percentage">
            <text:p>39,66%</text:p>
          </table:table-cell>
          <table:table-cell table:style-name="ce2" office:value-type="percentage" office:value="0.4034" calcext:value-type="percentage">
            <text:p>40,34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51" calcext:value-type="percentage">
            <text:p>5,10%</text:p>
          </table:table-cell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862" calcext:value-type="percentage">
            <text:p>58,62%</text:p>
          </table:table-cell>
          <table:table-cell table:style-name="ce2" office:value-type="percentage" office:value="0.6034" calcext:value-type="percentage">
            <text:p>60,34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3" calcext:value-type="percentage">
            <text:p>2,30%</text:p>
          </table:table-cell>
          <table:table-cell table:style-name="ce2" office:value-type="percentage" office:value="0.027" calcext:value-type="percentage">
            <text:p>2,70%</text:p>
          </table:table-cell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069" calcext:value-type="percentage">
            <text:p>50,69%</text:p>
          </table:table-cell>
          <table:table-cell table:style-name="ce2" office:value-type="percentage" office:value="0.5414" calcext:value-type="percentage">
            <text:p>54,14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9" calcext:value-type="percentage">
            <text:p>3,90%</text:p>
          </table:table-cell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6207" calcext:value-type="percentage">
            <text:p>62,07%</text:p>
          </table:table-cell>
          <table:table-cell table:style-name="ce2" office:value-type="percentage" office:value="0.4552" calcext:value-type="percentage">
            <text:p>45,52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48" calcext:value-type="percentage">
            <text:p>4,80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47241" calcext:value-type="percentage">
            <text:p>47,24%</text:p>
          </table:table-cell>
          <table:table-cell table:style-name="ce1" table:formula="of:=AVERAGE([.C14:.C23])" office:value-type="percentage" office:value="0.47585" calcext:value-type="percentage">
            <text:p>47,59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35" calcext:value-type="percentage">
            <text:p>4,35%</text:p>
          </table:table-cell>
          <table:table-cell table:style-name="ce1" table:formula="of:=AVERAGE([.G14:.G23])" office:value-type="percentage" office:value="0.0425" calcext:value-type="percentage">
            <text:p>4,25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2" office:value-type="percentage" office:value="0.1114" calcext:value-type="percentage">
            <text:p>11,14%</text:p>
          </table:table-cell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number-columns-repeated="2"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0943" calcext:value-type="percentage">
            <text:p>9,43%</text:p>
          </table:table-cell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number-columns-repeated="2"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714" calcext:value-type="percentage">
            <text:p>7,14%</text:p>
          </table:table-cell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771" calcext:value-type="percentage">
            <text:p>17,71%</text:p>
          </table:table-cell>
          <table:table-cell table:style-name="ce2" office:value-type="percentage" office:value="0.1514" calcext:value-type="percentage">
            <text:p>15,14%</text:p>
          </table:table-cell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43" calcext:value-type="percentage">
            <text:p>7,43%</text:p>
          </table:table-cell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086" calcext:value-type="percentage">
            <text:p>10,86%</text:p>
          </table:table-cell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number-columns-repeated="2" table:style-name="ce2" office:value-type="percentage" office:value="0.1314" calcext:value-type="percentage">
            <text:p>13,14%</text:p>
          </table:table-cell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657" calcext:value-type="percentage">
            <text:p>6,57%</text:p>
          </table:table-cell>
          <table:table-cell table:style-name="ce2" office:value-type="percentage" office:value="0.1057" calcext:value-type="percentage">
            <text:p>10,57%</text:p>
          </table:table-cell>
        </table:table-row>
        <table:table-row table:style-name="ro1">
          <table:table-cell table:style-name="ce1"/>
          <table:table-cell table:style-name="ce1" table:formula="of:=AVERAGE([.B27:.B36])" office:value-type="percentage" office:value="0.254" calcext:value-type="percentage">
            <text:p>25,40%</text:p>
          </table:table-cell>
          <table:table-cell table:style-name="ce1" table:formula="of:=AVERAGE([.C27:.C36])" office:value-type="percentage" office:value="0.25" calcext:value-type="percentage">
            <text:p>25,0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09829" calcext:value-type="percentage">
            <text:p>9,83%</text:p>
          </table:table-cell>
          <table:table-cell table:style-name="ce1" table:formula="of:=AVERAGE([.G27:.G36])" office:value-type="percentage" office:value="0.10399" calcext:value-type="percentage">
            <text:p>10,4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394" calcext:value-type="percentage">
            <text:p>43,94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532" calcext:value-type="percentage">
            <text:p>5,32%</text:p>
          </table:table-cell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5061" calcext:value-type="percentage">
            <text:p>50,61%</text:p>
          </table:table-cell>
          <table:table-cell table:style-name="ce2" office:value-type="percentage" office:value="0.4758" calcext:value-type="percentage">
            <text:p>47,58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032" calcext:value-type="percentage">
            <text:p>10,32%</text:p>
          </table:table-cell>
          <table:table-cell table:style-name="ce2" office:value-type="percentage" office:value="0.1097" calcext:value-type="percentage">
            <text:p>10,97%</text:p>
          </table:table-cell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5061" calcext:value-type="percentage">
            <text:p>50,61%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0871" calcext:value-type="percentage">
            <text:p>8,71%</text:p>
          </table:table-cell>
          <table:table-cell table:style-name="ce2" office:value-type="percentage" office:value="0.1048" calcext:value-type="percentage">
            <text:p>10,48%</text:p>
          </table:table-cell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4212" calcext:value-type="percentage">
            <text:p>42,12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71" calcext:value-type="percentage">
            <text:p>7,10%</text:p>
          </table:table-cell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121" calcext:value-type="percentage">
            <text:p>51,21%</text:p>
          </table:table-cell>
          <table:table-cell table:style-name="ce2" office:value-type="percentage" office:value="0.5303" calcext:value-type="percentage">
            <text:p>53,03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613" calcext:value-type="percentage">
            <text:p>6,13%</text:p>
          </table:table-cell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2" office:value-type="percentage" office:value="0.497" calcext:value-type="percentage">
            <text:p>49,70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613" calcext:value-type="percentage">
            <text:p>6,13%</text:p>
          </table:table-cell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6242" calcext:value-type="percentage">
            <text:p>62,42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1177" calcext:value-type="percentage">
            <text:p>11,77%</text:p>
          </table:table-cell>
          <table:table-cell table:style-name="ce2" office:value-type="percentage" office:value="0.1306" calcext:value-type="percentage">
            <text:p>13,06%</text:p>
          </table:table-cell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091" calcext:value-type="percentage">
            <text:p>50,91%</text:p>
          </table:table-cell>
          <table:table-cell table:style-name="ce2" office:value-type="percentage" office:value="0.5485" calcext:value-type="percentage">
            <text:p>54,85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597" calcext:value-type="percentage">
            <text:p>5,97%</text:p>
          </table:table-cell>
          <table:table-cell table:style-name="ce2" office:value-type="percentage" office:value="0.0661" calcext:value-type="percentage">
            <text:p>6,61%</text:p>
          </table:table-cell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4879" calcext:value-type="percentage">
            <text:p>48,79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694" calcext:value-type="percentage">
            <text:p>6,94%</text:p>
          </table:table-cell>
          <table:table-cell table:style-name="ce2" office:value-type="percentage" office:value="0.071" calcext:value-type="percentage">
            <text:p>7,10%</text:p>
          </table:table-cell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number-columns-repeated="2" table:style-name="ce2" office:value-type="percentage" office:value="0.079" calcext:value-type="percentage">
            <text:p>7,90%</text:p>
          </table:table-cell>
        </table:table-row>
        <table:table-row table:style-name="ro1">
          <table:table-cell table:style-name="ce1"/>
          <table:table-cell table:style-name="ce1" table:formula="of:=AVERAGE([.B40:.B49])" office:value-type="percentage" office:value="0.51577" calcext:value-type="percentage">
            <text:p>51,58%</text:p>
          </table:table-cell>
          <table:table-cell table:style-name="ce1" table:formula="of:=AVERAGE([.C40:.C49])" office:value-type="percentage" office:value="0.50334" calcext:value-type="percentage">
            <text:p>50,33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257" calcext:value-type="percentage">
            <text:p>7,26%</text:p>
          </table:table-cell>
          <table:table-cell table:style-name="ce1" table:formula="of:=AVERAGE([.G40:.G49])" office:value-type="percentage" office:value="0.0808" calcext:value-type="percentage">
            <text:p>8,08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714" calcext:value-type="percentage">
            <text:p>47,14%</text:p>
          </table:table-cell>
          <table:table-cell table:style-name="ce2" office:value-type="percentage" office:value="0.5524" calcext:value-type="percentage">
            <text:p>55,24%</text:p>
          </table:table-cell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367" calcext:value-type="percentage">
            <text:p>43,67%</text:p>
          </table:table-cell>
          <table:table-cell table:style-name="ce2" office:value-type="percentage" office:value="0.3867" calcext:value-type="percentage">
            <text:p>38,67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2" office:value-type="percentage" office:value="0.6476" calcext:value-type="percentage">
            <text:p>64,76%</text:p>
          </table:table-cell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6476" calcext:value-type="percentage">
            <text:p>64,76%</text:p>
          </table:table-cell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571" calcext:value-type="percentage">
            <text:p>55,71%</text:p>
          </table:table-cell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933" calcext:value-type="percentage">
            <text:p>39,33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681" calcext:value-type="percentage">
            <text:p>68,10%</text:p>
          </table:table-cell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733" calcext:value-type="percentage">
            <text:p>37,33%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429" calcext:value-type="percentage">
            <text:p>54,29%</text:p>
          </table:table-cell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4952" calcext:value-type="percentage">
            <text:p>49,52%</text:p>
          </table:table-cell>
          <table:table-cell table:style-name="ce2" office:value-type="percentage" office:value="0.6238" calcext:value-type="percentage">
            <text:p>62,38%</text:p>
          </table:table-cell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3429" calcext:value-type="percentage">
            <text:p>34,29%</text:p>
          </table:table-cell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095" calcext:value-type="percentage">
            <text:p>40,95%</text:p>
          </table:table-cell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381" calcext:value-type="percentage">
            <text:p>53,81%</text:p>
          </table:table-cell>
          <table:table-cell table:style-name="ce2" office:value-type="percentage" office:value="0.619" calcext:value-type="percentage">
            <text:p>61,90%</text:p>
          </table:table-cell>
        </table:table-row>
        <table:table-row table:style-name="ro1">
          <table:table-cell table:style-name="ce1"/>
          <table:table-cell table:style-name="ce1" table:formula="of:=AVERAGE([.B53:.B62])" office:value-type="percentage" office:value="0.29534" calcext:value-type="percentage">
            <text:p>29,53%</text:p>
          </table:table-cell>
          <table:table-cell table:style-name="ce1" table:formula="of:=AVERAGE([.C53:.C62])" office:value-type="percentage" office:value="0.28699" calcext:value-type="percentage">
            <text:p>28,70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0571" calcext:value-type="percentage">
            <text:p>50,57%</text:p>
          </table:table-cell>
          <table:table-cell table:style-name="ce1" table:formula="of:=AVERAGE([.G53:.G62])" office:value-type="percentage" office:value="0.56238" calcext:value-type="percentage">
            <text:p>56,24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4385" calcext:value-type="percentage">
            <text:p>43,85%</text:p>
          </table:table-cell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923" calcext:value-type="percentage">
            <text:p>39,23%</text:p>
          </table:table-cell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1148" calcext:value-type="percentage">
            <text:p>11,48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2" office:value-type="percentage" office:value="0.4615" calcext:value-type="percentage">
            <text:p>46,15%</text:p>
          </table:table-cell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number-columns-repeated="2" table:style-name="ce2" office:value-type="percentage" office:value="0.3077" calcext:value-type="percentage">
            <text:p>30,77%</text:p>
          </table:table-cell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4769" calcext:value-type="percentage">
            <text:p>47,69%</text:p>
          </table:table-cell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2778" calcext:value-type="percentage">
            <text:p>27,78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231" calcext:value-type="percentage">
            <text:p>42,31%</text:p>
          </table:table-cell>
          <table:table-cell table:style-name="ce2" office:value-type="percentage" office:value="0.4077" calcext:value-type="percentage">
            <text:p>40,77%</text:p>
          </table:table-cell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2" office:value-type="percentage" office:value="0.3259" calcext:value-type="percentage">
            <text:p>32,59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2538" calcext:value-type="percentage">
            <text:p>25,38%</text:p>
          </table:table-cell>
          <table:table-cell table:style-name="ce2" office:value-type="percentage" office:value="0.2462" calcext:value-type="percentage">
            <text:p>24,62%</text:p>
          </table:table-cell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154" calcext:value-type="percentage">
            <text:p>41,54%</text:p>
          </table:table-cell>
          <table:table-cell table:style-name="ce2" office:value-type="percentage" office:value="0.3231" calcext:value-type="percentage">
            <text:p>32,31%</text:p>
          </table:table-cell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2538" calcext:value-type="percentage">
            <text:p>25,38%</text:p>
          </table:table-cell>
          <table:table-cell table:style-name="ce2" office:value-type="percentage" office:value="0.2462" calcext:value-type="percentage">
            <text:p>24,62%</text:p>
          </table:table-cell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963" calcext:value-type="percentage">
            <text:p>19,63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4308" calcext:value-type="percentage">
            <text:p>43,08%</text:p>
          </table:table-cell>
        </table:table-row>
        <table:table-row table:style-name="ro1">
          <table:table-cell table:style-name="ce1"/>
          <table:table-cell table:style-name="ce1" table:formula="of:=AVERAGE([.B66:.B75])" office:value-type="percentage" office:value="0.20445" calcext:value-type="percentage">
            <text:p>20,45%</text:p>
          </table:table-cell>
          <table:table-cell table:style-name="ce1" table:formula="of:=AVERAGE([.C66:.C75])" office:value-type="percentage" office:value="0.20184" calcext:value-type="percentage">
            <text:p>20,18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5538" calcext:value-type="percentage">
            <text:p>35,54%</text:p>
          </table:table-cell>
          <table:table-cell table:style-name="ce1" table:formula="of:=AVERAGE([.G66:.G75])" office:value-type="percentage" office:value="0.37309" calcext:value-type="percentage">
            <text:p>37,31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2" office:value-type="percentage" office:value="0.2267" calcext:value-type="percentage">
            <text:p>22,67%</text:p>
          </table:table-cell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933" calcext:value-type="percentage">
            <text:p>9,33%</text:p>
          </table:table-cell>
          <table:table-cell table:style-name="ce2" office:value-type="percentage" office:value="0.06" calcext:value-type="percentage">
            <text:p>6,00%</text:p>
          </table:table-cell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2267" calcext:value-type="percentage">
            <text:p>22,67%</text:p>
          </table:table-cell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733" calcext:value-type="percentage">
            <text:p>17,33%</text:p>
          </table:table-cell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367" calcext:value-type="percentage">
            <text:p>23,67%</text:p>
          </table:table-cell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767" calcext:value-type="percentage">
            <text:p>17,67%</text:p>
          </table:table-cell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767" calcext:value-type="percentage">
            <text:p>27,67%</text:p>
          </table:table-cell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2167" calcext:value-type="percentage">
            <text:p>21,67%</text:p>
          </table:table-cell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933" calcext:value-type="percentage">
            <text:p>19,33%</text:p>
          </table:table-cell>
          <table:table-cell table:style-name="ce2" office:value-type="percentage" office:value="0.1667" calcext:value-type="percentage">
            <text:p>16,67%</text:p>
          </table:table-cell>
        </table:table-row>
        <table:table-row table:style-name="ro1">
          <table:table-cell table:style-name="ce1"/>
          <table:table-cell table:style-name="ce1" table:formula="of:=AVERAGE([.B79:.B88])" office:value-type="percentage" office:value="0.055" calcext:value-type="percentage">
            <text:p>5,50%</text:p>
          </table:table-cell>
          <table:table-cell table:style-name="ce1" table:formula="of:=AVERAGE([.C79:.C88])" office:value-type="percentage" office:value="0.041" calcext:value-type="percentage">
            <text:p>4,1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1132" calcext:value-type="percentage">
            <text:p>21,13%</text:p>
          </table:table-cell>
          <table:table-cell table:style-name="ce1" table:formula="of:=AVERAGE([.G79:.G88])" office:value-type="percentage" office:value="0.20635" calcext:value-type="percentage">
            <text:p>20,64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743" calcext:value-type="percentage">
            <text:p>17,43%</text:p>
          </table:table-cell>
          <table:table-cell table:style-name="ce2" office:value-type="percentage" office:value="0.18" calcext:value-type="percentage">
            <text:p>18,00%</text:p>
          </table:table-cell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number-columns-repeated="2" table:style-name="ce2" office:value-type="percentage" office:value="0.1057" calcext:value-type="percentage">
            <text:p>10,57%</text:p>
          </table:table-cell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1686" calcext:value-type="percentage">
            <text:p>16,86%</text:p>
          </table:table-cell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629" calcext:value-type="percentage">
            <text:p>16,29%</text:p>
          </table:table-cell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086" calcext:value-type="percentage">
            <text:p>10,86%</text:p>
          </table:table-cell>
          <table:table-cell table:style-name="ce2" office:value-type="percentage" office:value="0.1229" calcext:value-type="percentage">
            <text:p>12,29%</text:p>
          </table:table-cell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771" calcext:value-type="percentage">
            <text:p>17,71%</text:p>
          </table:table-cell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743" calcext:value-type="percentage">
            <text:p>17,43%</text:p>
          </table:table-cell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286" calcext:value-type="percentage">
            <text:p>12,86%</text:p>
          </table:table-cell>
          <table:table-cell table:style-name="ce2" office:value-type="percentage" office:value="0.1229" calcext:value-type="percentage">
            <text:p>12,29%</text:p>
          </table:table-cell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714" calcext:value-type="percentage">
            <text:p>17,14%</text:p>
          </table:table-cell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1087" calcext:value-type="percentage">
            <text:p>10,87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514" calcext:value-type="percentage">
            <text:p>15,14%</text:p>
          </table:table-cell>
        </table:table-row>
        <table:table-row table:style-name="ro1">
          <table:table-cell table:style-name="ce1"/>
          <table:table-cell table:style-name="ce1" table:formula="of:=AVERAGE([.B93:.B102])" office:value-type="percentage" office:value="0.07609" calcext:value-type="percentage">
            <text:p>7,61%</text:p>
          </table:table-cell>
          <table:table-cell table:style-name="ce1" table:formula="of:=AVERAGE([.C93:.C102])" office:value-type="percentage" office:value="0.07479" calcext:value-type="percentage">
            <text:p>7,48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4885" calcext:value-type="percentage">
            <text:p>14,89%</text:p>
          </table:table-cell>
          <table:table-cell table:style-name="ce1" table:formula="of:=AVERAGE([.G93:.G102])" office:value-type="percentage" office:value="0.15372" calcext:value-type="percentage">
            <text:p>15,37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2912" calcext:value-type="percentage">
            <text:p>29,12%</text:p>
          </table:table-cell>
          <table:table-cell table:style-name="ce2" office:value-type="percentage" office:value="0.3029" calcext:value-type="percentage">
            <text:p>30,29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265" calcext:value-type="percentage">
            <text:p>22,65%</text:p>
          </table:table-cell>
          <table:table-cell table:style-name="ce2" office:value-type="percentage" office:value="0.2181" calcext:value-type="percentage">
            <text:p>21,81%</text:p>
          </table:table-cell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482" calcext:value-type="percentage">
            <text:p>14,82%</text:p>
          </table:table-cell>
          <table:table-cell table:style-name="ce2" office:value-type="percentage" office:value="0.159" calcext:value-type="percentage">
            <text:p>15,90%</text:p>
          </table:table-cell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4" calcext:value-type="percentage">
            <text:p>19,40%</text:p>
          </table:table-cell>
          <table:table-cell table:style-name="ce2" office:value-type="percentage" office:value="0.1928" calcext:value-type="percentage">
            <text:p>19,28%</text:p>
          </table:table-cell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59" calcext:value-type="percentage">
            <text:p>45,59%</text:p>
          </table:table-cell>
          <table:table-cell table:style-name="ce2" office:value-type="percentage" office:value="0.45" calcext:value-type="percentage">
            <text:p>45,00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88" calcext:value-type="percentage">
            <text:p>19,88%</text:p>
          </table:table-cell>
          <table:table-cell table:style-name="ce2" office:value-type="percentage" office:value="0.2036" calcext:value-type="percentage">
            <text:p>20,36%</text:p>
          </table:table-cell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029" calcext:value-type="percentage">
            <text:p>30,29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61" calcext:value-type="percentage">
            <text:p>13,61%</text:p>
          </table:table-cell>
          <table:table-cell table:style-name="ce2" office:value-type="percentage" office:value="0.1337" calcext:value-type="percentage">
            <text:p>13,37%</text:p>
          </table:table-cell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735" calcext:value-type="percentage">
            <text:p>27,35%</text:p>
          </table:table-cell>
          <table:table-cell table:style-name="ce2" office:value-type="percentage" office:value="0.2529" calcext:value-type="percentage">
            <text:p>25,29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59" calcext:value-type="percentage">
            <text:p>15,90%</text:p>
          </table:table-cell>
          <table:table-cell table:style-name="ce2" office:value-type="percentage" office:value="0.1627" calcext:value-type="percentage">
            <text:p>16,27%</text:p>
          </table:table-cell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971" calcext:value-type="percentage">
            <text:p>39,71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843" calcext:value-type="percentage">
            <text:p>18,43%</text:p>
          </table:table-cell>
          <table:table-cell table:style-name="ce2" office:value-type="percentage" office:value="0.1771" calcext:value-type="percentage">
            <text:p>17,71%</text:p>
          </table:table-cell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2" office:value-type="percentage" office:value="0.2853" calcext:value-type="percentage">
            <text:p>28,53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number-columns-repeated="2" table:style-name="ce2" office:value-type="percentage" office:value="0.1542" calcext:value-type="percentage">
            <text:p>15,42%</text:p>
          </table:table-cell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971" calcext:value-type="percentage">
            <text:p>39,71%</text:p>
          </table:table-cell>
          <table:table-cell table:style-name="ce2" office:value-type="percentage" office:value="0.3647" calcext:value-type="percentage">
            <text:p>36,47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number-columns-repeated="2" table:style-name="ce2" office:value-type="percentage" office:value="0.1843" calcext:value-type="percentage">
            <text:p>18,43%</text:p>
          </table:table-cell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2" office:value-type="percentage" office:value="0.2735" calcext:value-type="percentage">
            <text:p>27,35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337" calcext:value-type="percentage">
            <text:p>13,37%</text:p>
          </table:table-cell>
        </table:table-row>
        <table:table-row table:style-name="ro1">
          <table:table-cell table:style-name="ce1"/>
          <table:table-cell table:style-name="ce1" table:formula="of:=AVERAGE([.B106:.B115])" office:value-type="percentage" office:value="0.33501" calcext:value-type="percentage">
            <text:p>33,50%</text:p>
          </table:table-cell>
          <table:table-cell table:style-name="ce1" table:formula="of:=AVERAGE([.C106:.C115])" office:value-type="percentage" office:value="0.32469" calcext:value-type="percentage">
            <text:p>32,47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131" calcext:value-type="percentage">
            <text:p>17,13%</text:p>
          </table:table-cell>
          <table:table-cell table:style-name="ce1" table:formula="of:=AVERAGE([.G106:.G115])" office:value-type="percentage" office:value="0.17192" calcext:value-type="percentage">
            <text:p>17,19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316" calcext:value-type="percentage">
            <text:p>23,16%</text:p>
          </table:table-cell>
          <table:table-cell table:style-name="ce2" office:value-type="percentage" office:value="0.2816" calcext:value-type="percentage">
            <text:p>28,16%</text:p>
          </table:table-cell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368" calcext:value-type="percentage">
            <text:p>23,68%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289" calcext:value-type="percentage">
            <text:p>32,89%</text:p>
          </table:table-cell>
          <table:table-cell table:style-name="ce2" office:value-type="percentage" office:value="0.2974" calcext:value-type="percentage">
            <text:p>29,74%</text:p>
          </table:table-cell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447" calcext:value-type="percentage">
            <text:p>24,47%</text:p>
          </table:table-cell>
          <table:table-cell table:style-name="ce2" office:value-type="percentage" office:value="0.2526" calcext:value-type="percentage">
            <text:p>25,26%</text:p>
          </table:table-cell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632" calcext:value-type="percentage">
            <text:p>16,32%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2" office:value-type="percentage" office:value="0.2658" calcext:value-type="percentage">
            <text:p>26,58%</text:p>
          </table:table-cell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number-columns-repeated="2" table:style-name="ce2" office:value-type="percentage" office:value="0.1895" calcext:value-type="percentage">
            <text:p>18,95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number-columns-repeated="2" table:style-name="ce2" office:value-type="percentage" office:value="0.2039" calcext:value-type="percentage">
            <text:p>20,39%</text:p>
          </table:table-cell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711" calcext:value-type="percentage">
            <text:p>27,11%</text:p>
          </table:table-cell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776" calcext:value-type="percentage">
            <text:p>27,76%</text:p>
          </table:table-cell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105" calcext:value-type="percentage">
            <text:p>11,05%</text:p>
          </table:table-cell>
          <table:table-cell table:style-name="ce2" office:value-type="percentage" office:value="0.1158" calcext:value-type="percentage">
            <text:p>11,58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2908" calcext:value-type="percentage">
            <text:p>29,08%</text:p>
          </table:table-cell>
          <table:table-cell table:style-name="ce2" office:value-type="percentage" office:value="0.2776" calcext:value-type="percentage">
            <text:p>27,76%</text:p>
          </table:table-cell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316" calcext:value-type="percentage">
            <text:p>13,16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2974" calcext:value-type="percentage">
            <text:p>29,74%</text:p>
          </table:table-cell>
          <table:table-cell table:style-name="ce2" office:value-type="percentage" office:value="0.3197" calcext:value-type="percentage">
            <text:p>31,97%</text:p>
          </table:table-cell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number-columns-repeated="2" table:style-name="ce2" office:value-type="percentage" office:value="0.0737" calcext:value-type="percentage">
            <text:p>7,37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921" calcext:value-type="percentage">
            <text:p>29,21%</text:p>
          </table:table-cell>
          <table:table-cell table:style-name="ce2" office:value-type="percentage" office:value="0.2658" calcext:value-type="percentage">
            <text:p>26,58%</text:p>
          </table:table-cell>
        </table:table-row>
        <table:table-row table:style-name="ro1">
          <table:table-cell table:style-name="ce1"/>
          <table:table-cell table:style-name="ce1" table:formula="of:=AVERAGE([.B119:.B128])" office:value-type="percentage" office:value="0.15895" calcext:value-type="percentage">
            <text:p>15,90%</text:p>
          </table:table-cell>
          <table:table-cell table:style-name="ce1" table:formula="of:=AVERAGE([.C119:.C128])" office:value-type="percentage" office:value="0.15159" calcext:value-type="percentage">
            <text:p>15,16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6869" calcext:value-type="percentage">
            <text:p>26,87%</text:p>
          </table:table-cell>
          <table:table-cell table:style-name="ce1" table:formula="of:=AVERAGE([.G119:.G128])" office:value-type="percentage" office:value="0.2692" calcext:value-type="percentage">
            <text:p>26,92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452" calcext:value-type="percentage">
            <text:p>24,52%</text:p>
          </table:table-cell>
          <table:table-cell table:style-name="ce2" office:value-type="percentage" office:value="0.2048" calcext:value-type="percentage">
            <text:p>20,48%</text:p>
          </table:table-cell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3274" calcext:value-type="percentage">
            <text:p>32,74%</text:p>
          </table:table-cell>
          <table:table-cell table:style-name="ce2" office:value-type="percentage" office:value="0.3016" calcext:value-type="percentage">
            <text:p>30,16%</text:p>
          </table:table-cell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3032" calcext:value-type="percentage">
            <text:p>30,32%</text:p>
          </table:table-cell>
          <table:table-cell table:style-name="ce2" office:value-type="percentage" office:value="0.271" calcext:value-type="percentage">
            <text:p>27,10%</text:p>
          </table:table-cell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581" calcext:value-type="percentage">
            <text:p>35,81%</text:p>
          </table:table-cell>
          <table:table-cell table:style-name="ce2" office:value-type="percentage" office:value="0.3565" calcext:value-type="percentage">
            <text:p>35,65%</text:p>
          </table:table-cell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065" calcext:value-type="percentage">
            <text:p>30,65%</text:p>
          </table:table-cell>
          <table:table-cell table:style-name="ce2" office:value-type="percentage" office:value="0.3048" calcext:value-type="percentage">
            <text:p>30,48%</text:p>
          </table:table-cell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548" calcext:value-type="percentage">
            <text:p>35,48%</text:p>
          </table:table-cell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907" calcext:value-type="percentage">
            <text:p>9,07%</text:p>
          </table:table-cell>
          <table:table-cell table:style-name="ce2" office:value-type="percentage" office:value="0.0741" calcext:value-type="percentage">
            <text:p>7,41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677" calcext:value-type="percentage">
            <text:p>26,77%</text:p>
          </table:table-cell>
          <table:table-cell table:style-name="ce2" office:value-type="percentage" office:value="0.3032" calcext:value-type="percentage">
            <text:p>30,32%</text:p>
          </table:table-cell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806" calcext:value-type="percentage">
            <text:p>28,06%</text:p>
          </table:table-cell>
          <table:table-cell table:style-name="ce2" office:value-type="percentage" office:value="0.2623" calcext:value-type="percentage">
            <text:p>26,23%</text:p>
          </table:table-cell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129" calcext:value-type="percentage">
            <text:p>21,29%</text:p>
          </table:table-cell>
          <table:table-cell table:style-name="ce2" office:value-type="percentage" office:value="0.2113" calcext:value-type="percentage">
            <text:p>21,13%</text:p>
          </table:table-cell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2" office:value-type="percentage" office:value="0.0926" calcext:value-type="percentage">
            <text:p>9,26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742" calcext:value-type="percentage">
            <text:p>37,42%</text:p>
          </table:table-cell>
          <table:table-cell table:style-name="ce2" office:value-type="percentage" office:value="0.3694" calcext:value-type="percentage">
            <text:p>36,94%</text:p>
          </table:table-cell>
        </table:table-row>
        <table:table-row table:style-name="ro1">
          <table:table-cell table:style-name="ce1"/>
          <table:table-cell table:style-name="ce1" table:formula="of:=AVERAGE([.B133:.B142])" office:value-type="percentage" office:value="0.07037" calcext:value-type="percentage">
            <text:p>7,04%</text:p>
          </table:table-cell>
          <table:table-cell table:style-name="ce1" table:formula="of:=AVERAGE([.C133:.C142])" office:value-type="percentage" office:value="0.06611" calcext:value-type="percentage">
            <text:p>6,61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0242" calcext:value-type="percentage">
            <text:p>30,24%</text:p>
          </table:table-cell>
          <table:table-cell table:style-name="ce1" table:formula="of:=AVERAGE([.G133:.G142])" office:value-type="percentage" office:value="0.29397" calcext:value-type="percentage">
            <text:p>29,4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2" office:value-type="percentage" office:value="0.1758" calcext:value-type="percentage">
            <text:p>17,58%</text:p>
          </table:table-cell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2" office:value-type="percentage" office:value="0.2957" calcext:value-type="percentage">
            <text:p>29,57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961" calcext:value-type="percentage">
            <text:p>19,61%</text:p>
          </table:table-cell>
          <table:table-cell table:style-name="ce2" office:value-type="percentage" office:value="0.2576" calcext:value-type="percentage">
            <text:p>25,76%</text:p>
          </table:table-cell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217" calcext:value-type="percentage">
            <text:p>42,17%</text:p>
          </table:table-cell>
          <table:table-cell table:style-name="ce2" office:value-type="percentage" office:value="0.45" calcext:value-type="percentage">
            <text:p>45,00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2152" calcext:value-type="percentage">
            <text:p>21,52%</text:p>
          </table:table-cell>
          <table:table-cell table:style-name="ce1" office:value-type="percentage" office:value="0.1615" calcext:value-type="percentage">
            <text:p>16,15%</text:p>
          </table:table-cell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2" office:value-type="percentage" office:value="0.3739" calcext:value-type="percentage">
            <text:p>37,39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554" calcext:value-type="percentage">
            <text:p>15,54%</text:p>
          </table:table-cell>
          <table:table-cell table:style-name="ce2" office:value-type="percentage" office:value="0.1719" calcext:value-type="percentage">
            <text:p>17,19%</text:p>
          </table:table-cell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688" calcext:value-type="percentage">
            <text:p>16,88%</text:p>
          </table:table-cell>
          <table:table-cell table:style-name="ce2" office:value-type="percentage" office:value="0.1987" calcext:value-type="percentage">
            <text:p>19,87%</text:p>
          </table:table-cell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326" calcext:value-type="percentage">
            <text:p>33,26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792" calcext:value-type="percentage">
            <text:p>17,92%</text:p>
          </table:table-cell>
          <table:table-cell table:style-name="ce2" office:value-type="percentage" office:value="0.1576" calcext:value-type="percentage">
            <text:p>15,76%</text:p>
          </table:table-cell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804" calcext:value-type="percentage">
            <text:p>38,04%</text:p>
          </table:table-cell>
          <table:table-cell table:style-name="ce2" office:value-type="percentage" office:value="0.3761" calcext:value-type="percentage">
            <text:p>37,61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463" calcext:value-type="percentage">
            <text:p>14,63%</text:p>
          </table:table-cell>
          <table:table-cell table:style-name="ce2" office:value-type="percentage" office:value="0.1433" calcext:value-type="percentage">
            <text:p>14,33%</text:p>
          </table:table-cell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2" office:value-type="percentage" office:value="0.3739" calcext:value-type="percentage">
            <text:p>37,39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1754" calcext:value-type="percentage">
            <text:p>17,54%</text:p>
          </table:table-cell>
          <table:table-cell table:style-name="ce2" office:value-type="percentage" office:value="0.174" calcext:value-type="percentage">
            <text:p>17,40%</text:p>
          </table:table-cell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3043" calcext:value-type="percentage">
            <text:p>30,43%</text:p>
          </table:table-cell>
          <table:table-cell table:style-name="ce2" office:value-type="percentage" office:value="0.2826" calcext:value-type="percentage">
            <text:p>28,26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1957" calcext:value-type="percentage">
            <text:p>19,57%</text:p>
          </table:table-cell>
          <table:table-cell table:style-name="ce2" office:value-type="percentage" office:value="0.2541" calcext:value-type="percentage">
            <text:p>25,41%</text:p>
          </table:table-cell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313" calcext:value-type="percentage">
            <text:p>31,30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2468" calcext:value-type="percentage">
            <text:p>24,68%</text:p>
          </table:table-cell>
          <table:table-cell table:style-name="ce2" office:value-type="percentage" office:value="0.2122" calcext:value-type="percentage">
            <text:p>21,22%</text:p>
          </table:table-cell>
        </table:table-row>
        <table:table-row table:style-name="ro1">
          <table:table-cell table:style-name="ce1"/>
          <table:table-cell table:style-name="ce1" table:formula="of:=AVERAGE([.B146:.B155])" office:value-type="percentage" office:value="0.33153" calcext:value-type="percentage">
            <text:p>33,15%</text:p>
          </table:table-cell>
          <table:table-cell table:style-name="ce1" table:formula="of:=AVERAGE([.C146:.C155])" office:value-type="percentage" office:value="0.33956" calcext:value-type="percentage">
            <text:p>33,96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8941" calcext:value-type="percentage">
            <text:p>18,94%</text:p>
          </table:table-cell>
          <table:table-cell table:style-name="ce1" table:formula="of:=AVERAGE([.G146:.G155])" office:value-type="percentage" office:value="0.19067" calcext:value-type="percentage">
            <text:p>19,07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86" calcext:value-type="percentage">
            <text:p>48,60%</text:p>
          </table:table-cell>
          <table:table-cell table:style-name="ce2" office:value-type="percentage" office:value="0.511" calcext:value-type="percentage">
            <text:p>51,10%</text:p>
          </table:table-cell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335" calcext:value-type="percentage">
            <text:p>43,35%</text:p>
          </table:table-cell>
          <table:table-cell table:style-name="ce2" office:value-type="percentage" office:value="0.4295" calcext:value-type="percentage">
            <text:p>42,95%</text:p>
          </table:table-cell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81" calcext:value-type="percentage">
            <text:p>38,10%</text:p>
          </table:table-cell>
          <table:table-cell table:style-name="ce2" office:value-type="percentage" office:value="0.378" calcext:value-type="percentage">
            <text:p>37,80%</text:p>
          </table:table-cell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04" calcext:value-type="percentage">
            <text:p>40,40%</text:p>
          </table:table-cell>
          <table:table-cell table:style-name="ce2" office:value-type="percentage" office:value="0.446" calcext:value-type="percentage">
            <text:p>44,60%</text:p>
          </table:table-cell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35" calcext:value-type="percentage">
            <text:p>43,35%</text:p>
          </table:table-cell>
          <table:table-cell table:style-name="ce2" office:value-type="percentage" office:value="0.4105" calcext:value-type="percentage">
            <text:p>41,05%</text:p>
          </table:table-cell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4265" calcext:value-type="percentage">
            <text:p>42,65%</text:p>
          </table:table-cell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35" calcext:value-type="percentage">
            <text:p>13,50%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3" calcext:value-type="percentage">
            <text:p>43,00%</text:p>
          </table:table-cell>
          <table:table-cell table:style-name="ce2" office:value-type="percentage" office:value="0.409" calcext:value-type="percentage">
            <text:p>40,90%</text:p>
          </table:table-cell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95" calcext:value-type="percentage">
            <text:p>19,5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4085" calcext:value-type="percentage">
            <text:p>40,85%</text:p>
          </table:table-cell>
          <table:table-cell table:style-name="ce2" office:value-type="percentage" office:value="0.399" calcext:value-type="percentage">
            <text:p>39,90%</text:p>
          </table:table-cell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number-columns-repeated="2" table:style-name="ce2" office:value-type="percentage" office:value="0.275" calcext:value-type="percentage">
            <text:p>27,5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205" calcext:value-type="percentage">
            <text:p>42,05%</text:p>
          </table:table-cell>
          <table:table-cell table:style-name="ce2" office:value-type="percentage" office:value="0.4185" calcext:value-type="percentage">
            <text:p>41,85%</text:p>
          </table:table-cell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2" office:value-type="percentage" office:value="0.245" calcext:value-type="percentage">
            <text:p>24,5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55" calcext:value-type="percentage">
            <text:p>35,50%</text:p>
          </table:table-cell>
          <table:table-cell table:style-name="ce2" office:value-type="percentage" office:value="0.3935" calcext:value-type="percentage">
            <text:p>39,35%</text:p>
          </table:table-cell>
        </table:table-row>
        <table:table-row table:style-name="ro1">
          <table:table-cell table:style-name="ce1"/>
          <table:table-cell table:style-name="ce1" table:formula="of:=AVERAGE([.B158:.B167])" office:value-type="percentage" office:value="0.219" calcext:value-type="percentage">
            <text:p>21,90%</text:p>
          </table:table-cell>
          <table:table-cell table:style-name="ce1" table:formula="of:=AVERAGE([.C158:.C167])" office:value-type="percentage" office:value="0.2115" calcext:value-type="percentage">
            <text:p>21,15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72" calcext:value-type="percentage">
            <text:p>41,72%</text:p>
          </table:table-cell>
          <table:table-cell table:style-name="ce1" table:formula="of:=AVERAGE([.G158:.G167])" office:value-type="percentage" office:value="0.42215" calcext:value-type="percentage">
            <text:p>42,22%</text:p>
          </table:table-cell>
        </table:table-row>
        <table:table-row table:style-name="ro1">
          <table:table-cell table:style-name="ce1" table:number-columns-repeated="3"/>
          <table:table-cell table:style-name="ce3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style-name="ce3" office:value-type="percentage" office:value="0.2649" calcext:value-type="percentage">
            <text:p>26,49%</text:p>
          </table:table-cell>
          <table:table-cell table:style-name="ce3" office:value-type="percentage" office:value="0.2689" calcext:value-type="percentage">
            <text:p>26,89%</text:p>
          </table:table-cell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622" calcext:value-type="percentage">
            <text:p>26,22%</text:p>
          </table:table-cell>
          <table:table-cell table:style-name="ce3" office:value-type="percentage" office:value="0.2595" calcext:value-type="percentage">
            <text:p>25,95%</text:p>
          </table:table-cell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5" calcext:value-type="percentage">
            <text:p>8,50%</text:p>
          </table:table-cell>
          <table:table-cell table:style-name="ce2" office:value-type="percentage" office:value="0.0875" calcext:value-type="percentage">
            <text:p>8,7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622" calcext:value-type="percentage">
            <text:p>26,22%</text:p>
          </table:table-cell>
          <table:table-cell table:style-name="ce3" office:value-type="percentage" office:value="0.2595" calcext:value-type="percentage">
            <text:p>25,95%</text:p>
          </table:table-cell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365" calcext:value-type="percentage">
            <text:p>23,65%</text:p>
          </table:table-cell>
          <table:table-cell table:style-name="ce3" office:value-type="percentage" office:value="0.2257" calcext:value-type="percentage">
            <text:p>22,57%</text:p>
          </table:table-cell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975" calcext:value-type="percentage">
            <text:p>9,75%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338" calcext:value-type="percentage">
            <text:p>23,38%</text:p>
          </table:table-cell>
          <table:table-cell table:style-name="ce3" office:value-type="percentage" office:value="0.2514" calcext:value-type="percentage">
            <text:p>25,14%</text:p>
          </table:table-cell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932" calcext:value-type="percentage">
            <text:p>29,32%</text:p>
          </table:table-cell>
          <table:table-cell table:style-name="ce3" office:value-type="percentage" office:value="0.2973" calcext:value-type="percentage">
            <text:p>29,73%</text:p>
          </table:table-cell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73" calcext:value-type="percentage">
            <text:p>27,30%</text:p>
          </table:table-cell>
          <table:table-cell table:style-name="ce3" office:value-type="percentage" office:value="0.2595" calcext:value-type="percentage">
            <text:p>25,95%</text:p>
          </table:table-cell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38" calcext:value-type="percentage">
            <text:p>18,38%</text:p>
          </table:table-cell>
          <table:table-cell table:style-name="ce3" office:value-type="percentage" office:value="0.1865" calcext:value-type="percentage">
            <text:p>18,65%</text:p>
          </table:table-cell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 office:value-type="percentage" office:value="0.2297" calcext:value-type="percentage">
            <text:p>22,97%</text:p>
          </table:table-cell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number-columns-repeated="2" table:style-name="ce3" office:value-type="percentage" office:value="0.1986" calcext:value-type="percentage">
            <text:p>19,86%</text:p>
          </table:table-cell>
        </table:table-row>
        <table:table-row table:style-name="ro1">
          <table:table-cell table:style-name="ce1"/>
          <table:table-cell table:style-name="ce1" table:formula="of:=AVERAGE([.B171:.B180])" office:value-type="percentage" office:value="0.06175" calcext:value-type="percentage">
            <text:p>6,18%</text:p>
          </table:table-cell>
          <table:table-cell table:style-name="ce1" table:formula="of:=AVERAGE([.C171:.C180])" office:value-type="percentage" office:value="0.059" calcext:value-type="percentage">
            <text:p>5,90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285" calcext:value-type="percentage">
            <text:p>24,29%</text:p>
          </table:table-cell>
          <table:table-cell table:style-name="ce1" table:formula="of:=AVERAGE([.G171:.G180])" office:value-type="percentage" office:value="0.24366" calcext:value-type="percentage">
            <text:p>24,37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714" calcext:value-type="percentage">
            <text:p>7,14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2294" calcext:value-type="percentage">
            <text:p>22,94%</text:p>
          </table:table-cell>
          <table:table-cell table:style-name="ce2" office:value-type="percentage" office:value="0.2765" calcext:value-type="percentage">
            <text:p>27,65%</text:p>
          </table:table-cell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118" calcext:value-type="percentage">
            <text:p>11,18%</text:p>
          </table:table-cell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25" calcext:value-type="percentage">
            <text:p>12,50%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2" office:value-type="percentage" office:value="0.2235" calcext:value-type="percentage">
            <text:p>22,35%</text:p>
          </table:table-cell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268" calcext:value-type="percentage">
            <text:p>2,68%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825" calcext:value-type="percentage">
            <text:p>8,25%</text:p>
          </table:table-cell>
          <table:table-cell table:style-name="ce2" office:value-type="percentage" office:value="0.0412" calcext:value-type="percentage">
            <text:p>4,12%</text:p>
          </table:table-cell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882" calcext:value-type="percentage">
            <text:p>8,82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1471" calcext:value-type="percentage">
            <text:p>14,71%</text:p>
          </table:table-cell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75" calcext:value-type="percentage">
            <text:p>8,75%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786" calcext:value-type="percentage">
            <text:p>7,86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588" calcext:value-type="percentage">
            <text:p>5,88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588" calcext:value-type="percentage">
            <text:p>15,88%</text:p>
          </table:table-cell>
          <table:table-cell table:style-name="ce2" office:value-type="percentage" office:value="0.1294" calcext:value-type="percentage">
            <text:p>12,94%</text:p>
          </table:table-cell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411" calcext:value-type="percentage">
            <text:p>4,11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0706" calcext:value-type="percentage">
            <text:p>7,06%</text:p>
          </table:table-cell>
        </table:table-row>
        <table:table-row table:style-name="ro1">
          <table:table-cell table:style-name="ce1"/>
          <table:table-cell table:style-name="ce1" table:formula="of:=AVERAGE([.B183:.B192])" office:value-type="percentage" office:value="0.05733" calcext:value-type="percentage">
            <text:p>5,73%</text:p>
          </table:table-cell>
          <table:table-cell table:style-name="ce1" table:formula="of:=AVERAGE([.C183:.C192])" office:value-type="percentage" office:value="0.06018" calcext:value-type="percentage">
            <text:p>6,02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4649" calcext:value-type="percentage">
            <text:p>14,65%</text:p>
          </table:table-cell>
          <table:table-cell table:style-name="ce1" table:formula="of:=AVERAGE([.G183:.G192])" office:value-type="percentage" office:value="0.13295" calcext:value-type="percentage">
            <text:p>13,30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633" calcext:value-type="percentage">
            <text:p>16,33%</text:p>
          </table:table-cell>
          <table:table-cell table:style-name="ce3" office:value-type="percentage" office:value="0.1733" calcext:value-type="percentage">
            <text:p>17,33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2233" calcext:value-type="percentage">
            <text:p>22,33%</text:p>
          </table:table-cell>
          <table:table-cell table:style-name="ce3" office:value-type="percentage" office:value="0.0967" calcext:value-type="percentage">
            <text:p>9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833" calcext:value-type="percentage">
            <text:p>18,33%</text:p>
          </table:table-cell>
          <table:table-cell table:style-name="ce3" office:value-type="percentage" office:value="0.1533" calcext:value-type="percentage">
            <text:p>15,33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1367" calcext:value-type="percentage">
            <text:p>13,67%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767" calcext:value-type="percentage">
            <text:p>7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33" calcext:value-type="percentage">
            <text:p>7,33%</text:p>
          </table:table-cell>
          <table:table-cell table:style-name="ce3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1467" calcext:value-type="percentage">
            <text:p>14,67%</text:p>
          </table:table-cell>
          <table:table-cell table:style-name="ce3" office:value-type="percentage" office:value="0.0567" calcext:value-type="percentage">
            <text:p>5,67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33" calcext:value-type="percentage">
            <text:p>7,33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</table:table-row>
        <table:table-row table:style-name="ro1">
          <table:table-cell table:style-name="ce1"/>
          <table:table-cell table:style-name="ce1" table:formula="of:=AVERAGE([.B196:.B205])" office:value-type="percentage" office:value="0.13199" calcext:value-type="percentage">
            <text:p>13,20%</text:p>
          </table:table-cell>
          <table:table-cell table:style-name="ce1" table:formula="of:=AVERAGE([.C196:.C205])" office:value-type="percentage" office:value="0.10633" calcext:value-type="percentage">
            <text:p>10,6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104" calcext:value-type="percentage">
            <text:p>10,40%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3" calcext:value-type="percentage">
            <text:p>3,00%</text:p>
          </table:table-cell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136" calcext:value-type="percentage">
            <text:p>13,60%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2" calcext:value-type="percentage">
            <text:p>4,20%</text:p>
          </table:table-cell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2" office:value-type="percentage" office:value="0.056" calcext:value-type="percentage">
            <text:p>5,6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38" calcext:value-type="percentage">
            <text:p>3,80%</text:p>
          </table:table-cell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152" calcext:value-type="percentage">
            <text:p>15,2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2" office:value-type="percentage" office:value="0.044" calcext:value-type="percentage">
            <text:p>4,40%</text:p>
          </table:table-cell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94" calcext:value-type="percentage">
            <text:p>9,4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2" calcext:value-type="percentage">
            <text:p>2,00%</text:p>
          </table:table-cell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16" calcext:value-type="percentage">
            <text:p>11,6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14" calcext:value-type="percentage">
            <text:p>1,40%</text:p>
          </table:table-cell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148" calcext:value-type="percentage">
            <text:p>14,8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2" office:value-type="percentage" office:value="0.026" calcext:value-type="percentage">
            <text:p>2,60%</text:p>
          </table:table-cell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126" calcext:value-type="percentage">
            <text:p>12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12" calcext:value-type="percentage">
            <text:p>1,20%</text:p>
          </table:table-cell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38" calcext:value-type="percentage">
            <text:p>3,80%</text:p>
          </table:table-cell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2" office:value-type="percentage" office:value="0.104" calcext:value-type="percentage">
            <text:p>10,4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26" calcext:value-type="percentage">
            <text:p>2,60%</text:p>
          </table:table-cell>
        </table:table-row>
        <table:table-row table:style-name="ro1">
          <table:table-cell table:style-name="ce1"/>
          <table:table-cell table:style-name="ce1" table:formula="of:=AVERAGE([.B208:.B217])" office:value-type="percentage" office:value="0.1016" calcext:value-type="percentage">
            <text:p>10,16%</text:p>
          </table:table-cell>
          <table:table-cell table:style-name="ce1" table:formula="of:=AVERAGE([.C208:.C217])" office:value-type="percentage" office:value="0.0812" calcext:value-type="percentage">
            <text:p>8,12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356" calcext:value-type="percentage">
            <text:p>3,56%</text:p>
          </table:table-cell>
          <table:table-cell table:style-name="ce1" table:formula="of:=AVERAGE([.G208:.G217])" office:value-type="percentage" office:value="0.029" calcext:value-type="percentage">
            <text:p>2,9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style-name="ce2" office:value-type="percentage" office:value="0.3357" calcext:value-type="percentage">
            <text:p>33,57%</text:p>
          </table:table-cell>
          <table:table-cell table:style-name="ce2" office:value-type="percentage" office:value="0.3071" calcext:value-type="percentage">
            <text:p>30,71%</text:p>
          </table:table-cell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3404" calcext:value-type="percentage">
            <text:p>34,04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643" calcext:value-type="percentage">
            <text:p>26,43%</text:p>
          </table:table-cell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2357" calcext:value-type="percentage">
            <text:p>23,57%</text:p>
          </table:table-cell>
          <table:table-cell table:style-name="ce2" office:value-type="percentage" office:value="0.2214" calcext:value-type="percentage">
            <text:p>22,14%</text:p>
          </table:table-cell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857" calcext:value-type="percentage">
            <text:p>28,57%</text:p>
          </table:table-cell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429" calcext:value-type="percentage">
            <text:p>34,29%</text:p>
          </table:table-cell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643" calcext:value-type="percentage">
            <text:p>26,43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2766" calcext:value-type="percentage">
            <text:p>27,66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286" calcext:value-type="percentage">
            <text:p>22,86%</text:p>
          </table:table-cell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786" calcext:value-type="percentage">
            <text:p>17,86%</text:p>
          </table:table-cell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714" calcext:value-type="percentage">
            <text:p>37,14%</text:p>
          </table:table-cell>
          <table:table-cell table:style-name="ce2" office:value-type="percentage" office:value="0.3929" calcext:value-type="percentage">
            <text:p>39,29%</text:p>
          </table:table-cell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071" calcext:value-type="percentage">
            <text:p>20,71%</text:p>
          </table:table-cell>
          <table:table-cell table:style-name="ce2" office:value-type="percentage" office:value="0.2214" calcext:value-type="percentage">
            <text:p>22,14%</text:p>
          </table:table-cell>
        </table:table-row>
        <table:table-row table:style-name="ro1">
          <table:table-cell table:style-name="ce1"/>
          <table:table-cell table:style-name="ce1" table:formula="of:=AVERAGE([.B220:.B229])" office:value-type="percentage" office:value="0.19788" calcext:value-type="percentage">
            <text:p>19,79%</text:p>
          </table:table-cell>
          <table:table-cell table:style-name="ce1" table:formula="of:=AVERAGE([.C220:.C229])" office:value-type="percentage" office:value="0.2085" calcext:value-type="percentage">
            <text:p>20,85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6214" calcext:value-type="percentage">
            <text:p>26,21%</text:p>
          </table:table-cell>
          <table:table-cell table:style-name="ce1" table:formula="of:=AVERAGE([.G220:.G229])" office:value-type="percentage" office:value="0.27143" calcext:value-type="percentage">
            <text:p>27,14%</text:p>
          </table:table-cell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481" calcext:value-type="percentage">
            <text:p>14,81%</text:p>
          </table:table-cell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number-columns-repeated="2" table:style-name="ce2" office:value-type="percentage" office:value="0.1556" calcext:value-type="percentage">
            <text:p>15,56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556" calcext:value-type="percentage">
            <text:p>15,56%</text:p>
          </table:table-cell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37" calcext:value-type="percentage">
            <text:p>15,37%</text:p>
          </table:table-cell>
          <table:table-cell table:style-name="ce2" office:value-type="percentage" office:value="0.1574" calcext:value-type="percentage">
            <text:p>15,74%</text:p>
          </table:table-cell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444" calcext:value-type="percentage">
            <text:p>14,44%</text:p>
          </table:table-cell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407" calcext:value-type="percentage">
            <text:p>14,07%</text:p>
          </table:table-cell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2963" calcext:value-type="percentage">
            <text:p>29,6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593" calcext:value-type="percentage">
            <text:p>15,93%</text:p>
          </table:table-cell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407" calcext:value-type="percentage">
            <text:p>14,07%</text:p>
          </table:table-cell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926" calcext:value-type="percentage">
            <text:p>19,26%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2" office:value-type="percentage" office:value="0.1519" calcext:value-type="percentage">
            <text:p>15,19%</text:p>
          </table:table-cell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278" calcext:value-type="percentage">
            <text:p>12,78%</text:p>
          </table:table-cell>
          <table:table-cell table:style-name="ce2" office:value-type="percentage" office:value="0.1704" calcext:value-type="percentage">
            <text:p>17,04%</text:p>
          </table:table-cell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407" calcext:value-type="percentage">
            <text:p>24,07%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241" calcext:value-type="percentage">
            <text:p>12,41%</text:p>
          </table:table-cell>
        </table:table-row>
        <table:table-row table:style-name="ro1">
          <table:table-cell table:style-name="ce1"/>
          <table:table-cell table:style-name="ce1" table:formula="of:=AVERAGE([.B233:.B242])" office:value-type="percentage" office:value="0.20371" calcext:value-type="percentage">
            <text:p>20,37%</text:p>
          </table:table-cell>
          <table:table-cell table:style-name="ce1" table:formula="of:=AVERAGE([.C233:.C242])" office:value-type="percentage" office:value="0.23111" calcext:value-type="percentage">
            <text:p>23,11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167" calcext:value-type="percentage">
            <text:p>14,17%</text:p>
          </table:table-cell>
          <table:table-cell table:style-name="ce1" table:formula="of:=AVERAGE([.G233:.G242])" office:value-type="percentage" office:value="0.14926" calcext:value-type="percentage">
            <text:p>14,9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624" calcext:value-type="percentage">
            <text:p>36,24%</text:p>
          </table:table-cell>
          <table:table-cell table:style-name="ce2" office:value-type="percentage" office:value="0.4043" calcext:value-type="percentage">
            <text:p>40,43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2" office:value-type="percentage" office:value="0.8305" calcext:value-type="percentage">
            <text:p>83,0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5879" calcext:value-type="percentage">
            <text:p>58,79%</text:p>
          </table:table-cell>
          <table:table-cell table:style-name="ce2" office:value-type="percentage" office:value="0.5863" calcext:value-type="percentage">
            <text:p>58,63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423" calcext:value-type="percentage">
            <text:p>42,30%</text:p>
          </table:table-cell>
          <table:table-cell table:style-name="ce2" office:value-type="percentage" office:value="0.3795" calcext:value-type="percentage">
            <text:p>37,95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761" calcext:value-type="percentage">
            <text:p>7,61%</text:p>
          </table:table-cell>
          <table:table-cell table:style-name="ce2" office:value-type="percentage" office:value="0.0696" calcext:value-type="percentage">
            <text:p>6,96%</text:p>
          </table:table-cell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5039" calcext:value-type="percentage">
            <text:p>50,39%</text:p>
          </table:table-cell>
          <table:table-cell table:style-name="ce2" office:value-type="percentage" office:value="0.5008" calcext:value-type="percentage">
            <text:p>50,08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6796" calcext:value-type="percentage">
            <text:p>67,96%</text:p>
          </table:table-cell>
          <table:table-cell table:style-name="ce2" office:value-type="percentage" office:value="0.3639" calcext:value-type="percentage">
            <text:p>36,39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number-columns-repeated="2"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4168" calcext:value-type="percentage">
            <text:p>41,68%</text:p>
          </table:table-cell>
          <table:table-cell table:style-name="ce2" office:value-type="percentage" office:value="0.5334" calcext:value-type="percentage">
            <text:p>53,34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696" calcext:value-type="percentage">
            <text:p>6,96%</text:p>
          </table:table-cell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6407" calcext:value-type="percentage">
            <text:p>64,07%</text:p>
          </table:table-cell>
          <table:table-cell table:style-name="ce2" office:value-type="percentage" office:value="0.6237" calcext:value-type="percentage">
            <text:p>62,37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6579" calcext:value-type="percentage">
            <text:p>65,79%</text:p>
          </table:table-cell>
          <table:table-cell table:style-name="ce2" office:value-type="percentage" office:value="0.5521" calcext:value-type="percentage">
            <text:p>55,21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8134" calcext:value-type="percentage">
            <text:p>81,34%</text:p>
          </table:table-cell>
          <table:table-cell table:style-name="ce2" office:value-type="percentage" office:value="0.5443" calcext:value-type="percentage">
            <text:p>54,43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74" calcext:value-type="percentage">
            <text:p>6,74%</text:p>
          </table:table-cell>
        </table:table-row>
        <table:table-row table:style-name="ro1">
          <table:table-cell table:style-name="ce1"/>
          <table:table-cell table:style-name="ce1" table:formula="of:=AVERAGE([.B245:.B254])" office:value-type="percentage" office:value="0.54449" calcext:value-type="percentage">
            <text:p>54,45%</text:p>
          </table:table-cell>
          <table:table-cell table:style-name="ce1" table:formula="of:=AVERAGE([.C245:.C254])" office:value-type="percentage" office:value="0.53188" calcext:value-type="percentage">
            <text:p>53,19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086" calcext:value-type="percentage">
            <text:p>6,09%</text:p>
          </table:table-cell>
          <table:table-cell table:style-name="ce1" table:formula="of:=AVERAGE([.G245:.G254])" office:value-type="percentage" office:value="0.06328" calcext:value-type="percentage">
            <text:p>6,33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6157" calcext:value-type="percentage">
            <text:p>61,57%</text:p>
          </table:table-cell>
          <table:table-cell table:style-name="ce2" office:value-type="percentage" office:value="0.3149" calcext:value-type="percentage">
            <text:p>31,49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1851" calcext:value-type="percentage">
            <text:p>18,51%</text:p>
          </table:table-cell>
          <table:table-cell table:style-name="ce2" office:value-type="percentage" office:value="0.2378" calcext:value-type="percentage">
            <text:p>23,78%</text:p>
          </table:table-cell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5783" calcext:value-type="percentage">
            <text:p>57,83%</text:p>
          </table:table-cell>
          <table:table-cell table:style-name="ce2" office:value-type="percentage" office:value="0.6752" calcext:value-type="percentage">
            <text:p>67,52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84" calcext:value-type="percentage">
            <text:p>22,84%</text:p>
          </table:table-cell>
          <table:table-cell table:style-name="ce2" office:value-type="percentage" office:value="0.2405" calcext:value-type="percentage">
            <text:p>24,05%</text:p>
          </table:table-cell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6708" calcext:value-type="percentage">
            <text:p>67,08%</text:p>
          </table:table-cell>
          <table:table-cell table:style-name="ce2" office:value-type="percentage" office:value="0.5587" calcext:value-type="percentage">
            <text:p>55,87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number-columns-repeated="2" table:style-name="ce2" office:value-type="percentage" office:value="0.2149" calcext:value-type="percentage">
            <text:p>21,49%</text:p>
          </table:table-cell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4057" calcext:value-type="percentage">
            <text:p>40,57%</text:p>
          </table:table-cell>
          <table:table-cell table:style-name="ce2" office:value-type="percentage" office:value="0.3505" calcext:value-type="percentage">
            <text:p>35,05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041" calcext:value-type="percentage">
            <text:p>20,41%</text:p>
          </table:table-cell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199" calcext:value-type="percentage">
            <text:p>41,99%</text:p>
          </table:table-cell>
          <table:table-cell table:style-name="ce2" office:value-type="percentage" office:value="0.5125" calcext:value-type="percentage">
            <text:p>51,25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1905" calcext:value-type="percentage">
            <text:p>19,05%</text:p>
          </table:table-cell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4359" calcext:value-type="percentage">
            <text:p>43,59%</text:p>
          </table:table-cell>
          <table:table-cell table:style-name="ce2" office:value-type="percentage" office:value="0.4929" calcext:value-type="percentage">
            <text:p>49,29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257" calcext:value-type="percentage">
            <text:p>22,57%</text:p>
          </table:table-cell>
          <table:table-cell table:style-name="ce2" office:value-type="percentage" office:value="0.2122" calcext:value-type="percentage">
            <text:p>21,22%</text:p>
          </table:table-cell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6246" calcext:value-type="percentage">
            <text:p>62,46%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1878" calcext:value-type="percentage">
            <text:p>18,78%</text:p>
          </table:table-cell>
          <table:table-cell table:style-name="ce2" office:value-type="percentage" office:value="0.2176" calcext:value-type="percentage">
            <text:p>21,76%</text:p>
          </table:table-cell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644" calcext:value-type="percentage">
            <text:p>46,44%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number-columns-repeated="2" table:style-name="ce2" office:value-type="percentage" office:value="0.2135" calcext:value-type="percentage">
            <text:p>21,35%</text:p>
          </table:table-cell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872" calcext:value-type="percentage">
            <text:p>58,72%</text:p>
          </table:table-cell>
          <table:table-cell table:style-name="ce2" office:value-type="percentage" office:value="0.3808" calcext:value-type="percentage">
            <text:p>38,08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892" calcext:value-type="percentage">
            <text:p>18,92%</text:p>
          </table:table-cell>
          <table:table-cell table:style-name="ce2" office:value-type="percentage" office:value="0.1811" calcext:value-type="percentage">
            <text:p>18,11%</text:p>
          </table:table-cell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5356" calcext:value-type="percentage">
            <text:p>53,56%</text:p>
          </table:table-cell>
          <table:table-cell table:style-name="ce54" office:value-type="percentage" office:value="0.5356" calcext:value-type="percentage">
            <text:p>53,56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054" calcext:value-type="percentage">
            <text:p>20,54%</text:p>
          </table:table-cell>
          <table:table-cell table:style-name="ce2" office:value-type="percentage" office:value="0.1878" calcext:value-type="percentage">
            <text:p>18,78%</text:p>
          </table:table-cell>
        </table:table-row>
        <table:table-row table:style-name="ro1">
          <table:table-cell table:style-name="ce1"/>
          <table:table-cell table:style-name="ce1" table:formula="of:=AVERAGE([.B257:.B266])" office:value-type="percentage" office:value="0.53381" calcext:value-type="percentage">
            <text:p>53,38%</text:p>
          </table:table-cell>
          <table:table-cell table:style-name="ce1" table:formula="of:=AVERAGE([.C257:.C266])" office:value-type="percentage" office:value="0.46468" calcext:value-type="percentage">
            <text:p>46,47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0581" calcext:value-type="percentage">
            <text:p>20,58%</text:p>
          </table:table-cell>
          <table:table-cell table:style-name="ce1" table:formula="of:=AVERAGE([.G257:.G266])" office:value-type="percentage" office:value="0.21" calcext:value-type="percentage">
            <text:p>21,00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3"/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Beed_1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2" office:value-type="percentage" office:value="0.3475" calcext:value-type="percentage">
            <text:p>34,75%</text:p>
          </table:table-cell>
          <table:table-cell table:style-name="ce3"/>
          <table:table-cell table:style-name="ce2" office:value-type="string" calcext:value-type="string">
            <text:p>pir_1</text:p>
          </table:table-cell>
          <table:table-cell table:style-name="ce2" office:value-type="percentage" office:value="0.0203" calcext:value-type="percentage">
            <text:p>2,03%</text:p>
          </table:table-cell>
          <table:table-cell table:style-name="ce2" office:value-type="percentage" office:value="0.0863" calcext:value-type="percentage">
            <text:p>8,63%</text:p>
          </table:table-cell>
        </table:table-row>
        <table:table-row table:style-name="ro1">
          <table:table-cell table:style-name="ce2" office:value-type="string" calcext:value-type="string">
            <text:p>Beed_2</text:p>
          </table:table-cell>
          <table:table-cell table:style-name="ce2" office:value-type="percentage" office:value="0.4563" calcext:value-type="percentage">
            <text:p>45,63%</text:p>
          </table:table-cell>
          <table:table-cell table:style-name="ce2" office:value-type="percentage" office:value="0.475" calcext:value-type="percentage">
            <text:p>47,50%</text:p>
          </table:table-cell>
          <table:table-cell table:style-name="ce3"/>
          <table:table-cell table:style-name="ce2" office:value-type="string" calcext:value-type="string">
            <text:p>pir_2</text:p>
          </table:table-cell>
          <table:table-cell table:style-name="ce2" office:value-type="percentage" office:value="0.0876" calcext:value-type="percentage">
            <text:p>8,76%</text:p>
          </table:table-cell>
          <table:table-cell table:style-name="ce2" office:value-type="percentage" office:value="0.0595" calcext:value-type="percentage">
            <text:p>5,95%</text:p>
          </table:table-cell>
        </table:table-row>
        <table:table-row table:style-name="ro1">
          <table:table-cell table:style-name="ce2" office:value-type="string" calcext:value-type="string">
            <text:p>Beed_3</text:p>
          </table:table-cell>
          <table:table-cell table:style-name="ce2" office:value-type="percentage" office:value="0.5463" calcext:value-type="percentage">
            <text:p>54,63%</text:p>
          </table:table-cell>
          <table:table-cell table:style-name="ce2" office:value-type="percentage" office:value="0.3788" calcext:value-type="percentage">
            <text:p>37,88%</text:p>
          </table:table-cell>
          <table:table-cell table:style-name="ce3"/>
          <table:table-cell table:style-name="ce2" office:value-type="string" calcext:value-type="string">
            <text:p>pir_3</text:p>
          </table:table-cell>
          <table:table-cell table:style-name="ce2" office:value-type="percentage" office:value="0.1144" calcext:value-type="percentage">
            <text:p>11,44%</text:p>
          </table:table-cell>
          <table:table-cell table:style-name="ce2" office:value-type="percentage" office:value="0.1013" calcext:value-type="percentage">
            <text:p>10,13%</text:p>
          </table:table-cell>
        </table:table-row>
        <table:table-row table:style-name="ro1">
          <table:table-cell table:style-name="ce2" office:value-type="string" calcext:value-type="string">
            <text:p>Beed_4</text:p>
          </table:table-cell>
          <table:table-cell table:style-name="ce2" office:value-type="percentage" office:value="0.4288" calcext:value-type="percentage">
            <text:p>42,88%</text:p>
          </table:table-cell>
          <table:table-cell table:style-name="ce2" office:value-type="percentage" office:value="0.5275" calcext:value-type="percentage">
            <text:p>52,75%</text:p>
          </table:table-cell>
          <table:table-cell table:style-name="ce3"/>
          <table:table-cell table:style-name="ce2" office:value-type="string" calcext:value-type="string">
            <text:p>pir_4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2" office:value-type="percentage" office:value="0.0745" calcext:value-type="percentage">
            <text:p>7,45%</text:p>
          </table:table-cell>
        </table:table-row>
        <table:table-row table:style-name="ro1">
          <table:table-cell table:style-name="ce2" office:value-type="string" calcext:value-type="string">
            <text:p>Beed_5</text:p>
          </table:table-cell>
          <table:table-cell table:style-name="ce2" office:value-type="percentage" office:value="0.3525" calcext:value-type="percentage">
            <text:p>35,25%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3"/>
          <table:table-cell table:style-name="ce2" office:value-type="string" calcext:value-type="string">
            <text:p>pir_5</text:p>
          </table:table-cell>
          <table:table-cell table:style-name="ce2" office:value-type="percentage" office:value="0.1026" calcext:value-type="percentage">
            <text:p>10,26%</text:p>
          </table:table-cell>
          <table:table-cell table:style-name="ce2" office:value-type="percentage" office:value="0.0915" calcext:value-type="percentage">
            <text:p>9,15%</text:p>
          </table:table-cell>
        </table:table-row>
        <table:table-row table:style-name="ro1">
          <table:table-cell table:style-name="ce2" office:value-type="string" calcext:value-type="string">
            <text:p>Beed_6</text:p>
          </table:table-cell>
          <table:table-cell table:style-name="ce2" office:value-type="percentage" office:value="0.4888" calcext:value-type="percentage">
            <text:p>48,88%</text:p>
          </table:table-cell>
          <table:table-cell table:style-name="ce2" office:value-type="percentage" office:value="0.4763" calcext:value-type="percentage">
            <text:p>47,63%</text:p>
          </table:table-cell>
          <table:table-cell table:style-name="ce3"/>
          <table:table-cell table:style-name="ce2" office:value-type="string" calcext:value-type="string">
            <text:p>pir_6</text:p>
          </table:table-cell>
          <table:table-cell table:style-name="ce2" office:value-type="percentage" office:value="0.1105" calcext:value-type="percentage">
            <text:p>11,05%</text:p>
          </table:table-cell>
          <table:table-cell table:style-name="ce2" office:value-type="percentage" office:value="0.0627" calcext:value-type="percentage">
            <text:p>6,27%</text:p>
          </table:table-cell>
        </table:table-row>
        <table:table-row table:style-name="ro1">
          <table:table-cell table:style-name="ce2" office:value-type="string" calcext:value-type="string">
            <text:p>Beed_7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2" office:value-type="percentage" office:value="0.3638" calcext:value-type="percentage">
            <text:p>36,38%</text:p>
          </table:table-cell>
          <table:table-cell table:style-name="ce3"/>
          <table:table-cell table:style-name="ce2" office:value-type="string" calcext:value-type="string">
            <text:p>pir_7</text:p>
          </table:table-cell>
          <table:table-cell table:style-name="ce2" office:value-type="percentage" office:value="0.0954" calcext:value-type="percentage">
            <text:p>9,54%</text:p>
          </table:table-cell>
          <table:table-cell table:style-name="ce2" office:value-type="percentage" office:value="0.0176" calcext:value-type="percentage">
            <text:p>1,76%</text:p>
          </table:table-cell>
        </table:table-row>
        <table:table-row table:style-name="ro1">
          <table:table-cell table:style-name="ce2" office:value-type="string" calcext:value-type="string">
            <text:p>Beed_8</text:p>
          </table:table-cell>
          <table:table-cell table:style-name="ce2" office:value-type="percentage" office:value="0.385" calcext:value-type="percentage">
            <text:p>38,50%</text:p>
          </table:table-cell>
          <table:table-cell table:style-name="ce2" office:value-type="percentage" office:value="0.3988" calcext:value-type="percentage">
            <text:p>39,88%</text:p>
          </table:table-cell>
          <table:table-cell table:style-name="ce3"/>
          <table:table-cell table:style-name="ce2" office:value-type="string" calcext:value-type="string">
            <text:p>pir_8</text:p>
          </table:table-cell>
          <table:table-cell table:style-name="ce2" office:value-type="percentage" office:value="0.0797" calcext:value-type="percentage">
            <text:p>7,97%</text:p>
          </table:table-cell>
          <table:table-cell table:style-name="ce2" office:value-type="percentage" office:value="0.1451" calcext:value-type="percentage">
            <text:p>14,51%</text:p>
          </table:table-cell>
        </table:table-row>
        <table:table-row table:style-name="ro1">
          <table:table-cell table:style-name="ce2" office:value-type="string" calcext:value-type="string">
            <text:p>Beed_9</text:p>
          </table:table-cell>
          <table:table-cell table:style-name="ce2" office:value-type="percentage" office:value="0.4275" calcext:value-type="percentage">
            <text:p>42,75%</text:p>
          </table:table-cell>
          <table:table-cell table:style-name="ce2" office:value-type="percentage" office:value="0.5063" calcext:value-type="percentage">
            <text:p>50,63%</text:p>
          </table:table-cell>
          <table:table-cell table:style-name="ce3"/>
          <table:table-cell table:style-name="ce2" office:value-type="string" calcext:value-type="string">
            <text:p>pir_9</text:p>
          </table:table-cell>
          <table:table-cell table:style-name="ce2" office:value-type="percentage" office:value="0.1275" calcext:value-type="percentage">
            <text:p>12,75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Beed_10</text:p>
          </table:table-cell>
          <table:table-cell table:style-name="ce2" office:value-type="percentage" office:value="0.4038" calcext:value-type="percentage">
            <text:p>40,38%</text:p>
          </table:table-cell>
          <table:table-cell table:style-name="ce54" office:value-type="percentage" office:value="0.4413" calcext:value-type="percentage">
            <text:p>44,13%</text:p>
          </table:table-cell>
          <table:table-cell table:style-name="ce3"/>
          <table:table-cell table:style-name="ce2" office:value-type="string" calcext:value-type="string">
            <text:p>pir_10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895" calcext:value-type="percentage">
            <text:p>8,95%</text:p>
          </table:table-cell>
        </table:table-row>
        <table:table-row table:style-name="ro1">
          <table:table-cell table:style-name="ce1"/>
          <table:table-cell table:style-name="ce1" table:formula="of:=AVERAGE([.B269:.B278])" office:value-type="percentage" office:value="0.4229" calcext:value-type="percentage">
            <text:p>42,29%</text:p>
          </table:table-cell>
          <table:table-cell table:style-name="ce1" table:formula="of:=AVERAGE([.C269:.C278])" office:value-type="percentage" office:value="0.42691" calcext:value-type="percentage">
            <text:p>42,69%</text:p>
          </table:table-cell>
          <table:table-cell table:style-name="ce3"/>
          <table:table-cell table:style-name="ce1"/>
          <table:table-cell table:style-name="ce1" table:formula="of:=AVERAGE([.F269:.F278])" office:value-type="percentage" office:value="0.09151" calcext:value-type="percentage">
            <text:p>9,15%</text:p>
          </table:table-cell>
          <table:table-cell table:style-name="ce1" table:formula="of:=AVERAGE([.G269:.G278])" office:value-type="percentage" office:value="0.07927" calcext:value-type="percentage">
            <text:p>7,93%</text:p>
          </table:table-cell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1" table:number-columns-repeated="2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9.394" calcext:value-type="float">
            <text:p>1429,39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11.087" calcext:value-type="float">
            <text:p>1,11E+01</text:p>
          </table:table-cell>
          <table:table-cell table:style-name="ce10" office:value-type="float" office:value="1.368" calcext:value-type="float">
            <text:p>1,37E+00</text:p>
          </table:table-cell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28.248" calcext:value-type="float">
            <text:p>1728,248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10" office:value-type="float" office:value="1.398" calcext:value-type="float">
            <text:p>1,40E+00</text:p>
          </table:table-cell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72.592" calcext:value-type="float">
            <text:p>2272,592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5.202" calcext:value-type="float">
            <text:p>15,202</text:p>
          </table:table-cell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09.332" calcext:value-type="float">
            <text:p>1809,33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1.084" calcext:value-type="float">
            <text:p>2,11E+01</text:p>
          </table:table-cell>
          <table:table-cell table:style-name="ce10" office:value-type="float" office:value="0.68" calcext:value-type="float">
            <text:p>6,80E-01</text:p>
          </table:table-cell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342" calcext:value-type="float">
            <text:p>3,42E-01</text:p>
          </table:table-cell>
          <table:table-cell table:style-name="ce10" office:value-type="float" office:value="0.113" calcext:value-type="float">
            <text:p>1,13E-01</text:p>
          </table:table-cell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12.423" calcext:value-type="float">
            <text:p>1,24E+01</text:p>
          </table:table-cell>
          <table:table-cell table:style-name="ce10" office:value-type="float" office:value="6.195" calcext:value-type="float">
            <text:p>6,20E+00</text:p>
          </table:table-cell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0844" calcext:value-type="float">
            <text:p>0,0844</text:p>
          </table:table-cell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295" calcext:value-type="float">
            <text:p>2,95E-01</text:p>
          </table:table-cell>
          <table:table-cell table:style-name="ce10" office:value-type="float" office:value="1.241" calcext:value-type="float">
            <text:p>1,24E+00</text:p>
          </table:table-cell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2.2" calcext:value-type="float">
            <text:p>2,20E+00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number-columns-repeated="2" table:style-name="ce6" office:value-type="float" office:value="0.827" calcext:value-type="float">
            <text:p>0,827</text:p>
          </table:table-cell>
        </table:table-row>
        <table:table-row table:style-name="ro1">
          <table:table-cell table:style-name="ce1"/>
          <table:table-cell table:style-name="ce5" table:formula="of:=AVERAGE([.B282:.B291])" office:value-type="float" office:value="1809.8915" calcext:value-type="float">
            <text:p>1809,8915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4.89063" calcext:value-type="float">
            <text:p>4,89063</text:p>
          </table:table-cell>
          <table:table-cell table:style-name="ce11" table:formula="of:=AVERAGE([.G282:.G291])" office:value-type="float" office:value="3.01204444444444" calcext:value-type="float">
            <text:p>3,01E+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to1</text:p>
          </table:table-cell>
          <table:table-cell table:style-name="ce1" office:value-type="string" calcext:value-type="string">
            <text:p>1toN</text:p>
          </table:table-cell>
          <table:table-cell table:style-name="ce1"/>
          <table:table-cell table:style-name="ce5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0691" calcext:value-type="float">
            <text:p>0,0691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239.904" calcext:value-type="float">
            <text:p>2239,904</text:p>
          </table:table-cell>
          <table:table-cell table:style-name="ce6" office:value-type="float" office:value="3446.277" calcext:value-type="float">
            <text:p>3446,277</text:p>
          </table:table-cell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205" calcext:value-type="float">
            <text:p>0,205</text:p>
          </table:table-cell>
          <table:table-cell table:style-name="ce6" office:value-type="float" office:value="0.195" calcext:value-type="float">
            <text:p>0,19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533.338" calcext:value-type="float">
            <text:p>1533,33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575.821" calcext:value-type="float">
            <text:p>2575,8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727.179" calcext:value-type="float">
            <text:p>2727,17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08.427" calcext:value-type="float">
            <text:p>1908,4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99" calcext:value-type="float">
            <text:p>0,109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427.756" calcext:value-type="float">
            <text:p>1427,75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676" calcext:value-type="float">
            <text:p>0,0676</text:p>
          </table:table-cell>
          <table:table-cell table:style-name="ce6" office:value-type="float" office:value="0.0747" calcext:value-type="float">
            <text:p>0,074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421.882" calcext:value-type="float">
            <text:p>2421,8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241.85" calcext:value-type="float">
            <text:p>3241,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97.465" calcext:value-type="float">
            <text:p>2397,4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961" calcext:value-type="float">
            <text:p>0,0961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837.778" calcext:value-type="float">
            <text:p>2837,77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294:.B303])" office:value-type="float" office:value="0.18217" calcext:value-type="float">
            <text:p>0,18217</text:p>
          </table:table-cell>
          <table:table-cell table:style-name="ce5" table:formula="of:=AVERAGE([.C294:.C303])" office:value-type="float" office:value="0.18027" calcext:value-type="float">
            <text:p>0,18027</text:p>
          </table:table-cell>
          <table:table-cell table:style-name="ce5" table:number-columns-repeated="2"/>
          <table:table-cell table:style-name="ce5" table:formula="of:=AVERAGE([.F294:.F303])" office:value-type="float" office:value="2331.14" calcext:value-type="float">
            <text:p>2331,14</text:p>
          </table:table-cell>
          <table:table-cell table:style-name="ce5" table:formula="of:=AVERAGE([.G294:.G303])" office:value-type="float" office:value="3446.277" calcext:value-type="float">
            <text:p>3446,2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1.39" calcext:value-type="float">
            <text:p>11,39</text:p>
          </table:table-cell>
          <table:table-cell table:style-name="ce6" office:value-type="float" office:value="9.81" calcext:value-type="float">
            <text:p>9,81</text:p>
          </table:table-cell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0.97" calcext:value-type="float">
            <text:p>10,97</text:p>
          </table:table-cell>
          <table:table-cell table:style-name="ce6" office:value-type="float" office:value="11.44" calcext:value-type="float">
            <text:p>11,44</text:p>
          </table:table-cell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68" calcext:value-type="float">
            <text:p>11,68</text:p>
          </table:table-cell>
          <table:table-cell table:style-name="ce6" office:value-type="float" office:value="11.23" calcext:value-type="float">
            <text:p>11,23</text:p>
          </table:table-cell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 office:value-type="float" office:value="9.62" calcext:value-type="float">
            <text:p>9,62</text:p>
          </table:table-cell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0.63" calcext:value-type="float">
            <text:p>10,63</text:p>
          </table:table-cell>
          <table:table-cell table:style-name="ce6" office:value-type="float" office:value="11.15" calcext:value-type="float">
            <text:p>11,15</text:p>
          </table:table-cell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6.42" calcext:value-type="float">
            <text:p>16,42</text:p>
          </table:table-cell>
          <table:table-cell table:style-name="ce6" office:value-type="float" office:value="14.35" calcext:value-type="float">
            <text:p>14,35</text:p>
          </table:table-cell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0.27" calcext:value-type="float">
            <text:p>10,27</text:p>
          </table:table-cell>
          <table:table-cell table:style-name="ce6" office:value-type="float" office:value="8.6" calcext:value-type="float">
            <text:p>8,6</text:p>
          </table:table-cell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0.74" calcext:value-type="float">
            <text:p>10,74</text:p>
          </table:table-cell>
          <table:table-cell table:style-name="ce6" office:value-type="float" office:value="10.902" calcext:value-type="float">
            <text:p>10,902</text:p>
          </table:table-cell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1.17" calcext:value-type="float">
            <text:p>11,1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number-columns-repeated="2" table:style-name="ce6" office:value-type="float" office:value="14.02" calcext:value-type="float">
            <text:p>14,02</text:p>
          </table:table-cell>
        </table:table-row>
        <table:table-row table:style-name="ro1">
          <table:table-cell table:style-name="ce1"/>
          <table:table-cell table:style-name="ce5" table:formula="of:=AVERAGE([.B306:.B315])" office:value-type="float" office:value="0.17636" calcext:value-type="float">
            <text:p>0,17636</text:p>
          </table:table-cell>
          <table:table-cell table:style-name="ce5" table:formula="of:=AVERAGE([.C306:.C31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6:.F315])" office:value-type="float" office:value="11.902" calcext:value-type="float">
            <text:p>11,902</text:p>
          </table:table-cell>
          <table:table-cell table:style-name="ce5" table:formula="of:=AVERAGE([.G306:.G315])" office:value-type="float" office:value="11.2357777777778" calcext:value-type="float">
            <text:p>11,2357777777778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55" calcext:value-type="float">
            <text:p>0,255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1.208" calcext:value-type="float">
            <text:p>1,208</text:p>
          </table:table-cell>
          <table:table-cell table:style-name="ce6" office:value-type="float" office:value="0.705" calcext:value-type="float">
            <text:p>0,705</text:p>
          </table:table-cell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 office:value-type="float" office:value="0.707" calcext:value-type="float">
            <text:p>0,707</text:p>
          </table:table-cell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373" calcext:value-type="float">
            <text:p>1,373</text:p>
          </table:table-cell>
          <table:table-cell table:style-name="ce6" office:value-type="float" office:value="1.229" calcext:value-type="float">
            <text:p>1,229</text:p>
          </table:table-cell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2.081" calcext:value-type="float">
            <text:p>2,081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number-columns-repeated="2" table:style-name="ce6" office:value-type="float" office:value="0.774" calcext:value-type="float">
            <text:p>0,774</text:p>
          </table:table-cell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number-columns-repeated="2" table:style-name="ce6" office:value-type="float" office:value="1.461" calcext:value-type="float">
            <text:p>1,461</text:p>
          </table:table-cell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477" calcext:value-type="float">
            <text:p>1,47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number-columns-repeated="2" table:style-name="ce6" office:value-type="float" office:value="0.854" calcext:value-type="float">
            <text:p>0,854</text:p>
          </table:table-cell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number-columns-repeated="2" table:style-name="ce6" office:value-type="float" office:value="0.731" calcext:value-type="float">
            <text:p>0,731</text:p>
          </table:table-cell>
        </table:table-row>
        <table:table-row table:style-name="ro1">
          <table:table-cell table:style-name="ce1"/>
          <table:table-cell table:style-name="ce5" table:formula="of:=AVERAGE([.B319:.B328])" office:value-type="float" office:value="0.331" calcext:value-type="float">
            <text:p>0,331</text:p>
          </table:table-cell>
          <table:table-cell table:style-name="ce5" table:formula="of:=AVERAGE([.C319:.C328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19:.F328])" office:value-type="float" office:value="1.1879" calcext:value-type="float">
            <text:p>1,1879</text:p>
          </table:table-cell>
          <table:table-cell table:style-name="ce5" table:formula="of:=AVERAGE([.G319:.G328])" office:value-type="float" office:value="0.923" calcext:value-type="float">
            <text:p>0,923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4.263" calcext:value-type="float">
            <text:p>4,26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3.069" calcext:value-type="float">
            <text:p>3,069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0766" calcext:value-type="float">
            <text:p>0,07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717" calcext:value-type="float">
            <text:p>0,717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485" calcext:value-type="float">
            <text:p>0,4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549" calcext:value-type="float">
            <text:p>1,549</text:p>
          </table:table-cell>
          <table:table-cell table:style-name="ce6" office:value-type="float" office:value="1.557" calcext:value-type="float">
            <text:p>1,557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375" calcext:value-type="float">
            <text:p>26,375</text:p>
          </table:table-cell>
          <table:table-cell table:style-name="ce6" office:value-type="float" office:value="10.519" calcext:value-type="float">
            <text:p>10,519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1.664" calcext:value-type="float">
            <text:p>1,664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53" calcext:value-type="float">
            <text:p>0,53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0708" calcext:value-type="float">
            <text:p>0,07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595" calcext:value-type="float">
            <text:p>3,595</text:p>
          </table:table-cell>
          <table:table-cell table:style-name="ce6" office:value-type="float" office:value="0.995" calcext:value-type="float">
            <text:p>0,995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528" calcext:value-type="float">
            <text:p>0,52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049" calcext:value-type="float">
            <text:p>0,04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number-columns-repeated="2" table:style-name="ce6" office:value-type="float" office:value="8.943" calcext:value-type="float">
            <text:p>8,943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31:.B340])" office:value-type="float" office:value="4.7041" calcext:value-type="float">
            <text:p>4,7041</text:p>
          </table:table-cell>
          <table:table-cell table:style-name="ce5" table:formula="of:=AVERAGE([.C331:.C340])" office:value-type="float" office:value="3.39933333333333" calcext:value-type="float">
            <text:p>3,39933333333333</text:p>
          </table:table-cell>
          <table:table-cell table:style-name="ce5" table:number-columns-repeated="2"/>
          <table:table-cell table:style-name="ce5" table:formula="of:=AVERAGE([.F331:.F340])" office:value-type="float" office:value="0.30648" calcext:value-type="float">
            <text:p>0,30648</text:p>
          </table:table-cell>
          <table:table-cell table:style-name="ce5" table:formula="of:=AVERAGE([.G331:.G3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1531.152" calcext:value-type="float">
            <text:p>1531,152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71.581" calcext:value-type="float">
            <text:p>71,58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889.658" calcext:value-type="float">
            <text:p>1889,658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77.662" calcext:value-type="float">
            <text:p>77,6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729.495" calcext:value-type="float">
            <text:p>1729,49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53.501" calcext:value-type="float">
            <text:p>53,5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174.749" calcext:value-type="float">
            <text:p>2174,74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50.093" calcext:value-type="float">
            <text:p>50,0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949.023" calcext:value-type="float">
            <text:p>2949,02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48.444" calcext:value-type="float">
            <text:p>48,44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644.596" calcext:value-type="float">
            <text:p>2644,59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52.499" calcext:value-type="float">
            <text:p>52,4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1994.929" calcext:value-type="float">
            <text:p>1994,929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65.453" calcext:value-type="float">
            <text:p>65,4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1596.418" calcext:value-type="float">
            <text:p>1596,418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424.44" calcext:value-type="float">
            <text:p>2424,4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592.307" calcext:value-type="float">
            <text:p>1592,307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68.069" calcext:value-type="float">
            <text:p>68,069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44:.B353])" office:value-type="float" office:value="2052.6767" calcext:value-type="float">
            <text:p>2052,6767</text:p>
          </table:table-cell>
          <table:table-cell table:style-name="ce5" table:formula="of:=AVERAGE([.C344:.C35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4:.F353])" office:value-type="float" office:value="60.91275" calcext:value-type="float">
            <text:p>60,91275</text:p>
          </table:table-cell>
          <table:table-cell table:style-name="ce5" table:formula="of:=AVERAGE([.G344:.G35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 office:value-type="float" office:value="2.672" calcext:value-type="float">
            <text:p>2,672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687" calcext:value-type="float">
            <text:p>3,6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0.3799" calcext:value-type="float">
            <text:p>0,3799</text:p>
          </table:table-cell>
          <table:table-cell table:style-name="ce6" office:value-type="float" office:value="2.759" calcext:value-type="float">
            <text:p>2,759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537" calcext:value-type="float">
            <text:p>3,5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6.071" calcext:value-type="float">
            <text:p>6,071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289" calcext:value-type="float">
            <text:p>3,2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3.288" calcext:value-type="float">
            <text:p>13,288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" calcext:value-type="float">
            <text:p>3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196" calcext:value-type="float">
            <text:p>3,19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number-columns-repeated="2" table:style-name="ce6" office:value-type="float" office:value="0.1898" calcext:value-type="float">
            <text:p>0,1898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1.691" calcext:value-type="float">
            <text:p>11,6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number-columns-repeated="2" table:style-name="ce6" office:value-type="float" office:value="0.292" calcext:value-type="float">
            <text:p>0,292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541" calcext:value-type="float">
            <text:p>3,5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number-columns-repeated="2" table:style-name="ce6" office:value-type="float" office:value="0.442" calcext:value-type="float">
            <text:p>0,44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393" calcext:value-type="float">
            <text:p>3,3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number-columns-repeated="2" table:style-name="ce6" office:value-type="float" office:value="0.447" calcext:value-type="float">
            <text:p>0,447</text:p>
          </table:table-cell>
          <table:table-cell table:style-name="ce6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57:.B366])" office:value-type="float" office:value="2.19967" calcext:value-type="float">
            <text:p>2,19967</text:p>
          </table:table-cell>
          <table:table-cell table:style-name="ce5" table:formula="of:=AVERAGE([.C357:.C366])" office:value-type="float" office:value="0.819088888888889" calcext:value-type="float">
            <text:p>0,819088888888889</text:p>
          </table:table-cell>
          <table:table-cell table:style-name="ce5" table:number-columns-repeated="2"/>
          <table:table-cell table:style-name="ce5" table:formula="of:=AVERAGE([.F357:.F366])" office:value-type="float" office:value="4.2399" calcext:value-type="float">
            <text:p>4,2399</text:p>
          </table:table-cell>
          <table:table-cell table:style-name="ce5" table:formula="of:=AVERAGE([.G357:.G36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 table:number-columns-repeated="2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41.615" calcext:value-type="float">
            <text:p>41,61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2.342" calcext:value-type="float">
            <text:p>2,342</text:p>
          </table:table-cell>
          <table:table-cell table:style-name="ce6" office:value-type="float" office:value="3.755" calcext:value-type="float">
            <text:p>3,755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219" calcext:value-type="float">
            <text:p>7,219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8.251" calcext:value-type="float">
            <text:p>28,251</text:p>
          </table:table-cell>
          <table:table-cell table:style-name="ce6" office:value-type="float" office:value="50.634" calcext:value-type="float">
            <text:p>50,634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229" calcext:value-type="float">
            <text:p>9,22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2.363" calcext:value-type="float">
            <text:p>32,363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99" calcext:value-type="float">
            <text:p>7,699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5.159" calcext:value-type="float">
            <text:p>15,159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6" calcext:value-type="float">
            <text:p>7,64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52.542" calcext:value-type="float">
            <text:p>52,542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193" calcext:value-type="float">
            <text:p>8,19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7.1298" calcext:value-type="float">
            <text:p>7,1298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8" calcext:value-type="float">
            <text:p>9,8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2.96" calcext:value-type="float">
            <text:p>12,9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54" calcext:value-type="float">
            <text:p>7,54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2.821" calcext:value-type="float">
            <text:p>12,82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671" calcext:value-type="float">
            <text:p>6,67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28.96" calcext:value-type="float">
            <text:p>28,9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33" calcext:value-type="float">
            <text:p>7,33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98" calcext:value-type="float">
            <text:p>1,798</text:p>
          </table:table-cell>
          <table:table-cell table:style-name="ce6"/>
        </table:table-row>
        <table:table-row table:style-name="ro1">
          <table:table-cell table:style-name="ce5"/>
          <table:table-cell table:style-name="ce5" table:formula="of:=AVERAGE([.B370:.B379])" office:value-type="float" office:value="11.2942" calcext:value-type="float">
            <text:p>11,2942</text:p>
          </table:table-cell>
          <table:table-cell table:style-name="ce5" table:formula="of:=AVERAGE([.C370:.C3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70:.F379])" office:value-type="float" office:value="19.43258" calcext:value-type="float">
            <text:p>19,43258</text:p>
          </table:table-cell>
          <table:table-cell table:style-name="ce5" table:formula="of:=AVERAGE([.G370:.G379])" office:value-type="float" office:value="27.1945" calcext:value-type="float">
            <text:p>27,1945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39.503" calcext:value-type="float">
            <text:p>139,503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111.674" calcext:value-type="float">
            <text:p>111,6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85" calcext:value-type="float">
            <text:p>128,58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72.466" calcext:value-type="float">
            <text:p>72,4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6.388" calcext:value-type="float">
            <text:p>156,388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79.677" calcext:value-type="float">
            <text:p>79,67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0.322" calcext:value-type="float">
            <text:p>170,32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3.203" calcext:value-type="float">
            <text:p>13,2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3.555" calcext:value-type="float">
            <text:p>143,55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127.55" calcext:value-type="float">
            <text:p>127,5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30.076" calcext:value-type="float">
            <text:p>130,076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146.318" calcext:value-type="float">
            <text:p>146,3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6.348" calcext:value-type="float">
            <text:p>176,348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1.831" calcext:value-type="float">
            <text:p>151,831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46.662" calcext:value-type="float">
            <text:p>146,662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5.141" calcext:value-type="float">
            <text:p>155,141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83:.B392])" office:value-type="float" office:value="149.8411" calcext:value-type="float">
            <text:p>149,8411</text:p>
          </table:table-cell>
          <table:table-cell table:style-name="ce5" table:formula="of:=AVERAGE([.C383:.C392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3:.F392])" office:value-type="float" office:value="91.8146666666667" calcext:value-type="float">
            <text:p>91,8146666666667</text:p>
          </table:table-cell>
          <table:table-cell table:style-name="ce5" table:formula="of:=AVERAGE([.G383:.G39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065.133" calcext:value-type="float">
            <text:p>2065,133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61.361" calcext:value-type="float">
            <text:p>561,361</text:p>
          </table:table-cell>
          <table:table-cell table:style-name="ce6" office:value-type="float" office:value="1000.15" calcext:value-type="float">
            <text:p>1000,15</text:p>
          </table:table-cell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3199.82" calcext:value-type="float">
            <text:p>3199,82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92.377" calcext:value-type="float">
            <text:p>692,37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2894.846" calcext:value-type="float">
            <text:p>2894,846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1084.323" calcext:value-type="float">
            <text:p>1084,32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032.966" calcext:value-type="float">
            <text:p>4032,966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85.605" calcext:value-type="float">
            <text:p>985,60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4066.631" calcext:value-type="float">
            <text:p>4066,63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14.788" calcext:value-type="float">
            <text:p>814,7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3072.138" calcext:value-type="float">
            <text:p>3072,138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625.878" calcext:value-type="float">
            <text:p>625,87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3865.951" calcext:value-type="float">
            <text:p>3865,95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1053.257" calcext:value-type="float">
            <text:p>1053,2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float" office:value="2996.765" calcext:value-type="float">
            <text:p>2996,765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140.693" calcext:value-type="float">
            <text:p>1140,6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997.511" calcext:value-type="float">
            <text:p>3997,51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5.241" calcext:value-type="float">
            <text:p>855,2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3876.217" calcext:value-type="float">
            <text:p>3876,217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703.881" calcext:value-type="float">
            <text:p>703,881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96:.B405])" office:value-type="float" office:value="3406.7978" calcext:value-type="float">
            <text:p>3406,7978</text:p>
          </table:table-cell>
          <table:table-cell table:style-name="ce5" table:formula="of:=AVERAGE([.C396:.C405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6:.F405])" office:value-type="float" office:value="851.7404" calcext:value-type="float">
            <text:p>851,7404</text:p>
          </table:table-cell>
          <table:table-cell table:style-name="ce5" table:formula="of:=AVERAGE([.G396:.G405])" office:value-type="float" office:value="1000.15" calcext:value-type="float">
            <text:p>1000,15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 table:style-name="ce5"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49.523" calcext:value-type="float">
            <text:p>449,523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539.473" calcext:value-type="float">
            <text:p>539,473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67" calcext:value-type="float">
            <text:p>0,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577.137" calcext:value-type="float">
            <text:p>577,13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604.078" calcext:value-type="float">
            <text:p>604,078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548.497" calcext:value-type="float">
            <text:p>548,497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782" calcext:value-type="float">
            <text:p>0,07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table:number-columns-repeated="3"/>
          <table:table-cell table:style-name="ce2" office:value-type="string" calcext:value-type="string">
            <text:p>MB_7</text:p>
          </table:table-cell>
          <table:table-cell table:style-name="ce6" office:value-type="float" office:value="0.291" calcext:value-type="float">
            <text:p>0,2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730.782" calcext:value-type="float">
            <text:p>730,782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85.224" calcext:value-type="float">
            <text:p>585,22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09:.B418])" office:value-type="float" office:value="576.387714285714" calcext:value-type="float">
            <text:p>576,387714285714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409:.F418])" office:value-type="float" office:value="0.28482" calcext:value-type="float">
            <text:p>0,28482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  <table:table-cell/>
          <table:table-cell table:style-name="ce1"/>
          <table:table-cell table:style-name="ce5" office:value-type="string" calcext:value-type="string">
            <text:p>Nto1</text:p>
          </table:table-cell>
          <table:table-cell table:style-name="ce5" office:value-type="string" calcext:value-type="string">
            <text:p>1toN</text:p>
          </table:table-cell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53" calcext:value-type="float">
            <text:p>1,2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3.835" calcext:value-type="float">
            <text:p>3,83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848" calcext:value-type="float">
            <text:p>0,0848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1.115" calcext:value-type="float">
            <text:p>1,1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21:.B430])" office:value-type="float" office:value="0.08156" calcext:value-type="float">
            <text:p>0,08156</text:p>
          </table:table-cell>
          <table:table-cell table:style-name="ce5" table:formula="of:=AVERAGE([.C421:.C43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21:.F430])" office:value-type="float" office:value="0.82937" calcext:value-type="float">
            <text:p>0,82937</text:p>
          </table:table-cell>
          <table:table-cell table:style-name="ce5" table:formula="of:=AVERAGE([.G421:.G430])" office:value-type="string" office:string-value="" calcext:value-type="error">
            <text:p>#DIV/0!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pagation_average" table:style-name="ta1">
        <table:table-column table:style-name="co8" table:default-cell-style-name="Default"/>
        <table:table-column table:style-name="co9" table:default-cell-style-name="ce15"/>
        <table:table-column table:style-name="co11" table:default-cell-style-name="Default"/>
        <table:table-column table:style-name="co7" table:number-columns-repeated="3" table:default-cell-style-name="Default"/>
        <table:table-row table:style-name="ro4">
          <table:table-cell table:style-name="ce55" office:value-type="string" calcext:value-type="string">
            <text:p>mechanisms with 5 threads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NtoN</text:p>
          </table:table-cell>
          <table:table-cell table:style-name="ce24" office:value-type="string" calcext:value-type="string">
            <text:p>1to1</text:p>
          </table:table-cell>
          <table:table-cell table:style-name="ce24" office:value-type="string" calcext:value-type="string">
            <text:p>1toN</text:p>
          </table:table-cell>
          <table:table-cell table:style-name="ce24" office:value-type="string" calcext:value-type="string">
            <text:p>Nto1</text:p>
          </table:table-cell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48" office:value-type="percentage" office:value="0.228" calcext:value-type="percentage">
            <text:p>22,80%</text:p>
          </table:table-cell>
          <table:table-cell table:style-name="ce48" office:value-type="percentage" office:value="0.239" calcext:value-type="percentage">
            <text:p>23,90%</text:p>
          </table:table-cell>
          <table:table-cell table:style-name="ce48" office:value-type="percentage" office:value="0.233" calcext:value-type="percentage">
            <text:p>23,30%</text:p>
          </table:table-cell>
          <table:table-cell table:style-name="ce48" office:value-type="percentage" office:value="0.236" calcext:value-type="percentage">
            <text:p>23,60%</text:p>
          </table:table-cell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48" office:value-type="percentage" office:value="0.2213" calcext:value-type="percentage">
            <text:p>22,13%</text:p>
          </table:table-cell>
          <table:table-cell table:style-name="ce48" office:value-type="percentage" office:value="0.1778" calcext:value-type="percentage">
            <text:p>17,78%</text:p>
          </table:table-cell>
          <table:table-cell table:style-name="ce48" office:value-type="percentage" office:value="0.2085" calcext:value-type="percentage">
            <text:p>20,85%</text:p>
          </table:table-cell>
          <table:table-cell table:style-name="ce48" office:value-type="percentage" office:value="0.1979" calcext:value-type="percentage">
            <text:p>19,79%</text:p>
          </table:table-cell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48" office:value-type="percentage" office:value="0.2443" calcext:value-type="percentage">
            <text:p>24,43%</text:p>
          </table:table-cell>
          <table:table-cell table:style-name="ce48" office:value-type="percentage" office:value="0.2429" calcext:value-type="percentage">
            <text:p>24,29%</text:p>
          </table:table-cell>
          <table:table-cell table:style-name="ce48" office:value-type="percentage" office:value="0.2519" calcext:value-type="percentage">
            <text:p>25,19%</text:p>
          </table:table-cell>
          <table:table-cell table:style-name="ce48" office:value-type="percentage" office:value="0.2232" calcext:value-type="percentage">
            <text:p>22,32%</text:p>
          </table:table-cell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48" office:value-type="percentage" office:value="0.0694" calcext:value-type="percentage">
            <text:p>6,94%</text:p>
          </table:table-cell>
          <table:table-cell table:style-name="ce48" office:value-type="percentage" office:value="0.0771" calcext:value-type="percentage">
            <text:p>7,71%</text:p>
          </table:table-cell>
          <table:table-cell table:style-name="ce48" office:value-type="percentage" office:value="0.0808" calcext:value-type="percentage">
            <text:p>8,08%</text:p>
          </table:table-cell>
          <table:table-cell table:style-name="ce48" office:value-type="percentage" office:value="0.0726" calcext:value-type="percentage">
            <text:p>7,26%</text:p>
          </table:table-cell>
        </table:table-row>
        <table:table-row table:style-name="ro4">
          <table:table-cell office:value-type="string" calcext:value-type="string">
            <text:p>Beed</text:p>
          </table:table-cell>
          <table:table-cell office:value-type="percentage" office:value="0.4619" calcext:value-type="percentage">
            <text:p>46,19%</text:p>
          </table:table-cell>
          <table:table-cell table:style-name="ce48" office:value-type="percentage" office:value="0.3877" calcext:value-type="percentage">
            <text:p>38,77%</text:p>
          </table:table-cell>
          <table:table-cell table:style-name="ce48" office:value-type="percentage" office:value="0.4513" calcext:value-type="percentage">
            <text:p>45,13%</text:p>
          </table:table-cell>
          <table:table-cell table:style-name="ce48" office:value-type="percentage" office:value="0.4269" calcext:value-type="percentage">
            <text:p>42,69%</text:p>
          </table:table-cell>
          <table:table-cell table:style-name="ce48" office:value-type="percentage" office:value="0.4229" calcext:value-type="percentage">
            <text:p>42,29%</text:p>
          </table:table-cell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48" office:value-type="percentage" office:value="0.0434" calcext:value-type="percentage">
            <text:p>4,34%</text:p>
          </table:table-cell>
          <table:table-cell table:style-name="ce48" office:value-type="percentage" office:value="0.043" calcext:value-type="percentage">
            <text:p>4,30%</text:p>
          </table:table-cell>
          <table:table-cell table:style-name="ce48" office:value-type="percentage" office:value="0.0425" calcext:value-type="percentage">
            <text:p>4,25%</text:p>
          </table:table-cell>
          <table:table-cell table:style-name="ce48" office:value-type="percentage" office:value="0.0435" calcext:value-type="percentage">
            <text:p>4,35%</text:p>
          </table:table-cell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48" office:value-type="percentage" office:value="0.4569" calcext:value-type="percentage">
            <text:p>45,69%</text:p>
          </table:table-cell>
          <table:table-cell table:style-name="ce48" office:value-type="percentage" office:value="0.4566" calcext:value-type="percentage">
            <text:p>45,66%</text:p>
          </table:table-cell>
          <table:table-cell table:style-name="ce48" office:value-type="percentage" office:value="0.4759" calcext:value-type="percentage">
            <text:p>47,59%</text:p>
          </table:table-cell>
          <table:table-cell table:style-name="ce48" office:value-type="percentage" office:value="0.4724" calcext:value-type="percentage">
            <text:p>47,24%</text:p>
          </table:table-cell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48" office:value-type="percentage" office:value="0.0997" calcext:value-type="percentage">
            <text:p>9,97%</text:p>
          </table:table-cell>
          <table:table-cell table:style-name="ce48" office:value-type="percentage" office:value="0.1006" calcext:value-type="percentage">
            <text:p>10,06%</text:p>
          </table:table-cell>
          <table:table-cell table:style-name="ce48" office:value-type="percentage" office:value="0.104" calcext:value-type="percentage">
            <text:p>10,40%</text:p>
          </table:table-cell>
          <table:table-cell table:style-name="ce48" office:value-type="percentage" office:value="0.0983" calcext:value-type="percentage">
            <text:p>9,83%</text:p>
          </table:table-cell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48" office:value-type="percentage" office:value="0.5067" calcext:value-type="percentage">
            <text:p>50,67%</text:p>
          </table:table-cell>
          <table:table-cell table:style-name="ce48" office:value-type="percentage" office:value="0.5176" calcext:value-type="percentage">
            <text:p>51,76%</text:p>
          </table:table-cell>
          <table:table-cell table:style-name="ce48" office:value-type="percentage" office:value="0.5033" calcext:value-type="percentage">
            <text:p>50,33%</text:p>
          </table:table-cell>
          <table:table-cell table:style-name="ce48" office:value-type="percentage" office:value="0.5158" calcext:value-type="percentage">
            <text:p>51,58%</text:p>
          </table:table-cell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46" calcext:value-type="percentage">
            <text:p>24,60%</text:p>
          </table:table-cell>
          <table:table-cell table:style-name="ce48" office:value-type="percentage" office:value="0.25" calcext:value-type="percentage">
            <text:p>25,00%</text:p>
          </table:table-cell>
          <table:table-cell table:style-name="ce48" office:value-type="percentage" office:value="0.254" calcext:value-type="percentage">
            <text:p>25,40%</text:p>
          </table:table-cell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48" office:value-type="percentage" office:value="0.2897" calcext:value-type="percentage">
            <text:p>28,97%</text:p>
          </table:table-cell>
          <table:table-cell table:style-name="ce48" office:value-type="percentage" office:value="0.2927" calcext:value-type="percentage">
            <text:p>29,27%</text:p>
          </table:table-cell>
          <table:table-cell table:style-name="ce48" office:value-type="percentage" office:value="0.287" calcext:value-type="percentage">
            <text:p>28,70%</text:p>
          </table:table-cell>
          <table:table-cell table:style-name="ce48" office:value-type="percentage" office:value="0.2953" calcext:value-type="percentage">
            <text:p>29,53%</text:p>
          </table:table-cell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number-columns-repeated="2" table:style-name="ce48" office:value-type="percentage" office:value="0.35" calcext:value-type="percentage">
            <text:p>35,00%</text:p>
          </table:table-cell>
          <table:table-cell table:style-name="ce48" office:value-type="percentage" office:value="0.3731" calcext:value-type="percentage">
            <text:p>37,31%</text:p>
          </table:table-cell>
          <table:table-cell table:style-name="ce48" office:value-type="percentage" office:value="0.3554" calcext:value-type="percentage">
            <text:p>35,54%</text:p>
          </table:table-cell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48" office:value-type="percentage" office:value="0.2111" calcext:value-type="percentage">
            <text:p>21,11%</text:p>
          </table:table-cell>
          <table:table-cell table:style-name="ce48" office:value-type="percentage" office:value="0.2141" calcext:value-type="percentage">
            <text:p>21,41%</text:p>
          </table:table-cell>
          <table:table-cell table:style-name="ce48" office:value-type="percentage" office:value="0.2018" calcext:value-type="percentage">
            <text:p>20,18%</text:p>
          </table:table-cell>
          <table:table-cell table:style-name="ce48" office:value-type="percentage" office:value="0.2045" calcext:value-type="percentage">
            <text:p>20,45%</text:p>
          </table:table-cell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48" office:value-type="percentage" office:value="0.1993" calcext:value-type="percentage">
            <text:p>19,93%</text:p>
          </table:table-cell>
          <table:table-cell table:style-name="ce48" office:value-type="percentage" office:value="0.2153" calcext:value-type="percentage">
            <text:p>21,53%</text:p>
          </table:table-cell>
          <table:table-cell table:style-name="ce48" office:value-type="percentage" office:value="0.2064" calcext:value-type="percentage">
            <text:p>20,64%</text:p>
          </table:table-cell>
          <table:table-cell table:style-name="ce48" office:value-type="percentage" office:value="0.2113" calcext:value-type="percentage">
            <text:p>21,13%</text:p>
          </table:table-cell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48" office:value-type="percentage" office:value="0.0696" calcext:value-type="percentage">
            <text:p>6,96%</text:p>
          </table:table-cell>
          <table:table-cell table:style-name="ce48" office:value-type="percentage" office:value="0.0648" calcext:value-type="percentage">
            <text:p>6,48%</text:p>
          </table:table-cell>
          <table:table-cell table:style-name="ce48" office:value-type="percentage" office:value="0.0748" calcext:value-type="percentage">
            <text:p>7,48%</text:p>
          </table:table-cell>
          <table:table-cell table:style-name="ce48" office:value-type="percentage" office:value="0.0761" calcext:value-type="percentage">
            <text:p>7,61%</text:p>
          </table:table-cell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48" office:value-type="percentage" office:value="0.1486" calcext:value-type="percentage">
            <text:p>14,86%</text:p>
          </table:table-cell>
          <table:table-cell table:style-name="ce48" office:value-type="percentage" office:value="0.1517" calcext:value-type="percentage">
            <text:p>15,17%</text:p>
          </table:table-cell>
          <table:table-cell table:style-name="ce48" office:value-type="percentage" office:value="0.1537" calcext:value-type="percentage">
            <text:p>15,37%</text:p>
          </table:table-cell>
          <table:table-cell table:style-name="ce48" office:value-type="percentage" office:value="0.1489" calcext:value-type="percentage">
            <text:p>14,89%</text:p>
          </table:table-cell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48" office:value-type="percentage" office:value="0.3194" calcext:value-type="percentage">
            <text:p>31,94%</text:p>
          </table:table-cell>
          <table:table-cell table:style-name="ce48" office:value-type="percentage" office:value="0.3321" calcext:value-type="percentage">
            <text:p>33,21%</text:p>
          </table:table-cell>
          <table:table-cell table:style-name="ce48" office:value-type="percentage" office:value="0.3247" calcext:value-type="percentage">
            <text:p>32,47%</text:p>
          </table:table-cell>
          <table:table-cell table:style-name="ce48" office:value-type="percentage" office:value="0.335" calcext:value-type="percentage">
            <text:p>33,50%</text:p>
          </table:table-cell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48" office:value-type="percentage" office:value="0.2493" calcext:value-type="percentage">
            <text:p>24,93%</text:p>
          </table:table-cell>
          <table:table-cell table:style-name="ce48" office:value-type="percentage" office:value="0.2607" calcext:value-type="percentage">
            <text:p>26,07%</text:p>
          </table:table-cell>
          <table:table-cell table:style-name="ce48" office:value-type="percentage" office:value="0.2714" calcext:value-type="percentage">
            <text:p>27,14%</text:p>
          </table:table-cell>
          <table:table-cell table:style-name="ce48" office:value-type="percentage" office:value="0.2621" calcext:value-type="percentage">
            <text:p>26,21%</text:p>
          </table:table-cell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48" office:value-type="percentage" office:value="0.1706" calcext:value-type="percentage">
            <text:p>17,06%</text:p>
          </table:table-cell>
          <table:table-cell table:style-name="ce48" office:value-type="percentage" office:value="0.1712" calcext:value-type="percentage">
            <text:p>17,12%</text:p>
          </table:table-cell>
          <table:table-cell table:style-name="ce48" office:value-type="percentage" office:value="0.1719" calcext:value-type="percentage">
            <text:p>17,19%</text:p>
          </table:table-cell>
          <table:table-cell table:style-name="ce48" office:value-type="percentage" office:value="0.1713" calcext:value-type="percentage">
            <text:p>17,13%</text:p>
          </table:table-cell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48" office:value-type="percentage" office:value="0.4939" calcext:value-type="percentage">
            <text:p>49,39%</text:p>
          </table:table-cell>
          <table:table-cell table:style-name="ce48" office:value-type="percentage" office:value="0.4904" calcext:value-type="percentage">
            <text:p>49,04%</text:p>
          </table:table-cell>
          <table:table-cell table:style-name="ce48" office:value-type="percentage" office:value="0.4647" calcext:value-type="percentage">
            <text:p>46,47%</text:p>
          </table:table-cell>
          <table:table-cell table:style-name="ce48" office:value-type="percentage" office:value="0.5338" calcext:value-type="percentage">
            <text:p>53,38%</text:p>
          </table:table-cell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48" office:value-type="percentage" office:value="0.1637" calcext:value-type="percentage">
            <text:p>16,37%</text:p>
          </table:table-cell>
          <table:table-cell table:style-name="ce48" office:value-type="percentage" office:value="0.1595" calcext:value-type="percentage">
            <text:p>15,95%</text:p>
          </table:table-cell>
          <table:table-cell table:style-name="ce48" office:value-type="percentage" office:value="0.1516" calcext:value-type="percentage">
            <text:p>15,16%</text:p>
          </table:table-cell>
          <table:table-cell table:style-name="ce48" office:value-type="percentage" office:value="0.159" calcext:value-type="percentage">
            <text:p>15,90%</text:p>
          </table:table-cell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48" office:value-type="percentage" office:value="0.1546" calcext:value-type="percentage">
            <text:p>15,46%</text:p>
          </table:table-cell>
          <table:table-cell table:style-name="ce48" office:value-type="percentage" office:value="0.1491" calcext:value-type="percentage">
            <text:p>14,91%</text:p>
          </table:table-cell>
          <table:table-cell table:style-name="ce48" office:value-type="percentage" office:value="0.1493" calcext:value-type="percentage">
            <text:p>14,93%</text:p>
          </table:table-cell>
          <table:table-cell table:style-name="ce48" office:value-type="percentage" office:value="0.1417" calcext:value-type="percentage">
            <text:p>14,17%</text:p>
          </table:table-cell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style-name="ce48" office:value-type="percentage" office:value="0.2788" calcext:value-type="percentage">
            <text:p>27,88%</text:p>
          </table:table-cell>
          <table:table-cell table:style-name="ce48" office:value-type="percentage" office:value="0.2659" calcext:value-type="percentage">
            <text:p>26,59%</text:p>
          </table:table-cell>
          <table:table-cell table:style-name="ce48" office:value-type="percentage" office:value="0.2692" calcext:value-type="percentage">
            <text:p>26,92%</text:p>
          </table:table-cell>
          <table:table-cell table:style-name="ce48" office:value-type="percentage" office:value="0.2687" calcext:value-type="percentage">
            <text:p>26,87%</text:p>
          </table:table-cell>
        </table:table-row>
        <table:table-row table:style-name="ro4">
          <table:table-cell office:value-type="string" calcext:value-type="string">
            <text:p>Pirvision</text:p>
          </table:table-cell>
          <table:table-cell office:value-type="percentage" office:value="0.1431" calcext:value-type="percentage">
            <text:p>14,31%</text:p>
          </table:table-cell>
          <table:table-cell table:style-name="ce48" office:value-type="percentage" office:value="0.0907" calcext:value-type="percentage">
            <text:p>9,07%</text:p>
          </table:table-cell>
          <table:table-cell table:style-name="ce48" office:value-type="percentage" office:value="0.1052" calcext:value-type="percentage">
            <text:p>10,52%</text:p>
          </table:table-cell>
          <table:table-cell table:style-name="ce48" office:value-type="percentage" office:value="0.0793" calcext:value-type="percentage">
            <text:p>7,93%</text:p>
          </table:table-cell>
          <table:table-cell table:style-name="ce48" office:value-type="percentage" office:value="0.0915" calcext:value-type="percentage">
            <text:p>9,15%</text:p>
          </table:table-cell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48" office:value-type="percentage" office:value="0.0683" calcext:value-type="percentage">
            <text:p>6,83%</text:p>
          </table:table-cell>
          <table:table-cell table:style-name="ce48" office:value-type="percentage" office:value="0.068" calcext:value-type="percentage">
            <text:p>6,80%</text:p>
          </table:table-cell>
          <table:table-cell table:style-name="ce48" office:value-type="percentage" office:value="0.0661" calcext:value-type="percentage">
            <text:p>6,61%</text:p>
          </table:table-cell>
          <table:table-cell table:style-name="ce48" office:value-type="percentage" office:value="0.0704" calcext:value-type="percentage">
            <text:p>7,04%</text:p>
          </table:table-cell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48" office:value-type="percentage" office:value="0.3111" calcext:value-type="percentage">
            <text:p>31,11%</text:p>
          </table:table-cell>
          <table:table-cell table:style-name="ce48" office:value-type="percentage" office:value="0.3073" calcext:value-type="percentage">
            <text:p>30,73%</text:p>
          </table:table-cell>
          <table:table-cell table:style-name="ce48" office:value-type="percentage" office:value="0.294" calcext:value-type="percentage">
            <text:p>29,40%</text:p>
          </table:table-cell>
          <table:table-cell table:style-name="ce48" office:value-type="percentage" office:value="0.3024" calcext:value-type="percentage">
            <text:p>30,24%</text:p>
          </table:table-cell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48" office:value-type="percentage" office:value="0.2076" calcext:value-type="percentage">
            <text:p>20,76%</text:p>
          </table:table-cell>
          <table:table-cell table:style-name="ce48" office:value-type="percentage" office:value="0.2022" calcext:value-type="percentage">
            <text:p>20,22%</text:p>
          </table:table-cell>
          <table:table-cell table:style-name="ce48" office:value-type="percentage" office:value="0.21" calcext:value-type="percentage">
            <text:p>21,00%</text:p>
          </table:table-cell>
          <table:table-cell table:style-name="ce48" office:value-type="percentage" office:value="0.2058" calcext:value-type="percentage">
            <text:p>20,58%</text:p>
          </table:table-cell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48" office:value-type="percentage" office:value="0.3387" calcext:value-type="percentage">
            <text:p>33,87%</text:p>
          </table:table-cell>
          <table:table-cell table:style-name="ce48" office:value-type="percentage" office:value="0.3365" calcext:value-type="percentage">
            <text:p>33,65%</text:p>
          </table:table-cell>
          <table:table-cell table:style-name="ce48" office:value-type="percentage" office:value="0.3396" calcext:value-type="percentage">
            <text:p>33,96%</text:p>
          </table:table-cell>
          <table:table-cell table:style-name="ce48" office:value-type="percentage" office:value="0.3315" calcext:value-type="percentage">
            <text:p>33,15%</text:p>
          </table:table-cell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48" office:value-type="percentage" office:value="0.4747" calcext:value-type="percentage">
            <text:p>47,47%</text:p>
          </table:table-cell>
          <table:table-cell table:style-name="ce48" office:value-type="percentage" office:value="0.5218" calcext:value-type="percentage">
            <text:p>52,18%</text:p>
          </table:table-cell>
          <table:table-cell table:style-name="ce48" office:value-type="percentage" office:value="0.5319" calcext:value-type="percentage">
            <text:p>53,19%</text:p>
          </table:table-cell>
          <table:table-cell table:style-name="ce48" office:value-type="percentage" office:value="0.5445" calcext:value-type="percentage">
            <text:p>54,45%</text:p>
          </table:table-cell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48" office:value-type="percentage" office:value="0.1774" calcext:value-type="percentage">
            <text:p>17,74%</text:p>
          </table:table-cell>
          <table:table-cell table:style-name="ce48" office:value-type="percentage" office:value="0.2068" calcext:value-type="percentage">
            <text:p>20,68%</text:p>
          </table:table-cell>
          <table:table-cell table:style-name="ce48" office:value-type="percentage" office:value="0.1907" calcext:value-type="percentage">
            <text:p>19,07%</text:p>
          </table:table-cell>
          <table:table-cell table:style-name="ce48" office:value-type="percentage" office:value="0.1894" calcext:value-type="percentage">
            <text:p>18,94%</text:p>
          </table:table-cell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48" office:value-type="percentage" office:value="0.198" calcext:value-type="percentage">
            <text:p>19,80%</text:p>
          </table:table-cell>
          <table:table-cell table:style-name="ce48" office:value-type="percentage" office:value="0.226" calcext:value-type="percentage">
            <text:p>22,60%</text:p>
          </table:table-cell>
          <table:table-cell table:style-name="ce48" office:value-type="percentage" office:value="0.2115" calcext:value-type="percentage">
            <text:p>21,15%</text:p>
          </table:table-cell>
          <table:table-cell table:style-name="ce48" office:value-type="percentage" office:value="0.219" calcext:value-type="percentage">
            <text:p>21,90%</text:p>
          </table:table-cell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48" office:value-type="percentage" office:value="0.0619" calcext:value-type="percentage">
            <text:p>6,19%</text:p>
          </table:table-cell>
          <table:table-cell table:style-name="ce48" office:value-type="percentage" office:value="0.0652" calcext:value-type="percentage">
            <text:p>6,52%</text:p>
          </table:table-cell>
          <table:table-cell table:style-name="ce48" office:value-type="percentage" office:value="0.0633" calcext:value-type="percentage">
            <text:p>6,33%</text:p>
          </table:table-cell>
          <table:table-cell table:style-name="ce48" office:value-type="percentage" office:value="0.0609" calcext:value-type="percentage">
            <text:p>6,09%</text:p>
          </table:table-cell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48" office:value-type="percentage" office:value="0.4191" calcext:value-type="percentage">
            <text:p>41,91%</text:p>
          </table:table-cell>
          <table:table-cell table:style-name="ce48" office:value-type="percentage" office:value="0.4248" calcext:value-type="percentage">
            <text:p>42,48%</text:p>
          </table:table-cell>
          <table:table-cell table:style-name="ce48" office:value-type="percentage" office:value="0.4222" calcext:value-type="percentage">
            <text:p>42,22%</text:p>
          </table:table-cell>
          <table:table-cell table:style-name="ce48" office:value-type="percentage" office:value="0.4172" calcext:value-type="percentage">
            <text:p>41,72%</text:p>
          </table:table-cell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48" office:value-type="percentage" office:value="0.2222" calcext:value-type="percentage">
            <text:p>22,22%</text:p>
          </table:table-cell>
          <table:table-cell table:style-name="ce48" office:value-type="percentage" office:value="0.2189" calcext:value-type="percentage">
            <text:p>21,89%</text:p>
          </table:table-cell>
          <table:table-cell table:style-name="ce48" office:value-type="percentage" office:value="0.2311" calcext:value-type="percentage">
            <text:p>23,11%</text:p>
          </table:table-cell>
          <table:table-cell table:style-name="ce48" office:value-type="percentage" office:value="0.2037" calcext:value-type="percentage">
            <text:p>20,37%</text:p>
          </table:table-cell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48" office:value-type="percentage" office:value="0.0568" calcext:value-type="percentage">
            <text:p>5,68%</text:p>
          </table:table-cell>
          <table:table-cell table:style-name="ce48" office:value-type="percentage" office:value="0.0623" calcext:value-type="percentage">
            <text:p>6,23%</text:p>
          </table:table-cell>
          <table:table-cell table:style-name="ce48" office:value-type="percentage" office:value="0.059" calcext:value-type="percentage">
            <text:p>5,90%</text:p>
          </table:table-cell>
          <table:table-cell table:style-name="ce48" office:value-type="percentage" office:value="0.0618" calcext:value-type="percentage">
            <text:p>6,18%</text:p>
          </table:table-cell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48" office:value-type="percentage" office:value="0.2445" calcext:value-type="percentage">
            <text:p>24,45%</text:p>
          </table:table-cell>
          <table:table-cell table:style-name="ce48" office:value-type="percentage" office:value="0.2442" calcext:value-type="percentage">
            <text:p>24,42%</text:p>
          </table:table-cell>
          <table:table-cell table:style-name="ce48" office:value-type="percentage" office:value="0.2437" calcext:value-type="percentage">
            <text:p>24,37%</text:p>
          </table:table-cell>
          <table:table-cell table:style-name="ce48" office:value-type="percentage" office:value="0.2429" calcext:value-type="percentage">
            <text:p>24,29%</text:p>
          </table:table-cell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48" office:value-type="percentage" office:value="0.0495" calcext:value-type="percentage">
            <text:p>4,95%</text:p>
          </table:table-cell>
          <table:table-cell table:style-name="ce48" office:value-type="percentage" office:value="0.053" calcext:value-type="percentage">
            <text:p>5,30%</text:p>
          </table:table-cell>
          <table:table-cell table:style-name="ce48" office:value-type="percentage" office:value="0.0602" calcext:value-type="percentage">
            <text:p>6,02%</text:p>
          </table:table-cell>
          <table:table-cell table:style-name="ce48" office:value-type="percentage" office:value="0.0573" calcext:value-type="percentage">
            <text:p>5,73%</text:p>
          </table:table-cell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48" office:value-type="percentage" office:value="0.1182" calcext:value-type="percentage">
            <text:p>11,82%</text:p>
          </table:table-cell>
          <table:table-cell table:style-name="ce48" office:value-type="percentage" office:value="0.1424" calcext:value-type="percentage">
            <text:p>14,24%</text:p>
          </table:table-cell>
          <table:table-cell table:style-name="ce48" office:value-type="percentage" office:value="0.133" calcext:value-type="percentage">
            <text:p>13,30%</text:p>
          </table:table-cell>
          <table:table-cell table:style-name="ce48" office:value-type="percentage" office:value="0.1465" calcext:value-type="percentage">
            <text:p>14,65%</text:p>
          </table:table-cell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48" office:value-type="percentage" office:value="0.09" calcext:value-type="percentage">
            <text:p>9,00%</text:p>
          </table:table-cell>
          <table:table-cell table:style-name="ce48" office:value-type="percentage" office:value="0.144" calcext:value-type="percentage">
            <text:p>14,40%</text:p>
          </table:table-cell>
          <table:table-cell table:style-name="ce48" office:value-type="percentage" office:value="0.1063" calcext:value-type="percentage">
            <text:p>10,63%</text:p>
          </table:table-cell>
          <table:table-cell table:style-name="ce48" office:value-type="percentage" office:value="0.132" calcext:value-type="percentage">
            <text:p>13,20%</text:p>
          </table:table-cell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48" office:value-type="percentage" office:value="0.1008" calcext:value-type="percentage">
            <text:p>10,08%</text:p>
          </table:table-cell>
          <table:table-cell table:style-name="ce48" office:value-type="percentage" office:value="0.1064" calcext:value-type="percentage">
            <text:p>10,64%</text:p>
          </table:table-cell>
          <table:table-cell table:style-name="ce48" office:value-type="percentage" office:value="0.0812" calcext:value-type="percentage">
            <text:p>8,12%</text:p>
          </table:table-cell>
          <table:table-cell table:style-name="ce48" office:value-type="percentage" office:value="0.1016" calcext:value-type="percentage">
            <text:p>10,16%</text:p>
          </table:table-cell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48" office:value-type="percentage" office:value="0.0268" calcext:value-type="percentage">
            <text:p>2,68%</text:p>
          </table:table-cell>
          <table:table-cell table:style-name="ce48" office:value-type="percentage" office:value="0.0322" calcext:value-type="percentage">
            <text:p>3,22%</text:p>
          </table:table-cell>
          <table:table-cell table:style-name="ce48" office:value-type="percentage" office:value="0.029" calcext:value-type="percentage">
            <text:p>2,90%</text:p>
          </table:table-cell>
          <table:table-cell table:style-name="ce48" office:value-type="percentage" office:value="0.0356" calcext:value-type="percentage">
            <text:p>3,56%</text:p>
          </table:table-cell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48" office:value-type="percentage" office:value="0.039" calcext:value-type="percentage">
            <text:p>3,90%</text:p>
          </table:table-cell>
          <table:table-cell table:style-name="ce48" office:value-type="percentage" office:value="0.045" calcext:value-type="percentage">
            <text:p>4,50%</text:p>
          </table:table-cell>
          <table:table-cell table:style-name="ce48" office:value-type="percentage" office:value="0.041" calcext:value-type="percentage">
            <text:p>4,10%</text:p>
          </table:table-cell>
          <table:table-cell table:style-name="ce48" office:value-type="percentage" office:value="0.055" calcext:value-type="percentage">
            <text:p>5,50%</text:p>
          </table:table-cell>
        </table:table-row>
        <table:table-row table:style-name="ro5">
          <table:table-cell table:style-name="ce13"/>
          <table:table-cell table:style-name="ce17" table:formula="of:=AVERAGE([.B3:.B44])" office:value-type="percentage" office:value="0.26637619047619" calcext:value-type="percentage">
            <text:p>26,64%</text:p>
          </table:table-cell>
          <table:table-cell table:style-name="ce17" table:formula="of:=AVERAGE([.C3:.C44])" office:value-type="percentage" office:value="0.212054761904762" calcext:value-type="percentage">
            <text:p>21,21%</text:p>
          </table:table-cell>
          <table:table-cell table:style-name="ce17" table:formula="of:=AVERAGE([.D3:.D44])" office:value-type="percentage" office:value="0.218609523809524" calcext:value-type="percentage">
            <text:p>21,86%</text:p>
          </table:table-cell>
          <table:table-cell table:style-name="ce17" table:formula="of:=AVERAGE([.E3:.E44])" office:value-type="percentage" office:value="0.215940476190476" calcext:value-type="percentage">
            <text:p>21,59%</text:p>
          </table:table-cell>
          <table:table-cell table:style-name="ce17" table:formula="of:=AVERAGE([.F3:.F44])" office:value-type="percentage" office:value="0.218302380952381" calcext:value-type="percentage">
            <text:p>21,83%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table:style-name="ce38"/>
          <table:table-cell table:style-name="ce18" office:value-type="string" calcext:value-type="string">
            <text:p>GAIN:</text:p>
          </table:table-cell>
          <table:table-cell table:style-name="ce18" table:formula="of:=([.B45]-[.C45])/[.B45]" office:value-type="percentage" office:value="0.20392749244713" calcext:value-type="percentage">
            <text:p>20,39%</text:p>
          </table:table-cell>
          <table:table-cell table:style-name="ce18" table:formula="of:=([.B45]-[.D45])/[.B45]" office:value-type="percentage" office:value="0.179320331074921" calcext:value-type="percentage">
            <text:p>17,93%</text:p>
          </table:table-cell>
          <table:table-cell table:style-name="ce18" table:formula="of:=([.B45]-[.E45])/[.B45]" office:value-type="percentage" office:value="0.189340174118236" calcext:value-type="percentage">
            <text:p>18,93%</text:p>
          </table:table-cell>
          <table:table-cell table:style-name="ce18" table:formula="of:=([.B45]-[.F45])/[.B45]" office:value-type="percentage" office:value="0.180473372781065" calcext:value-type="percentage">
            <text:p>18,05%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table:number-columns-repeated="2"/>
          <table:table-cell table:style-name="ce38" table:number-columns-repeated="4"/>
        </table:table-row>
        <table:table-row table:style-name="ro1">
          <table:table-cell table:style-name="ce12"/>
          <table:table-cell table:style-name="ce19"/>
          <table:table-cell table:style-name="ce12" table:number-columns-repeated="4"/>
        </table:table-row>
        <table:table-row table:style-name="ro4" table:number-rows-repeated="24">
          <table:table-cell/>
          <table:table-cell table:style-name="ce20"/>
          <table:table-cell table:style-name="ce51" table:number-columns-repeated="4"/>
        </table:table-row>
        <table:table-row table:style-name="ro4">
          <table:table-cell/>
          <table:table-cell table:style-name="ce20"/>
          <table:table-cell table:number-columns-repeated="4"/>
        </table:table-row>
        <table:table-row table:style-name="ro5">
          <table:table-cell table:style-name="ce13"/>
          <table:table-cell table:style-name="ce21"/>
          <table:table-cell table:style-name="ce13" table:number-columns-repeated="4"/>
        </table:table-row>
        <table:table-row table:style-name="ro3">
          <table:table-cell table:style-name="ce38"/>
          <table:table-cell table:style-name="ce22"/>
          <table:table-cell table:style-name="ce18" table:number-columns-repeated="4"/>
        </table:table-row>
        <table:table-row table:style-name="ro4">
          <table:table-cell/>
          <table:table-cell table:style-name="ce20"/>
          <table:table-cell table:number-columns-repeated="4"/>
        </table:table-row>
        <table:table-row table:style-name="ro4" table:number-rows-repeated="104849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artic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072" calcext:value-type="percentage">
            <text:p>30,72%</text:p>
          </table:table-cell>
          <table:table-cell table:style-name="ce3" office:value-type="percentage" office:value="0.3188" calcext:value-type="percentage">
            <text:p>31,88%</text:p>
          </table:table-cell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number-columns-repeated="2" table:style-name="ce2" office:value-type="percentage" office:value="0.39" calcext:value-type="percentage">
            <text:p>39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1594" calcext:value-type="percentage">
            <text:p>15,94%</text:p>
          </table:table-cell>
          <table:table-cell table:style-name="ce3" office:value-type="percentage" office:value="0.1754" calcext:value-type="percentage">
            <text:p>17,54%</text:p>
          </table:table-cell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office:value-type="percentage" office:value="0.3377" calcext:value-type="percentage">
            <text:p>33,77%</text:p>
          </table:table-cell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number-columns-repeated="2"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2986" calcext:value-type="percentage">
            <text:p>29,86%</text:p>
          </table:table-cell>
          <table:table-cell table:style-name="ce3" office:value-type="percentage" office:value="0.2899" calcext:value-type="percentage">
            <text:p>28,99%</text:p>
          </table:table-cell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 office:value-type="percentage" office:value="0.2638" calcext:value-type="percentage">
            <text:p>26,38%</text:p>
          </table:table-cell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072" calcext:value-type="percentage">
            <text:p>20,72%</text:p>
          </table:table-cell>
          <table:table-cell table:style-name="ce3" office:value-type="percentage" office:value="0.2507" calcext:value-type="percentage">
            <text:p>25,07%</text:p>
          </table:table-cell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number-columns-repeated="2"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2986" calcext:value-type="percentage">
            <text:p>29,86%</text:p>
          </table:table-cell>
          <table:table-cell table:style-name="ce3" office:value-type="percentage" office:value="0.2696" calcext:value-type="percentage">
            <text:p>26,96%</text:p>
          </table:table-cell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667" calcext:value-type="percentage">
            <text:p>16,67%</text:p>
          </table:table-cell>
          <table:table-cell table:style-name="ce3" office:value-type="percentage" office:value="0.1551" calcext:value-type="percentage">
            <text:p>15,51%</text:p>
          </table:table-cell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 office:value-type="percentage" office:value="0.2116" calcext:value-type="percentage">
            <text:p>21,16%</text:p>
          </table:table-cell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1464" calcext:value-type="percentage">
            <text:p>14,64%</text:p>
          </table:table-cell>
          <table:table-cell table:style-name="ce2" office:value-type="percentage" office:value="0.2058" calcext:value-type="percentage">
            <text:p>20,58%</text:p>
          </table:table-cell>
        </table:table-row>
        <table:table-row table:style-name="ro1">
          <table:table-cell table:style-name="ce1"/>
          <table:table-cell table:style-name="ce1" table:formula="of:=AVERAGE([.B2:.B11])" office:value-type="percentage" office:value="0.214" calcext:value-type="percentage">
            <text:p>21,40%</text:p>
          </table:table-cell>
          <table:table-cell table:style-name="ce1" table:formula="of:=AVERAGE([.C2:.C11])" office:value-type="percentage" office:value="0.216" calcext:value-type="percentage">
            <text:p>21,6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3131" calcext:value-type="percentage">
            <text:p>23,13%</text:p>
          </table:table-cell>
          <table:table-cell table:style-name="ce1" table:formula="of:=AVERAGE([.G2:.G11])" office:value-type="percentage" office:value="0.24784" calcext:value-type="percentage">
            <text:p>24,78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number-columns-repeated="2" table:style-name="ce2" office:value-type="percentage" office:value="0.5241" calcext:value-type="percentage">
            <text:p>52,41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2" office:value-type="percentage" office:value="0.049" calcext:value-type="percentage">
            <text:p>4,90%</text:p>
          </table:table-cell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2" office:value-type="percentage" office:value="0.3931" calcext:value-type="percentage">
            <text:p>39,31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27" calcext:value-type="percentage">
            <text:p>2,70%</text:p>
          </table:table-cell>
          <table:table-cell table:style-name="ce2" office:value-type="percentage" office:value="0.029" calcext:value-type="percentage">
            <text:p>2,90%</text:p>
          </table:table-cell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3966" calcext:value-type="percentage">
            <text:p>39,66%</text:p>
          </table:table-cell>
          <table:table-cell table:style-name="ce2" office:value-type="percentage" office:value="0.3931" calcext:value-type="percentage">
            <text:p>39,31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 office:value-type="percentage" office:value="0.071" calcext:value-type="percentage">
            <text:p>7,10%</text:p>
          </table:table-cell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431" calcext:value-type="percentage">
            <text:p>43,10%</text:p>
          </table:table-cell>
          <table:table-cell table:style-name="ce2" office:value-type="percentage" office:value="0.4517" calcext:value-type="percentage">
            <text:p>45,17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68" calcext:value-type="percentage">
            <text:p>6,80%</text:p>
          </table:table-cell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531" calcext:value-type="percentage">
            <text:p>53,10%</text:p>
          </table:table-cell>
          <table:table-cell table:style-name="ce2" office:value-type="percentage" office:value="0.4655" calcext:value-type="percentage">
            <text:p>46,55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style-name="ce2" office:value-type="percentage" office:value="0.019" calcext:value-type="percentage">
            <text:p>1,90%</text:p>
          </table:table-cell>
          <table:table-cell table:style-name="ce2" office:value-type="percentage" office:value="0.025" calcext:value-type="percentage">
            <text:p>2,50%</text:p>
          </table:table-cell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31" calcext:value-type="percentage">
            <text:p>33,10%</text:p>
          </table:table-cell>
          <table:table-cell table:style-name="ce2" office:value-type="percentage" office:value="0.3241" calcext:value-type="percentage">
            <text:p>32,41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43" calcext:value-type="percentage">
            <text:p>4,30%</text:p>
          </table:table-cell>
          <table:table-cell table:style-name="ce2" office:value-type="percentage" office:value="0.037" calcext:value-type="percentage">
            <text:p>3,70%</text:p>
          </table:table-cell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2" office:value-type="percentage" office:value="0.4379" calcext:value-type="percentage">
            <text:p>43,79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52" calcext:value-type="percentage">
            <text:p>5,20%</text:p>
          </table:table-cell>
          <table:table-cell table:style-name="ce2" office:value-type="percentage" office:value="0.042" calcext:value-type="percentage">
            <text:p>4,20%</text:p>
          </table:table-cell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6034" calcext:value-type="percentage">
            <text:p>60,34%</text:p>
          </table:table-cell>
          <table:table-cell table:style-name="ce2" office:value-type="percentage" office:value="0.5897" calcext:value-type="percentage">
            <text:p>58,97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27" calcext:value-type="percentage">
            <text:p>2,70%</text:p>
          </table:table-cell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4517" calcext:value-type="percentage">
            <text:p>45,17%</text:p>
          </table:table-cell>
          <table:table-cell table:style-name="ce2" office:value-type="percentage" office:value="0.4966" calcext:value-type="percentage">
            <text:p>49,66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27" calcext:value-type="percentage">
            <text:p>2,70%</text:p>
          </table:table-cell>
          <table:table-cell table:style-name="ce2" office:value-type="percentage" office:value="0.031" calcext:value-type="percentage">
            <text:p>3,10%</text:p>
          </table:table-cell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4621" calcext:value-type="percentage">
            <text:p>46,21%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79" calcext:value-type="percentage">
            <text:p>7,90%</text:p>
          </table:table-cell>
          <table:table-cell table:style-name="ce2" office:value-type="percentage" office:value="0.073" calcext:value-type="percentage">
            <text:p>7,30%</text:p>
          </table:table-cell>
        </table:table-row>
        <table:table-row table:style-name="ro1">
          <table:table-cell table:style-name="ce1"/>
          <table:table-cell table:style-name="ce1" table:formula="of:=AVERAGE([.B14:.B23])" office:value-type="percentage" office:value="0.45723" calcext:value-type="percentage">
            <text:p>45,72%</text:p>
          </table:table-cell>
          <table:table-cell table:style-name="ce1" table:formula="of:=AVERAGE([.C14:.C23])" office:value-type="percentage" office:value="0.45792" calcext:value-type="percentage">
            <text:p>45,79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56" calcext:value-type="percentage">
            <text:p>4,56%</text:p>
          </table:table-cell>
          <table:table-cell table:style-name="ce1" table:formula="of:=AVERAGE([.G14:.G23])" office:value-type="percentage" office:value="0.0452" calcext:value-type="percentage">
            <text:p>4,52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2" office:value-type="percentage" office:value="0.0429" calcext:value-type="percentage">
            <text:p>4,29%</text:p>
          </table:table-cell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1143" calcext:value-type="percentage">
            <text:p>11,43%</text:p>
          </table:table-cell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771" calcext:value-type="percentage">
            <text:p>7,71%</text:p>
          </table:table-cell>
          <table:table-cell table:style-name="ce2" office:value-type="percentage" office:value="0.1171" calcext:value-type="percentage">
            <text:p>11,71%</text:p>
          </table:table-cell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743" calcext:value-type="percentage">
            <text:p>7,43%</text:p>
          </table:table-cell>
          <table:table-cell table:style-name="ce2" office:value-type="percentage" office:value="0.0457" calcext:value-type="percentage">
            <text:p>4,57%</text:p>
          </table:table-cell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429" calcext:value-type="percentage">
            <text:p>14,29%</text:p>
          </table:table-cell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114" calcext:value-type="percentage">
            <text:p>11,14%</text:p>
          </table:table-cell>
          <table:table-cell table:style-name="ce2" office:value-type="percentage" office:value="0.0943" calcext:value-type="percentage">
            <text:p>9,43%</text:p>
          </table:table-cell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543" calcext:value-type="percentage">
            <text:p>15,43%</text:p>
          </table:table-cell>
          <table:table-cell table:style-name="ce2" office:value-type="percentage" office:value="0.1257" calcext:value-type="percentage">
            <text:p>12,57%</text:p>
          </table:table-cell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34" calcext:value-type="percentage">
            <text:p>34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0971" calcext:value-type="percentage">
            <text:p>9,71%</text:p>
          </table:table-cell>
          <table:table-cell table:style-name="ce2" office:value-type="percentage" office:value="0.1229" calcext:value-type="percentage">
            <text:p>12,29%</text:p>
          </table:table-cell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71" calcext:value-type="percentage">
            <text:p>7,71%</text:p>
          </table:table-cell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1086" calcext:value-type="percentage">
            <text:p>10,86%</text:p>
          </table:table-cell>
        </table:table-row>
        <table:table-row table:style-name="ro1">
          <table:table-cell table:style-name="ce1"/>
          <table:table-cell table:style-name="ce1" table:formula="of:=AVERAGE([.B27:.B36])" office:value-type="percentage" office:value="0.265" calcext:value-type="percentage">
            <text:p>26,50%</text:p>
          </table:table-cell>
          <table:table-cell table:style-name="ce1" table:formula="of:=AVERAGE([.C27:.C36])" office:value-type="percentage" office:value="0.276" calcext:value-type="percentage">
            <text:p>27,6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10028" calcext:value-type="percentage">
            <text:p>10,03%</text:p>
          </table:table-cell>
          <table:table-cell table:style-name="ce1" table:formula="of:=AVERAGE([.G27:.G36])" office:value-type="percentage" office:value="0.09915" calcext:value-type="percentage">
            <text:p>9,92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452" calcext:value-type="percentage">
            <text:p>4,52%</text:p>
          </table:table-cell>
          <table:table-cell table:style-name="ce2" office:value-type="percentage" office:value="0.0484" calcext:value-type="percentage">
            <text:p>4,84%</text:p>
          </table:table-cell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2" office:value-type="percentage" office:value="0.3939" calcext:value-type="percentage">
            <text:p>39,39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145" calcext:value-type="percentage">
            <text:p>11,45%</text:p>
          </table:table-cell>
          <table:table-cell table:style-name="ce2" office:value-type="percentage" office:value="0.0984" calcext:value-type="percentage">
            <text:p>9,84%</text:p>
          </table:table-cell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4515" calcext:value-type="percentage">
            <text:p>45,15%</text:p>
          </table:table-cell>
          <table:table-cell table:style-name="ce2" office:value-type="percentage" office:value="0.4636" calcext:value-type="percentage">
            <text:p>46,36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style-name="ce2" office:value-type="percentage" office:value="0.1081" calcext:value-type="percentage">
            <text:p>10,81%</text:p>
          </table:table-cell>
          <table:table-cell table:style-name="ce2" office:value-type="percentage" office:value="0.1048" calcext:value-type="percentage">
            <text:p>10,48%</text:p>
          </table:table-cell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333" calcext:value-type="percentage">
            <text:p>43,33%</text:p>
          </table:table-cell>
          <table:table-cell table:style-name="ce2" office:value-type="percentage" office:value="0.4909" calcext:value-type="percentage">
            <text:p>49,09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94" calcext:value-type="percentage">
            <text:p>6,94%</text:p>
          </table:table-cell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4636" calcext:value-type="percentage">
            <text:p>46,36%</text:p>
          </table:table-cell>
          <table:table-cell table:style-name="ce2" office:value-type="percentage" office:value="0.5212" calcext:value-type="percentage">
            <text:p>52,12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726" calcext:value-type="percentage">
            <text:p>7,26%</text:p>
          </table:table-cell>
          <table:table-cell table:style-name="ce2" office:value-type="percentage" office:value="0.0677" calcext:value-type="percentage">
            <text:p>6,77%</text:p>
          </table:table-cell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403" calcext:value-type="percentage">
            <text:p>4,03%</text:p>
          </table:table-cell>
          <table:table-cell table:style-name="ce2" office:value-type="percentage" office:value="0.0468" calcext:value-type="percentage">
            <text:p>4,68%</text:p>
          </table:table-cell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879" calcext:value-type="percentage">
            <text:p>58,79%</text:p>
          </table:table-cell>
          <table:table-cell table:style-name="ce2" office:value-type="percentage" office:value="0.6121" calcext:value-type="percentage">
            <text:p>61,21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968" calcext:value-type="percentage">
            <text:p>9,68%</text:p>
          </table:table-cell>
          <table:table-cell table:style-name="ce2" office:value-type="percentage" office:value="0.0774" calcext:value-type="percentage">
            <text:p>7,74%</text:p>
          </table:table-cell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4848" calcext:value-type="percentage">
            <text:p>48,48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13" calcext:value-type="percentage">
            <text:p>6,13%</text:p>
          </table:table-cell>
          <table:table-cell table:style-name="ce2" office:value-type="percentage" office:value="0.0565" calcext:value-type="percentage">
            <text:p>5,65%</text:p>
          </table:table-cell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5152" calcext:value-type="percentage">
            <text:p>51,52%</text:p>
          </table:table-cell>
          <table:table-cell table:style-name="ce2" office:value-type="percentage" office:value="0.5091" calcext:value-type="percentage">
            <text:p>50,91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number-columns-repeated="2" table:style-name="ce2" office:value-type="percentage" office:value="0.079" calcext:value-type="percentage">
            <text:p>7,90%</text:p>
          </table:table-cell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818" calcext:value-type="percentage">
            <text:p>58,18%</text:p>
          </table:table-cell>
          <table:table-cell table:style-name="ce2" office:value-type="percentage" office:value="0.4818" calcext:value-type="percentage">
            <text:p>48,18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516" calcext:value-type="percentage">
            <text:p>5,16%</text:p>
          </table:table-cell>
          <table:table-cell table:style-name="ce2" office:value-type="percentage" office:value="0.1" calcext:value-type="percentage">
            <text:p>10,00%</text:p>
          </table:table-cell>
        </table:table-row>
        <table:table-row table:style-name="ro1">
          <table:table-cell table:style-name="ce1"/>
          <table:table-cell table:style-name="ce1" table:formula="of:=AVERAGE([.B40:.B49])" office:value-type="percentage" office:value="0.50757" calcext:value-type="percentage">
            <text:p>50,76%</text:p>
          </table:table-cell>
          <table:table-cell table:style-name="ce1" table:formula="of:=AVERAGE([.C40:.C49])" office:value-type="percentage" office:value="0.49272" calcext:value-type="percentage">
            <text:p>49,27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355" calcext:value-type="percentage">
            <text:p>7,36%</text:p>
          </table:table-cell>
          <table:table-cell table:style-name="ce1" table:formula="of:=AVERAGE([.G40:.G49])" office:value-type="percentage" office:value="0.07484" calcext:value-type="percentage">
            <text:p>7,48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714" calcext:value-type="percentage">
            <text:p>47,14%</text:p>
          </table:table-cell>
          <table:table-cell table:style-name="ce2" office:value-type="percentage" office:value="0.5524" calcext:value-type="percentage">
            <text:p>55,24%</text:p>
          </table:table-cell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6" calcext:value-type="percentage">
            <text:p>46,00%</text:p>
          </table:table-cell>
          <table:table-cell table:style-name="ce2" office:value-type="percentage" office:value="0.4333" calcext:value-type="percentage">
            <text:p>43,33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905" calcext:value-type="percentage">
            <text:p>69,05%</text:p>
          </table:table-cell>
          <table:table-cell table:style-name="ce2" office:value-type="percentage" office:value="0.6476" calcext:value-type="percentage">
            <text:p>64,76%</text:p>
          </table:table-cell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6476" calcext:value-type="percentage">
            <text:p>64,76%</text:p>
          </table:table-cell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5571" calcext:value-type="percentage">
            <text:p>55,71%</text:p>
          </table:table-cell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2" office:value-type="percentage" office:value="0.3733" calcext:value-type="percentage">
            <text:p>37,33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681" calcext:value-type="percentage">
            <text:p>68,10%</text:p>
          </table:table-cell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267" calcext:value-type="percentage">
            <text:p>32,67%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429" calcext:value-type="percentage">
            <text:p>54,29%</text:p>
          </table:table-cell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33" calcext:value-type="percentage">
            <text:p>24,33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4952" calcext:value-type="percentage">
            <text:p>49,52%</text:p>
          </table:table-cell>
          <table:table-cell table:style-name="ce2" office:value-type="percentage" office:value="0.6238" calcext:value-type="percentage">
            <text:p>62,38%</text:p>
          </table:table-cell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867" calcext:value-type="percentage">
            <text:p>28,67%</text:p>
          </table:table-cell>
          <table:table-cell table:style-name="ce2" office:value-type="percentage" office:value="0.3333" calcext:value-type="percentage">
            <text:p>33,33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3857" calcext:value-type="percentage">
            <text:p>38,57%</text:p>
          </table:table-cell>
          <table:table-cell table:style-name="ce2" office:value-type="percentage" office:value="0.3429" calcext:value-type="percentage">
            <text:p>34,29%</text:p>
          </table:table-cell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233" calcext:value-type="percentage">
            <text:p>32,33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4095" calcext:value-type="percentage">
            <text:p>40,95%</text:p>
          </table:table-cell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381" calcext:value-type="percentage">
            <text:p>53,81%</text:p>
          </table:table-cell>
          <table:table-cell table:style-name="ce2" office:value-type="percentage" office:value="0.619" calcext:value-type="percentage">
            <text:p>61,90%</text:p>
          </table:table-cell>
        </table:table-row>
        <table:table-row table:style-name="ro1">
          <table:table-cell table:style-name="ce1"/>
          <table:table-cell table:style-name="ce1" table:formula="of:=AVERAGE([.B53:.B62])" office:value-type="percentage" office:value="0.28967" calcext:value-type="percentage">
            <text:p>28,97%</text:p>
          </table:table-cell>
          <table:table-cell table:style-name="ce1" table:formula="of:=AVERAGE([.C53:.C62])" office:value-type="percentage" office:value="0.29365" calcext:value-type="percentage">
            <text:p>29,37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0571" calcext:value-type="percentage">
            <text:p>50,57%</text:p>
          </table:table-cell>
          <table:table-cell table:style-name="ce1" table:formula="of:=AVERAGE([.G53:.G62])" office:value-type="percentage" office:value="0.56238" calcext:value-type="percentage">
            <text:p>56,24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3846" calcext:value-type="percentage">
            <text:p>38,46%</text:p>
          </table:table-cell>
          <table:table-cell table:style-name="ce2" office:value-type="percentage" office:value="0.3231" calcext:value-type="percentage">
            <text:p>32,31%</text:p>
          </table:table-cell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1222" calcext:value-type="percentage">
            <text:p>12,22%</text:p>
          </table:table-cell>
          <table:table-cell table:style-name="ce2" office:value-type="percentage" office:value="0.1111" calcext:value-type="percentage">
            <text:p>11,11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3846" calcext:value-type="percentage">
            <text:p>38,46%</text:p>
          </table:table-cell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846" calcext:value-type="percentage">
            <text:p>48,46%</text:p>
          </table:table-cell>
          <table:table-cell table:style-name="ce2" office:value-type="percentage" office:value="0.4231" calcext:value-type="percentage">
            <text:p>42,31%</text:p>
          </table:table-cell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1259" calcext:value-type="percentage">
            <text:p>12,59%</text:p>
          </table:table-cell>
          <table:table-cell table:style-name="ce2" office:value-type="percentage" office:value="0.1148" calcext:value-type="percentage">
            <text:p>11,48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3154" calcext:value-type="percentage">
            <text:p>31,54%</text:p>
          </table:table-cell>
          <table:table-cell table:style-name="ce2" office:value-type="percentage" office:value="0.3077" calcext:value-type="percentage">
            <text:p>30,77%</text:p>
          </table:table-cell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4077" calcext:value-type="percentage">
            <text:p>40,77%</text:p>
          </table:table-cell>
          <table:table-cell table:style-name="ce2" office:value-type="percentage" office:value="0.4692" calcext:value-type="percentage">
            <text:p>46,92%</text:p>
          </table:table-cell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2222" calcext:value-type="percentage">
            <text:p>22,22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462" calcext:value-type="percentage">
            <text:p>44,62%</text:p>
          </table:table-cell>
          <table:table-cell table:style-name="ce2" office:value-type="percentage" office:value="0.3692" calcext:value-type="percentage">
            <text:p>36,92%</text:p>
          </table:table-cell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2" office:value-type="percentage" office:value="0.2852" calcext:value-type="percentage">
            <text:p>28,52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3077" calcext:value-type="percentage">
            <text:p>30,77%</text:p>
          </table:table-cell>
          <table:table-cell table:style-name="ce2" office:value-type="percentage" office:value="0.2692" calcext:value-type="percentage">
            <text:p>26,92%</text:p>
          </table:table-cell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3077" calcext:value-type="percentage">
            <text:p>30,77%</text:p>
          </table:table-cell>
          <table:table-cell table:style-name="ce2" office:value-type="percentage" office:value="0.4154" calcext:value-type="percentage">
            <text:p>41,54%</text:p>
          </table:table-cell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3231" calcext:value-type="percentage">
            <text:p>32,31%</text:p>
          </table:table-cell>
          <table:table-cell table:style-name="ce2" office:value-type="percentage" office:value="0.3077" calcext:value-type="percentage">
            <text:p>30,77%</text:p>
          </table:table-cell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137" calcext:value-type="percentage">
            <text:p>13,70%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692" calcext:value-type="percentage">
            <text:p>46,92%</text:p>
          </table:table-cell>
          <table:table-cell table:style-name="ce2" office:value-type="percentage" office:value="0.3538" calcext:value-type="percentage">
            <text:p>35,38%</text:p>
          </table:table-cell>
        </table:table-row>
        <table:table-row table:style-name="ro1">
          <table:table-cell table:style-name="ce1"/>
          <table:table-cell table:style-name="ce1" table:formula="of:=AVERAGE([.B66:.B75])" office:value-type="percentage" office:value="0.17777" calcext:value-type="percentage">
            <text:p>17,78%</text:p>
          </table:table-cell>
          <table:table-cell table:style-name="ce1" table:formula="of:=AVERAGE([.C66:.C75])" office:value-type="percentage" office:value="0.19887" calcext:value-type="percentage">
            <text:p>19,89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7693" calcext:value-type="percentage">
            <text:p>37,69%</text:p>
          </table:table-cell>
          <table:table-cell table:style-name="ce1" table:formula="of:=AVERAGE([.G66:.G75])" office:value-type="percentage" office:value="0.3623" calcext:value-type="percentage">
            <text:p>36,23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2533" calcext:value-type="percentage">
            <text:p>25,33%</text:p>
          </table:table-cell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7" calcext:value-type="percentage">
            <text:p>4,67%</text:p>
          </table:table-cell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567" calcext:value-type="percentage">
            <text:p>25,67%</text:p>
          </table:table-cell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8" calcext:value-type="percentage">
            <text:p>18,00%</text:p>
          </table:table-cell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number-columns-repeated="2" table:style-name="ce2" office:value-type="percentage" office:value="0.13" calcext:value-type="percentage">
            <text:p>13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number-columns-repeated="2" table:style-name="ce2" office:value-type="percentage" office:value="0.2867" calcext:value-type="percentage">
            <text:p>28,67%</text:p>
          </table:table-cell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1533" calcext:value-type="percentage">
            <text:p>15,33%</text:p>
          </table:table-cell>
          <table:table-cell table:style-name="ce2" office:value-type="percentage" office:value="0.1667" calcext:value-type="percentage">
            <text:p>16,67%</text:p>
          </table:table-cell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767" calcext:value-type="percentage">
            <text:p>27,67%</text:p>
          </table:table-cell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7" calcext:value-type="percentage">
            <text:p>17,00%</text:p>
          </table:table-cell>
        </table:table-row>
        <table:table-row table:style-name="ro1">
          <table:table-cell table:style-name="ce1"/>
          <table:table-cell table:style-name="ce1" table:formula="of:=AVERAGE([.B79:.B88])" office:value-type="percentage" office:value="0.043" calcext:value-type="percentage">
            <text:p>4,30%</text:p>
          </table:table-cell>
          <table:table-cell table:style-name="ce1" table:formula="of:=AVERAGE([.C79:.C88])" office:value-type="percentage" office:value="0.039" calcext:value-type="percentage">
            <text:p>3,9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19333" calcext:value-type="percentage">
            <text:p>19,33%</text:p>
          </table:table-cell>
          <table:table-cell table:style-name="ce1" table:formula="of:=AVERAGE([.G79:.G88])" office:value-type="percentage" office:value="0.19468" calcext:value-type="percentage">
            <text:p>19,47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304" calcext:value-type="percentage">
            <text:p>3,04%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629" calcext:value-type="percentage">
            <text:p>16,29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1174" calcext:value-type="percentage">
            <text:p>11,74%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 office:value-type="percentage" office:value="0.12" calcext:value-type="percentage">
            <text:p>12,00%</text:p>
          </table:table-cell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686" calcext:value-type="percentage">
            <text:p>16,86%</text:p>
          </table:table-cell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714" calcext:value-type="percentage">
            <text:p>17,14%</text:p>
          </table:table-cell>
          <table:table-cell table:style-name="ce2" office:value-type="percentage" office:value="0.1914" calcext:value-type="percentage">
            <text:p>19,14%</text:p>
          </table:table-cell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913" calcext:value-type="percentage">
            <text:p>9,13%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4" calcext:value-type="percentage">
            <text:p>14,00%</text:p>
          </table:table-cell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743" calcext:value-type="percentage">
            <text:p>17,43%</text:p>
          </table:table-cell>
          <table:table-cell table:style-name="ce2" office:value-type="percentage" office:value="0.1543" calcext:value-type="percentage">
            <text:p>15,43%</text:p>
          </table:table-cell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514" calcext:value-type="percentage">
            <text:p>15,14%</text:p>
          </table:table-cell>
          <table:table-cell table:style-name="ce2" office:value-type="percentage" office:value="0.1829" calcext:value-type="percentage">
            <text:p>18,29%</text:p>
          </table:table-cell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0686" calcext:value-type="percentage">
            <text:p>6,86%</text:p>
          </table:table-cell>
          <table:table-cell table:style-name="ce2" office:value-type="percentage" office:value="0.1029" calcext:value-type="percentage">
            <text:p>10,29%</text:p>
          </table:table-cell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435" calcext:value-type="percentage">
            <text:p>4,35%</text:p>
          </table:table-cell>
          <table:table-cell table:style-name="ce2" office:value-type="percentage" office:value="0.0391" calcext:value-type="percentage">
            <text:p>3,91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743" calcext:value-type="percentage">
            <text:p>17,43%</text:p>
          </table:table-cell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8" calcext:value-type="percentage">
            <text:p>18,00%</text:p>
          </table:table-cell>
        </table:table-row>
        <table:table-row table:style-name="ro1">
          <table:table-cell table:style-name="ce1"/>
          <table:table-cell table:style-name="ce1" table:formula="of:=AVERAGE([.B93:.B102])" office:value-type="percentage" office:value="0.07304" calcext:value-type="percentage">
            <text:p>7,30%</text:p>
          </table:table-cell>
          <table:table-cell table:style-name="ce1" table:formula="of:=AVERAGE([.C93:.C102])" office:value-type="percentage" office:value="0.06696" calcext:value-type="percentage">
            <text:p>6,70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3942" calcext:value-type="percentage">
            <text:p>13,94%</text:p>
          </table:table-cell>
          <table:table-cell table:style-name="ce1" table:formula="of:=AVERAGE([.G93:.G102])" office:value-type="percentage" office:value="0.157155555555556" calcext:value-type="percentage">
            <text:p>15,72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157" calcext:value-type="percentage">
            <text:p>21,57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794" calcext:value-type="percentage">
            <text:p>27,94%</text:p>
          </table:table-cell>
          <table:table-cell table:style-name="ce2" office:value-type="percentage" office:value="0.2706" calcext:value-type="percentage">
            <text:p>27,06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639" calcext:value-type="percentage">
            <text:p>16,39%</text:p>
          </table:table-cell>
          <table:table-cell table:style-name="ce2" office:value-type="percentage" office:value="0.1614" calcext:value-type="percentage">
            <text:p>16,14%</text:p>
          </table:table-cell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1964" calcext:value-type="percentage">
            <text:p>19,64%</text:p>
          </table:table-cell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324" calcext:value-type="percentage">
            <text:p>43,24%</text:p>
          </table:table-cell>
          <table:table-cell table:style-name="ce2" office:value-type="percentage" office:value="0.4265" calcext:value-type="percentage">
            <text:p>42,65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1952" calcext:value-type="percentage">
            <text:p>19,52%</text:p>
          </table:table-cell>
          <table:table-cell table:style-name="ce2" office:value-type="percentage" office:value="0.2048" calcext:value-type="percentage">
            <text:p>20,48%</text:p>
          </table:table-cell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147" calcext:value-type="percentage">
            <text:p>31,47%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1325" calcext:value-type="percentage">
            <text:p>13,25%</text:p>
          </table:table-cell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412" calcext:value-type="percentage">
            <text:p>24,12%</text:p>
          </table:table-cell>
          <table:table-cell table:style-name="ce2" office:value-type="percentage" office:value="0.2588" calcext:value-type="percentage">
            <text:p>25,88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77" calcext:value-type="percentage">
            <text:p>16,77%</text:p>
          </table:table-cell>
          <table:table-cell table:style-name="ce2" office:value-type="percentage" office:value="0.1578" calcext:value-type="percentage">
            <text:p>15,78%</text:p>
          </table:table-cell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471" calcext:value-type="percentage">
            <text:p>34,71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904" calcext:value-type="percentage">
            <text:p>19,04%</text:p>
          </table:table-cell>
          <table:table-cell table:style-name="ce2" office:value-type="percentage" office:value="0.1759" calcext:value-type="percentage">
            <text:p>17,59%</text:p>
          </table:table-cell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441" calcext:value-type="percentage">
            <text:p>34,41%</text:p>
          </table:table-cell>
          <table:table-cell table:style-name="ce2" office:value-type="percentage" office:value="0.2676" calcext:value-type="percentage">
            <text:p>26,7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87" calcext:value-type="percentage">
            <text:p>16,87%</text:p>
          </table:table-cell>
          <table:table-cell table:style-name="ce2" office:value-type="percentage" office:value="0.1639" calcext:value-type="percentage">
            <text:p>16,39%</text:p>
          </table:table-cell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4059" calcext:value-type="percentage">
            <text:p>40,59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1843" calcext:value-type="percentage">
            <text:p>18,43%</text:p>
          </table:table-cell>
          <table:table-cell table:style-name="ce2" office:value-type="percentage" office:value="0.1759" calcext:value-type="percentage">
            <text:p>17,59%</text:p>
          </table:table-cell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118" calcext:value-type="percentage">
            <text:p>31,18%</text:p>
          </table:table-cell>
          <table:table-cell table:style-name="ce2" office:value-type="percentage" office:value="0.3324" calcext:value-type="percentage">
            <text:p>33,24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157" calcext:value-type="percentage">
            <text:p>11,57%</text:p>
          </table:table-cell>
          <table:table-cell table:style-name="ce2" office:value-type="percentage" office:value="0.1349" calcext:value-type="percentage">
            <text:p>13,49%</text:p>
          </table:table-cell>
        </table:table-row>
        <table:table-row table:style-name="ro1">
          <table:table-cell table:style-name="ce1"/>
          <table:table-cell table:style-name="ce1" table:formula="of:=AVERAGE([.B106:.B115])" office:value-type="percentage" office:value="0.32471" calcext:value-type="percentage">
            <text:p>32,47%</text:p>
          </table:table-cell>
          <table:table-cell table:style-name="ce1" table:formula="of:=AVERAGE([.C106:.C115])" office:value-type="percentage" office:value="0.32471" calcext:value-type="percentage">
            <text:p>32,47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257" calcext:value-type="percentage">
            <text:p>17,26%</text:p>
          </table:table-cell>
          <table:table-cell table:style-name="ce1" table:formula="of:=AVERAGE([.G106:.G115])" office:value-type="percentage" office:value="0.167455555555556" calcext:value-type="percentage">
            <text:p>16,75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2158" calcext:value-type="percentage">
            <text:p>21,58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2" office:value-type="percentage" office:value="0.2395" calcext:value-type="percentage">
            <text:p>23,95%</text:p>
          </table:table-cell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2" office:value-type="percentage" office:value="0.1579" calcext:value-type="percentage">
            <text:p>15,79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75" calcext:value-type="percentage">
            <text:p>27,50%</text:p>
          </table:table-cell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2632" calcext:value-type="percentage">
            <text:p>26,32%</text:p>
          </table:table-cell>
          <table:table-cell table:style-name="ce2" office:value-type="percentage" office:value="0.2368" calcext:value-type="percentage">
            <text:p>23,68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605" calcext:value-type="percentage">
            <text:p>26,05%</text:p>
          </table:table-cell>
          <table:table-cell table:style-name="ce2" office:value-type="percentage" office:value="0.2763" calcext:value-type="percentage">
            <text:p>27,63%</text:p>
          </table:table-cell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776" calcext:value-type="percentage">
            <text:p>27,76%</text:p>
          </table:table-cell>
          <table:table-cell table:style-name="ce2" office:value-type="percentage" office:value="0.2605" calcext:value-type="percentage">
            <text:p>26,05%</text:p>
          </table:table-cell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2" office:value-type="percentage" office:value="0.1789" calcext:value-type="percentage">
            <text:p>17,89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2105" calcext:value-type="percentage">
            <text:p>21,05%</text:p>
          </table:table-cell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513" calcext:value-type="percentage">
            <text:p>25,13%</text:p>
          </table:table-cell>
          <table:table-cell table:style-name="ce2" office:value-type="percentage" office:value="0.2342" calcext:value-type="percentage">
            <text:p>23,42%</text:p>
          </table:table-cell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947" calcext:value-type="percentage">
            <text:p>9,47%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395" calcext:value-type="percentage">
            <text:p>23,95%</text:p>
          </table:table-cell>
          <table:table-cell table:style-name="ce2" office:value-type="percentage" office:value="0.2579" calcext:value-type="percentage">
            <text:p>25,79%</text:p>
          </table:table-cell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number-columns-repeated="2" table:style-name="ce2" office:value-type="percentage" office:value="0.1368" calcext:value-type="percentage">
            <text:p>13,68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408" calcext:value-type="percentage">
            <text:p>34,08%</text:p>
          </table:table-cell>
          <table:table-cell table:style-name="ce2" office:value-type="percentage" office:value="0.2921" calcext:value-type="percentage">
            <text:p>29,21%</text:p>
          </table:table-cell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526" calcext:value-type="percentage">
            <text:p>15,26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461" calcext:value-type="percentage">
            <text:p>34,61%</text:p>
          </table:table-cell>
          <table:table-cell table:style-name="ce2" office:value-type="percentage" office:value="0.3197" calcext:value-type="percentage">
            <text:p>31,97%</text:p>
          </table:table-cell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2974" calcext:value-type="percentage">
            <text:p>29,74%</text:p>
          </table:table-cell>
          <table:table-cell table:style-name="ce2" office:value-type="percentage" office:value="0.2961" calcext:value-type="percentage">
            <text:p>29,61%</text:p>
          </table:table-cell>
        </table:table-row>
        <table:table-row table:style-name="ro1">
          <table:table-cell table:style-name="ce1"/>
          <table:table-cell table:style-name="ce1" table:formula="of:=AVERAGE([.B119:.B128])" office:value-type="percentage" office:value="0.15051" calcext:value-type="percentage">
            <text:p>15,05%</text:p>
          </table:table-cell>
          <table:table-cell table:style-name="ce1" table:formula="of:=AVERAGE([.C119:.C128])" office:value-type="percentage" office:value="0.16261" calcext:value-type="percentage">
            <text:p>16,26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704" calcext:value-type="percentage">
            <text:p>27,04%</text:p>
          </table:table-cell>
          <table:table-cell table:style-name="ce1" table:formula="of:=AVERAGE([.G119:.G128])" office:value-type="percentage" office:value="0.26618" calcext:value-type="percentage">
            <text:p>26,62%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677" calcext:value-type="percentage">
            <text:p>26,77%</text:p>
          </table:table-cell>
          <table:table-cell table:style-name="ce2" office:value-type="percentage" office:value="0.2065" calcext:value-type="percentage">
            <text:p>20,65%</text:p>
          </table:table-cell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 office:value-type="percentage" office:value="0.1037" calcext:value-type="percentage">
            <text:p>10,37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677" calcext:value-type="percentage">
            <text:p>26,77%</text:p>
          </table:table-cell>
          <table:table-cell table:style-name="ce2" office:value-type="percentage" office:value="0.2403" calcext:value-type="percentage">
            <text:p>24,03%</text:p>
          </table:table-cell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444" calcext:value-type="percentage">
            <text:p>4,44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258" calcext:value-type="percentage">
            <text:p>22,58%</text:p>
          </table:table-cell>
          <table:table-cell table:style-name="ce2" office:value-type="percentage" office:value="0.3194" calcext:value-type="percentage">
            <text:p>31,94%</text:p>
          </table:table-cell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 office:value-type="percentage" office:value="0.0648" calcext:value-type="percentage">
            <text:p>6,48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2823" calcext:value-type="percentage">
            <text:p>28,23%</text:p>
          </table:table-cell>
          <table:table-cell table:style-name="ce2" office:value-type="percentage" office:value="0.3435" calcext:value-type="percentage">
            <text:p>34,35%</text:p>
          </table:table-cell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style-name="ce2" office:value-type="percentage" office:value="0.0574" calcext:value-type="percentage">
            <text:p>5,74%</text:p>
          </table:table-cell>
          <table:table-cell table:style-name="ce2" office:value-type="percentage" office:value="0.0796" calcext:value-type="percentage">
            <text:p>7,96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2" office:value-type="percentage" office:value="0.3113" calcext:value-type="percentage">
            <text:p>31,13%</text:p>
          </table:table-cell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833" calcext:value-type="percentage">
            <text:p>8,33%</text:p>
          </table:table-cell>
          <table:table-cell table:style-name="ce2" office:value-type="percentage" office:value="0.0704" calcext:value-type="percentage">
            <text:p>7,04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484" calcext:value-type="percentage">
            <text:p>34,84%</text:p>
          </table:table-cell>
          <table:table-cell table:style-name="ce2" office:value-type="percentage" office:value="0.3516" calcext:value-type="percentage">
            <text:p>35,16%</text:p>
          </table:table-cell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629" calcext:value-type="percentage">
            <text:p>26,29%</text:p>
          </table:table-cell>
          <table:table-cell table:style-name="ce2" office:value-type="percentage" office:value="0.279" calcext:value-type="percentage">
            <text:p>27,90%</text:p>
          </table:table-cell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2532" calcext:value-type="percentage">
            <text:p>25,32%</text:p>
          </table:table-cell>
          <table:table-cell table:style-name="ce2" office:value-type="percentage" office:value="0.2774" calcext:value-type="percentage">
            <text:p>27,74%</text:p>
          </table:table-cell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 office:value-type="percentage" office:value="0.0389" calcext:value-type="percentage">
            <text:p>3,89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468" calcext:value-type="percentage">
            <text:p>24,68%</text:p>
          </table:table-cell>
          <table:table-cell table:style-name="ce2" office:value-type="percentage" office:value="0.2677" calcext:value-type="percentage">
            <text:p>26,77%</text:p>
          </table:table-cell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89" calcext:value-type="percentage">
            <text:p>8,89%</text:p>
          </table:table-cell>
          <table:table-cell table:style-name="ce2" office:value-type="percentage" office:value="0.0963" calcext:value-type="percentage">
            <text:p>9,63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306" calcext:value-type="percentage">
            <text:p>33,06%</text:p>
          </table:table-cell>
          <table:table-cell table:style-name="ce2" office:value-type="percentage" office:value="0.321" calcext:value-type="percentage">
            <text:p>32,10%</text:p>
          </table:table-cell>
        </table:table-row>
        <table:table-row table:style-name="ro1">
          <table:table-cell table:style-name="ce1"/>
          <table:table-cell table:style-name="ce1" table:formula="of:=AVERAGE([.B133:.B142])" office:value-type="percentage" office:value="0.06815" calcext:value-type="percentage">
            <text:p>6,82%</text:p>
          </table:table-cell>
          <table:table-cell table:style-name="ce1" table:formula="of:=AVERAGE([.C133:.C142])" office:value-type="percentage" office:value="0.07037" calcext:value-type="percentage">
            <text:p>7,04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27789" calcext:value-type="percentage">
            <text:p>27,79%</text:p>
          </table:table-cell>
          <table:table-cell table:style-name="ce1" table:formula="of:=AVERAGE([.G133:.G142])" office:value-type="percentage" office:value="0.29177" calcext:value-type="percentage">
            <text:p>29,18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891" calcext:value-type="percentage">
            <text:p>28,91%</text:p>
          </table:table-cell>
          <table:table-cell table:style-name="ce2" office:value-type="percentage" office:value="0.2804" calcext:value-type="percentage">
            <text:p>28,04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541" calcext:value-type="percentage">
            <text:p>15,41%</text:p>
          </table:table-cell>
          <table:table-cell table:style-name="ce2" office:value-type="percentage" office:value="0.1307" calcext:value-type="percentage">
            <text:p>13,07%</text:p>
          </table:table-cell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766" calcext:value-type="percentage">
            <text:p>17,66%</text:p>
          </table:table-cell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283" calcext:value-type="percentage">
            <text:p>42,83%</text:p>
          </table:table-cell>
          <table:table-cell table:style-name="ce2" office:value-type="percentage" office:value="0.4022" calcext:value-type="percentage">
            <text:p>40,22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606" calcext:value-type="percentage">
            <text:p>16,06%</text:p>
          </table:table-cell>
          <table:table-cell table:style-name="ce1" office:value-type="percentage" office:value="0.1377" calcext:value-type="percentage">
            <text:p>13,77%</text:p>
          </table:table-cell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391" calcext:value-type="percentage">
            <text:p>33,91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1381" calcext:value-type="percentage">
            <text:p>13,81%</text:p>
          </table:table-cell>
          <table:table-cell table:style-name="ce2" office:value-type="percentage" office:value="0.2009" calcext:value-type="percentage">
            <text:p>20,09%</text:p>
          </table:table-cell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13" calcext:value-type="percentage">
            <text:p>31,3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1771" calcext:value-type="percentage">
            <text:p>17,71%</text:p>
          </table:table-cell>
          <table:table-cell table:style-name="ce2" office:value-type="percentage" office:value="0.168" calcext:value-type="percentage">
            <text:p>16,80%</text:p>
          </table:table-cell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283" calcext:value-type="percentage">
            <text:p>32,83%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524" calcext:value-type="percentage">
            <text:p>15,24%</text:p>
          </table:table-cell>
          <table:table-cell table:style-name="ce2" office:value-type="percentage" office:value="0.1411" calcext:value-type="percentage">
            <text:p>14,11%</text:p>
          </table:table-cell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717" calcext:value-type="percentage">
            <text:p>37,17%</text:p>
          </table:table-cell>
          <table:table-cell table:style-name="ce2" office:value-type="percentage" office:value="0.3783" calcext:value-type="percentage">
            <text:p>37,83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1515" calcext:value-type="percentage">
            <text:p>15,15%</text:p>
          </table:table-cell>
          <table:table-cell table:style-name="ce2" office:value-type="percentage" office:value="0.1987" calcext:value-type="percentage">
            <text:p>19,87%</text:p>
          </table:table-cell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109" calcext:value-type="percentage">
            <text:p>31,09%</text:p>
          </table:table-cell>
          <table:table-cell table:style-name="ce2" office:value-type="percentage" office:value="0.3696" calcext:value-type="percentage">
            <text:p>36,96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1654" calcext:value-type="percentage">
            <text:p>16,54%</text:p>
          </table:table-cell>
          <table:table-cell table:style-name="ce2" office:value-type="percentage" office:value="0.1758" calcext:value-type="percentage">
            <text:p>17,58%</text:p>
          </table:table-cell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2674" calcext:value-type="percentage">
            <text:p>26,74%</text:p>
          </table:table-cell>
          <table:table-cell table:style-name="ce2" office:value-type="percentage" office:value="0.2587" calcext:value-type="percentage">
            <text:p>25,87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2092" calcext:value-type="percentage">
            <text:p>20,92%</text:p>
          </table:table-cell>
          <table:table-cell table:style-name="ce2" office:value-type="percentage" office:value="0.1615" calcext:value-type="percentage">
            <text:p>16,15%</text:p>
          </table:table-cell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2" office:value-type="percentage" office:value="0.3022" calcext:value-type="percentage">
            <text:p>30,22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2442" calcext:value-type="percentage">
            <text:p>24,42%</text:p>
          </table:table-cell>
          <table:table-cell table:style-name="ce2" office:value-type="percentage" office:value="0.1554" calcext:value-type="percentage">
            <text:p>15,54%</text:p>
          </table:table-cell>
        </table:table-row>
        <table:table-row table:style-name="ro1">
          <table:table-cell table:style-name="ce1"/>
          <table:table-cell table:style-name="ce1" table:formula="of:=AVERAGE([.B146:.B155])" office:value-type="percentage" office:value="0.32674" calcext:value-type="percentage">
            <text:p>32,67%</text:p>
          </table:table-cell>
          <table:table-cell table:style-name="ce1" table:formula="of:=AVERAGE([.C146:.C155])" office:value-type="percentage" office:value="0.33001" calcext:value-type="percentage">
            <text:p>33,00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1721" calcext:value-type="percentage">
            <text:p>17,21%</text:p>
          </table:table-cell>
          <table:table-cell table:style-name="ce1" table:formula="of:=AVERAGE([.G146:.G155])" office:value-type="percentage" office:value="0.16464" calcext:value-type="percentage">
            <text:p>16,4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81" calcext:value-type="percentage">
            <text:p>48,10%</text:p>
          </table:table-cell>
          <table:table-cell table:style-name="ce2" office:value-type="percentage" office:value="0.507" calcext:value-type="percentage">
            <text:p>50,70%</text:p>
          </table:table-cell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2" office:value-type="percentage" office:value="0.225" calcext:value-type="percentage">
            <text:p>22,5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165" calcext:value-type="percentage">
            <text:p>41,65%</text:p>
          </table:table-cell>
          <table:table-cell table:style-name="ce2" office:value-type="percentage" office:value="0.4325" calcext:value-type="percentage">
            <text:p>43,25%</text:p>
          </table:table-cell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325" calcext:value-type="percentage">
            <text:p>32,5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925" calcext:value-type="percentage">
            <text:p>39,25%</text:p>
          </table:table-cell>
          <table:table-cell table:style-name="ce2" office:value-type="percentage" office:value="0.3845" calcext:value-type="percentage">
            <text:p>38,45%</text:p>
          </table:table-cell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02" calcext:value-type="percentage">
            <text:p>40,20%</text:p>
          </table:table-cell>
          <table:table-cell table:style-name="ce2" office:value-type="percentage" office:value="0.4085" calcext:value-type="percentage">
            <text:p>40,85%</text:p>
          </table:table-cell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28" calcext:value-type="percentage">
            <text:p>42,80%</text:p>
          </table:table-cell>
          <table:table-cell table:style-name="ce2" office:value-type="percentage" office:value="0.413" calcext:value-type="percentage">
            <text:p>41,30%</text:p>
          </table:table-cell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35" calcext:value-type="percentage">
            <text:p>43,50%</text:p>
          </table:table-cell>
          <table:table-cell table:style-name="ce2" office:value-type="percentage" office:value="0.424" calcext:value-type="percentage">
            <text:p>42,40%</text:p>
          </table:table-cell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55" calcext:value-type="percentage">
            <text:p>15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13" calcext:value-type="percentage">
            <text:p>41,30%</text:p>
          </table:table-cell>
          <table:table-cell table:style-name="ce2" office:value-type="percentage" office:value="0.413" calcext:value-type="percentage">
            <text:p>41,30%</text:p>
          </table:table-cell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83" calcext:value-type="percentage">
            <text:p>38,30%</text:p>
          </table:table-cell>
          <table:table-cell table:style-name="ce2" office:value-type="percentage" office:value="0.401" calcext:value-type="percentage">
            <text:p>40,10%</text:p>
          </table:table-cell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85" calcext:value-type="percentage">
            <text:p>28,5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395" calcext:value-type="percentage">
            <text:p>39,50%</text:p>
          </table:table-cell>
          <table:table-cell table:style-name="ce2" office:value-type="percentage" office:value="0.4365" calcext:value-type="percentage">
            <text:p>43,65%</text:p>
          </table:table-cell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3825" calcext:value-type="percentage">
            <text:p>38,25%</text:p>
          </table:table-cell>
          <table:table-cell table:style-name="ce2" office:value-type="percentage" office:value="0.4205" calcext:value-type="percentage">
            <text:p>42,05%</text:p>
          </table:table-cell>
        </table:table-row>
        <table:table-row table:style-name="ro1">
          <table:table-cell table:style-name="ce1"/>
          <table:table-cell table:style-name="ce1" table:formula="of:=AVERAGE([.B158:.B167])" office:value-type="percentage" office:value="0.2015" calcext:value-type="percentage">
            <text:p>20,15%</text:p>
          </table:table-cell>
          <table:table-cell table:style-name="ce1" table:formula="of:=AVERAGE([.C158:.C167])" office:value-type="percentage" office:value="0.2165" calcext:value-type="percentage">
            <text:p>21,65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1285" calcext:value-type="percentage">
            <text:p>41,29%</text:p>
          </table:table-cell>
          <table:table-cell table:style-name="ce1" table:formula="of:=AVERAGE([.G158:.G167])" office:value-type="percentage" office:value="0.42405" calcext:value-type="percentage">
            <text:p>42,41%</text:p>
          </table:table-cell>
        </table:table-row>
        <table:table-row table:style-name="ro1">
          <table:table-cell table:style-name="ce1" table:number-columns-repeated="3"/>
          <table:table-cell table:style-name="ce3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75" calcext:value-type="percentage">
            <text:p>7,75%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number-columns-repeated="2" table:style-name="ce3" office:value-type="percentage" office:value="0.2892" calcext:value-type="percentage">
            <text:p>28,92%</text:p>
          </table:table-cell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number-columns-repeated="2"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622" calcext:value-type="percentage">
            <text:p>26,22%</text:p>
          </table:table-cell>
          <table:table-cell table:style-name="ce3" office:value-type="percentage" office:value="0.2554" calcext:value-type="percentage">
            <text:p>25,54%</text:p>
          </table:table-cell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716" calcext:value-type="percentage">
            <text:p>27,16%</text:p>
          </table:table-cell>
          <table:table-cell table:style-name="ce3" office:value-type="percentage" office:value="0.2649" calcext:value-type="percentage">
            <text:p>26,49%</text:p>
          </table:table-cell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176" calcext:value-type="percentage">
            <text:p>21,76%</text:p>
          </table:table-cell>
          <table:table-cell table:style-name="ce3" office:value-type="percentage" office:value="0.2419" calcext:value-type="percentage">
            <text:p>24,19%</text:p>
          </table:table-cell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675" calcext:value-type="percentage">
            <text:p>6,75%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432" calcext:value-type="percentage">
            <text:p>24,32%</text:p>
          </table:table-cell>
          <table:table-cell table:style-name="ce3" office:value-type="percentage" office:value="0.2405" calcext:value-type="percentage">
            <text:p>24,05%</text:p>
          </table:table-cell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375" calcext:value-type="percentage">
            <text:p>3,75%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662" calcext:value-type="percentage">
            <text:p>26,62%</text:p>
          </table:table-cell>
          <table:table-cell table:style-name="ce3" office:value-type="percentage" office:value="0.2946" calcext:value-type="percentage">
            <text:p>29,46%</text:p>
          </table:table-cell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2" office:value-type="percentage" office:value="0.045" calcext:value-type="percentage">
            <text:p>4,5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595" calcext:value-type="percentage">
            <text:p>25,95%</text:p>
          </table:table-cell>
          <table:table-cell table:style-name="ce3" office:value-type="percentage" office:value="0.2635" calcext:value-type="percentage">
            <text:p>26,35%</text:p>
          </table:table-cell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75" calcext:value-type="percentage">
            <text:p>5,75%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1851" calcext:value-type="percentage">
            <text:p>18,51%</text:p>
          </table:table-cell>
          <table:table-cell table:style-name="ce3" office:value-type="percentage" office:value="0.1986" calcext:value-type="percentage">
            <text:p>19,86%</text:p>
          </table:table-cell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57" calcext:value-type="percentage">
            <text:p>22,57%</text:p>
          </table:table-cell>
          <table:table-cell table:style-name="ce3" office:value-type="percentage" office:value="0.2243" calcext:value-type="percentage">
            <text:p>22,43%</text:p>
          </table:table-cell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59" calcext:value-type="percentage">
            <text:p>19,59%</text:p>
          </table:table-cell>
          <table:table-cell table:style-name="ce3" office:value-type="percentage" office:value="0.1892" calcext:value-type="percentage">
            <text:p>18,92%</text:p>
          </table:table-cell>
        </table:table-row>
        <table:table-row table:style-name="ro1">
          <table:table-cell table:style-name="ce1"/>
          <table:table-cell table:style-name="ce1" table:formula="of:=AVERAGE([.B171:.B180])" office:value-type="percentage" office:value="0.0555" calcext:value-type="percentage">
            <text:p>5,55%</text:p>
          </table:table-cell>
          <table:table-cell table:style-name="ce1" table:formula="of:=AVERAGE([.C171:.C180])" office:value-type="percentage" office:value="0.0545" calcext:value-type="percentage">
            <text:p>5,45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162" calcext:value-type="percentage">
            <text:p>24,16%</text:p>
          </table:table-cell>
          <table:table-cell table:style-name="ce1" table:formula="of:=AVERAGE([.G171:.G180])" office:value-type="percentage" office:value="0.24621" calcext:value-type="percentage">
            <text:p>24,62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 office:value-type="percentage" office:value="0.0321" calcext:value-type="percentage">
            <text:p>3,21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0941" calcext:value-type="percentage">
            <text:p>9,41%</text:p>
          </table:table-cell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161" calcext:value-type="percentage">
            <text:p>1,61%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0824" calcext:value-type="percentage">
            <text:p>8,24%</text:p>
          </table:table-cell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304" calcext:value-type="percentage">
            <text:p>13,04%</text:p>
          </table:table-cell>
          <table:table-cell table:style-name="ce2" office:value-type="percentage" office:value="0.1232" calcext:value-type="percentage">
            <text:p>12,32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style-name="ce2" office:value-type="percentage" office:value="0.1588" calcext:value-type="percentage">
            <text:p>15,88%</text:p>
          </table:table-cell>
          <table:table-cell table:style-name="ce2" office:value-type="percentage" office:value="0.1882" calcext:value-type="percentage">
            <text:p>18,82%</text:p>
          </table:table-cell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941" calcext:value-type="percentage">
            <text:p>9,41%</text:p>
          </table:table-cell>
          <table:table-cell table:style-name="ce2" office:value-type="percentage" office:value="0.0529" calcext:value-type="percentage">
            <text:p>5,29%</text:p>
          </table:table-cell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0412" calcext:value-type="percentage">
            <text:p>4,12%</text:p>
          </table:table-cell>
          <table:table-cell table:style-name="ce2" office:value-type="percentage" office:value="0.0529" calcext:value-type="percentage">
            <text:p>5,29%</text:p>
          </table:table-cell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25" calcext:value-type="percentage">
            <text:p>2,50%</text:p>
          </table:table-cell>
          <table:table-cell table:style-name="ce2" office:value-type="percentage" office:value="0.0429" calcext:value-type="percentage">
            <text:p>4,29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1647" calcext:value-type="percentage">
            <text:p>16,47%</text:p>
          </table:table-cell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588" calcext:value-type="percentage">
            <text:p>15,88%</text:p>
          </table:table-cell>
          <table:table-cell table:style-name="ce2" office:value-type="percentage" office:value="0.1353" calcext:value-type="percentage">
            <text:p>13,53%</text:p>
          </table:table-cell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0471" calcext:value-type="percentage">
            <text:p>4,71%</text:p>
          </table:table-cell>
          <table:table-cell table:style-name="ce2" office:value-type="percentage" office:value="0.0647" calcext:value-type="percentage">
            <text:p>6,47%</text:p>
          </table:table-cell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214" calcext:value-type="percentage">
            <text:p>2,14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059" calcext:value-type="percentage">
            <text:p>10,59%</text:p>
          </table:table-cell>
          <table:table-cell table:style-name="ce2" office:value-type="percentage" office:value="0.1294" calcext:value-type="percentage">
            <text:p>12,94%</text:p>
          </table:table-cell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style-name="ce2" office:value-type="percentage" office:value="0.0304" calcext:value-type="percentage">
            <text:p>3,04%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0471" calcext:value-type="percentage">
            <text:p>4,71%</text:p>
          </table:table-cell>
          <table:table-cell table:style-name="ce2" office:value-type="percentage" office:value="0.0941" calcext:value-type="percentage">
            <text:p>9,41%</text:p>
          </table:table-cell>
        </table:table-row>
        <table:table-row table:style-name="ro1">
          <table:table-cell table:style-name="ce1"/>
          <table:table-cell table:style-name="ce1" table:formula="of:=AVERAGE([.B183:.B192])" office:value-type="percentage" office:value="0.04429" calcext:value-type="percentage">
            <text:p>4,43%</text:p>
          </table:table-cell>
          <table:table-cell table:style-name="ce1" table:formula="of:=AVERAGE([.C183:.C192])" office:value-type="percentage" office:value="0.05392" calcext:value-type="percentage">
            <text:p>5,39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1413" calcext:value-type="percentage">
            <text:p>11,41%</text:p>
          </table:table-cell>
          <table:table-cell table:style-name="ce1" table:formula="of:=AVERAGE([.G183:.G192])" office:value-type="percentage" office:value="0.10587" calcext:value-type="percentage">
            <text:p>10,59%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367" calcext:value-type="percentage">
            <text:p>13,67%</text:p>
          </table:table-cell>
          <table:table-cell table:style-name="ce3" office:value-type="percentage" office:value="0.1533" calcext:value-type="percentage">
            <text:p>15,33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percentage" office:value="0.574" calcext:value-type="percentage">
            <text:p>57,40%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1067" calcext:value-type="percentage">
            <text:p>10,67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538" calcext:value-type="percentage">
            <text:p>53,80%</text:p>
          </table:table-cell>
          <table:table-cell table:style-name="ce2" office:value-type="percentage" office:value="0.544" calcext:value-type="percentage">
            <text:p>54,40%</text:p>
          </table:table-cell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 office:value-type="percentage" office:value="0.18" calcext:value-type="percentage">
            <text:p>18,00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2" calcext:value-type="percentage">
            <text:p>62,2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533" calcext:value-type="percentage">
            <text:p>5,33%</text:p>
          </table:table-cell>
          <table:table-cell table:style-name="ce3" office:value-type="percentage" office:value="0.09" calcext:value-type="percentage">
            <text:p>9,00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62" calcext:value-type="percentage">
            <text:p>56,20%</text:p>
          </table:table-cell>
          <table:table-cell table:style-name="ce2" office:value-type="percentage" office:value="0.614" calcext:value-type="percentage">
            <text:p>61,40%</text:p>
          </table:table-cell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433" calcext:value-type="percentage">
            <text:p>4,33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616" calcext:value-type="percentage">
            <text:p>61,60%</text:p>
          </table:table-cell>
          <table:table-cell table:style-name="ce2" office:value-type="percentage" office:value="0.74" calcext:value-type="percentage">
            <text:p>74,00%</text:p>
          </table:table-cell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 office:value-type="percentage" office:value="0.1033" calcext:value-type="percentage">
            <text:p>10,33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558" calcext:value-type="percentage">
            <text:p>55,80%</text:p>
          </table:table-cell>
          <table:table-cell table:style-name="ce2" office:value-type="percentage" office:value="0.622" calcext:value-type="percentage">
            <text:p>62,20%</text:p>
          </table:table-cell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6" calcext:value-type="percentage">
            <text:p>6,00%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588" calcext:value-type="percentage">
            <text:p>58,80%</text:p>
          </table:table-cell>
          <table:table-cell table:style-name="ce2" office:value-type="percentage" office:value="0.606" calcext:value-type="percentage">
            <text:p>60,60%</text:p>
          </table:table-cell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08" calcext:value-type="percentage">
            <text:p>8,00%</text:p>
          </table:table-cell>
          <table:table-cell table:style-name="ce3" office:value-type="percentage" office:value="0.1033" calcext:value-type="percentage">
            <text:p>10,33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54" calcext:value-type="percentage">
            <text:p>65,40%</text:p>
          </table:table-cell>
          <table:table-cell table:style-name="ce2" office:value-type="percentage" office:value="0.706" calcext:value-type="percentage">
            <text:p>70,60%</text:p>
          </table:table-cell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8" calcext:value-type="percentage">
            <text:p>8,00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0767" calcext:value-type="percentage">
            <text:p>7,67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</table:table-row>
        <table:table-row table:style-name="ro1">
          <table:table-cell table:style-name="ce1"/>
          <table:table-cell table:style-name="ce1" table:formula="of:=AVERAGE([.B196:.B205])" office:value-type="percentage" office:value="0.08732" calcext:value-type="percentage">
            <text:p>8,73%</text:p>
          </table:table-cell>
          <table:table-cell table:style-name="ce1" table:formula="of:=AVERAGE([.C196:.C205])" office:value-type="percentage" office:value="0.10566" calcext:value-type="percentage">
            <text:p>10,57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595" calcext:value-type="percentage">
            <text:p>59,50%</text:p>
          </table:table-cell>
          <table:table-cell table:style-name="ce1" table:formula="of:=AVERAGE([.G196:.G205])" office:value-type="percentage" office:value="0.634444444444445" calcext:value-type="percentage">
            <text:p>63,44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32" calcext:value-type="percentage">
            <text:p>3,20%</text:p>
          </table:table-cell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number-columns-repeated="2" table:style-name="ce2" office:value-type="percentage" office:value="0.02" calcext:value-type="percentage">
            <text:p>2,00%</text:p>
          </table:table-cell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6" calcext:value-type="percentage">
            <text:p>4,60%</text:p>
          </table:table-cell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14" calcext:value-type="percentage">
            <text:p>1,40%</text:p>
          </table:table-cell>
          <table:table-cell table:style-name="ce2" office:value-type="percentage" office:value="0.022" calcext:value-type="percentage">
            <text:p>2,20%</text:p>
          </table:table-cell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34" calcext:value-type="percentage">
            <text:p>13,40%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14" calcext:value-type="percentage">
            <text:p>1,40%</text:p>
          </table:table-cell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04" calcext:value-type="percentage">
            <text:p>0,40%</text:p>
          </table:table-cell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32" calcext:value-type="percentage">
            <text:p>3,20%</text:p>
          </table:table-cell>
          <table:table-cell table:style-name="ce2" office:value-type="percentage" office:value="0.03" calcext:value-type="percentage">
            <text:p>3,00%</text:p>
          </table:table-cell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2" office:value-type="percentage" office:value="0.106" calcext:value-type="percentage">
            <text:p>10,6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44" calcext:value-type="percentage">
            <text:p>4,40%</text:p>
          </table:table-cell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086" calcext:value-type="percentage">
            <text:p>8,60%</text:p>
          </table:table-cell>
          <table:table-cell table:style-name="ce2" office:value-type="percentage" office:value="0.082" calcext:value-type="percentage">
            <text:p>8,2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28" calcext:value-type="percentage">
            <text:p>2,80%</text:p>
          </table:table-cell>
          <table:table-cell table:style-name="ce2" office:value-type="percentage" office:value="0.024" calcext:value-type="percentage">
            <text:p>2,40%</text:p>
          </table:table-cell>
        </table:table-row>
        <table:table-row table:style-name="ro1">
          <table:table-cell table:style-name="ce1"/>
          <table:table-cell table:style-name="ce1" table:formula="of:=AVERAGE([.B208:.B217])" office:value-type="percentage" office:value="0.0634" calcext:value-type="percentage">
            <text:p>6,34%</text:p>
          </table:table-cell>
          <table:table-cell table:style-name="ce1" table:formula="of:=AVERAGE([.C208:.C217])" office:value-type="percentage" office:value="0.0638" calcext:value-type="percentage">
            <text:p>6,38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296" calcext:value-type="percentage">
            <text:p>2,96%</text:p>
          </table:table-cell>
          <table:table-cell table:style-name="ce1" table:formula="of:=AVERAGE([.G208:.G217])" office:value-type="percentage" office:value="0.0286" calcext:value-type="percentage">
            <text:p>2,8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number-columns-repeated="2" table:style-name="ce2" office:value-type="percentage" office:value="0.2286" calcext:value-type="percentage">
            <text:p>22,86%</text:p>
          </table:table-cell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1277" calcext:value-type="percentage">
            <text:p>12,77%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2571" calcext:value-type="percentage">
            <text:p>25,71%</text:p>
          </table:table-cell>
          <table:table-cell table:style-name="ce2" office:value-type="percentage" office:value="0.1571" calcext:value-type="percentage">
            <text:p>15,71%</text:p>
          </table:table-cell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071" calcext:value-type="percentage">
            <text:p>20,71%</text:p>
          </table:table-cell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2643" calcext:value-type="percentage">
            <text:p>26,43%</text:p>
          </table:table-cell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3571" calcext:value-type="percentage">
            <text:p>35,71%</text:p>
          </table:table-cell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number-columns-repeated="2"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714" calcext:value-type="percentage">
            <text:p>27,14%</text:p>
          </table:table-cell>
          <table:table-cell table:style-name="ce2" office:value-type="percentage" office:value="0.2214" calcext:value-type="percentage">
            <text:p>22,14%</text:p>
          </table:table-cell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3071" calcext:value-type="percentage">
            <text:p>30,71%</text:p>
          </table:table-cell>
          <table:table-cell table:style-name="ce2" office:value-type="percentage" office:value="0.2286" calcext:value-type="percentage">
            <text:p>22,86%</text:p>
          </table:table-cell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1643" calcext:value-type="percentage">
            <text:p>16,43%</text:p>
          </table:table-cell>
          <table:table-cell table:style-name="ce2" office:value-type="percentage" office:value="0.2214" calcext:value-type="percentage">
            <text:p>22,14%</text:p>
          </table:table-cell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571" calcext:value-type="percentage">
            <text:p>35,71%</text:p>
          </table:table-cell>
          <table:table-cell table:style-name="ce2" office:value-type="percentage" office:value="0.3071" calcext:value-type="percentage">
            <text:p>30,71%</text:p>
          </table:table-cell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3404" calcext:value-type="percentage">
            <text:p>34,04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143" calcext:value-type="percentage">
            <text:p>21,43%</text:p>
          </table:table-cell>
          <table:table-cell table:style-name="ce2" office:value-type="percentage" office:value="0.2429" calcext:value-type="percentage">
            <text:p>24,29%</text:p>
          </table:table-cell>
        </table:table-row>
        <table:table-row table:style-name="ro1">
          <table:table-cell table:style-name="ce1"/>
          <table:table-cell table:style-name="ce1" table:formula="of:=AVERAGE([.B220:.B229])" office:value-type="percentage" office:value="0.14892" calcext:value-type="percentage">
            <text:p>14,89%</text:p>
          </table:table-cell>
          <table:table-cell table:style-name="ce1" table:formula="of:=AVERAGE([.C220:.C229])" office:value-type="percentage" office:value="0.18085" calcext:value-type="percentage">
            <text:p>18,09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356" calcext:value-type="percentage">
            <text:p>25,36%</text:p>
          </table:table-cell>
          <table:table-cell table:style-name="ce1" table:formula="of:=AVERAGE([.G220:.G229])" office:value-type="percentage" office:value="0.24356" calcext:value-type="percentage">
            <text:p>24,36%</text:p>
          </table:table-cell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889" calcext:value-type="percentage">
            <text:p>18,89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556" calcext:value-type="percentage">
            <text:p>15,56%</text:p>
          </table:table-cell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648" calcext:value-type="percentage">
            <text:p>16,48%</text:p>
          </table:table-cell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389" calcext:value-type="percentage">
            <text:p>13,89%</text:p>
          </table:table-cell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2074" calcext:value-type="percentage">
            <text:p>20,74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278" calcext:value-type="percentage">
            <text:p>12,78%</text:p>
          </table:table-cell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2741" calcext:value-type="percentage">
            <text:p>27,41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537" calcext:value-type="percentage">
            <text:p>15,37%</text:p>
          </table:table-cell>
          <table:table-cell table:style-name="ce2" office:value-type="percentage" office:value="0.1389" calcext:value-type="percentage">
            <text:p>13,89%</text:p>
          </table:table-cell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593" calcext:value-type="percentage">
            <text:p>25,93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537" calcext:value-type="percentage">
            <text:p>15,37%</text:p>
          </table:table-cell>
          <table:table-cell table:style-name="ce2" office:value-type="percentage" office:value="0.1574" calcext:value-type="percentage">
            <text:p>15,74%</text:p>
          </table:table-cell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63" calcext:value-type="percentage">
            <text:p>16,30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389" calcext:value-type="percentage">
            <text:p>13,89%</text:p>
          </table:table-cell>
          <table:table-cell table:style-name="ce2" office:value-type="percentage" office:value="0.1204" calcext:value-type="percentage">
            <text:p>12,04%</text:p>
          </table:table-cell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519" calcext:value-type="percentage">
            <text:p>15,19%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704" calcext:value-type="percentage">
            <text:p>17,04%</text:p>
          </table:table-cell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1593" calcext:value-type="percentage">
            <text:p>15,93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481" calcext:value-type="percentage">
            <text:p>14,81%</text:p>
          </table:table-cell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2481" calcext:value-type="percentage">
            <text:p>24,81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37" calcext:value-type="percentage">
            <text:p>13,70%</text:p>
          </table:table-cell>
        </table:table-row>
        <table:table-row table:style-name="ro1">
          <table:table-cell table:style-name="ce1"/>
          <table:table-cell table:style-name="ce1" table:formula="of:=AVERAGE([.B233:.B242])" office:value-type="percentage" office:value="0.19408" calcext:value-type="percentage">
            <text:p>19,41%</text:p>
          </table:table-cell>
          <table:table-cell table:style-name="ce1" table:formula="of:=AVERAGE([.C233:.C242])" office:value-type="percentage" office:value="0.21964" calcext:value-type="percentage">
            <text:p>21,96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5167" calcext:value-type="percentage">
            <text:p>15,17%</text:p>
          </table:table-cell>
          <table:table-cell table:style-name="ce1" table:formula="of:=AVERAGE([.G233:.G242])" office:value-type="percentage" office:value="0.14593" calcext:value-type="percentage">
            <text:p>14,59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048" calcext:value-type="percentage">
            <text:p>30,48%</text:p>
          </table:table-cell>
          <table:table-cell table:style-name="ce2" office:value-type="percentage" office:value="0.5474" calcext:value-type="percentage">
            <text:p>54,74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number-columns-repeated="2" table:style-name="ce2" office:value-type="percentage" office:value="0.0565" calcext:value-type="percentage">
            <text:p>5,65%</text:p>
          </table:table-cell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4774" calcext:value-type="percentage">
            <text:p>47,74%</text:p>
          </table:table-cell>
          <table:table-cell table:style-name="ce2" office:value-type="percentage" office:value="0.563" calcext:value-type="percentage">
            <text:p>56,30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96" calcext:value-type="percentage">
            <text:p>6,96%</text:p>
          </table:table-cell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437" calcext:value-type="percentage">
            <text:p>43,70%</text:p>
          </table:table-cell>
          <table:table-cell table:style-name="ce2" office:value-type="percentage" office:value="0.5894" calcext:value-type="percentage">
            <text:p>58,94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43" calcext:value-type="percentage">
            <text:p>5,43%</text:p>
          </table:table-cell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188" calcext:value-type="percentage">
            <text:p>31,88%</text:p>
          </table:table-cell>
          <table:table-cell table:style-name="ce2" office:value-type="percentage" office:value="0.5877" calcext:value-type="percentage">
            <text:p>58,77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2" office:value-type="percentage" office:value="0.063" calcext:value-type="percentage">
            <text:p>6,30%</text:p>
          </table:table-cell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3779" calcext:value-type="percentage">
            <text:p>37,79%</text:p>
          </table:table-cell>
          <table:table-cell table:style-name="ce2" office:value-type="percentage" office:value="0.4557" calcext:value-type="percentage">
            <text:p>45,57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5" calcext:value-type="percentage">
            <text:p>5,00%</text:p>
          </table:table-cell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3297" calcext:value-type="percentage">
            <text:p>32,97%</text:p>
          </table:table-cell>
          <table:table-cell table:style-name="ce2" office:value-type="percentage" office:value="0.577" calcext:value-type="percentage">
            <text:p>57,70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565" calcext:value-type="percentage">
            <text:p>5,65%</text:p>
          </table:table-cell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3157" calcext:value-type="percentage">
            <text:p>31,57%</text:p>
          </table:table-cell>
          <table:table-cell table:style-name="ce2" office:value-type="percentage" office:value="0.3406" calcext:value-type="percentage">
            <text:p>34,06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761" calcext:value-type="percentage">
            <text:p>7,61%</text:p>
          </table:table-cell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3546" calcext:value-type="percentage">
            <text:p>35,46%</text:p>
          </table:table-cell>
          <table:table-cell table:style-name="ce2" office:value-type="percentage" office:value="0.5894" calcext:value-type="percentage">
            <text:p>58,94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522" calcext:value-type="percentage">
            <text:p>5,22%</text:p>
          </table:table-cell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3966" calcext:value-type="percentage">
            <text:p>39,66%</text:p>
          </table:table-cell>
          <table:table-cell table:style-name="ce2" office:value-type="percentage" office:value="0.4759" calcext:value-type="percentage">
            <text:p>47,59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543" calcext:value-type="percentage">
            <text:p>5,43%</text:p>
          </table:table-cell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4044" calcext:value-type="percentage">
            <text:p>40,44%</text:p>
          </table:table-cell>
          <table:table-cell table:style-name="ce2" office:value-type="percentage" office:value="0.5614" calcext:value-type="percentage">
            <text:p>56,14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63" calcext:value-type="percentage">
            <text:p>6,30%</text:p>
          </table:table-cell>
        </table:table-row>
        <table:table-row table:style-name="ro1">
          <table:table-cell table:style-name="ce1"/>
          <table:table-cell table:style-name="ce1" table:formula="of:=AVERAGE([.B245:.B254])" office:value-type="percentage" office:value="0.37169" calcext:value-type="percentage">
            <text:p>37,17%</text:p>
          </table:table-cell>
          <table:table-cell table:style-name="ce1" table:formula="of:=AVERAGE([.C245:.C254])" office:value-type="percentage" office:value="0.52875" calcext:value-type="percentage">
            <text:p>52,88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26" calcext:value-type="percentage">
            <text:p>6,33%</text:p>
          </table:table-cell>
          <table:table-cell table:style-name="ce1" table:formula="of:=AVERAGE([.G245:.G254])" office:value-type="percentage" office:value="0.05955" calcext:value-type="percentage">
            <text:p>5,9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3754" calcext:value-type="percentage">
            <text:p>37,54%</text:p>
          </table:table-cell>
          <table:table-cell table:style-name="ce2" office:value-type="percentage" office:value="0.3701" calcext:value-type="percentage">
            <text:p>37,01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style-name="ce2" office:value-type="percentage" office:value="0.227" calcext:value-type="percentage">
            <text:p>22,70%</text:p>
          </table:table-cell>
          <table:table-cell table:style-name="ce2" office:value-type="percentage" office:value="0.1946" calcext:value-type="percentage">
            <text:p>19,46%</text:p>
          </table:table-cell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3772" calcext:value-type="percentage">
            <text:p>37,72%</text:p>
          </table:table-cell>
          <table:table-cell table:style-name="ce2" office:value-type="percentage" office:value="0.5338" calcext:value-type="percentage">
            <text:p>53,38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243" calcext:value-type="percentage">
            <text:p>22,43%</text:p>
          </table:table-cell>
          <table:table-cell table:style-name="ce2" office:value-type="percentage" office:value="0.2351" calcext:value-type="percentage">
            <text:p>23,51%</text:p>
          </table:table-cell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5303" calcext:value-type="percentage">
            <text:p>53,03%</text:p>
          </table:table-cell>
          <table:table-cell table:style-name="ce2" office:value-type="percentage" office:value="0.3345" calcext:value-type="percentage">
            <text:p>33,45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27" calcext:value-type="percentage">
            <text:p>22,70%</text:p>
          </table:table-cell>
          <table:table-cell table:style-name="ce2" office:value-type="percentage" office:value="0.2216" calcext:value-type="percentage">
            <text:p>22,16%</text:p>
          </table:table-cell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6228" calcext:value-type="percentage">
            <text:p>62,28%</text:p>
          </table:table-cell>
          <table:table-cell table:style-name="ce2" office:value-type="percentage" office:value="0.3897" calcext:value-type="percentage">
            <text:p>38,97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162" calcext:value-type="percentage">
            <text:p>21,62%</text:p>
          </table:table-cell>
          <table:table-cell table:style-name="ce2" office:value-type="percentage" office:value="0.2027" calcext:value-type="percentage">
            <text:p>20,27%</text:p>
          </table:table-cell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4786" calcext:value-type="percentage">
            <text:p>47,86%</text:p>
          </table:table-cell>
          <table:table-cell table:style-name="ce2" office:value-type="percentage" office:value="0.3168" calcext:value-type="percentage">
            <text:p>31,68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135" calcext:value-type="percentage">
            <text:p>21,35%</text:p>
          </table:table-cell>
          <table:table-cell table:style-name="ce2" office:value-type="percentage" office:value="0.1986" calcext:value-type="percentage">
            <text:p>19,86%</text:p>
          </table:table-cell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5302" calcext:value-type="percentage">
            <text:p>53,02%</text:p>
          </table:table-cell>
          <table:table-cell table:style-name="ce2" office:value-type="percentage" office:value="0.5925" calcext:value-type="percentage">
            <text:p>59,25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297" calcext:value-type="percentage">
            <text:p>22,97%</text:p>
          </table:table-cell>
          <table:table-cell table:style-name="ce2" office:value-type="percentage" office:value="0.2419" calcext:value-type="percentage">
            <text:p>24,19%</text:p>
          </table:table-cell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377" calcext:value-type="percentage">
            <text:p>43,77%</text:p>
          </table:table-cell>
          <table:table-cell table:style-name="ce2" office:value-type="percentage" office:value="0.468" calcext:value-type="percentage">
            <text:p>46,80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068" calcext:value-type="percentage">
            <text:p>20,68%</text:p>
          </table:table-cell>
          <table:table-cell table:style-name="ce2" office:value-type="percentage" office:value="0.2108" calcext:value-type="percentage">
            <text:p>21,08%</text:p>
          </table:table-cell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4573" calcext:value-type="percentage">
            <text:p>45,73%</text:p>
          </table:table-cell>
          <table:table-cell table:style-name="ce2" office:value-type="percentage" office:value="0.4733" calcext:value-type="percentage">
            <text:p>47,33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style-name="ce2" office:value-type="percentage" office:value="0.2081" calcext:value-type="percentage">
            <text:p>20,81%</text:p>
          </table:table-cell>
          <table:table-cell table:style-name="ce2" office:value-type="percentage" office:value="0.1797" calcext:value-type="percentage">
            <text:p>17,97%</text:p>
          </table:table-cell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3986" calcext:value-type="percentage">
            <text:p>39,86%</text:p>
          </table:table-cell>
          <table:table-cell table:style-name="ce2" office:value-type="percentage" office:value="0.4377" calcext:value-type="percentage">
            <text:p>43,77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973" calcext:value-type="percentage">
            <text:p>19,73%</text:p>
          </table:table-cell>
          <table:table-cell table:style-name="ce2" office:value-type="percentage" office:value="0.1878" calcext:value-type="percentage">
            <text:p>18,78%</text:p>
          </table:table-cell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5374" calcext:value-type="percentage">
            <text:p>53,74%</text:p>
          </table:table-cell>
          <table:table-cell table:style-name="ce54" office:value-type="percentage" office:value="0.5267" calcext:value-type="percentage">
            <text:p>52,67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1919" calcext:value-type="percentage">
            <text:p>19,19%</text:p>
          </table:table-cell>
          <table:table-cell table:style-name="ce2" office:value-type="percentage" office:value="0.1932" calcext:value-type="percentage">
            <text:p>19,32%</text:p>
          </table:table-cell>
        </table:table-row>
        <table:table-row table:style-name="ro1">
          <table:table-cell table:style-name="ce1"/>
          <table:table-cell table:style-name="ce1" table:formula="of:=AVERAGE([.B257:.B266])" office:value-type="percentage" office:value="0.47455" calcext:value-type="percentage">
            <text:p>47,46%</text:p>
          </table:table-cell>
          <table:table-cell table:style-name="ce1" table:formula="of:=AVERAGE([.C257:.C266])" office:value-type="percentage" office:value="0.44431" calcext:value-type="percentage">
            <text:p>44,43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1418" calcext:value-type="percentage">
            <text:p>21,42%</text:p>
          </table:table-cell>
          <table:table-cell table:style-name="ce1" table:formula="of:=AVERAGE([.G257:.G266])" office:value-type="percentage" office:value="0.2066" calcext:value-type="percentage">
            <text:p>20,66%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3"/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Beed_1</text:p>
          </table:table-cell>
          <table:table-cell table:style-name="ce2" office:value-type="percentage" office:value="0.3475" calcext:value-type="percentage">
            <text:p>34,75%</text:p>
          </table:table-cell>
          <table:table-cell table:style-name="ce2" office:value-type="percentage" office:value="0.4725" calcext:value-type="percentage">
            <text:p>47,25%</text:p>
          </table:table-cell>
          <table:table-cell table:style-name="ce3"/>
          <table:table-cell table:style-name="ce2" office:value-type="string" calcext:value-type="string">
            <text:p>pir_1</text:p>
          </table:table-cell>
          <table:table-cell table:style-name="ce2" office:value-type="percentage" office:value="0.0817" calcext:value-type="percentage">
            <text:p>8,17%</text:p>
          </table:table-cell>
          <table:table-cell table:style-name="ce2" office:value-type="percentage" office:value="0.0203" calcext:value-type="percentage">
            <text:p>2,03%</text:p>
          </table:table-cell>
        </table:table-row>
        <table:table-row table:style-name="ro1">
          <table:table-cell table:style-name="ce2" office:value-type="string" calcext:value-type="string">
            <text:p>Beed_2</text:p>
          </table:table-cell>
          <table:table-cell table:style-name="ce2" office:value-type="percentage" office:value="0.4263" calcext:value-type="percentage">
            <text:p>42,63%</text:p>
          </table:table-cell>
          <table:table-cell table:style-name="ce2" office:value-type="percentage" office:value="0.3613" calcext:value-type="percentage">
            <text:p>36,13%</text:p>
          </table:table-cell>
          <table:table-cell table:style-name="ce3"/>
          <table:table-cell table:style-name="ce2" office:value-type="string" calcext:value-type="string">
            <text:p>pir_2</text:p>
          </table:table-cell>
          <table:table-cell table:style-name="ce2" office:value-type="percentage" office:value="0.1131" calcext:value-type="percentage">
            <text:p>11,31%</text:p>
          </table:table-cell>
          <table:table-cell table:style-name="ce2" office:value-type="percentage" office:value="0.0693" calcext:value-type="percentage">
            <text:p>6,93%</text:p>
          </table:table-cell>
        </table:table-row>
        <table:table-row table:style-name="ro1">
          <table:table-cell table:style-name="ce2" office:value-type="string" calcext:value-type="string">
            <text:p>Beed_3</text:p>
          </table:table-cell>
          <table:table-cell table:style-name="ce2" office:value-type="percentage" office:value="0.4113" calcext:value-type="percentage">
            <text:p>41,13%</text:p>
          </table:table-cell>
          <table:table-cell table:style-name="ce2" office:value-type="percentage" office:value="0.435" calcext:value-type="percentage">
            <text:p>43,50%</text:p>
          </table:table-cell>
          <table:table-cell table:style-name="ce3"/>
          <table:table-cell table:style-name="ce2" office:value-type="string" calcext:value-type="string">
            <text:p>pir_3</text:p>
          </table:table-cell>
          <table:table-cell table:style-name="ce2" office:value-type="percentage" office:value="0.0967" calcext:value-type="percentage">
            <text:p>9,67%</text:p>
          </table:table-cell>
          <table:table-cell table:style-name="ce2" office:value-type="percentage" office:value="0.102" calcext:value-type="percentage">
            <text:p>10,20%</text:p>
          </table:table-cell>
        </table:table-row>
        <table:table-row table:style-name="ro1">
          <table:table-cell table:style-name="ce2" office:value-type="string" calcext:value-type="string">
            <text:p>Beed_4</text:p>
          </table:table-cell>
          <table:table-cell table:style-name="ce2" office:value-type="percentage" office:value="0.4925" calcext:value-type="percentage">
            <text:p>49,25%</text:p>
          </table:table-cell>
          <table:table-cell table:style-name="ce2" office:value-type="percentage" office:value="0.405" calcext:value-type="percentage">
            <text:p>40,50%</text:p>
          </table:table-cell>
          <table:table-cell table:style-name="ce3"/>
          <table:table-cell table:style-name="ce2" office:value-type="string" calcext:value-type="string">
            <text:p>pir_4</text:p>
          </table:table-cell>
          <table:table-cell table:style-name="ce2" office:value-type="percentage" office:value="0.051" calcext:value-type="percentage">
            <text:p>5,10%</text:p>
          </table:table-cell>
          <table:table-cell table:style-name="ce2" office:value-type="percentage" office:value="0.1209" calcext:value-type="percentage">
            <text:p>12,09%</text:p>
          </table:table-cell>
        </table:table-row>
        <table:table-row table:style-name="ro1">
          <table:table-cell table:style-name="ce2" office:value-type="string" calcext:value-type="string">
            <text:p>Beed_5</text:p>
          </table:table-cell>
          <table:table-cell table:style-name="ce2" office:value-type="percentage" office:value="0.3638" calcext:value-type="percentage">
            <text:p>36,38%</text:p>
          </table:table-cell>
          <table:table-cell table:style-name="ce2" office:value-type="percentage" office:value="0.3563" calcext:value-type="percentage">
            <text:p>35,63%</text:p>
          </table:table-cell>
          <table:table-cell table:style-name="ce3"/>
          <table:table-cell table:style-name="ce2" office:value-type="string" calcext:value-type="string">
            <text:p>pir_5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235" calcext:value-type="percentage">
            <text:p>2,35%</text:p>
          </table:table-cell>
        </table:table-row>
        <table:table-row table:style-name="ro1">
          <table:table-cell table:style-name="ce2" office:value-type="string" calcext:value-type="string">
            <text:p>Beed_6</text:p>
          </table:table-cell>
          <table:table-cell table:style-name="ce2" office:value-type="percentage" office:value="0.4925" calcext:value-type="percentage">
            <text:p>49,25%</text:p>
          </table:table-cell>
          <table:table-cell table:style-name="ce2" office:value-type="percentage" office:value="0.3863" calcext:value-type="percentage">
            <text:p>38,63%</text:p>
          </table:table-cell>
          <table:table-cell table:style-name="ce3"/>
          <table:table-cell table:style-name="ce2" office:value-type="string" calcext:value-type="string">
            <text:p>pir_6</text:p>
          </table:table-cell>
          <table:table-cell table:style-name="ce2" office:value-type="percentage" office:value="0.1176" calcext:value-type="percentage">
            <text:p>11,76%</text:p>
          </table:table-cell>
          <table:table-cell table:style-name="ce2" office:value-type="percentage" office:value="0.1033" calcext:value-type="percentage">
            <text:p>10,33%</text:p>
          </table:table-cell>
        </table:table-row>
        <table:table-row table:style-name="ro1">
          <table:table-cell table:style-name="ce2" office:value-type="string" calcext:value-type="string">
            <text:p>Beed_7</text:p>
          </table:table-cell>
          <table:table-cell table:style-name="ce2" office:value-type="percentage" office:value="0.4038" calcext:value-type="percentage">
            <text:p>40,38%</text:p>
          </table:table-cell>
          <table:table-cell table:style-name="ce2" office:value-type="percentage" office:value="0.3963" calcext:value-type="percentage">
            <text:p>39,63%</text:p>
          </table:table-cell>
          <table:table-cell table:style-name="ce3"/>
          <table:table-cell table:style-name="ce2" office:value-type="string" calcext:value-type="string">
            <text:p>pir_7</text:p>
          </table:table-cell>
          <table:table-cell table:style-name="ce2" office:value-type="percentage" office:value="0.0987" calcext:value-type="percentage">
            <text:p>9,87%</text:p>
          </table:table-cell>
          <table:table-cell table:style-name="ce2" office:value-type="percentage" office:value="0.0928" calcext:value-type="percentage">
            <text:p>9,28%</text:p>
          </table:table-cell>
        </table:table-row>
        <table:table-row table:style-name="ro1">
          <table:table-cell table:style-name="ce2" office:value-type="string" calcext:value-type="string">
            <text:p>Beed_8</text:p>
          </table:table-cell>
          <table:table-cell table:style-name="ce2" office:value-type="percentage" office:value="0.415" calcext:value-type="percentage">
            <text:p>41,50%</text:p>
          </table:table-cell>
          <table:table-cell table:style-name="ce2" office:value-type="percentage" office:value="0.5325" calcext:value-type="percentage">
            <text:p>53,25%</text:p>
          </table:table-cell>
          <table:table-cell table:style-name="ce3"/>
          <table:table-cell table:style-name="ce2" office:value-type="string" calcext:value-type="string">
            <text:p>pir_8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0778" calcext:value-type="percentage">
            <text:p>7,78%</text:p>
          </table:table-cell>
        </table:table-row>
        <table:table-row table:style-name="ro1">
          <table:table-cell table:style-name="ce2" office:value-type="string" calcext:value-type="string">
            <text:p>Beed_9</text:p>
          </table:table-cell>
          <table:table-cell table:style-name="ce2" office:value-type="percentage" office:value="0.355" calcext:value-type="percentage">
            <text:p>35,50%</text:p>
          </table:table-cell>
          <table:table-cell table:style-name="ce2" office:value-type="percentage" office:value="0.5325" calcext:value-type="percentage">
            <text:p>53,25%</text:p>
          </table:table-cell>
          <table:table-cell table:style-name="ce3"/>
          <table:table-cell table:style-name="ce2" office:value-type="string" calcext:value-type="string">
            <text:p>pir_9</text:p>
          </table:table-cell>
          <table:table-cell table:style-name="ce2" office:value-type="percentage" office:value="0.0673" calcext:value-type="percentage">
            <text:p>6,73%</text:p>
          </table:table-cell>
          <table:table-cell table:style-name="ce2" office:value-type="percentage" office:value="0.0791" calcext:value-type="percentage">
            <text:p>7,91%</text:p>
          </table:table-cell>
        </table:table-row>
        <table:table-row table:style-name="ro1">
          <table:table-cell table:style-name="ce2" office:value-type="string" calcext:value-type="string">
            <text:p>Beed_10</text:p>
          </table:table-cell>
          <table:table-cell table:style-name="ce2" office:value-type="percentage" office:value="0.3875" calcext:value-type="percentage">
            <text:p>38,75%</text:p>
          </table:table-cell>
          <table:table-cell table:style-name="ce54" office:value-type="percentage" office:value="0.3363" calcext:value-type="percentage">
            <text:p>33,63%</text:p>
          </table:table-cell>
          <table:table-cell table:style-name="ce3"/>
          <table:table-cell table:style-name="ce2" office:value-type="string" calcext:value-type="string">
            <text:p>pir_10</text:p>
          </table:table-cell>
          <table:table-cell table:style-name="ce2" office:value-type="percentage" office:value="0.0948" calcext:value-type="percentage">
            <text:p>9,48%</text:p>
          </table:table-cell>
          <table:table-cell table:style-name="ce2" office:value-type="percentage" office:value="0.083" calcext:value-type="percentage">
            <text:p>8,30%</text:p>
          </table:table-cell>
        </table:table-row>
        <table:table-row table:style-name="ro1">
          <table:table-cell table:style-name="ce1"/>
          <table:table-cell table:style-name="ce1" table:formula="of:=AVERAGE([.B269:.B278])" office:value-type="percentage" office:value="0.40952" calcext:value-type="percentage">
            <text:p>40,95%</text:p>
          </table:table-cell>
          <table:table-cell table:style-name="ce1" table:formula="of:=AVERAGE([.C269:.C278])" office:value-type="percentage" office:value="0.4214" calcext:value-type="percentage">
            <text:p>42,14%</text:p>
          </table:table-cell>
          <table:table-cell table:style-name="ce3"/>
          <table:table-cell table:style-name="ce1"/>
          <table:table-cell table:style-name="ce1" table:formula="of:=AVERAGE([.F269:.F278])" office:value-type="percentage" office:value="0.0868555555555556" calcext:value-type="percentage">
            <text:p>8,69%</text:p>
          </table:table-cell>
          <table:table-cell table:style-name="ce1" table:formula="of:=AVERAGE([.G269:.G278])" office:value-type="percentage" office:value="0.0772" calcext:value-type="percentage">
            <text:p>7,72%</text:p>
          </table:table-cell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1" table:number-columns-repeated="2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29.394" calcext:value-type="float">
            <text:p>1429,39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11.087" calcext:value-type="float">
            <text:p>1,11E+01</text:p>
          </table:table-cell>
          <table:table-cell table:style-name="ce10" office:value-type="float" office:value="1.368" calcext:value-type="float">
            <text:p>1,37E+00</text:p>
          </table:table-cell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float" office:value="1728.248" calcext:value-type="float">
            <text:p>1728,248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10" office:value-type="float" office:value="1.398" calcext:value-type="float">
            <text:p>1,40E+00</text:p>
          </table:table-cell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office:value-type="float" office:value="2272.592" calcext:value-type="float">
            <text:p>2272,592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5.202" calcext:value-type="float">
            <text:p>15,202</text:p>
          </table:table-cell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office:value-type="float" office:value="1809.332" calcext:value-type="float">
            <text:p>1809,33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1.084" calcext:value-type="float">
            <text:p>2,11E+01</text:p>
          </table:table-cell>
          <table:table-cell table:style-name="ce10" office:value-type="float" office:value="0.68" calcext:value-type="float">
            <text:p>6,80E-01</text:p>
          </table:table-cell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0.342" calcext:value-type="float">
            <text:p>3,42E-01</text:p>
          </table:table-cell>
          <table:table-cell table:style-name="ce10" office:value-type="float" office:value="0.113" calcext:value-type="float">
            <text:p>1,13E-01</text:p>
          </table:table-cell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12.423" calcext:value-type="float">
            <text:p>1,24E+01</text:p>
          </table:table-cell>
          <table:table-cell table:style-name="ce10" office:value-type="float" office:value="6.195" calcext:value-type="float">
            <text:p>6,20E+00</text:p>
          </table:table-cell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0844" calcext:value-type="float">
            <text:p>0,0844</text:p>
          </table:table-cell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295" calcext:value-type="float">
            <text:p>2,95E-01</text:p>
          </table:table-cell>
          <table:table-cell table:style-name="ce10" office:value-type="float" office:value="1.241" calcext:value-type="float">
            <text:p>1,24E+00</text:p>
          </table:table-cell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2.2" calcext:value-type="float">
            <text:p>2,20E+00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number-columns-repeated="2" table:style-name="ce6" office:value-type="float" office:value="0.827" calcext:value-type="float">
            <text:p>0,827</text:p>
          </table:table-cell>
        </table:table-row>
        <table:table-row table:style-name="ro1">
          <table:table-cell table:style-name="ce1"/>
          <table:table-cell table:style-name="ce5" table:formula="of:=AVERAGE([.B282:.B291])" office:value-type="float" office:value="1809.8915" calcext:value-type="float">
            <text:p>1809,8915</text:p>
          </table:table-cell>
          <table:table-cell table:style-name="ce5" table:formula="of:=AVERAGE([.C282:.C29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82:.F291])" office:value-type="float" office:value="4.89063" calcext:value-type="float">
            <text:p>4,89063</text:p>
          </table:table-cell>
          <table:table-cell table:style-name="ce11" table:formula="of:=AVERAGE([.G282:.G291])" office:value-type="float" office:value="3.01204444444444" calcext:value-type="float">
            <text:p>3,01E+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c=2000</text:p>
          </table:table-cell>
          <table:table-cell table:style-name="ce1" office:value-type="string" calcext:value-type="string">
            <text:p>Nc=1000</text:p>
          </table:table-cell>
          <table:table-cell table:style-name="ce1"/>
          <table:table-cell table:style-name="ce5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0691" calcext:value-type="float">
            <text:p>0,0691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2239.904" calcext:value-type="float">
            <text:p>2239,904</text:p>
          </table:table-cell>
          <table:table-cell table:style-name="ce6" office:value-type="float" office:value="3446.277" calcext:value-type="float">
            <text:p>3446,277</text:p>
          </table:table-cell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205" calcext:value-type="float">
            <text:p>0,205</text:p>
          </table:table-cell>
          <table:table-cell table:style-name="ce6" office:value-type="float" office:value="0.195" calcext:value-type="float">
            <text:p>0,19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533.338" calcext:value-type="float">
            <text:p>1533,33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575.821" calcext:value-type="float">
            <text:p>2575,8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2727.179" calcext:value-type="float">
            <text:p>2727,17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416" calcext:value-type="float">
            <text:p>0,416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1908.427" calcext:value-type="float">
            <text:p>1908,4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1099" calcext:value-type="float">
            <text:p>0,1099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427.756" calcext:value-type="float">
            <text:p>1427,75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676" calcext:value-type="float">
            <text:p>0,0676</text:p>
          </table:table-cell>
          <table:table-cell table:style-name="ce6" office:value-type="float" office:value="0.0747" calcext:value-type="float">
            <text:p>0,0747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421.882" calcext:value-type="float">
            <text:p>2421,8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241.85" calcext:value-type="float">
            <text:p>3241,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397.465" calcext:value-type="float">
            <text:p>2397,4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961" calcext:value-type="float">
            <text:p>0,0961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837.778" calcext:value-type="float">
            <text:p>2837,77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294:.B303])" office:value-type="float" office:value="0.18217" calcext:value-type="float">
            <text:p>0,18217</text:p>
          </table:table-cell>
          <table:table-cell table:style-name="ce5" table:formula="of:=AVERAGE([.C294:.C303])" office:value-type="float" office:value="0.18027" calcext:value-type="float">
            <text:p>0,18027</text:p>
          </table:table-cell>
          <table:table-cell table:style-name="ce5" table:number-columns-repeated="2"/>
          <table:table-cell table:style-name="ce5" table:formula="of:=AVERAGE([.F294:.F303])" office:value-type="float" office:value="2331.14" calcext:value-type="float">
            <text:p>2331,14</text:p>
          </table:table-cell>
          <table:table-cell table:style-name="ce5" table:formula="of:=AVERAGE([.G294:.G303])" office:value-type="float" office:value="3446.277" calcext:value-type="float">
            <text:p>3446,277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 table:number-columns-repeated="2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596" calcext:value-type="float">
            <text:p>0,1596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11.39" calcext:value-type="float">
            <text:p>11,39</text:p>
          </table:table-cell>
          <table:table-cell table:style-name="ce6" office:value-type="float" office:value="9.81" calcext:value-type="float">
            <text:p>9,81</text:p>
          </table:table-cell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10.97" calcext:value-type="float">
            <text:p>10,97</text:p>
          </table:table-cell>
          <table:table-cell table:style-name="ce6" office:value-type="float" office:value="11.44" calcext:value-type="float">
            <text:p>11,44</text:p>
          </table:table-cell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1.68" calcext:value-type="float">
            <text:p>11,68</text:p>
          </table:table-cell>
          <table:table-cell table:style-name="ce6" office:value-type="float" office:value="11.23" calcext:value-type="float">
            <text:p>11,23</text:p>
          </table:table-cell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11.73" calcext:value-type="float">
            <text:p>11,73</text:p>
          </table:table-cell>
          <table:table-cell table:style-name="ce6" office:value-type="float" office:value="9.62" calcext:value-type="float">
            <text:p>9,62</text:p>
          </table:table-cell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0.63" calcext:value-type="float">
            <text:p>10,63</text:p>
          </table:table-cell>
          <table:table-cell table:style-name="ce6" office:value-type="float" office:value="11.15" calcext:value-type="float">
            <text:p>11,15</text:p>
          </table:table-cell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16.42" calcext:value-type="float">
            <text:p>16,42</text:p>
          </table:table-cell>
          <table:table-cell table:style-name="ce6" office:value-type="float" office:value="14.35" calcext:value-type="float">
            <text:p>14,35</text:p>
          </table:table-cell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0.27" calcext:value-type="float">
            <text:p>10,27</text:p>
          </table:table-cell>
          <table:table-cell table:style-name="ce6" office:value-type="float" office:value="8.6" calcext:value-type="float">
            <text:p>8,6</text:p>
          </table:table-cell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10.74" calcext:value-type="float">
            <text:p>10,74</text:p>
          </table:table-cell>
          <table:table-cell table:style-name="ce6" office:value-type="float" office:value="10.902" calcext:value-type="float">
            <text:p>10,902</text:p>
          </table:table-cell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1.17" calcext:value-type="float">
            <text:p>11,1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number-columns-repeated="2" table:style-name="ce6" office:value-type="float" office:value="14.02" calcext:value-type="float">
            <text:p>14,02</text:p>
          </table:table-cell>
        </table:table-row>
        <table:table-row table:style-name="ro1">
          <table:table-cell table:style-name="ce1"/>
          <table:table-cell table:style-name="ce5" table:formula="of:=AVERAGE([.B306:.B315])" office:value-type="float" office:value="0.17636" calcext:value-type="float">
            <text:p>0,17636</text:p>
          </table:table-cell>
          <table:table-cell table:style-name="ce5" table:formula="of:=AVERAGE([.C306:.C31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6:.F315])" office:value-type="float" office:value="11.902" calcext:value-type="float">
            <text:p>11,902</text:p>
          </table:table-cell>
          <table:table-cell table:style-name="ce5" table:formula="of:=AVERAGE([.G306:.G315])" office:value-type="float" office:value="11.2357777777778" calcext:value-type="float">
            <text:p>11,2357777777778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 table:number-columns-repeated="2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55" calcext:value-type="float">
            <text:p>0,255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1.208" calcext:value-type="float">
            <text:p>1,208</text:p>
          </table:table-cell>
          <table:table-cell table:style-name="ce6" office:value-type="float" office:value="0.705" calcext:value-type="float">
            <text:p>0,705</text:p>
          </table:table-cell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 office:value-type="float" office:value="0.707" calcext:value-type="float">
            <text:p>0,707</text:p>
          </table:table-cell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1.373" calcext:value-type="float">
            <text:p>1,373</text:p>
          </table:table-cell>
          <table:table-cell table:style-name="ce6" office:value-type="float" office:value="1.229" calcext:value-type="float">
            <text:p>1,229</text:p>
          </table:table-cell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2.081" calcext:value-type="float">
            <text:p>2,081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number-columns-repeated="2" table:style-name="ce6" office:value-type="float" office:value="0.774" calcext:value-type="float">
            <text:p>0,774</text:p>
          </table:table-cell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number-columns-repeated="2" table:style-name="ce6" office:value-type="float" office:value="1.461" calcext:value-type="float">
            <text:p>1,461</text:p>
          </table:table-cell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477" calcext:value-type="float">
            <text:p>1,47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number-columns-repeated="2" table:style-name="ce6" office:value-type="float" office:value="0.854" calcext:value-type="float">
            <text:p>0,854</text:p>
          </table:table-cell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number-columns-repeated="2" table:style-name="ce6" office:value-type="float" office:value="0.731" calcext:value-type="float">
            <text:p>0,731</text:p>
          </table:table-cell>
        </table:table-row>
        <table:table-row table:style-name="ro1">
          <table:table-cell table:style-name="ce1"/>
          <table:table-cell table:style-name="ce5" table:formula="of:=AVERAGE([.B319:.B328])" office:value-type="float" office:value="0.331" calcext:value-type="float">
            <text:p>0,331</text:p>
          </table:table-cell>
          <table:table-cell table:style-name="ce5" table:formula="of:=AVERAGE([.C319:.C328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19:.F328])" office:value-type="float" office:value="1.1879" calcext:value-type="float">
            <text:p>1,1879</text:p>
          </table:table-cell>
          <table:table-cell table:style-name="ce5" table:formula="of:=AVERAGE([.G319:.G328])" office:value-type="float" office:value="0.923" calcext:value-type="float">
            <text:p>0,923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 table:number-columns-repeated="2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4.263" calcext:value-type="float">
            <text:p>4,263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814" calcext:value-type="float">
            <text:p>0,08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3.069" calcext:value-type="float">
            <text:p>3,069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0766" calcext:value-type="float">
            <text:p>0,07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717" calcext:value-type="float">
            <text:p>0,717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485" calcext:value-type="float">
            <text:p>0,4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549" calcext:value-type="float">
            <text:p>1,549</text:p>
          </table:table-cell>
          <table:table-cell table:style-name="ce6" office:value-type="float" office:value="1.557" calcext:value-type="float">
            <text:p>1,557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26.375" calcext:value-type="float">
            <text:p>26,375</text:p>
          </table:table-cell>
          <table:table-cell table:style-name="ce6" office:value-type="float" office:value="10.519" calcext:value-type="float">
            <text:p>10,519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1.664" calcext:value-type="float">
            <text:p>1,664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53" calcext:value-type="float">
            <text:p>0,53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0708" calcext:value-type="float">
            <text:p>0,07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595" calcext:value-type="float">
            <text:p>3,595</text:p>
          </table:table-cell>
          <table:table-cell table:style-name="ce6" office:value-type="float" office:value="0.995" calcext:value-type="float">
            <text:p>0,995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528" calcext:value-type="float">
            <text:p>0,52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049" calcext:value-type="float">
            <text:p>0,04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number-columns-repeated="2" table:style-name="ce6" office:value-type="float" office:value="8.943" calcext:value-type="float">
            <text:p>8,943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31:.B340])" office:value-type="float" office:value="4.7041" calcext:value-type="float">
            <text:p>4,7041</text:p>
          </table:table-cell>
          <table:table-cell table:style-name="ce5" table:formula="of:=AVERAGE([.C331:.C340])" office:value-type="float" office:value="3.39933333333333" calcext:value-type="float">
            <text:p>3,39933333333333</text:p>
          </table:table-cell>
          <table:table-cell table:style-name="ce5" table:number-columns-repeated="2"/>
          <table:table-cell table:style-name="ce5" table:formula="of:=AVERAGE([.F331:.F340])" office:value-type="float" office:value="0.30648" calcext:value-type="float">
            <text:p>0,30648</text:p>
          </table:table-cell>
          <table:table-cell table:style-name="ce5" table:formula="of:=AVERAGE([.G331:.G3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 table:number-columns-repeated="2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1531.152" calcext:value-type="float">
            <text:p>1531,152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71.581" calcext:value-type="float">
            <text:p>71,58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1889.658" calcext:value-type="float">
            <text:p>1889,658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77.662" calcext:value-type="float">
            <text:p>77,6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1729.495" calcext:value-type="float">
            <text:p>1729,495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53.501" calcext:value-type="float">
            <text:p>53,5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2174.749" calcext:value-type="float">
            <text:p>2174,749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50.093" calcext:value-type="float">
            <text:p>50,0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2949.023" calcext:value-type="float">
            <text:p>2949,023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48.444" calcext:value-type="float">
            <text:p>48,44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644.596" calcext:value-type="float">
            <text:p>2644,596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52.499" calcext:value-type="float">
            <text:p>52,4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float" office:value="1994.929" calcext:value-type="float">
            <text:p>1994,929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65.453" calcext:value-type="float">
            <text:p>65,4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1596.418" calcext:value-type="float">
            <text:p>1596,418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424.44" calcext:value-type="float">
            <text:p>2424,4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592.307" calcext:value-type="float">
            <text:p>1592,307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68.069" calcext:value-type="float">
            <text:p>68,069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44:.B353])" office:value-type="float" office:value="2052.6767" calcext:value-type="float">
            <text:p>2052,6767</text:p>
          </table:table-cell>
          <table:table-cell table:style-name="ce5" table:formula="of:=AVERAGE([.C344:.C35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4:.F353])" office:value-type="float" office:value="60.91275" calcext:value-type="float">
            <text:p>60,91275</text:p>
          </table:table-cell>
          <table:table-cell table:style-name="ce5" table:formula="of:=AVERAGE([.G344:.G35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 table:number-columns-repeated="2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377" calcext:value-type="float">
            <text:p>0,377</text:p>
          </table:table-cell>
          <table:table-cell table:style-name="ce6" office:value-type="float" office:value="2.672" calcext:value-type="float">
            <text:p>2,672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3.687" calcext:value-type="float">
            <text:p>3,6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0.3799" calcext:value-type="float">
            <text:p>0,3799</text:p>
          </table:table-cell>
          <table:table-cell table:style-name="ce6" office:value-type="float" office:value="2.759" calcext:value-type="float">
            <text:p>2,759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537" calcext:value-type="float">
            <text:p>3,5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6.071" calcext:value-type="float">
            <text:p>6,071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289" calcext:value-type="float">
            <text:p>3,2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13.288" calcext:value-type="float">
            <text:p>13,288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2" calcext:value-type="float">
            <text:p>3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757" calcext:value-type="float">
            <text:p>3,7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196" calcext:value-type="float">
            <text:p>3,19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number-columns-repeated="2" table:style-name="ce6" office:value-type="float" office:value="0.1898" calcext:value-type="float">
            <text:p>0,1898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1.691" calcext:value-type="float">
            <text:p>11,6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number-columns-repeated="2" table:style-name="ce6" office:value-type="float" office:value="0.292" calcext:value-type="float">
            <text:p>0,292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541" calcext:value-type="float">
            <text:p>3,5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number-columns-repeated="2" table:style-name="ce6" office:value-type="float" office:value="0.442" calcext:value-type="float">
            <text:p>0,44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393" calcext:value-type="float">
            <text:p>3,3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number-columns-repeated="2" table:style-name="ce6" office:value-type="float" office:value="0.447" calcext:value-type="float">
            <text:p>0,447</text:p>
          </table:table-cell>
          <table:table-cell table:style-name="ce6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57:.B366])" office:value-type="float" office:value="2.19967" calcext:value-type="float">
            <text:p>2,19967</text:p>
          </table:table-cell>
          <table:table-cell table:style-name="ce5" table:formula="of:=AVERAGE([.C357:.C366])" office:value-type="float" office:value="0.819088888888889" calcext:value-type="float">
            <text:p>0,819088888888889</text:p>
          </table:table-cell>
          <table:table-cell table:style-name="ce5" table:number-columns-repeated="2"/>
          <table:table-cell table:style-name="ce5" table:formula="of:=AVERAGE([.F357:.F366])" office:value-type="float" office:value="4.2399" calcext:value-type="float">
            <text:p>4,2399</text:p>
          </table:table-cell>
          <table:table-cell table:style-name="ce5" table:formula="of:=AVERAGE([.G357:.G36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 table:number-columns-repeated="2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41.615" calcext:value-type="float">
            <text:p>41,615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2.342" calcext:value-type="float">
            <text:p>2,342</text:p>
          </table:table-cell>
          <table:table-cell table:style-name="ce6" office:value-type="float" office:value="3.755" calcext:value-type="float">
            <text:p>3,755</text:p>
          </table:table-cell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219" calcext:value-type="float">
            <text:p>7,219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8.251" calcext:value-type="float">
            <text:p>28,251</text:p>
          </table:table-cell>
          <table:table-cell table:style-name="ce6" office:value-type="float" office:value="50.634" calcext:value-type="float">
            <text:p>50,634</text:p>
          </table:table-cell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229" calcext:value-type="float">
            <text:p>9,22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32.363" calcext:value-type="float">
            <text:p>32,363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7.699" calcext:value-type="float">
            <text:p>7,699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15.159" calcext:value-type="float">
            <text:p>15,159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646" calcext:value-type="float">
            <text:p>7,64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52.542" calcext:value-type="float">
            <text:p>52,542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193" calcext:value-type="float">
            <text:p>8,193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7.1298" calcext:value-type="float">
            <text:p>7,1298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9.8" calcext:value-type="float">
            <text:p>9,8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2.96" calcext:value-type="float">
            <text:p>12,9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54" calcext:value-type="float">
            <text:p>7,54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12.821" calcext:value-type="float">
            <text:p>12,82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671" calcext:value-type="float">
            <text:p>6,671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28.96" calcext:value-type="float">
            <text:p>28,96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33" calcext:value-type="float">
            <text:p>7,33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1.798" calcext:value-type="float">
            <text:p>1,798</text:p>
          </table:table-cell>
          <table:table-cell table:style-name="ce6"/>
        </table:table-row>
        <table:table-row table:style-name="ro1">
          <table:table-cell table:style-name="ce5"/>
          <table:table-cell table:style-name="ce5" table:formula="of:=AVERAGE([.B370:.B379])" office:value-type="float" office:value="11.2942" calcext:value-type="float">
            <text:p>11,2942</text:p>
          </table:table-cell>
          <table:table-cell table:style-name="ce5" table:formula="of:=AVERAGE([.C370:.C3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70:.F379])" office:value-type="float" office:value="19.43258" calcext:value-type="float">
            <text:p>19,43258</text:p>
          </table:table-cell>
          <table:table-cell table:style-name="ce5" table:formula="of:=AVERAGE([.G370:.G379])" office:value-type="float" office:value="27.1945" calcext:value-type="float">
            <text:p>27,1945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/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39.503" calcext:value-type="float">
            <text:p>139,503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111.674" calcext:value-type="float">
            <text:p>111,6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585" calcext:value-type="float">
            <text:p>128,585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float" office:value="72.466" calcext:value-type="float">
            <text:p>72,4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6.388" calcext:value-type="float">
            <text:p>156,388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office:value-type="float" office:value="79.677" calcext:value-type="float">
            <text:p>79,67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float" office:value="170.322" calcext:value-type="float">
            <text:p>170,322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office:value-type="float" office:value="13.203" calcext:value-type="float">
            <text:p>13,2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office:value-type="float" office:value="143.555" calcext:value-type="float">
            <text:p>143,555</text:p>
          </table:table-cell>
          <table:table-cell table:style-name="ce6" table:number-columns-repeated="2"/>
          <table:table-cell table:style-name="ce2" office:value-type="string" calcext:value-type="string">
            <text:p>Treasury_5</text:p>
          </table:table-cell>
          <table:table-cell table:style-name="ce6" office:value-type="float" office:value="127.55" calcext:value-type="float">
            <text:p>127,5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office:value-type="float" office:value="130.076" calcext:value-type="float">
            <text:p>130,076</text:p>
          </table:table-cell>
          <table:table-cell table:style-name="ce6" table:number-columns-repeated="2"/>
          <table:table-cell table:style-name="ce2" office:value-type="string" calcext:value-type="string">
            <text:p>Treasury_6</text:p>
          </table:table-cell>
          <table:table-cell table:style-name="ce6" office:value-type="float" office:value="146.318" calcext:value-type="float">
            <text:p>146,3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office:value-type="float" office:value="176.348" calcext:value-type="float">
            <text:p>176,348</text:p>
          </table:table-cell>
          <table:table-cell table:style-name="ce6" table:number-columns-repeated="2"/>
          <table:table-cell table:style-name="ce2" office:value-type="string" calcext:value-type="string">
            <text:p>Treasury_7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office:value-type="float" office:value="151.831" calcext:value-type="float">
            <text:p>151,831</text:p>
          </table:table-cell>
          <table:table-cell table:style-name="ce6" table:number-columns-repeated="2"/>
          <table:table-cell table:style-name="ce2" office:value-type="string" calcext:value-type="string">
            <text:p>Treasury_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office:value-type="float" office:value="146.662" calcext:value-type="float">
            <text:p>146,662</text:p>
          </table:table-cell>
          <table:table-cell table:style-name="ce6" table:number-columns-repeated="2"/>
          <table:table-cell table:style-name="ce2" office:value-type="string" calcext:value-type="string">
            <text:p>Treasury_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office:value-type="float" office:value="155.141" calcext:value-type="float">
            <text:p>155,141</text:p>
          </table:table-cell>
          <table:table-cell table:style-name="ce6" table:number-columns-repeated="2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83:.B392])" office:value-type="float" office:value="149.8411" calcext:value-type="float">
            <text:p>149,8411</text:p>
          </table:table-cell>
          <table:table-cell table:style-name="ce5" table:formula="of:=AVERAGE([.C383:.C392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3:.F392])" office:value-type="float" office:value="91.8146666666667" calcext:value-type="float">
            <text:p>91,8146666666667</text:p>
          </table:table-cell>
          <table:table-cell table:style-name="ce5" table:formula="of:=AVERAGE([.G383:.G39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/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2065.133" calcext:value-type="float">
            <text:p>2065,133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561.361" calcext:value-type="float">
            <text:p>561,361</text:p>
          </table:table-cell>
          <table:table-cell table:style-name="ce6" office:value-type="float" office:value="1000.15" calcext:value-type="float">
            <text:p>1000,15</text:p>
          </table:table-cell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3199.82" calcext:value-type="float">
            <text:p>3199,82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692.377" calcext:value-type="float">
            <text:p>692,377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float" office:value="2894.846" calcext:value-type="float">
            <text:p>2894,846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1084.323" calcext:value-type="float">
            <text:p>1084,32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office:value-type="float" office:value="4032.966" calcext:value-type="float">
            <text:p>4032,966</text:p>
          </table:table-cell>
          <table:table-cell table:style-name="ce6" table:number-columns-repeated="2"/>
          <table:table-cell table:style-name="ce2" office:value-type="string" calcext:value-type="string">
            <text:p>Auto_4</text:p>
          </table:table-cell>
          <table:table-cell table:style-name="ce6" office:value-type="float" office:value="985.605" calcext:value-type="float">
            <text:p>985,60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office:value-type="float" office:value="4066.631" calcext:value-type="float">
            <text:p>4066,631</text:p>
          </table:table-cell>
          <table:table-cell table:style-name="ce6" table:number-columns-repeated="2"/>
          <table:table-cell table:style-name="ce2" office:value-type="string" calcext:value-type="string">
            <text:p>Auto_5</text:p>
          </table:table-cell>
          <table:table-cell table:style-name="ce6" office:value-type="float" office:value="814.788" calcext:value-type="float">
            <text:p>814,7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office:value-type="float" office:value="3072.138" calcext:value-type="float">
            <text:p>3072,138</text:p>
          </table:table-cell>
          <table:table-cell table:style-name="ce6" table:number-columns-repeated="2"/>
          <table:table-cell table:style-name="ce2" office:value-type="string" calcext:value-type="string">
            <text:p>Auto_6</text:p>
          </table:table-cell>
          <table:table-cell table:style-name="ce6" office:value-type="float" office:value="625.878" calcext:value-type="float">
            <text:p>625,87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office:value-type="float" office:value="3865.951" calcext:value-type="float">
            <text:p>3865,951</text:p>
          </table:table-cell>
          <table:table-cell table:style-name="ce6" table:number-columns-repeated="2"/>
          <table:table-cell table:style-name="ce2" office:value-type="string" calcext:value-type="string">
            <text:p>Auto_7</text:p>
          </table:table-cell>
          <table:table-cell table:style-name="ce6" office:value-type="float" office:value="1053.257" calcext:value-type="float">
            <text:p>1053,2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office:value-type="float" office:value="2996.765" calcext:value-type="float">
            <text:p>2996,765</text:p>
          </table:table-cell>
          <table:table-cell table:style-name="ce6" table:number-columns-repeated="2"/>
          <table:table-cell table:style-name="ce2" office:value-type="string" calcext:value-type="string">
            <text:p>Auto_8</text:p>
          </table:table-cell>
          <table:table-cell table:style-name="ce6" office:value-type="float" office:value="1140.693" calcext:value-type="float">
            <text:p>1140,6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office:value-type="float" office:value="3997.511" calcext:value-type="float">
            <text:p>3997,511</text:p>
          </table:table-cell>
          <table:table-cell table:style-name="ce6" table:number-columns-repeated="2"/>
          <table:table-cell table:style-name="ce2" office:value-type="string" calcext:value-type="string">
            <text:p>Auto_9</text:p>
          </table:table-cell>
          <table:table-cell table:style-name="ce6" office:value-type="float" office:value="855.241" calcext:value-type="float">
            <text:p>855,2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office:value-type="float" office:value="3876.217" calcext:value-type="float">
            <text:p>3876,217</text:p>
          </table:table-cell>
          <table:table-cell table:style-name="ce6" table:number-columns-repeated="2"/>
          <table:table-cell table:style-name="ce2" office:value-type="string" calcext:value-type="string">
            <text:p>Auto_10</text:p>
          </table:table-cell>
          <table:table-cell table:style-name="ce6" office:value-type="float" office:value="703.881" calcext:value-type="float">
            <text:p>703,881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396:.B405])" office:value-type="float" office:value="3406.7978" calcext:value-type="float">
            <text:p>3406,7978</text:p>
          </table:table-cell>
          <table:table-cell table:style-name="ce5" table:formula="of:=AVERAGE([.C396:.C405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6:.F405])" office:value-type="float" office:value="851.7404" calcext:value-type="float">
            <text:p>851,7404</text:p>
          </table:table-cell>
          <table:table-cell table:style-name="ce5" table:formula="of:=AVERAGE([.G396:.G405])" office:value-type="float" office:value="1000.15" calcext:value-type="float">
            <text:p>1000,15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 table:style-name="ce5"/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49.523" calcext:value-type="float">
            <text:p>449,523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float" office:value="539.473" calcext:value-type="float">
            <text:p>539,473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67" calcext:value-type="float">
            <text:p>0,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577.137" calcext:value-type="float">
            <text:p>577,137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2" calcext:value-type="float">
            <text:p>0,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604.078" calcext:value-type="float">
            <text:p>604,078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548.497" calcext:value-type="float">
            <text:p>548,497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782" calcext:value-type="float">
            <text:p>0,07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table:number-columns-repeated="3"/>
          <table:table-cell table:style-name="ce2" office:value-type="string" calcext:value-type="string">
            <text:p>MB_7</text:p>
          </table:table-cell>
          <table:table-cell table:style-name="ce6" office:value-type="float" office:value="0.291" calcext:value-type="float">
            <text:p>0,2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730.782" calcext:value-type="float">
            <text:p>730,782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lastic_10</text:p>
          </table:table-cell>
          <table:table-cell table:style-name="ce6" office:value-type="float" office:value="585.224" calcext:value-type="float">
            <text:p>585,22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09:.B418])" office:value-type="float" office:value="576.387714285714" calcext:value-type="float">
            <text:p>576,387714285714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409:.F418])" office:value-type="float" office:value="0.28482" calcext:value-type="float">
            <text:p>0,28482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  <table:table-cell/>
          <table:table-cell table:style-name="ce1"/>
          <table:table-cell table:style-name="ce5" office:value-type="string" calcext:value-type="string">
            <text:p>Nc=2000</text:p>
          </table:table-cell>
          <table:table-cell table:style-name="ce5" office:value-type="string" calcext:value-type="string">
            <text:p>Nc=1000</text:p>
          </table:table-cell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53" calcext:value-type="float">
            <text:p>1,2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float" office:value="0.113" calcext:value-type="float">
            <text:p>0,113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7" calcext:value-type="float">
            <text:p>0,04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3.835" calcext:value-type="float">
            <text:p>3,83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207" calcext:value-type="float">
            <text:p>0,2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8</text:p>
          </table:table-cell>
          <table:table-cell table:style-name="ce6" office:value-type="float" office:value="0.0848" calcext:value-type="float">
            <text:p>0,0848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1.115" calcext:value-type="float">
            <text:p>1,1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5" calcext:value-type="float">
            <text:p>0,2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591" calcext:value-type="float">
            <text:p>0,0591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/>
        </table:table-row>
        <table:table-row table:style-name="ro1">
          <table:table-cell table:style-name="ce1"/>
          <table:table-cell table:style-name="ce5" table:formula="of:=AVERAGE([.B421:.B430])" office:value-type="float" office:value="0.08156" calcext:value-type="float">
            <text:p>0,08156</text:p>
          </table:table-cell>
          <table:table-cell table:style-name="ce5" table:formula="of:=AVERAGE([.C421:.C43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21:.F430])" office:value-type="float" office:value="0.82937" calcext:value-type="float">
            <text:p>0,82937</text:p>
          </table:table-cell>
          <table:table-cell table:style-name="ce5" table:formula="of:=AVERAGE([.G421:.G430])" office:value-type="string" office:string-value="" calcext:value-type="error">
            <text:p>#DIV/0!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articles_average" table:style-name="ta1">
        <table:table-column table:style-name="co7" table:default-cell-style-name="Default"/>
        <table:table-column table:style-name="co7" table:default-cell-style-name="ce15"/>
        <table:table-column table:style-name="co7" table:number-columns-repeated="4" table:default-cell-style-name="ce48"/>
        <table:table-column table:style-name="co7" table:number-columns-repeated="16378" table:default-cell-style-name="Default"/>
        <table:table-row table:style-name="ro4">
          <table:table-cell office:value-type="string" calcext:value-type="string">
            <text:p>Threads=5 propagation=NtoN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Nc=500</text:p>
          </table:table-cell>
          <table:table-cell table:style-name="ce24" office:value-type="string" calcext:value-type="string">
            <text:p>Nc=200</text:p>
          </table:table-cell>
          <table:table-cell table:style-name="ce24" office:value-type="string" calcext:value-type="string">
            <text:p>Nc=1000</text:p>
          </table:table-cell>
          <table:table-cell table:style-name="ce24" office:value-type="string" calcext:value-type="string">
            <text:p>Nc=20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office:value-type="percentage" office:value="0.2213" calcext:value-type="percentage">
            <text:p>22,13%</text:p>
          </table:table-cell>
          <table:table-cell office:value-type="percentage" office:value="0.2042" calcext:value-type="percentage">
            <text:p>20,42%</text:p>
          </table:table-cell>
          <table:table-cell office:value-type="percentage" office:value="0.1809" calcext:value-type="percentage">
            <text:p>18,09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2443" calcext:value-type="percentage">
            <text:p>24,43%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36" calcext:value-type="percentage">
            <text:p>7,3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eed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4095" calcext:value-type="percentage">
            <text:p>40,9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456" calcext:value-type="percentage">
            <text:p>4,5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4569" calcext:value-type="percentage">
            <text:p>45,69%</text:p>
          </table:table-cell>
          <table:table-cell office:value-type="percentage" office:value="0.4541" calcext:value-type="percentage">
            <text:p>45,41%</text:p>
          </table:table-cell>
          <table:table-cell office:value-type="percentage" office:value="0.4579" calcext:value-type="percentage">
            <text:p>45,79%</text:p>
          </table:table-cell>
          <table:table-cell office:value-type="percentage" office:value="0.4572" calcext:value-type="percentage">
            <text:p>45,7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0997" calcext:value-type="percentage">
            <text:p>9,97%</text:p>
          </table:table-cell>
          <table:table-cell office:value-type="percentage" office:value="0.1329" calcext:value-type="percentage">
            <text:p>13,29%</text:p>
          </table:table-cell>
          <table:table-cell office:value-type="percentage" office:value="0.0992" calcext:value-type="percentage">
            <text:p>9,92%</text:p>
          </table:table-cell>
          <table:table-cell office:value-type="percentage" office:value="0.1003" calcext:value-type="percentage">
            <text:p>10,0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76" calcext:value-type="percentage">
            <text:p>50,7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265" calcext:value-type="percentage">
            <text:p>26,5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3769" calcext:value-type="percentage">
            <text:p>37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1778" calcext:value-type="percentage">
            <text:p>17,7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2163" calcext:value-type="percentage">
            <text:p>21,63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3" calcext:value-type="percentage">
            <text:p>7,3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572" calcext:value-type="percentage">
            <text:p>15,72%</text:p>
          </table:table-cell>
          <table:table-cell office:value-type="percentage" office:value="0.1394" calcext:value-type="percentage">
            <text:p>13,9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406" calcext:value-type="percentage">
            <text:p>34,06%</text:p>
          </table:table-cell>
          <table:table-cell table:number-columns-repeated="2" office:value-type="percentage" office:value="0.3247" calcext:value-type="percentage">
            <text:p>32,4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2536" calcext:value-type="percentage">
            <text:p>25,3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26" calcext:value-type="percentage">
            <text:p>17,2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office:value-type="percentage" office:value="0.4939" calcext:value-type="percentage">
            <text:p>49,39%</text:p>
          </table:table-cell>
          <table:table-cell office:value-type="percentage" office:value="0.4406" calcext:value-type="percentage">
            <text:p>44,06%</text:p>
          </table:table-cell>
          <table:table-cell office:value-type="percentage" office:value="0.4443" calcext:value-type="percentage">
            <text:p>44,43%</text:p>
          </table:table-cell>
          <table:table-cell office:value-type="percentage" office:value="0.4746" calcext:value-type="percentage">
            <text:p>47,4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637" calcext:value-type="percentage">
            <text:p>16,37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office:value-type="percentage" office:value="0.1546" calcext:value-type="percentage">
            <text:p>15,46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59" calcext:value-type="percentage">
            <text:p>14,59%</text:p>
          </table:table-cell>
          <table:table-cell office:value-type="percentage" office:value="0.1517" calcext:value-type="percentage">
            <text:p>15,1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788" calcext:value-type="percentage">
            <text:p>27,88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2704" calcext:value-type="percentage">
            <text:p>27,0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irvision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82" calcext:value-type="percentage">
            <text:p>6,8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2915" calcext:value-type="percentage">
            <text:p>29,15%</text:p>
          </table:table-cell>
          <table:table-cell office:value-type="percentage" office:value="0.2918" calcext:value-type="percentage">
            <text:p>29,18%</text:p>
          </table:table-cell>
          <table:table-cell office:value-type="percentage" office:value="0.2779" calcext:value-type="percentage">
            <text:p>27,7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2076" calcext:value-type="percentage">
            <text:p>20,76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2066" calcext:value-type="percentage">
            <text:p>20,66%</text:p>
          </table:table-cell>
          <table:table-cell office:value-type="percentage" office:value="0.2142" calcext:value-type="percentage">
            <text:p>21,4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267" calcext:value-type="percentage">
            <text:p>32,6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817" calcext:value-type="percentage">
            <text:p>58,17%</text:p>
          </table:table-cell>
          <table:table-cell office:value-type="percentage" office:value="0.5288" calcext:value-type="percentage">
            <text:p>52,88%</text:p>
          </table:table-cell>
          <table:table-cell office:value-type="percentage" office:value="0.3717" calcext:value-type="percentage">
            <text:p>37,1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983" calcext:value-type="percentage">
            <text:p>19,83%</text:p>
          </table:table-cell>
          <table:table-cell office:value-type="percentage" office:value="0.1646" calcext:value-type="percentage">
            <text:p>16,46%</text:p>
          </table:table-cell>
          <table:table-cell office:value-type="percentage" office:value="0.1721" calcext:value-type="percentage">
            <text:p>17,2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165" calcext:value-type="percentage">
            <text:p>21,65%</text:p>
          </table:table-cell>
          <table:table-cell office:value-type="percentage" office:value="0.2015" calcext:value-type="percentage">
            <text:p>20,1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4191" calcext:value-type="percentage">
            <text:p>41,91%</text:p>
          </table:table-cell>
          <table:table-cell office:value-type="percentage" office:value="0.4204" calcext:value-type="percentage">
            <text:p>42,04%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396" calcext:value-type="percentage">
            <text:p>23,96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1941" calcext:value-type="percentage">
            <text:p>19,4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55" calcext:value-type="percentage">
            <text:p>5,5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445" calcext:value-type="percentage">
            <text:p>24,4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416" calcext:value-type="percentage">
            <text:p>24,1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443" calcext:value-type="percentage">
            <text:p>4,4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1182" calcext:value-type="percentage">
            <text:p>11,82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41" calcext:value-type="percentage">
            <text:p>11,4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873" calcext:value-type="percentage">
            <text:p>8,7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868" calcext:value-type="percentage">
            <text:p>8,68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96" calcext:value-type="percentage">
            <text:p>2,9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3" calcext:value-type="percentage">
            <text:p>4,30%</text:p>
          </table:table-cell>
          <table:table-cell table:number-columns-repeated="16378"/>
        </table:table-row>
        <table:table-row table:style-name="ro5">
          <table:table-cell table:style-name="ce13"/>
          <table:table-cell table:style-name="ce17" table:formula="of:=AVERAGE([.B3:.B44])" office:value-type="percentage" office:value="0.26637619047619" calcext:value-type="percentage">
            <text:p>26,64%</text:p>
          </table:table-cell>
          <table:table-cell table:style-name="ce17" table:formula="of:=AVERAGE([.C3:.C44])" office:value-type="percentage" office:value="0.212054761904762" calcext:value-type="percentage">
            <text:p>21,21%</text:p>
          </table:table-cell>
          <table:table-cell table:style-name="ce17" table:formula="of:=AVERAGE([.D3:.D44])" office:value-type="percentage" office:value="0.219411904761905" calcext:value-type="percentage">
            <text:p>21,94%</text:p>
          </table:table-cell>
          <table:table-cell table:style-name="ce17" table:formula="of:=AVERAGE([.E3:.E44])" office:value-type="percentage" office:value="0.210302380952381" calcext:value-type="percentage">
            <text:p>21,03%</text:p>
          </table:table-cell>
          <table:table-cell table:style-name="ce17" table:formula="of:=AVERAGE([.F3:.F44])" office:value-type="percentage" office:value="0.204035714285714" calcext:value-type="percentage">
            <text:p>20,40%</text:p>
          </table:table-cell>
          <table:table-cell table:number-columns-repeated="16378"/>
        </table:table-row>
        <table:table-row table:style-name="ro3">
          <table:table-cell table:style-name="ce38"/>
          <table:table-cell table:style-name="ce38" office:value-type="string" calcext:value-type="string">
            <text:p>GAIN</text:p>
          </table:table-cell>
          <table:table-cell table:style-name="ce18" table:formula="of:=([.B45]-[.C45])/[.B45]" office:value-type="percentage" office:value="0.20392749244713" calcext:value-type="percentage">
            <text:p>20,39%</text:p>
          </table:table-cell>
          <table:table-cell table:style-name="ce18" table:formula="of:=([.B45]-[.D45])/[.B45]" office:value-type="percentage" office:value="0.176308121346467" calcext:value-type="percentage">
            <text:p>17,63%</text:p>
          </table:table-cell>
          <table:table-cell table:style-name="ce18" table:formula="of:=([.B45]-[.E45])/[.B45]" office:value-type="percentage" office:value="0.210506086987611" calcext:value-type="percentage">
            <text:p>21,05%</text:p>
          </table:table-cell>
          <table:table-cell table:style-name="ce18" table:formula="of:=([.B45]-[.F45])/[.B45]" office:value-type="percentage" office:value="0.234031713116073" calcext:value-type="percentage">
            <text:p>23,40%</text:p>
          </table:table-cell>
          <table:table-cell table:style-name="ce38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1">00/00/0000</text:date>, <text:time style:data-style-name="N2" text:time-value="09:06:08.56554377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7-11T15:16:47.578948419</dc:date>
    <meta:editing-duration>P3DT1H42M58S</meta:editing-duration>
    <meta:editing-cycles>2563</meta:editing-cycles>
    <meta:generator>LibreOffice/25.2.3.2$Linux_X86_64 LibreOffice_project/520$Build-2</meta:generator>
    <meta:document-statistic meta:table-count="8" meta:cell-count="9614" meta:object-count="0"/>
  </office:meta>
</office:document-meta>
</file>