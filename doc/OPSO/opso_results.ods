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609" calcext:value-type="percentage">
            <text:p>36,09%</text:p>
          </table:table-cell>
          <table:table-cell table:style-name="ce3" office:value-type="percentage" office:value="0.3855" calcext:value-type="percentage">
            <text:p>38,55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971" calcext:value-type="percentage">
            <text:p>19,71%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number-columns-repeated="2"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3435" calcext:value-type="percentage">
            <text:p>34,35%</text:p>
          </table:table-cell>
          <table:table-cell table:style-name="ce3" office:value-type="percentage" office:value="0.2681" calcext:value-type="percentage">
            <text:p>26,8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3072" calcext:value-type="percentage">
            <text:p>30,72%</text:p>
          </table:table-cell>
          <table:table-cell table:style-name="ce3" office:value-type="percentage" office:value="0.3507" calcext:value-type="percentage">
            <text:p>35,0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42" calcext:value-type="percentage">
            <text:p>24,20%</text:p>
          </table:table-cell>
          <table:table-cell table:style-name="ce3" office:value-type="percentage" office:value="0.2522" calcext:value-type="percentage">
            <text:p>25,2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348" calcext:value-type="percentage">
            <text:p>23,48%</text:p>
          </table:table-cell>
          <table:table-cell table:style-name="ce3" office:value-type="percentage" office:value="0.3087" calcext:value-type="percentage">
            <text:p>30,8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2971" calcext:value-type="percentage">
            <text:p>29,71%</text:p>
          </table:table-cell>
          <table:table-cell table:style-name="ce3" office:value-type="percentage" office:value="0.3174" calcext:value-type="percentage">
            <text:p>31,74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899" calcext:value-type="percentage">
            <text:p>18,99%</text:p>
          </table:table-cell>
          <table:table-cell table:style-name="ce3" office:value-type="percentage" office:value="0.2406" calcext:value-type="percentage">
            <text:p>24,0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928" calcext:value-type="percentage">
            <text:p>29,2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449" calcext:value-type="percentage">
            <text:p>24,49%</text:p>
          </table:table-cell>
          <table:table-cell table:style-name="ce2" office:value-type="percentage" office:value="0.2623" calcext:value-type="percentage">
            <text:p>26,2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36" calcext:value-type="percentage">
            <text:p>23,60%</text:p>
          </table:table-cell>
          <table:table-cell table:style-name="ce1" table:formula="of:=AVERAGE([.C2:.C11])" office:value-type="percentage" office:value="0.222222222222222" calcext:value-type="percentage">
            <text:p>22,22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671" calcext:value-type="percentage">
            <text:p>26,71%</text:p>
          </table:table-cell>
          <table:table-cell table:style-name="ce1" table:formula="of:=AVERAGE([.G2:.G11])" office:value-type="percentage" office:value="0.297588888888889" calcext:value-type="percentage">
            <text:p>29,7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69" calcext:value-type="percentage">
            <text:p>56,90%</text:p>
          </table:table-cell>
          <table:table-cell table:style-name="ce2" office:value-type="percentage" office:value="0.6793" calcext:value-type="percentage">
            <text:p>67,93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53" calcext:value-type="percentage">
            <text:p>5,3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759" calcext:value-type="percentage">
            <text:p>37,59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966" calcext:value-type="percentage">
            <text:p>49,66%</text:p>
          </table:table-cell>
          <table:table-cell table:style-name="ce2" office:value-type="percentage" office:value="0.4207" calcext:value-type="percentage">
            <text:p>42,07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4207" calcext:value-type="percentage">
            <text:p>42,07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number-columns-repeated="2" table:style-name="ce2" office:value-type="percentage" office:value="0.068" calcext:value-type="percentage">
            <text:p>6,8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862" calcext:value-type="percentage">
            <text:p>48,62%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23" calcext:value-type="percentage">
            <text:p>2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448" calcext:value-type="percentage">
            <text:p>34,48%</text:p>
          </table:table-cell>
          <table:table-cell table:style-name="ce2" office:value-type="percentage" office:value="0.3828" calcext:value-type="percentage">
            <text:p>38,28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3" calcext:value-type="percentage">
            <text:p>3,3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2" office:value-type="percentage" office:value="0.4586" calcext:value-type="percentage">
            <text:p>45,86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54" calcext:value-type="percentage">
            <text:p>5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655" calcext:value-type="percentage">
            <text:p>56,55%</text:p>
          </table:table-cell>
          <table:table-cell table:style-name="ce2" office:value-type="percentage" office:value="0.631" calcext:value-type="percentage">
            <text:p>63,10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138" calcext:value-type="percentage">
            <text:p>51,38%</text:p>
          </table:table-cell>
          <table:table-cell table:style-name="ce2" office:value-type="percentage" office:value="0.4897" calcext:value-type="percentage">
            <text:p>48,97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4966" calcext:value-type="percentage">
            <text:p>49,66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7863" calcext:value-type="percentage">
            <text:p>47,86%</text:p>
          </table:table-cell>
          <table:table-cell table:style-name="ce1" table:formula="of:=AVERAGE([.C14:.C23])" office:value-type="percentage" office:value="0.494644444444445" calcext:value-type="percentage">
            <text:p>49,46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95" calcext:value-type="percentage">
            <text:p>4,40%</text:p>
          </table:table-cell>
          <table:table-cell table:style-name="ce1" table:formula="of:=AVERAGE([.G14:.G23])" office:value-type="percentage" office:value="0.0458888888888889" calcext:value-type="percentage">
            <text:p>4,59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229" calcext:value-type="percentage">
            <text:p>12,29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 office:value-type="percentage" office:value="0.0514" calcext:value-type="percentage">
            <text:p>5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514" calcext:value-type="percentage">
            <text:p>5,14%</text:p>
          </table:table-cell>
          <table:table-cell table:style-name="ce2" office:value-type="percentage" office:value="0.0314" calcext:value-type="percentage">
            <text:p>3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1029" calcext:value-type="percentage">
            <text:p>10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486" calcext:value-type="percentage">
            <text:p>14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914" calcext:value-type="percentage">
            <text:p>19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0829" calcext:value-type="percentage">
            <text:p>8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59" calcext:value-type="percentage">
            <text:p>25,90%</text:p>
          </table:table-cell>
          <table:table-cell table:style-name="ce1" table:formula="of:=AVERAGE([.C27:.C36])" office:value-type="percentage" office:value="0.261111111111111" calcext:value-type="percentage">
            <text:p>26,11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0715" calcext:value-type="percentage">
            <text:p>10,72%</text:p>
          </table:table-cell>
          <table:table-cell table:style-name="ce1" table:formula="of:=AVERAGE([.G27:.G36])" office:value-type="percentage" office:value="0.1165" calcext:value-type="percentage">
            <text:p>11,6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818" calcext:value-type="percentage">
            <text:p>38,18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5303" calcext:value-type="percentage">
            <text:p>53,03%</text:p>
          </table:table-cell>
          <table:table-cell table:style-name="ce2" office:value-type="percentage" office:value="0.4242" calcext:value-type="percentage">
            <text:p>42,42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984" calcext:value-type="percentage">
            <text:p>9,84%</text:p>
          </table:table-cell>
          <table:table-cell table:style-name="ce2" office:value-type="percentage" office:value="0.0952" calcext:value-type="percentage">
            <text:p>9,5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758" calcext:value-type="percentage">
            <text:p>47,58%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42" calcext:value-type="percentage">
            <text:p>7,42%</text:p>
          </table:table-cell>
          <table:table-cell table:style-name="ce2" office:value-type="percentage" office:value="0.0726" calcext:value-type="percentage">
            <text:p>7,26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4818" calcext:value-type="percentage">
            <text:p>48,18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45" calcext:value-type="percentage">
            <text:p>6,4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029" calcext:value-type="percentage">
            <text:p>2,9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545" calcext:value-type="percentage">
            <text:p>55,45%</text:p>
          </table:table-cell>
          <table:table-cell table:style-name="ce2" office:value-type="percentage" office:value="0.6152" calcext:value-type="percentage">
            <text:p>61,52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177" calcext:value-type="percentage">
            <text:p>11,77%</text:p>
          </table:table-cell>
          <table:table-cell table:style-name="ce2" office:value-type="percentage" office:value="0.0968" calcext:value-type="percentage">
            <text:p>9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2" office:value-type="percentage" office:value="0.5606" calcext:value-type="percentage">
            <text:p>56,06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742" calcext:value-type="percentage">
            <text:p>7,4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2" office:value-type="percentage" office:value="0.5303" calcext:value-type="percentage">
            <text:p>53,03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484" calcext:value-type="percentage">
            <text:p>4,8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8969" calcext:value-type="percentage">
            <text:p>48,97%</text:p>
          </table:table-cell>
          <table:table-cell table:style-name="ce1" table:formula="of:=AVERAGE([.C40:.C49])" office:value-type="percentage" office:value="0.511111111111111" calcext:value-type="percentage">
            <text:p>51,11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741" calcext:value-type="percentage">
            <text:p>7,74%</text:p>
          </table:table-cell>
          <table:table-cell table:style-name="ce1" table:formula="of:=AVERAGE([.G40:.G49])" office:value-type="percentage" office:value="0.0691888888888889" calcext:value-type="percentage">
            <text:p>6,9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619" calcext:value-type="percentage">
            <text:p>46,19%</text:p>
          </table:table-cell>
          <table:table-cell table:style-name="ce2"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67" calcext:value-type="percentage">
            <text:p>27,67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6143" calcext:value-type="percentage">
            <text:p>61,43%</text:p>
          </table:table-cell>
          <table:table-cell table:style-name="ce2" office:value-type="percentage" office:value="0.5952" calcext:value-type="percentage">
            <text:p>59,5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5524" calcext:value-type="percentage">
            <text:p>55,2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4286" calcext:value-type="percentage">
            <text:p>42,8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number-columns-repeated="2" table:style-name="ce2" office:value-type="percentage" office:value="0.1167" calcext:value-type="percentage">
            <text:p>11,67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286" calcext:value-type="percentage">
            <text:p>6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86" calcext:value-type="percentage">
            <text:p>28,60%</text:p>
          </table:table-cell>
          <table:table-cell table:style-name="ce1" table:formula="of:=AVERAGE([.C53:.C62])" office:value-type="percentage" office:value="0.255933333333333" calcext:value-type="percentage">
            <text:p>25,59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2714" calcext:value-type="percentage">
            <text:p>52,71%</text:p>
          </table:table-cell>
          <table:table-cell table:style-name="ce1" table:formula="of:=AVERAGE([.G53:.G62])" office:value-type="percentage" office:value="0.5291" calcext:value-type="percentage">
            <text:p>52,9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percentage" office:value="0.4923" calcext:value-type="percentage">
            <text:p>4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1111" calcext:value-type="percentage">
            <text:p>11,11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185" calcext:value-type="percentage">
            <text:p>11,85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692" calcext:value-type="percentage">
            <text:p>26,92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4385" calcext:value-type="percentage">
            <text:p>43,85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148" calcext:value-type="percentage">
            <text:p>31,48%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846" calcext:value-type="percentage">
            <text:p>28,46%</text:p>
          </table:table-cell>
          <table:table-cell table:style-name="ce2" office:value-type="percentage" office:value="0.3231" calcext:value-type="percentage">
            <text:p>3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538" calcext:value-type="percentage">
            <text:p>45,3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462" calcext:value-type="percentage">
            <text:p>24,62%</text:p>
          </table:table-cell>
          <table:table-cell table:style-name="ce2" office:value-type="percentage" office:value="0.3231" calcext:value-type="percentage">
            <text:p>3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4769" calcext:value-type="percentage">
            <text:p>47,6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20148" calcext:value-type="percentage">
            <text:p>20,15%</text:p>
          </table:table-cell>
          <table:table-cell table:style-name="ce1" table:formula="of:=AVERAGE([.C66:.C75])" office:value-type="percentage" office:value="0.192177777777778" calcext:value-type="percentage">
            <text:p>19,22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6999" calcext:value-type="percentage">
            <text:p>37,00%</text:p>
          </table:table-cell>
          <table:table-cell table:style-name="ce1" table:formula="of:=AVERAGE([.G66:.G75])" office:value-type="percentage" office:value="0.387188888888889" calcext:value-type="percentage">
            <text:p>38,7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667" calcext:value-type="percentage">
            <text:p>26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2"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1533" calcext:value-type="percentage">
            <text:p>15,33%</text:p>
          </table:table-cell>
          <table:table-cell table:style-name="ce2" office:value-type="percentage" office:value="0.3333" calcext:value-type="percentage">
            <text:p>33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1333" calcext:value-type="percentage">
            <text:p>13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867" calcext:value-type="percentage">
            <text:p>18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number-columns-repeated="2" table:style-name="ce2"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067" calcext:value-type="percentage">
            <text:p>20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57" calcext:value-type="percentage">
            <text:p>5,70%</text:p>
          </table:table-cell>
          <table:table-cell table:style-name="ce1" table:formula="of:=AVERAGE([.C79:.C88])" office:value-type="percentage" office:value="0.066" calcext:value-type="percentage">
            <text:p>6,6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0799" calcext:value-type="percentage">
            <text:p>20,80%</text:p>
          </table:table-cell>
          <table:table-cell table:style-name="ce1" table:formula="of:=AVERAGE([.G79:.G88])" office:value-type="percentage" office:value="0.225177777777778" calcext:value-type="percentage">
            <text:p>22,52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686" calcext:value-type="percentage">
            <text:p>16,86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857" calcext:value-type="percentage">
            <text:p>8,57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829" calcext:value-type="percentage">
            <text:p>18,29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86" calcext:value-type="percentage">
            <text:p>18,86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2057" calcext:value-type="percentage">
            <text:p>20,57%</text:p>
          </table:table-cell>
          <table:table-cell table:style-name="ce2" office:value-type="percentage" office:value="0.1571" calcext:value-type="percentage">
            <text:p>1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0886" calcext:value-type="percentage">
            <text:p>8,86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261" calcext:value-type="percentage">
            <text:p>2,61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743" calcext:value-type="percentage">
            <text:p>17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486" calcext:value-type="percentage">
            <text:p>14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661777777777778" calcext:value-type="percentage">
            <text:p>6,62%</text:p>
          </table:table-cell>
          <table:table-cell table:style-name="ce1" table:formula="of:=AVERAGE([.C93:.C102])" office:value-type="percentage" office:value="0.07434" calcext:value-type="percentage">
            <text:p>7,43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973" calcext:value-type="percentage">
            <text:p>14,97%</text:p>
          </table:table-cell>
          <table:table-cell table:style-name="ce1" table:formula="of:=AVERAGE([.G93:.G102])" office:value-type="percentage" office:value="0.148888888888889" calcext:value-type="percentage">
            <text:p>14,89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676" calcext:value-type="percentage">
            <text:p>36,76%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265" calcext:value-type="percentage">
            <text:p>22,65%</text:p>
          </table:table-cell>
          <table:table-cell table:style-name="ce2" office:value-type="percentage" office:value="0.2289" calcext:value-type="percentage">
            <text:p>22,8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627" calcext:value-type="percentage">
            <text:p>16,27%</text:p>
          </table:table-cell>
          <table:table-cell table:style-name="ce2" office:value-type="percentage" office:value="0.1446" calcext:value-type="percentage">
            <text:p>14,4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2108" calcext:value-type="percentage">
            <text:p>21,08%</text:p>
          </table:table-cell>
          <table:table-cell table:style-name="ce2" office:value-type="percentage" office:value="0.2169" calcext:value-type="percentage">
            <text:p>21,6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676" calcext:value-type="percentage">
            <text:p>46,76%</text:p>
          </table:table-cell>
          <table:table-cell table:style-name="ce2" office:value-type="percentage" office:value="0.4941" calcext:value-type="percentage">
            <text:p>49,41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36" calcext:value-type="percentage">
            <text:p>20,36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2" office:value-type="percentage" office:value="0.3853" calcext:value-type="percentage">
            <text:p>38,53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2" calcext:value-type="percentage">
            <text:p>14,8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2971" calcext:value-type="percentage">
            <text:p>29,71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554" calcext:value-type="percentage">
            <text:p>15,54%</text:p>
          </table:table-cell>
          <table:table-cell table:style-name="ce2"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807" calcext:value-type="percentage">
            <text:p>18,0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482" calcext:value-type="percentage">
            <text:p>14,82%</text:p>
          </table:table-cell>
          <table:table-cell table:style-name="ce2" office:value-type="percentage" office:value="0.153" calcext:value-type="percentage">
            <text:p>15,3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4118" calcext:value-type="percentage">
            <text:p>41,18%</text:p>
          </table:table-cell>
          <table:table-cell table:style-name="ce2" office:value-type="percentage" office:value="0.3912" calcext:value-type="percentage">
            <text:p>39,12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07" calcext:value-type="percentage">
            <text:p>18,0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2912" calcext:value-type="percentage">
            <text:p>29,12%</text:p>
          </table:table-cell>
          <table:table-cell table:style-name="ce2" office:value-type="percentage" office:value="0.3118" calcext:value-type="percentage">
            <text:p>31,18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313" calcext:value-type="percentage">
            <text:p>13,1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44766666666667" calcext:value-type="percentage">
            <text:p>34,48%</text:p>
          </table:table-cell>
          <table:table-cell table:style-name="ce1" table:formula="of:=AVERAGE([.C106:.C115])" office:value-type="percentage" office:value="0.34236" calcext:value-type="percentage">
            <text:p>34,24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312" calcext:value-type="percentage">
            <text:p>17,31%</text:p>
          </table:table-cell>
          <table:table-cell table:style-name="ce1" table:formula="of:=AVERAGE([.G106:.G115])" office:value-type="percentage" office:value="0.172277777777778" calcext:value-type="percentage">
            <text:p>17,2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842" calcext:value-type="percentage">
            <text:p>28,42%</text:p>
          </table:table-cell>
          <table:table-cell table:style-name="ce2" office:value-type="percentage" office:value="0.2618" calcext:value-type="percentage">
            <text:p>26,1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974" calcext:value-type="percentage">
            <text:p>29,74%</text:p>
          </table:table-cell>
          <table:table-cell table:style-name="ce2" office:value-type="percentage" office:value="0.3329" calcext:value-type="percentage">
            <text:p>33,2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2" office:value-type="percentage" office:value="0.2895" calcext:value-type="percentage">
            <text:p>28,95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724" calcext:value-type="percentage">
            <text:p>27,24%</text:p>
          </table:table-cell>
          <table:table-cell table:style-name="ce2" office:value-type="percentage" office:value="0.2711" calcext:value-type="percentage">
            <text:p>27,11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645" calcext:value-type="percentage">
            <text:p>26,45%</text:p>
          </table:table-cell>
          <table:table-cell table:style-name="ce2" office:value-type="percentage" office:value="0.2776" calcext:value-type="percentage">
            <text:p>27,7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342" calcext:value-type="percentage">
            <text:p>23,42%</text:p>
          </table:table-cell>
          <table:table-cell table:style-name="ce2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789" calcext:value-type="percentage">
            <text:p>27,89%</text:p>
          </table:table-cell>
          <table:table-cell table:style-name="ce2" office:value-type="percentage" office:value="0.2842" calcext:value-type="percentage">
            <text:p>28,4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895" calcext:value-type="percentage">
            <text:p>28,95%</text:p>
          </table:table-cell>
          <table:table-cell table:style-name="ce2"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737" calcext:value-type="percentage">
            <text:p>17,37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447" calcext:value-type="percentage">
            <text:p>34,47%</text:p>
          </table:table-cell>
          <table:table-cell table:style-name="ce2" office:value-type="percentage" office:value="0.3026" calcext:value-type="percentage">
            <text:p>30,2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579" calcext:value-type="percentage">
            <text:p>15,79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539" calcext:value-type="percentage">
            <text:p>35,39%</text:p>
          </table:table-cell>
          <table:table-cell table:style-name="ce2" office:value-type="percentage" office:value="0.3368" calcext:value-type="percentage">
            <text:p>33,6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0632" calcext:value-type="percentage">
            <text:p>6,32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395" calcext:value-type="percentage">
            <text:p>33,95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64322222222222" calcext:value-type="percentage">
            <text:p>16,43%</text:p>
          </table:table-cell>
          <table:table-cell table:style-name="ce1" table:formula="of:=AVERAGE([.C119:.C128])" office:value-type="percentage" office:value="0.17106" calcext:value-type="percentage">
            <text:p>17,11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9592" calcext:value-type="percentage">
            <text:p>29,59%</text:p>
          </table:table-cell>
          <table:table-cell table:style-name="ce1" table:formula="of:=AVERAGE([.G119:.G128])" office:value-type="percentage" office:value="0.28552" calcext:value-type="percentage">
            <text:p>28,55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371" calcext:value-type="percentage">
            <text:p>23,71%</text:p>
          </table:table-cell>
          <table:table-cell table:style-name="ce2" office:value-type="percentage" office:value="0.2774" calcext:value-type="percentage">
            <text:p>27,7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0889" calcext:value-type="percentage">
            <text:p>8,89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79" calcext:value-type="percentage">
            <text:p>27,90%</text:p>
          </table:table-cell>
          <table:table-cell table:style-name="ce2" office:value-type="percentage" office:value="0.2661" calcext:value-type="percentage">
            <text:p>26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 office:value-type="percentage" office:value="0.0352" calcext:value-type="percentage">
            <text:p>3,52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661" calcext:value-type="percentage">
            <text:p>26,61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444" calcext:value-type="percentage">
            <text:p>4,44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113" calcext:value-type="percentage">
            <text:p>31,13%</text:p>
          </table:table-cell>
          <table:table-cell table:style-name="ce2" office:value-type="percentage" office:value="0.3419" calcext:value-type="percentage">
            <text:p>34,19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339" calcext:value-type="percentage">
            <text:p>33,39%</text:p>
          </table:table-cell>
          <table:table-cell table:style-name="ce2" office:value-type="percentage" office:value="0.3097" calcext:value-type="percentage">
            <text:p>30,9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 office:value-type="percentage" office:value="0.3403" calcext:value-type="percentage">
            <text:p>34,0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2" office:value-type="percentage" office:value="0.3113" calcext:value-type="percentage">
            <text:p>31,1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339" calcext:value-type="percentage">
            <text:p>23,39%</text:p>
          </table:table-cell>
          <table:table-cell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323" calcext:value-type="percentage">
            <text:p>23,23%</text:p>
          </table:table-cell>
          <table:table-cell table:style-name="ce2" office:value-type="percentage" office:value="0.2952" calcext:value-type="percentage">
            <text:p>29,52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2903" calcext:value-type="percentage">
            <text:p>29,03%</text:p>
          </table:table-cell>
          <table:table-cell table:style-name="ce2" office:value-type="percentage" office:value="0.3371" calcext:value-type="percentage">
            <text:p>33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52222222222222" calcext:value-type="percentage">
            <text:p>6,52%</text:p>
          </table:table-cell>
          <table:table-cell table:style-name="ce1" table:formula="of:=AVERAGE([.C133:.C142])" office:value-type="percentage" office:value="0.06463" calcext:value-type="percentage">
            <text:p>6,46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8081" calcext:value-type="percentage">
            <text:p>28,08%</text:p>
          </table:table-cell>
          <table:table-cell table:style-name="ce1" table:formula="of:=AVERAGE([.G133:.G142])" office:value-type="percentage" office:value="0.29967" calcext:value-type="percentage">
            <text:p>29,9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2826" calcext:value-type="percentage">
            <text:p>28,2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2134" calcext:value-type="percentage">
            <text:p>21,34%</text:p>
          </table:table-cell>
          <table:table-cell table:style-name="ce2" office:value-type="percentage" office:value="0.2537" calcext:value-type="percentage">
            <text:p>25,3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313" calcext:value-type="percentage">
            <text:p>31,30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697" calcext:value-type="percentage">
            <text:p>16,97%</text:p>
          </table:table-cell>
          <table:table-cell table:style-name="ce2" office:value-type="percentage" office:value="0.2004" calcext:value-type="percentage">
            <text:p>20,0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4239" calcext:value-type="percentage">
            <text:p>42,39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2039" calcext:value-type="percentage">
            <text:p>20,39%</text:p>
          </table:table-cell>
          <table:table-cell table:style-name="ce1" office:value-type="percentage" office:value="0.1918" calcext:value-type="percentage">
            <text:p>19,1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326" calcext:value-type="percentage">
            <text:p>33,26%</text:p>
          </table:table-cell>
          <table:table-cell table:style-name="ce2" office:value-type="percentage" office:value="0.3609" calcext:value-type="percentage">
            <text:p>36,09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97" calcext:value-type="percentage">
            <text:p>19,70%</text:p>
          </table:table-cell>
          <table:table-cell table:style-name="ce2" office:value-type="percentage" office:value="0.239" calcext:value-type="percentage">
            <text:p>23,90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2804" calcext:value-type="percentage">
            <text:p>28,04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2762" calcext:value-type="percentage">
            <text:p>27,62%</text:p>
          </table:table-cell>
          <table:table-cell table:style-name="ce2" office:value-type="percentage" office:value="0.1833" calcext:value-type="percentage">
            <text:p>18,3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674" calcext:value-type="percentage">
            <text:p>36,74%</text:p>
          </table:table-cell>
          <table:table-cell table:style-name="ce2" office:value-type="percentage" office:value="0.3413" calcext:value-type="percentage">
            <text:p>34,13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385" calcext:value-type="percentage">
            <text:p>13,85%</text:p>
          </table:table-cell>
          <table:table-cell table:style-name="ce2" office:value-type="percentage" office:value="0.2506" calcext:value-type="percentage">
            <text:p>25,06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826" calcext:value-type="percentage">
            <text:p>38,26%</text:p>
          </table:table-cell>
          <table:table-cell table:style-name="ce2" office:value-type="percentage" office:value="0.3739" calcext:value-type="percentage">
            <text:p>37,39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76" calcext:value-type="percentage">
            <text:p>17,6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326" calcext:value-type="percentage">
            <text:p>33,26%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3195" calcext:value-type="percentage">
            <text:p>31,95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 office:value-type="percentage" office:value="0.3087" calcext:value-type="percentage">
            <text:p>30,87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775" calcext:value-type="percentage">
            <text:p>17,75%</text:p>
          </table:table-cell>
          <table:table-cell table:style-name="ce2" office:value-type="percentage" office:value="0.2091" calcext:value-type="percentage">
            <text:p>20,91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408" calcext:value-type="percentage">
            <text:p>24,08%</text:p>
          </table:table-cell>
          <table:table-cell table:style-name="ce2" office:value-type="percentage" office:value="0.2017" calcext:value-type="percentage">
            <text:p>20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25833333333333" calcext:value-type="percentage">
            <text:p>32,58%</text:p>
          </table:table-cell>
          <table:table-cell table:style-name="ce1" table:formula="of:=AVERAGE([.C146:.C155])" office:value-type="percentage" office:value="0.33543" calcext:value-type="percentage">
            <text:p>33,54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21125" calcext:value-type="percentage">
            <text:p>21,13%</text:p>
          </table:table-cell>
          <table:table-cell table:style-name="ce1" table:formula="of:=AVERAGE([.G146:.G155])" office:value-type="percentage" office:value="0.2162" calcext:value-type="percentage">
            <text:p>21,6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775" calcext:value-type="percentage">
            <text:p>47,75%</text:p>
          </table:table-cell>
          <table:table-cell table:style-name="ce2" office:value-type="percentage" office:value="0.512" calcext:value-type="percentage">
            <text:p>51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305" calcext:value-type="percentage">
            <text:p>43,05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85" calcext:value-type="percentage">
            <text:p>28,5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4005" calcext:value-type="percentage">
            <text:p>40,05%</text:p>
          </table:table-cell>
          <table:table-cell table:style-name="ce2" office:value-type="percentage" office:value="0.4025" calcext:value-type="percentage">
            <text:p>40,2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 office:value-type="percentage" office:value="0.412" calcext:value-type="percentage">
            <text:p>41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15" calcext:value-type="percentage">
            <text:p>21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05" calcext:value-type="percentage">
            <text:p>40,50%</text:p>
          </table:table-cell>
          <table:table-cell table:style-name="ce2" office:value-type="percentage" office:value="0.443" calcext:value-type="percentage">
            <text:p>44,3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435" calcext:value-type="percentage">
            <text:p>44,35%</text:p>
          </table:table-cell>
          <table:table-cell table:style-name="ce2" office:value-type="percentage" office:value="0.4315" calcext:value-type="percentage">
            <text:p>43,1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33" calcext:value-type="percentage">
            <text:p>43,30%</text:p>
          </table:table-cell>
          <table:table-cell table:style-name="ce2" office:value-type="percentage" office:value="0.4345" calcext:value-type="percentage">
            <text:p>43,4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95" calcext:value-type="percentage">
            <text:p>19,5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411" calcext:value-type="percentage">
            <text:p>41,10%</text:p>
          </table:table-cell>
          <table:table-cell table:style-name="ce2" office:value-type="percentage" office:value="0.3995" calcext:value-type="percentage">
            <text:p>39,9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1" calcext:value-type="percentage">
            <text:p>43,10%</text:p>
          </table:table-cell>
          <table:table-cell table:style-name="ce2" office:value-type="percentage" office:value="0.437" calcext:value-type="percentage">
            <text:p>43,7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number-columns-repeated="2"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4215" calcext:value-type="percentage">
            <text:p>42,15%</text:p>
          </table:table-cell>
          <table:table-cell table:style-name="ce2" office:value-type="percentage" office:value="0.398" calcext:value-type="percentage">
            <text:p>39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11111111111111" calcext:value-type="percentage">
            <text:p>21,11%</text:p>
          </table:table-cell>
          <table:table-cell table:style-name="ce1" table:formula="of:=AVERAGE([.C158:.C167])" office:value-type="percentage" office:value="0.2105" calcext:value-type="percentage">
            <text:p>21,0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262" calcext:value-type="percentage">
            <text:p>42,62%</text:p>
          </table:table-cell>
          <table:table-cell table:style-name="ce1" table:formula="of:=AVERAGE([.G158:.G167])" office:value-type="percentage" office:value="0.4298" calcext:value-type="percentage">
            <text:p>42,98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95" calcext:value-type="percentage">
            <text:p>9,50%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2554" calcext:value-type="percentage">
            <text:p>25,54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743" calcext:value-type="percentage">
            <text:p>27,43%</text:p>
          </table:table-cell>
          <table:table-cell table:style-name="ce3" office:value-type="percentage" office:value="0.2541" calcext:value-type="percentage">
            <text:p>25,4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811" calcext:value-type="percentage">
            <text:p>28,11%</text:p>
          </table:table-cell>
          <table:table-cell table:style-name="ce3" office:value-type="percentage" office:value="0.2797" calcext:value-type="percentage">
            <text:p>27,9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419" calcext:value-type="percentage">
            <text:p>24,19%</text:p>
          </table:table-cell>
          <table:table-cell table:style-name="ce3" office:value-type="percentage" office:value="0.2351" calcext:value-type="percentage">
            <text:p>23,5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486" calcext:value-type="percentage">
            <text:p>24,86%</text:p>
          </table:table-cell>
          <table:table-cell table:style-name="ce3" office:value-type="percentage" office:value="0.2554" calcext:value-type="percentage">
            <text:p>25,54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811" calcext:value-type="percentage">
            <text:p>28,11%</text:p>
          </table:table-cell>
          <table:table-cell table:style-name="ce3" office:value-type="percentage" office:value="0.2689" calcext:value-type="percentage">
            <text:p>26,8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338" calcext:value-type="percentage">
            <text:p>23,38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919" calcext:value-type="percentage">
            <text:p>19,19%</text:p>
          </table:table-cell>
          <table:table-cell table:style-name="ce3" office:value-type="percentage" office:value="0.1878" calcext:value-type="percentage">
            <text:p>18,78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027" calcext:value-type="percentage">
            <text:p>20,27%</text:p>
          </table:table-cell>
          <table:table-cell table:style-name="ce3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14" calcext:value-type="percentage">
            <text:p>19,14%</text:p>
          </table:table-cell>
          <table:table-cell table:style-name="ce3" office:value-type="percentage" office:value="0.2027" calcext:value-type="percentage">
            <text:p>20,2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6" calcext:value-type="percentage">
            <text:p>6,00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38533333333333" calcext:value-type="percentage">
            <text:p>23,85%</text:p>
          </table:table-cell>
          <table:table-cell table:style-name="ce1" table:formula="of:=AVERAGE([.G171:.G180])" office:value-type="percentage" office:value="0.24229" calcext:value-type="percentage">
            <text:p>24,2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2" office:value-type="percentage" office:value="0.1036" calcext:value-type="percentage">
            <text:p>10,36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353" calcext:value-type="percentage">
            <text:p>23,53%</text:p>
          </table:table-cell>
          <table:table-cell table:style-name="ce2" office:value-type="percentage" office:value="0.1765" calcext:value-type="percentage">
            <text:p>17,65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321" calcext:value-type="percentage">
            <text:p>3,21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25" calcext:value-type="percentage">
            <text:p>12,50%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235" calcext:value-type="percentage">
            <text:p>22,35%</text:p>
          </table:table-cell>
          <table:table-cell table:style-name="ce2" office:value-type="percentage" office:value="0.2529" calcext:value-type="percentage">
            <text:p>2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 office:value-type="percentage" office:value="0.0143" calcext:value-type="percentage">
            <text:p>1,43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 office:value-type="percentage" office:value="0.2353" calcext:value-type="percentage">
            <text:p>2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percentage" office:value="0.0929" calcext:value-type="percentage">
            <text:p>9,29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529" calcext:value-type="percentage">
            <text:p>15,29%</text:p>
          </table:table-cell>
          <table:table-cell table:style-name="ce2" office:value-type="percentage" office:value="0.1882" calcext:value-type="percentage">
            <text:p>18,8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.1176" calcext:value-type="percentage">
            <text:p>11,7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595" calcext:value-type="percentage">
            <text:p>5,95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176" calcext:value-type="percentage">
            <text:p>11,76%</text:p>
          </table:table-cell>
          <table:table-cell table:style-name="ce2" office:value-type="percentage" office:value="0.1588" calcext:value-type="percentage">
            <text:p>1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6406" calcext:value-type="percentage">
            <text:p>6,41%</text:p>
          </table:table-cell>
          <table:table-cell table:style-name="ce1" table:formula="of:=AVERAGE([.C183:.C192])" office:value-type="percentage" office:value="0.06214" calcext:value-type="percentage">
            <text:p>6,21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4529" calcext:value-type="percentage">
            <text:p>14,53%</text:p>
          </table:table-cell>
          <table:table-cell table:style-name="ce1" table:formula="of:=AVERAGE([.G183:.G192])" office:value-type="percentage" office:value="0.16821" calcext:value-type="percentage">
            <text:p>16,8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467" calcext:value-type="percentage">
            <text:p>14,67%</text:p>
          </table:table-cell>
          <table:table-cell table:style-name="ce3" office:value-type="percentage" office:value="0.1533" calcext:value-type="percentage">
            <text:p>15,33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678" calcext:value-type="percentage">
            <text:p>67,80%</text:p>
          </table:table-cell>
          <table:table-cell table:style-name="ce2" office:value-type="percentage" office:value="0.638" calcext:value-type="percentage">
            <text:p>63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 office:value-type="percentage" office:value="0.09" calcext:value-type="percentage">
            <text:p>9,00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233" calcext:value-type="percentage">
            <text:p>12,33%</text:p>
          </table:table-cell>
          <table:table-cell table:style-name="ce3" office:value-type="percentage" office:value="0.1567" calcext:value-type="percentage">
            <text:p>15,67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6" calcext:value-type="percentage">
            <text:p>62,6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92" calcext:value-type="percentage">
            <text:p>59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7" calcext:value-type="percentage">
            <text:p>7,00%</text:p>
          </table:table-cell>
          <table:table-cell table:style-name="ce3" office:value-type="percentage" office:value="0.1033" calcext:value-type="percentage">
            <text:p>10,33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706" calcext:value-type="percentage">
            <text:p>70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 office:value-type="percentage" office:value="0.0733" calcext:value-type="percentage">
            <text:p>7,33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614" calcext:value-type="percentage">
            <text:p>61,4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9" calcext:value-type="percentage">
            <text:p>9,00%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628" calcext:value-type="percentage">
            <text:p>62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167" calcext:value-type="percentage">
            <text:p>11,67%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762" calcext:value-type="percentage">
            <text:p>7,62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967" calcext:value-type="percentage">
            <text:p>9,67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08963" calcext:value-type="percentage">
            <text:p>8,96%</text:p>
          </table:table-cell>
          <table:table-cell table:style-name="ce1" table:formula="of:=AVERAGE([.C196:.C205])" office:value-type="percentage" office:value="0.10499" calcext:value-type="percentage">
            <text:p>10,50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6362" calcext:value-type="percentage">
            <text:p>63,62%</text:p>
          </table:table-cell>
          <table:table-cell table:style-name="ce1" table:formula="of:=AVERAGE([.G196:.G205])" office:value-type="percentage" office:value="0.6348" calcext:value-type="percentage">
            <text:p>63,4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2" office:value-type="percentage" office:value="0.094" calcext:value-type="percentage">
            <text:p>9,4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64" calcext:value-type="percentage">
            <text:p>6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116" calcext:value-type="percentage">
            <text:p>11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98" calcext:value-type="percentage">
            <text:p>9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233" calcext:value-type="percentage">
            <text:p>2,33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2" office:value-type="percentage" office:value="0.086" calcext:value-type="percentage">
            <text:p>8,6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98" calcext:value-type="percentage">
            <text:p>9,80%</text:p>
          </table:table-cell>
          <table:table-cell table:style-name="ce2" office:value-type="percentage" office:value="0.056" calcext:value-type="percentage">
            <text:p>5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8" calcext:value-type="percentage">
            <text:p>4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22" calcext:value-type="percentage">
            <text:p>8,22%</text:p>
          </table:table-cell>
          <table:table-cell table:style-name="ce2" office:value-type="percentage" office:value="0.106" calcext:value-type="percentage">
            <text:p>10,6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6189" calcext:value-type="percentage">
            <text:p>6,19%</text:p>
          </table:table-cell>
          <table:table-cell table:style-name="ce1" table:formula="of:=AVERAGE([.C208:.C217])" office:value-type="percentage" office:value="0.0852" calcext:value-type="percentage">
            <text:p>8,5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314" calcext:value-type="percentage">
            <text:p>3,14%</text:p>
          </table:table-cell>
          <table:table-cell table:style-name="ce1" table:formula="of:=AVERAGE([.G208:.G217])" office:value-type="percentage" office:value="0.03393" calcext:value-type="percentage">
            <text:p>3,39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214" calcext:value-type="percentage">
            <text:p>32,14%</text:p>
          </table:table-cell>
          <table:table-cell table:style-name="ce2" office:value-type="percentage" office:value="0.3286" calcext:value-type="percentage">
            <text:p>32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number-columns-repeated="2"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number-columns-repeated="2"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643" calcext:value-type="percentage">
            <text:p>26,43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3929" calcext:value-type="percentage">
            <text:p>3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2214" calcext:value-type="percentage">
            <text:p>22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 office:value-type="percentage" office:value="0.4143" calcext:value-type="percentage">
            <text:p>4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617" calcext:value-type="percentage">
            <text:p>16,17%</text:p>
          </table:table-cell>
          <table:table-cell table:style-name="ce1" table:formula="of:=AVERAGE([.C220:.C229])" office:value-type="percentage" office:value="0.17871" calcext:value-type="percentage">
            <text:p>17,87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857" calcext:value-type="percentage">
            <text:p>25,86%</text:p>
          </table:table-cell>
          <table:table-cell table:style-name="ce1" table:formula="of:=AVERAGE([.G220:.G229])" office:value-type="percentage" office:value="0.28072" calcext:value-type="percentage">
            <text:p>28,07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2" office:value-type="percentage" office:value="0.1574" calcext:value-type="percentage">
            <text:p>15,74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352" calcext:value-type="percentage">
            <text:p>13,52%</text:p>
          </table:table-cell>
          <table:table-cell table:style-name="ce2" office:value-type="percentage" office:value="0.1259" calcext:value-type="percentage">
            <text:p>12,5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426" calcext:value-type="percentage">
            <text:p>14,26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611" calcext:value-type="percentage">
            <text:p>16,1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463" calcext:value-type="percentage">
            <text:p>14,63%</text:p>
          </table:table-cell>
          <table:table-cell table:style-name="ce2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852" calcext:value-type="percentage">
            <text:p>28,52%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537" calcext:value-type="percentage">
            <text:p>15,3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22667" calcext:value-type="percentage">
            <text:p>22,67%</text:p>
          </table:table-cell>
          <table:table-cell table:style-name="ce1" table:formula="of:=AVERAGE([.C233:.C242])" office:value-type="percentage" office:value="0.22369" calcext:value-type="percentage">
            <text:p>22,37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704" calcext:value-type="percentage">
            <text:p>14,70%</text:p>
          </table:table-cell>
          <table:table-cell table:style-name="ce1" table:formula="of:=AVERAGE([.G233:.G242])" office:value-type="percentage" office:value="0.15224" calcext:value-type="percentage">
            <text:p>15,2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647" calcext:value-type="percentage">
            <text:p>64,70%</text:p>
          </table:table-cell>
          <table:table-cell table:style-name="ce2" office:value-type="percentage" office:value="0.5739" calcext:value-type="percentage">
            <text:p>57,39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577" calcext:value-type="percentage">
            <text:p>57,70%</text:p>
          </table:table-cell>
          <table:table-cell table:style-name="ce2" office:value-type="percentage" office:value="0.5428" calcext:value-type="percentage">
            <text:p>54,28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3904" calcext:value-type="percentage">
            <text:p>39,04%</text:p>
          </table:table-cell>
          <table:table-cell table:style-name="ce1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565" calcext:value-type="percentage">
            <text:p>5,65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981" calcext:value-type="percentage">
            <text:p>39,81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5288" calcext:value-type="percentage">
            <text:p>52,88%</text:p>
          </table:table-cell>
          <table:table-cell table:style-name="ce2" office:value-type="percentage" office:value="0.4495" calcext:value-type="percentage">
            <text:p>44,95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number-columns-repeated="2"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11" calcext:value-type="percentage">
            <text:p>31,10%</text:p>
          </table:table-cell>
          <table:table-cell table:style-name="ce2" office:value-type="percentage" office:value="0.5816" calcext:value-type="percentage">
            <text:p>58,16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number-columns-repeated="2" table:style-name="ce2" office:value-type="percentage" office:value="0.0652" calcext:value-type="percentage">
            <text:p>6,52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3079" calcext:value-type="percentage">
            <text:p>30,79%</text:p>
          </table:table-cell>
          <table:table-cell table:style-name="ce2" office:value-type="percentage" office:value="0.7527" calcext:value-type="percentage">
            <text:p>75,27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5443" calcext:value-type="percentage">
            <text:p>54,43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522" calcext:value-type="percentage">
            <text:p>5,22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2535" calcext:value-type="percentage">
            <text:p>25,3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4495" calcext:value-type="percentage">
            <text:p>44,95%</text:p>
          </table:table-cell>
          <table:table-cell table:style-name="ce2" office:value-type="percentage" office:value="0.521" calcext:value-type="percentage">
            <text:p>52,10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739" calcext:value-type="percentage">
            <text:p>7,3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44075" calcext:value-type="percentage">
            <text:p>44,08%</text:p>
          </table:table-cell>
          <table:table-cell table:style-name="ce1" table:formula="of:=AVERAGE([.C245:.C254])" office:value-type="percentage" office:value="0.57025" calcext:value-type="percentage">
            <text:p>57,03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153" calcext:value-type="percentage">
            <text:p>6,15%</text:p>
          </table:table-cell>
          <table:table-cell table:style-name="ce1" table:formula="of:=AVERAGE([.G245:.G254])" office:value-type="percentage" office:value="0.06173" calcext:value-type="percentage">
            <text:p>6,1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4466" calcext:value-type="percentage">
            <text:p>44,66%</text:p>
          </table:table-cell>
          <table:table-cell table:style-name="ce2" office:value-type="percentage" office:value="0.4448" calcext:value-type="percentage">
            <text:p>44,48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311" calcext:value-type="percentage">
            <text:p>23,11%</text:p>
          </table:table-cell>
          <table:table-cell table:style-name="ce2" office:value-type="percentage" office:value="0.2581" calcext:value-type="percentage">
            <text:p>25,8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532" calcext:value-type="percentage">
            <text:p>53,20%</text:p>
          </table:table-cell>
          <table:table-cell table:style-name="ce2" office:value-type="percentage" office:value="0.4893" calcext:value-type="percentage">
            <text:p>48,93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number-columns-repeated="2" table:style-name="ce2" office:value-type="percentage" office:value="0.2541" calcext:value-type="percentage">
            <text:p>25,4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3577" calcext:value-type="percentage">
            <text:p>35,77%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2297" calcext:value-type="percentage">
            <text:p>22,9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4804" calcext:value-type="percentage">
            <text:p>48,04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5178" calcext:value-type="percentage">
            <text:p>51,78%</text:p>
          </table:table-cell>
          <table:table-cell table:style-name="ce2" office:value-type="percentage" office:value="0.5854" calcext:value-type="percentage">
            <text:p>58,54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54" calcext:value-type="percentage">
            <text:p>20,54%</text:p>
          </table:table-cell>
          <table:table-cell table:style-name="ce2" office:value-type="percentage" office:value="0.2149" calcext:value-type="percentage">
            <text:p>21,4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3327" calcext:value-type="percentage">
            <text:p>33,27%</text:p>
          </table:table-cell>
          <table:table-cell table:style-name="ce2" office:value-type="percentage" office:value="0.7028" calcext:value-type="percentage">
            <text:p>70,28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3" calcext:value-type="percentage">
            <text:p>22,30%</text:p>
          </table:table-cell>
          <table:table-cell table:style-name="ce2" office:value-type="percentage" office:value="0.2486" calcext:value-type="percentage">
            <text:p>24,8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3488" calcext:value-type="percentage">
            <text:p>34,88%</text:p>
          </table:table-cell>
          <table:table-cell table:style-name="ce2" office:value-type="percentage" office:value="0.5819" calcext:value-type="percentage">
            <text:p>58,19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1824" calcext:value-type="percentage">
            <text:p>18,24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146" calcext:value-type="percentage">
            <text:p>41,46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2297" calcext:value-type="percentage">
            <text:p>22,97%</text:p>
          </table:table-cell>
          <table:table-cell table:style-name="ce2" office:value-type="percentage" office:value="0.2635" calcext:value-type="percentage">
            <text:p>26,3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3594" calcext:value-type="percentage">
            <text:p>35,9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2054" calcext:value-type="percentage">
            <text:p>20,54%</text:p>
          </table:table-cell>
          <table:table-cell table:style-name="ce2" office:value-type="percentage" office:value="0.2378" calcext:value-type="percentage">
            <text:p>23,7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5534" calcext:value-type="percentage">
            <text:p>55,3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1919" calcext:value-type="percentage">
            <text:p>19,19%</text:p>
          </table:table-cell>
          <table:table-cell table:style-name="ce2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1424" calcext:value-type="percentage">
            <text:p>41,42%</text:p>
          </table:table-cell>
          <table:table-cell table:style-name="ce1" table:formula="of:=AVERAGE([.C257:.C266])" office:value-type="percentage" office:value="0.5404" calcext:value-type="percentage">
            <text:p>54,04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1676" calcext:value-type="percentage">
            <text:p>21,68%</text:p>
          </table:table-cell>
          <table:table-cell table:style-name="ce1" table:formula="of:=AVERAGE([.G257:.G266])" office:value-type="percentage" office:value="0.23378" calcext:value-type="percentage">
            <text:p>23,3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 table:number-columns-repeated="2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32.246" calcext:value-type="float">
            <text:p>1432,2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791" calcext:value-type="float">
            <text:p>7,91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7.9793" calcext:value-type="float">
            <text:p>1757,9793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344" calcext:value-type="float">
            <text:p>3,44E-0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163.261" calcext:value-type="float">
            <text:p>2163,261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3.437" calcext:value-type="float">
            <text:p>3,437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7" calcext:value-type="float">
            <text:p>7,00E-01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office:value-type="float" office:value="12.515" calcext:value-type="float">
            <text:p>1,25E+01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1" calcext:value-type="float">
            <text:p>1,00E-01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904" calcext:value-type="float">
            <text:p>9,04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11.189" calcext:value-type="float">
            <text:p>1,12E+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784.49543333333" calcext:value-type="float">
            <text:p>1784,49543333333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2.84159" calcext:value-type="float">
            <text:p>2,84159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/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3372.974" calcext:value-type="float">
            <text:p>3372,97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2659.334" calcext:value-type="float">
            <text:p>2659,3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4298.878" calcext:value-type="float">
            <text:p>4298,87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1.902" calcext:value-type="float">
            <text:p>1,902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4245.117" calcext:value-type="float">
            <text:p>4245,11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3262.873" calcext:value-type="float">
            <text:p>3262,8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2574.642" calcext:value-type="float">
            <text:p>2574,6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83" calcext:value-type="float">
            <text:p>0,08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3966.326" calcext:value-type="float">
            <text:p>3966,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4467.252" calcext:value-type="float">
            <text:p>4467,2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3278.998" calcext:value-type="float">
            <text:p>3278,99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689.7499" calcext:value-type="float">
            <text:p>3689,749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0.40384" calcext:value-type="float">
            <text:p>0,40384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3581.61439" calcext:value-type="float">
            <text:p>3581,61439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7.17" calcext:value-type="float">
            <text:p>7,17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03" calcext:value-type="float">
            <text:p>7,03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83" calcext:value-type="float">
            <text:p>9,8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57" calcext:value-type="float">
            <text:p>7,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9.302" calcext:value-type="float">
            <text:p>9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" calcext:value-type="float">
            <text:p>0,13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1.58" calcext:value-type="float">
            <text:p>11,5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71" calcext:value-type="float">
            <text:p>6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47" calcext:value-type="float">
            <text:p>7,4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5.75" calcext:value-type="float">
            <text:p>5,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72" calcext:value-type="float">
            <text:p>0,177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052" calcext:value-type="float">
            <text:p>8,0052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752" calcext:value-type="float">
            <text:p>0,752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" calcext:value-type="float">
            <text:p>0,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697" calcext:value-type="float">
            <text:p>0,6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26" calcext:value-type="float">
            <text:p>1,2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1.41" calcext:value-type="float">
            <text:p>1,4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71" calcext:value-type="float">
            <text:p>0,37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0.893" calcext:value-type="float">
            <text:p>0,8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725" calcext:value-type="float">
            <text:p>0,7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.648" calcext:value-type="float">
            <text:p>1,6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662" calcext:value-type="float">
            <text:p>0,662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8297" calcext:value-type="float">
            <text:p>0,8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1.2796" calcext:value-type="float">
            <text:p>1,2796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99" calcext:value-type="float">
            <text:p>0,29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53756" calcext:value-type="float">
            <text:p>0,53756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1.05563333333333" calcext:value-type="float">
            <text:p>1,05563333333333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4.555" calcext:value-type="float">
            <text:p>4,555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447" calcext:value-type="float">
            <text:p>0,044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2.178" calcext:value-type="float">
            <text:p>2,17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519" calcext:value-type="float">
            <text:p>0,519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3.414" calcext:value-type="float">
            <text:p>3,4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464" calcext:value-type="float">
            <text:p>1,464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8" calcext:value-type="float">
            <text:p>0,6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1.158" calcext:value-type="float">
            <text:p>1,158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03" calcext:value-type="float">
            <text:p>0,1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765" calcext:value-type="float">
            <text:p>0,76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0948" calcext:value-type="float">
            <text:p>0,09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5397" calcext:value-type="float">
            <text:p>0,5397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0.998" calcext:value-type="float">
            <text:p>0,998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73" calcext:value-type="float">
            <text:p>0,03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548" calcext:value-type="float">
            <text:p>0,54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2.46647" calcext:value-type="float">
            <text:p>2,46647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56718" calcext:value-type="float">
            <text:p>0,56718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2367.037" calcext:value-type="float">
            <text:p>2367,037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57.356" calcext:value-type="float">
            <text:p>157,3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538.235" calcext:value-type="float">
            <text:p>2538,235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110.942" calcext:value-type="float">
            <text:p>110,9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2003.881" calcext:value-type="float">
            <text:p>2003,88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113.732" calcext:value-type="float">
            <text:p>113,7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3362.189" calcext:value-type="float">
            <text:p>3362,18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861.368" calcext:value-type="float">
            <text:p>2861,368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3225.166" calcext:value-type="float">
            <text:p>3225,16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565.856" calcext:value-type="float">
            <text:p>2565,856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2134.215" calcext:value-type="float">
            <text:p>2134,215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554.1786" calcext:value-type="float">
            <text:p>2554,1786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0.8151" calcext:value-type="float">
            <text:p>150,8151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1" calcext:value-type="float">
            <text:p>3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3.631" calcext:value-type="float">
            <text:p>3,631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79" calcext:value-type="float">
            <text:p>3,57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287" calcext:value-type="float">
            <text:p>3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312" calcext:value-type="float">
            <text:p>3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188" calcext:value-type="float">
            <text:p>2,188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77" calcext:value-type="float">
            <text:p>3,8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2.384" calcext:value-type="float">
            <text:p>2,384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309" calcext:value-type="float">
            <text:p>3,3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3.043" calcext:value-type="float">
            <text:p>3,043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928" calcext:value-type="float">
            <text:p>4,92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542" calcext:value-type="float">
            <text:p>3,5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0.3497" calcext:value-type="float">
            <text:p>0,3497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367" calcext:value-type="float">
            <text:p>3,3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27.962" calcext:value-type="float">
            <text:p>27,962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4.07497" calcext:value-type="float">
            <text:p>4,07497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6019" calcext:value-type="float">
            <text:p>3,6019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898" calcext:value-type="float">
            <text:p>8,898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1.428" calcext:value-type="float">
            <text:p>11,428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26.908" calcext:value-type="float">
            <text:p>26,90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18.125" calcext:value-type="float">
            <text:p>18,12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4.709" calcext:value-type="float">
            <text:p>14,70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8.005" calcext:value-type="float">
            <text:p>18,00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24" calcext:value-type="float">
            <text:p>7,62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7.269" calcext:value-type="float">
            <text:p>7,269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328" calcext:value-type="float">
            <text:p>7,328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21.023" calcext:value-type="float">
            <text:p>21,02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12.503" calcext:value-type="float">
            <text:p>12,50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6.494" calcext:value-type="float">
            <text:p>16,49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356" calcext:value-type="float">
            <text:p>9,356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623" calcext:value-type="float">
            <text:p>1,62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11.936" calcext:value-type="float">
            <text:p>11,936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2.392" calcext:value-type="float">
            <text:p>2,39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501" calcext:value-type="float">
            <text:p>6,50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.692" calcext:value-type="float">
            <text:p>1,69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6.936" calcext:value-type="float">
            <text:p>6,936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11.2699" calcext:value-type="float">
            <text:p>11,2699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0.8945555555556" calcext:value-type="float">
            <text:p>10,8945555555556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5" calcext:value-type="float">
            <text:p>148,3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266.563" calcext:value-type="float">
            <text:p>266,56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6.114" calcext:value-type="float">
            <text:p>126,114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214.164" calcext:value-type="float">
            <text:p>214,1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60.366" calcext:value-type="float">
            <text:p>160,366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198.293" calcext:value-type="float">
            <text:p>198,2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3.047" calcext:value-type="float">
            <text:p>173,047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81.914" calcext:value-type="float">
            <text:p>181,9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56.265" calcext:value-type="float">
            <text:p>156,26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234.793" calcext:value-type="float">
            <text:p>234,7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29.221" calcext:value-type="float">
            <text:p>129,221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221.545" calcext:value-type="float">
            <text:p>221,5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68.027" calcext:value-type="float">
            <text:p>168,027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6.647" calcext:value-type="float">
            <text:p>156,647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65.565" calcext:value-type="float">
            <text:p>165,565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53.733555555556" calcext:value-type="float">
            <text:p>153,733555555556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float" office:value="219.545333333333" calcext:value-type="float">
            <text:p>219,545333333333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486.429" calcext:value-type="float">
            <text:p>486,429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454.718" calcext:value-type="float">
            <text:p>454,71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480.335" calcext:value-type="float">
            <text:p>480,335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486.896" calcext:value-type="float">
            <text:p>486,8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530.698" calcext:value-type="float">
            <text:p>530,698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714.812" calcext:value-type="float">
            <text:p>714,81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89.669" calcext:value-type="float">
            <text:p>489,669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33.57" calcext:value-type="float">
            <text:p>933,5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753.86" calcext:value-type="float">
            <text:p>753,86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766.518" calcext:value-type="float">
            <text:p>766,51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580.786" calcext:value-type="float">
            <text:p>580,786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447.774" calcext:value-type="float">
            <text:p>447,77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542.841" calcext:value-type="float">
            <text:p>542,84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538.191" calcext:value-type="float">
            <text:p>538,19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836.72" calcext:value-type="float">
            <text:p>836,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503.89" calcext:value-type="float">
            <text:p>503,89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8.696" calcext:value-type="float">
            <text:p>858,6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562.178" calcext:value-type="float">
            <text:p>562,178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613.011" calcext:value-type="float">
            <text:p>613,011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547.854" calcext:value-type="float">
            <text:p>547,85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665.0906" calcext:value-type="float">
            <text:p>665,0906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73.464" calcext:value-type="float">
            <text:p>473,464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48" calcext:value-type="float">
            <text:p>0,34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395.907" calcext:value-type="float">
            <text:p>395,907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7099" calcext:value-type="float">
            <text:p>0,709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93" calcext:value-type="float">
            <text:p>0,493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827" calcext:value-type="float">
            <text:p>0,082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57.0937" calcext:value-type="float">
            <text:p>457,0937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1186" calcext:value-type="float">
            <text:p>0,3118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83" calcext:value-type="float">
            <text:p>1,28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57" calcext:value-type="float">
            <text:p>0,0357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44" calcext:value-type="float">
            <text:p>0,4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7197" calcext:value-type="float">
            <text:p>0,71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1" calcext:value-type="float">
            <text:p>0,043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08" calcext:value-type="float">
            <text:p>0,0608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1" calcext:value-type="float">
            <text:p>0,038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69" calcext:value-type="float">
            <text:p>0,076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21" calcext:value-type="float">
            <text:p>0,2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8151" calcext:value-type="float">
            <text:p>0,08151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45586" calcext:value-type="float">
            <text:p>0,4558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4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16" office:value-type="percentage" office:value="0.222" calcext:value-type="percentage">
            <text:p>22,20%</text:p>
          </table:table-cell>
          <table:table-cell table:style-name="ce25" office:value-type="percentage" office:value="0.22" calcext:value-type="percentage">
            <text:p>22,00%</text:p>
          </table:table-cell>
          <table:table-cell table:style-name="ce25" office:value-type="percentage" office:value="0.236" calcext:value-type="percentage">
            <text:p>23,60%</text:p>
          </table:table-cell>
          <table:table-cell table:style-name="ce25" office:value-type="percentage" office:value="0.216" calcext:value-type="percentage">
            <text:p>21,6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16" office:value-type="percentage" office:value="0.1617" calcext:value-type="percentage">
            <text:p>16,17%</text:p>
          </table:table-cell>
          <table:table-cell table:number-columns-repeated="2" table:style-name="ce25" office:value-type="percentage" office:value="0.1787" calcext:value-type="percentage">
            <text:p>17,87%</text:p>
          </table:table-cell>
          <table:table-cell table:style-name="ce25" office:value-type="percentage" office:value="0.1766" calcext:value-type="percentage">
            <text:p>17,6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16" office:value-type="percentage" office:value="0.2671" calcext:value-type="percentage">
            <text:p>26,71%</text:p>
          </table:table-cell>
          <table:table-cell table:style-name="ce25" office:value-type="percentage" office:value="0.2841" calcext:value-type="percentage">
            <text:p>28,41%</text:p>
          </table:table-cell>
          <table:table-cell table:style-name="ce25" office:value-type="percentage" office:value="0.2957" calcext:value-type="percentage">
            <text:p>29,57%</text:p>
          </table:table-cell>
          <table:table-cell table:style-name="ce25" office:value-type="percentage" office:value="0.2545" calcext:value-type="percentage">
            <text:p>25,45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16" office:value-type="percentage" office:value="0.0774" calcext:value-type="percentage">
            <text:p>7,74%</text:p>
          </table:table-cell>
          <table:table-cell table:style-name="ce25" office:value-type="percentage" office:value="0.0678" calcext:value-type="percentage">
            <text:p>6,78%</text:p>
          </table:table-cell>
          <table:table-cell table:style-name="ce25" office:value-type="percentage" office:value="0.0769" calcext:value-type="percentage">
            <text:p>7,69%</text:p>
          </table:table-cell>
          <table:table-cell table:style-name="ce25" office:value-type="percentage" office:value="0.0768" calcext:value-type="percentage">
            <text:p>7,68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16" office:value-type="percentage" office:value="0.044" calcext:value-type="percentage">
            <text:p>4,40%</text:p>
          </table:table-cell>
          <table:table-cell table:style-name="ce25" office:value-type="percentage" office:value="0.0432" calcext:value-type="percentage">
            <text:p>4,32%</text:p>
          </table:table-cell>
          <table:table-cell table:style-name="ce25" office:value-type="percentage" office:value="0.0423" calcext:value-type="percentage">
            <text:p>4,23%</text:p>
          </table:table-cell>
          <table:table-cell table:style-name="ce25" office:value-type="percentage" office:value="0.0429" calcext:value-type="percentage">
            <text:p>4,29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16" office:value-type="percentage" office:value="0.4662" calcext:value-type="percentage">
            <text:p>46,62%</text:p>
          </table:table-cell>
          <table:table-cell table:style-name="ce25" office:value-type="percentage" office:value="0.4683" calcext:value-type="percentage">
            <text:p>46,83%</text:p>
          </table:table-cell>
          <table:table-cell table:style-name="ce25" office:value-type="percentage" office:value="0.4786" calcext:value-type="percentage">
            <text:p>47,86%</text:p>
          </table:table-cell>
          <table:table-cell table:style-name="ce25" office:value-type="percentage" office:value="0.5152" calcext:value-type="percentage">
            <text:p>51,52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16" office:value-type="percentage" office:value="0.1072" calcext:value-type="percentage">
            <text:p>10,72%</text:p>
          </table:table-cell>
          <table:table-cell table:style-name="ce25" office:value-type="percentage" office:value="0.1037" calcext:value-type="percentage">
            <text:p>10,37%</text:p>
          </table:table-cell>
          <table:table-cell table:style-name="ce25" office:value-type="percentage" office:value="0.2156" calcext:value-type="percentage">
            <text:p>21,56%</text:p>
          </table:table-cell>
          <table:table-cell table:style-name="ce25" office:value-type="percentage" office:value="0.242" calcext:value-type="percentage">
            <text:p>24,20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16" office:value-type="percentage" office:value="0.477" calcext:value-type="percentage">
            <text:p>47,70%</text:p>
          </table:table-cell>
          <table:table-cell table:style-name="ce25" office:value-type="percentage" office:value="0.5039" calcext:value-type="percentage">
            <text:p>50,39%</text:p>
          </table:table-cell>
          <table:table-cell table:style-name="ce25" office:value-type="percentage" office:value="0.4897" calcext:value-type="percentage">
            <text:p>48,97%</text:p>
          </table:table-cell>
          <table:table-cell table:style-name="ce25" office:value-type="percentage" office:value="0.5297" calcext:value-type="percentage">
            <text:p>52,97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16" office:value-type="percentage" office:value="0.239" calcext:value-type="percentage">
            <text:p>23,90%</text:p>
          </table:table-cell>
          <table:table-cell table:style-name="ce25" office:value-type="percentage" office:value="0.258" calcext:value-type="percentage">
            <text:p>25,80%</text:p>
          </table:table-cell>
          <table:table-cell table:style-name="ce25" office:value-type="percentage" office:value="0.259" calcext:value-type="percentage">
            <text:p>25,90%</text:p>
          </table:table-cell>
          <table:table-cell table:style-name="ce25" office:value-type="percentage" office:value="0.266" calcext:value-type="percentage">
            <text:p>26,6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16" office:value-type="percentage" office:value="0.2757" calcext:value-type="percentage">
            <text:p>27,57%</text:p>
          </table:table-cell>
          <table:table-cell table:style-name="ce25" office:value-type="percentage" office:value="0.27" calcext:value-type="percentage">
            <text:p>27,00%</text:p>
          </table:table-cell>
          <table:table-cell table:style-name="ce25" office:value-type="percentage" office:value="0.286" calcext:value-type="percentage">
            <text:p>28,60%</text:p>
          </table:table-cell>
          <table:table-cell table:style-name="ce25" office:value-type="percentage" office:value="0.2847" calcext:value-type="percentage">
            <text:p>28,47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16" office:value-type="percentage" office:value="0.3531" calcext:value-type="percentage">
            <text:p>35,31%</text:p>
          </table:table-cell>
          <table:table-cell table:number-columns-repeated="2" table:style-name="ce25" office:value-type="percentage" office:value="0.37" calcext:value-type="percentage">
            <text:p>37,00%</text:p>
          </table:table-cell>
          <table:table-cell table:style-name="ce25" office:value-type="percentage" office:value="0.3546" calcext:value-type="percentage">
            <text:p>35,46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16" office:value-type="percentage" office:value="0.2015" calcext:value-type="percentage">
            <text:p>20,15%</text:p>
          </table:table-cell>
          <table:table-cell table:style-name="ce25" office:value-type="percentage" office:value="0.203" calcext:value-type="percentage">
            <text:p>20,30%</text:p>
          </table:table-cell>
          <table:table-cell table:style-name="ce25" office:value-type="percentage" office:value="0.3137" calcext:value-type="percentage">
            <text:p>31,37%</text:p>
          </table:table-cell>
          <table:table-cell table:style-name="ce25" office:value-type="percentage" office:value="0.2426" calcext:value-type="percentage">
            <text:p>24,26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16" office:value-type="percentage" office:value="0.208" calcext:value-type="percentage">
            <text:p>20,80%</text:p>
          </table:table-cell>
          <table:table-cell table:style-name="ce25" office:value-type="percentage" office:value="0.23" calcext:value-type="percentage">
            <text:p>23,00%</text:p>
          </table:table-cell>
          <table:table-cell table:style-name="ce25" office:value-type="percentage" office:value="0.3603" calcext:value-type="percentage">
            <text:p>36,03%</text:p>
          </table:table-cell>
          <table:table-cell table:style-name="ce25" office:value-type="percentage" office:value="0.2663" calcext:value-type="percentage">
            <text:p>26,63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16" office:value-type="percentage" office:value="0.067" calcext:value-type="percentage">
            <text:p>6,70%</text:p>
          </table:table-cell>
          <table:table-cell table:style-name="ce25" office:value-type="percentage" office:value="0.0743" calcext:value-type="percentage">
            <text:p>7,43%</text:p>
          </table:table-cell>
          <table:table-cell table:style-name="ce25" office:value-type="percentage" office:value="0.0683" calcext:value-type="percentage">
            <text:p>6,83%</text:p>
          </table:table-cell>
          <table:table-cell table:style-name="ce25" office:value-type="percentage" office:value="0.0674" calcext:value-type="percentage">
            <text:p>6,74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16" office:value-type="percentage" office:value="0.1497" calcext:value-type="percentage">
            <text:p>14,97%</text:p>
          </table:table-cell>
          <table:table-cell table:style-name="ce25" office:value-type="percentage" office:value="0.1523" calcext:value-type="percentage">
            <text:p>15,23%</text:p>
          </table:table-cell>
          <table:table-cell table:style-name="ce25" office:value-type="percentage" office:value="0.1634" calcext:value-type="percentage">
            <text:p>16,34%</text:p>
          </table:table-cell>
          <table:table-cell table:style-name="ce25" office:value-type="percentage" office:value="0.1543" calcext:value-type="percentage">
            <text:p>15,43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16" office:value-type="percentage" office:value="0.3406" calcext:value-type="percentage">
            <text:p>34,06%</text:p>
          </table:table-cell>
          <table:table-cell table:style-name="ce25" office:value-type="percentage" office:value="0.3424" calcext:value-type="percentage">
            <text:p>34,24%</text:p>
          </table:table-cell>
          <table:table-cell table:style-name="ce25" office:value-type="percentage" office:value="0.3506" calcext:value-type="percentage">
            <text:p>35,06%</text:p>
          </table:table-cell>
          <table:table-cell table:style-name="ce25" office:value-type="percentage" office:value="0.3441" calcext:value-type="percentage">
            <text:p>34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16" office:value-type="percentage" office:value="0.2586" calcext:value-type="percentage">
            <text:p>25,86%</text:p>
          </table:table-cell>
          <table:table-cell table:style-name="ce25" office:value-type="percentage" office:value="0.2807" calcext:value-type="percentage">
            <text:p>28,07%</text:p>
          </table:table-cell>
          <table:table-cell table:style-name="ce25" office:value-type="percentage" office:value="0.2764" calcext:value-type="percentage">
            <text:p>27,64%</text:p>
          </table:table-cell>
          <table:table-cell table:style-name="ce25" office:value-type="percentage" office:value="0.2521" calcext:value-type="percentage">
            <text:p>25,21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16" office:value-type="percentage" office:value="0.1731" calcext:value-type="percentage">
            <text:p>17,31%</text:p>
          </table:table-cell>
          <table:table-cell table:style-name="ce25" office:value-type="percentage" office:value="0.174" calcext:value-type="percentage">
            <text:p>17,40%</text:p>
          </table:table-cell>
          <table:table-cell table:style-name="ce25" office:value-type="percentage" office:value="0.192" calcext:value-type="percentage">
            <text:p>19,20%</text:p>
          </table:table-cell>
          <table:table-cell table:style-name="ce25" office:value-type="percentage" office:value="0.2143" calcext:value-type="percentage">
            <text:p>21,43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16" office:value-type="percentage" office:value="0.4142" calcext:value-type="percentage">
            <text:p>41,42%</text:p>
          </table:table-cell>
          <table:table-cell table:style-name="ce25" office:value-type="percentage" office:value="0.5648" calcext:value-type="percentage">
            <text:p>56,48%</text:p>
          </table:table-cell>
          <table:table-cell table:style-name="ce25" office:value-type="percentage" office:value="0.4763" calcext:value-type="percentage">
            <text:p>47,63%</text:p>
          </table:table-cell>
          <table:table-cell table:style-name="ce25" office:value-type="percentage" office:value="0.5465" calcext:value-type="percentage">
            <text:p>54,65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16" office:value-type="percentage" office:value="0.1579" calcext:value-type="percentage">
            <text:p>15,79%</text:p>
          </table:table-cell>
          <table:table-cell table:style-name="ce25" office:value-type="percentage" office:value="0.1711" calcext:value-type="percentage">
            <text:p>17,11%</text:p>
          </table:table-cell>
          <table:table-cell table:style-name="ce25" office:value-type="percentage" office:value="0.2111" calcext:value-type="percentage">
            <text:p>21,11%</text:p>
          </table:table-cell>
          <table:table-cell table:style-name="ce25" office:value-type="percentage" office:value="0.1905" calcext:value-type="percentage">
            <text:p>19,05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16" office:value-type="percentage" office:value="0.147" calcext:value-type="percentage">
            <text:p>14,70%</text:p>
          </table:table-cell>
          <table:table-cell table:style-name="ce25" office:value-type="percentage" office:value="0.1522" calcext:value-type="percentage">
            <text:p>15,22%</text:p>
          </table:table-cell>
          <table:table-cell table:style-name="ce25" office:value-type="percentage" office:value="0.1558" calcext:value-type="percentage">
            <text:p>15,58%</text:p>
          </table:table-cell>
          <table:table-cell table:style-name="ce25" office:value-type="percentage" office:value="0.1544" calcext:value-type="percentage">
            <text:p>15,44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16" office:value-type="percentage" office:value="0.2959" calcext:value-type="percentage">
            <text:p>29,59%</text:p>
          </table:table-cell>
          <table:table-cell table:style-name="ce25" office:value-type="percentage" office:value="0.2855" calcext:value-type="percentage">
            <text:p>28,55%</text:p>
          </table:table-cell>
          <table:table-cell table:style-name="ce25" office:value-type="percentage" office:value="0.3139" calcext:value-type="percentage">
            <text:p>31,39%</text:p>
          </table:table-cell>
          <table:table-cell table:style-name="ce25" office:value-type="percentage" office:value="0.2713" calcext:value-type="percentage">
            <text:p>27,13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16" office:value-type="percentage" office:value="0.0691" calcext:value-type="percentage">
            <text:p>6,91%</text:p>
          </table:table-cell>
          <table:table-cell table:style-name="ce25" office:value-type="percentage" office:value="0.0646" calcext:value-type="percentage">
            <text:p>6,46%</text:p>
          </table:table-cell>
          <table:table-cell table:style-name="ce25" office:value-type="percentage" office:value="0.0685" calcext:value-type="percentage">
            <text:p>6,85%</text:p>
          </table:table-cell>
          <table:table-cell table:style-name="ce25" office:value-type="percentage" office:value="0.0656" calcext:value-type="percentage">
            <text:p>6,56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16" office:value-type="percentage" office:value="0.2808" calcext:value-type="percentage">
            <text:p>28,08%</text:p>
          </table:table-cell>
          <table:table-cell table:style-name="ce25" office:value-type="percentage" office:value="0.2997" calcext:value-type="percentage">
            <text:p>29,97%</text:p>
          </table:table-cell>
          <table:table-cell table:style-name="ce25" office:value-type="percentage" office:value="0.2952" calcext:value-type="percentage">
            <text:p>29,52%</text:p>
          </table:table-cell>
          <table:table-cell table:style-name="ce25" office:value-type="percentage" office:value="0.2981" calcext:value-type="percentage">
            <text:p>29,81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16" office:value-type="percentage" office:value="0.2168" calcext:value-type="percentage">
            <text:p>21,68%</text:p>
          </table:table-cell>
          <table:table-cell table:style-name="ce25" office:value-type="percentage" office:value="0.2338" calcext:value-type="percentage">
            <text:p>23,38%</text:p>
          </table:table-cell>
          <table:table-cell table:style-name="ce25" office:value-type="percentage" office:value="0.2553" calcext:value-type="percentage">
            <text:p>25,53%</text:p>
          </table:table-cell>
          <table:table-cell table:style-name="ce25" office:value-type="percentage" office:value="0.2179" calcext:value-type="percentage">
            <text:p>21,79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16" office:value-type="percentage" office:value="0.3322" calcext:value-type="percentage">
            <text:p>33,22%</text:p>
          </table:table-cell>
          <table:table-cell table:style-name="ce25" office:value-type="percentage" office:value="0.3354" calcext:value-type="percentage">
            <text:p>33,54%</text:p>
          </table:table-cell>
          <table:table-cell table:style-name="ce25" office:value-type="percentage" office:value="0.3463" calcext:value-type="percentage">
            <text:p>34,63%</text:p>
          </table:table-cell>
          <table:table-cell table:style-name="ce25" office:value-type="percentage" office:value="0.3352" calcext:value-type="percentage">
            <text:p>33,52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16" office:value-type="percentage" office:value="0.4408" calcext:value-type="percentage">
            <text:p>44,08%</text:p>
          </table:table-cell>
          <table:table-cell table:style-name="ce25" office:value-type="percentage" office:value="0.5267" calcext:value-type="percentage">
            <text:p>52,67%</text:p>
          </table:table-cell>
          <table:table-cell table:style-name="ce25" office:value-type="percentage" office:value="0.6507" calcext:value-type="percentage">
            <text:p>65,07%</text:p>
          </table:table-cell>
          <table:table-cell table:style-name="ce25" office:value-type="percentage" office:value="0.585" calcext:value-type="percentage">
            <text:p>58,50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16" office:value-type="percentage" office:value="0.2113" calcext:value-type="percentage">
            <text:p>21,13%</text:p>
          </table:table-cell>
          <table:table-cell table:style-name="ce25" office:value-type="percentage" office:value="0.3356" calcext:value-type="percentage">
            <text:p>33,56%</text:p>
          </table:table-cell>
          <table:table-cell table:style-name="ce25" office:value-type="percentage" office:value="0.3222" calcext:value-type="percentage">
            <text:p>32,22%</text:p>
          </table:table-cell>
          <table:table-cell table:style-name="ce25" office:value-type="percentage" office:value="0.2732" calcext:value-type="percentage">
            <text:p>27,3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16" office:value-type="percentage" office:value="0.207" calcext:value-type="percentage">
            <text:p>20,70%</text:p>
          </table:table-cell>
          <table:table-cell table:style-name="ce25" office:value-type="percentage" office:value="0.2105" calcext:value-type="percentage">
            <text:p>21,05%</text:p>
          </table:table-cell>
          <table:table-cell table:style-name="ce25" office:value-type="percentage" office:value="0.2245" calcext:value-type="percentage">
            <text:p>22,45%</text:p>
          </table:table-cell>
          <table:table-cell table:style-name="ce25" office:value-type="percentage" office:value="0.223" calcext:value-type="percentage">
            <text:p>22,3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16" office:value-type="percentage" office:value="0.0615" calcext:value-type="percentage">
            <text:p>6,15%</text:p>
          </table:table-cell>
          <table:table-cell table:style-name="ce25" office:value-type="percentage" office:value="0.0617" calcext:value-type="percentage">
            <text:p>6,17%</text:p>
          </table:table-cell>
          <table:table-cell table:style-name="ce25" office:value-type="percentage" office:value="0.0628" calcext:value-type="percentage">
            <text:p>6,28%</text:p>
          </table:table-cell>
          <table:table-cell table:style-name="ce25" office:value-type="percentage" office:value="0.0657" calcext:value-type="percentage">
            <text:p>6,57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16" office:value-type="percentage" office:value="0.4262" calcext:value-type="percentage">
            <text:p>42,62%</text:p>
          </table:table-cell>
          <table:table-cell table:style-name="ce25" office:value-type="percentage" office:value="0.4298" calcext:value-type="percentage">
            <text:p>42,98%</text:p>
          </table:table-cell>
          <table:table-cell table:style-name="ce25" office:value-type="percentage" office:value="0.4315" calcext:value-type="percentage">
            <text:p>43,15%</text:p>
          </table:table-cell>
          <table:table-cell table:style-name="ce25" office:value-type="percentage" office:value="0.4216" calcext:value-type="percentage">
            <text:p>42,16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16" office:value-type="percentage" office:value="0.2267" calcext:value-type="percentage">
            <text:p>22,67%</text:p>
          </table:table-cell>
          <table:table-cell table:style-name="ce25" office:value-type="percentage" office:value="0.2237" calcext:value-type="percentage">
            <text:p>22,37%</text:p>
          </table:table-cell>
          <table:table-cell table:style-name="ce25" office:value-type="percentage" office:value="0.3393" calcext:value-type="percentage">
            <text:p>33,93%</text:p>
          </table:table-cell>
          <table:table-cell table:style-name="ce25" office:value-type="percentage" office:value="0.2782" calcext:value-type="percentage">
            <text:p>27,82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16" office:value-type="percentage" office:value="0.061" calcext:value-type="percentage">
            <text:p>6,10%</text:p>
          </table:table-cell>
          <table:table-cell table:style-name="ce25" office:value-type="percentage" office:value="0.059" calcext:value-type="percentage">
            <text:p>5,90%</text:p>
          </table:table-cell>
          <table:table-cell table:style-name="ce25" office:value-type="percentage" office:value="0.065" calcext:value-type="percentage">
            <text:p>6,50%</text:p>
          </table:table-cell>
          <table:table-cell table:style-name="ce25" office:value-type="percentage" office:value="0.0573" calcext:value-type="percentage">
            <text:p>5,73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16" office:value-type="percentage" office:value="0.2423" calcext:value-type="percentage">
            <text:p>24,23%</text:p>
          </table:table-cell>
          <table:table-cell table:style-name="ce25" office:value-type="percentage" office:value="0.2423" calcext:value-type="percentage">
            <text:p>24,23%</text:p>
          </table:table-cell>
          <table:table-cell table:style-name="ce25" office:value-type="percentage" office:value="0.2523" calcext:value-type="percentage">
            <text:p>25,23%</text:p>
          </table:table-cell>
          <table:table-cell table:style-name="ce25" office:value-type="percentage" office:value="0.2472" calcext:value-type="percentage">
            <text:p>24,72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16" office:value-type="percentage" office:value="0.0641" calcext:value-type="percentage">
            <text:p>6,41%</text:p>
          </table:table-cell>
          <table:table-cell table:style-name="ce25" office:value-type="percentage" office:value="0.0621" calcext:value-type="percentage">
            <text:p>6,21%</text:p>
          </table:table-cell>
          <table:table-cell table:style-name="ce25" office:value-type="percentage" office:value="0.0814" calcext:value-type="percentage">
            <text:p>8,14%</text:p>
          </table:table-cell>
          <table:table-cell table:style-name="ce25" office:value-type="percentage" office:value="0.0636" calcext:value-type="percentage">
            <text:p>6,36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16" office:value-type="percentage" office:value="0.1453" calcext:value-type="percentage">
            <text:p>14,53%</text:p>
          </table:table-cell>
          <table:table-cell table:style-name="ce25" office:value-type="percentage" office:value="0.1682" calcext:value-type="percentage">
            <text:p>16,82%</text:p>
          </table:table-cell>
          <table:table-cell table:style-name="ce25" office:value-type="percentage" office:value="0.2312" calcext:value-type="percentage">
            <text:p>23,12%</text:p>
          </table:table-cell>
          <table:table-cell table:style-name="ce25" office:value-type="percentage" office:value="0.2165" calcext:value-type="percentage">
            <text:p>21,65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16" office:value-type="percentage" office:value="0.0896" calcext:value-type="percentage">
            <text:p>8,96%</text:p>
          </table:table-cell>
          <table:table-cell table:style-name="ce25" office:value-type="percentage" office:value="0.105" calcext:value-type="percentage">
            <text:p>10,50%</text:p>
          </table:table-cell>
          <table:table-cell table:style-name="ce25" office:value-type="percentage" office:value="0.1773" calcext:value-type="percentage">
            <text:p>17,73%</text:p>
          </table:table-cell>
          <table:table-cell table:style-name="ce25" office:value-type="percentage" office:value="0.0923" calcext:value-type="percentage">
            <text:p>9,2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16" office:value-type="percentage" office:value="0.0619" calcext:value-type="percentage">
            <text:p>6,19%</text:p>
          </table:table-cell>
          <table:table-cell table:style-name="ce25" office:value-type="percentage" office:value="0.0852" calcext:value-type="percentage">
            <text:p>8,52%</text:p>
          </table:table-cell>
          <table:table-cell table:style-name="ce25" office:value-type="percentage" office:value="0.2156" calcext:value-type="percentage">
            <text:p>21,56%</text:p>
          </table:table-cell>
          <table:table-cell table:style-name="ce25" office:value-type="percentage" office:value="0.0968" calcext:value-type="percentage">
            <text:p>9,68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16" office:value-type="percentage" office:value="0.0314" calcext:value-type="percentage">
            <text:p>3,14%</text:p>
          </table:table-cell>
          <table:table-cell table:style-name="ce25" office:value-type="percentage" office:value="0.0339" calcext:value-type="percentage">
            <text:p>3,39%</text:p>
          </table:table-cell>
          <table:table-cell table:style-name="ce25" office:value-type="percentage" office:value="0.0564" calcext:value-type="percentage">
            <text:p>5,64%</text:p>
          </table:table-cell>
          <table:table-cell table:style-name="ce25" office:value-type="percentage" office:value="0.0352" calcext:value-type="percentage">
            <text:p>3,52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16" office:value-type="percentage" office:value="0.063" calcext:value-type="percentage">
            <text:p>6,30%</text:p>
          </table:table-cell>
          <table:table-cell table:number-columns-repeated="2" table:style-name="ce25" office:value-type="percentage" office:value="0.057" calcext:value-type="percentage">
            <text:p>5,70%</text:p>
          </table:table-cell>
          <table:table-cell table:style-name="ce25" office:value-type="percentage" office:value="0.063" calcext:value-type="percentage">
            <text:p>6,3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2083725" calcext:value-type="percentage">
            <text:p>20,84%</text:p>
          </table:table-cell>
          <table:table-cell table:style-name="ce17" table:formula="of:=AVERAGE([.D3:.D42])" office:value-type="percentage" office:value="0.223305" calcext:value-type="percentage">
            <text:p>22,33%</text:p>
          </table:table-cell>
          <table:table-cell table:style-name="ce17" table:formula="of:=AVERAGE([.E3:.E42])" office:value-type="percentage" office:value="0.24857" calcext:value-type="percentage">
            <text:p>24,86%</text:p>
          </table:table-cell>
          <table:table-cell table:style-name="ce17" table:formula="of:=AVERAGE([.F3:.F42])" office:value-type="percentage" office:value="0.232455" calcext:value-type="percentage">
            <text:p>23,25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40"/>
          <table:table-cell table:style-name="ce18"/>
          <table:table-cell table:style-name="ce40"/>
          <table:table-cell table:style-name="ce18" table:number-columns-repeated="3"/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40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40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26" table:formula="of:=0.1772/150" office:value-type="float" office:value="0.00118133333333333" calcext:value-type="float">
            <text:p>0,00118133333333333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style-name="ce26" table:formula="of:=665.0906/39" office:value-type="float" office:value="17.0536051282051" calcext:value-type="float">
            <text:p>17,053605128205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26" table:formula="of:=0.40384/9" office:value-type="float" office:value="0.0448711111111111" calcext:value-type="float">
            <text:p>0,044871111111111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26" table:formula="of:=2.84159/4" office:value-type="float" office:value="0.7103975" calcext:value-type="float">
            <text:p>0,7103975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26" table:formula="of:=3581.61439/33" office:value-type="float" office:value="108.533769393939" calcext:value-type="float">
            <text:p>108,53376939393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26" table:formula="of:=0.53756/103" office:value-type="float" office:value="0.00521902912621359" calcext:value-type="float">
            <text:p>0,0052190291262135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style-name="ce26" table:formula="of:=8.0052/36" office:value-type="float" office:value="0.222366666666667" calcext:value-type="float">
            <text:p>0,2223666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26" table:formula="of:=2.46647/12" office:value-type="float" office:value="0.205539166666667" calcext:value-type="float">
            <text:p>0,2055391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style-name="ce26" table:formula="of:=2554.1786/50" office:value-type="float" office:value="51.083572" calcext:value-type="float">
            <text:p>51,083572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26" table:formula="of:=0.56718/99" office:value-type="float" office:value="0.00572909090909091" calcext:value-type="float">
            <text:p>0,0057290909090909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26" table:formula="of:=4.07497/18" office:value-type="float" office:value="0.226387222222222" calcext:value-type="float">
            <text:p>0,226387222222222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26" table:formula="of:=0.31186/6" office:value-type="float" office:value="0.0519766666666667" calcext:value-type="float">
            <text:p>0,051976666666666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style-name="ce26" table:formula="of:=150.8151/104" office:value-type="float" office:value="1.45014519230769" calcext:value-type="float">
            <text:p>1,45014519230769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style-name="ce26" table:formula="of:=0.08151/13" office:value-type="float" office:value="0.00627" calcext:value-type="float">
            <text:p>0,0062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26" table:formula="of:=3.6019/165" office:value-type="float" office:value="0.021829696969697" calcext:value-type="float">
            <text:p>0,02182969696969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style-name="ce26" table:formula="of:=0.45586/7" office:value-type="float" office:value="0.0651228571428571" calcext:value-type="float">
            <text:p>0,0651228571428571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style-name="ce26" table:formula="of:=457.0937/165" office:value-type="float" office:value="2.77026484848485" calcext:value-type="float">
            <text:p>2,77026484848485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26" table:formula="of:=11.2699/217" office:value-type="float" office:value="0.0519350230414747" calcext:value-type="float">
            <text:p>0,0519350230414747</text:p>
          </table:table-cell>
          <table:table-cell table:style-name="ce26" table:number-columns-repeated="3"/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style-name="ce26" table:number-columns-repeated="4"/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style-name="ce26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10.1394545514885" calcext:value-type="float">
            <text:p>10,1394545514885</text:p>
          </table:table-cell>
          <table:table-cell table:style-name="ce13" table:formula="of:=AVERAGE([.D49:.D72])" office:value-type="string" office:string-value="" calcext:value-type="error">
            <text:p>#DIV/0!</text:p>
          </table:table-cell>
          <table:table-cell table:style-name="ce13" table:formula="of:=AVERAGE([.E49:.E72])" office:value-type="string" office:string-value="" calcext:value-type="error">
            <text:p>#DIV/0!</text:p>
          </table:table-cell>
          <table:table-cell table:style-name="ce13" table:formula="of:=AVERAGE([.F49:.F72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40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-0.240579096706875" calcext:value-type="percentage">
            <text:p>-24,06%</text:p>
          </table:table-cell>
          <table:table-cell table:style-name="ce18" table:formula="of:=([.C74]-[.D74])/[.C74]" office:value-type="string" office:string-value="" calcext:value-type="error">
            <text:p>#DIV/0!</text:p>
          </table:table-cell>
          <table:table-cell table:style-name="ce18" table:formula="of:=([.D74]-[.E74])/[.D74]" office:value-type="string" office:string-value="" calcext:value-type="error">
            <text:p>#DIV/0!</text:p>
          </table:table-cell>
          <table:table-cell table:style-name="ce18" table:formula="of:=([.C74]-[.F74])/[.C74]" office:value-type="string" office:string-value="" calcext:value-type="error">
            <text:p>#DIV/0!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4:27:26.35492297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6-28T20:26:54.120426962</dc:date>
    <meta:editing-duration>PT21H18M42S</meta:editing-duration>
    <meta:editing-cycles>751</meta:editing-cycles>
    <meta:generator>LibreOffice/25.2.3.2$Linux_X86_64 LibreOffice_project/520$Build-2</meta:generator>
    <meta:document-statistic meta:table-count="2" meta:cell-count="2355" meta:object-count="0"/>
  </office:meta>
</office:document-meta>
</file>