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/>
    <style:style style:name="ce10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1"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hread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 office:value-type="percentage" office:value="0.3522" calcext:value-type="percentage">
            <text:p>35,2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6" calcext:value-type="percentage">
            <text:p>46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229" calcext:value-type="percentage">
            <text:p>22,90%</text:p>
          </table:table-cell>
          <table:table-cell table:style-name="ce3" office:value-type="percentage" office:value="0.2812" calcext:value-type="percentage">
            <text:p>28,1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2362" calcext:value-type="percentage">
            <text:p>23,62%</text:p>
          </table:table-cell>
          <table:table-cell table:style-name="ce3" office:value-type="percentage" office:value="0.3377" calcext:value-type="percentage">
            <text:p>33,77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3217" calcext:value-type="percentage">
            <text:p>32,17%</text:p>
          </table:table-cell>
          <table:table-cell table:style-name="ce3" office:value-type="percentage" office:value="0.2986" calcext:value-type="percentage">
            <text:p>29,8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536" calcext:value-type="percentage">
            <text:p>25,36%</text:p>
          </table:table-cell>
          <table:table-cell table:style-name="ce3" office:value-type="percentage" office:value="0.2319" calcext:value-type="percentage">
            <text:p>23,1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2812" calcext:value-type="percentage">
            <text:p>28,12%</text:p>
          </table:table-cell>
          <table:table-cell table:style-name="ce3" office:value-type="percentage" office:value="0.2261" calcext:value-type="percentage">
            <text:p>22,6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899" calcext:value-type="percentage">
            <text:p>38,99%</text:p>
          </table:table-cell>
          <table:table-cell table:style-name="ce3" office:value-type="percentage" office:value="0.3812" calcext:value-type="percentage">
            <text:p>38,1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841" calcext:value-type="percentage">
            <text:p>18,41%</text:p>
          </table:table-cell>
          <table:table-cell table:style-name="ce3" office:value-type="percentage" office:value="0.2188" calcext:value-type="percentage">
            <text:p>21,88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609" calcext:value-type="percentage">
            <text:p>26,09%</text:p>
          </table:table-cell>
          <table:table-cell table:style-name="ce3" office:value-type="percentage" office:value="0.2986" calcext:value-type="percentage">
            <text:p>29,8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232" calcext:value-type="percentage">
            <text:p>22,32%</text:p>
          </table:table-cell>
          <table:table-cell table:style-name="ce2" office:value-type="percentage" office:value="0.2159" calcext:value-type="percentage">
            <text:p>21,5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37" calcext:value-type="percentage">
            <text:p>23,70%</text:p>
          </table:table-cell>
          <table:table-cell table:style-name="ce1" table:formula="of:=AVERAGE([.C2:.C11])" office:value-type="percentage" office:value="0.222" calcext:value-type="percentage">
            <text:p>22,2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7001" calcext:value-type="percentage">
            <text:p>27,00%</text:p>
          </table:table-cell>
          <table:table-cell table:style-name="ce1" table:formula="of:=AVERAGE([.G2:.G11])" office:value-type="percentage" office:value="0.28422" calcext:value-type="percentage">
            <text:p>28,4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2" office:value-type="percentage" office:value="0.5862" calcext:value-type="percentage">
            <text:p>58,62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7" calcext:value-type="percentage">
            <text:p>4,70%</text:p>
          </table:table-cell>
          <table:table-cell table:style-name="ce2" office:value-type="percentage" office:value="0.039" calcext:value-type="percentage">
            <text:p>3,9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414" calcext:value-type="percentage">
            <text:p>34,14%</text:p>
          </table:table-cell>
          <table:table-cell table:style-name="ce2" office:value-type="percentage" office:value="0.369" calcext:value-type="percentage">
            <text:p>36,90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12" calcext:value-type="percentage">
            <text:p>1,2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724" calcext:value-type="percentage">
            <text:p>47,24%</text:p>
          </table:table-cell>
          <table:table-cell table:style-name="ce2" office:value-type="percentage" office:value="0.4103" calcext:value-type="percentage">
            <text:p>41,03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66" calcext:value-type="percentage">
            <text:p>6,6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3828" calcext:value-type="percentage">
            <text:p>38,28%</text:p>
          </table:table-cell>
          <table:table-cell table:style-name="ce2" office:value-type="percentage" office:value="0.4207" calcext:value-type="percentage">
            <text:p>42,07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793" calcext:value-type="percentage">
            <text:p>47,93%</text:p>
          </table:table-cell>
          <table:table-cell table:style-name="ce2" office:value-type="percentage" office:value="0.4828" calcext:value-type="percentage">
            <text:p>48,28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number-columns-repeated="2" table:style-name="ce2" office:value-type="percentage" office:value="0.021" calcext:value-type="percentage">
            <text:p>2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483" calcext:value-type="percentage">
            <text:p>34,83%</text:p>
          </table:table-cell>
          <table:table-cell table:style-name="ce2" office:value-type="percentage" office:value="0.3793" calcext:value-type="percentage">
            <text:p>37,93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3" calcext:value-type="percentage">
            <text:p>3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469" calcext:value-type="percentage">
            <text:p>46,90%</text:p>
          </table:table-cell>
          <table:table-cell table:style-name="ce2" office:value-type="percentage" office:value="0.5103" calcext:value-type="percentage">
            <text:p>51,03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53" calcext:value-type="percentage">
            <text:p>5,30%</text:p>
          </table:table-cell>
          <table:table-cell table:style-name="ce2" office:value-type="percentage" office:value="0.045" calcext:value-type="percentage">
            <text:p>4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5552" calcext:value-type="percentage">
            <text:p>55,52%</text:p>
          </table:table-cell>
          <table:table-cell table:style-name="ce2" office:value-type="percentage" office:value="0.5862" calcext:value-type="percentage">
            <text:p>58,62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 office:value-type="percentage" office:value="0.021" calcext:value-type="percentage">
            <text:p>2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5034" calcext:value-type="percentage">
            <text:p>50,34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31" calcext:value-type="percentage">
            <text:p>3,10%</text:p>
          </table:table-cell>
          <table:table-cell table:style-name="ce2" office:value-type="percentage" office:value="0.037" calcext:value-type="percentage">
            <text:p>3,7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4862" calcext:value-type="percentage">
            <text:p>48,62%</text:p>
          </table:table-cell>
          <table:table-cell table:style-name="ce2" office:value-type="percentage" office:value="0.4931" calcext:value-type="percentage">
            <text:p>49,31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77" calcext:value-type="percentage">
            <text:p>7,70%</text:p>
          </table:table-cell>
          <table:table-cell table:style-name="ce2" office:value-type="percentage" office:value="0.073" calcext:value-type="percentage">
            <text:p>7,3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45587" calcext:value-type="percentage">
            <text:p>45,59%</text:p>
          </table:table-cell>
          <table:table-cell table:style-name="ce1" table:formula="of:=AVERAGE([.C14:.C23])" office:value-type="percentage" office:value="0.47413" calcext:value-type="percentage">
            <text:p>47,41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4" calcext:value-type="percentage">
            <text:p>4,40%</text:p>
          </table:table-cell>
          <table:table-cell table:style-name="ce1" table:formula="of:=AVERAGE([.G14:.G23])" office:value-type="percentage" office:value="0.0418" calcext:value-type="percentage">
            <text:p>4,18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914" calcext:value-type="percentage">
            <text:p>9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0886" calcext:value-type="percentage">
            <text:p>8,86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829" calcext:value-type="percentage">
            <text:p>8,29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171" calcext:value-type="percentage">
            <text:p>11,71%</text:p>
          </table:table-cell>
          <table:table-cell table:style-name="ce2" office:value-type="percentage" office:value="0.14" calcext:value-type="percentage">
            <text:p>14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1514" calcext:value-type="percentage">
            <text:p>15,14%</text:p>
          </table:table-cell>
          <table:table-cell table:style-name="ce2"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314" calcext:value-type="percentage">
            <text:p>13,14%</text:p>
          </table:table-cell>
          <table:table-cell table:style-name="ce2" office:value-type="percentage" office:value="0.1229" calcext:value-type="percentage">
            <text:p>12,29%</text:p>
          </table:table-cell>
          <table:table-cell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457" calcext:value-type="percentage">
            <text:p>14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1743" calcext:value-type="percentage">
            <text:p>17,43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7:.B36])" office:value-type="percentage" office:value="0.264" calcext:value-type="percentage">
            <text:p>26,40%</text:p>
          </table:table-cell>
          <table:table-cell table:style-name="ce1" table:formula="of:=AVERAGE([.C27:.C36])" office:value-type="percentage" office:value="0.261" calcext:value-type="percentage">
            <text:p>26,1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12628" calcext:value-type="percentage">
            <text:p>12,63%</text:p>
          </table:table-cell>
          <table:table-cell table:style-name="ce1" table:formula="of:=AVERAGE([.G27:.G36])" office:value-type="percentage" office:value="0.11629" calcext:value-type="percentage">
            <text:p>11,6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636" calcext:value-type="percentage">
            <text:p>36,36%</text:p>
          </table:table-cell>
          <table:table-cell table:style-name="ce2" office:value-type="percentage" office:value="0.4424" calcext:value-type="percentage">
            <text:p>44,24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387" calcext:value-type="percentage">
            <text:p>3,87%</text:p>
          </table:table-cell>
          <table:table-cell table:style-name="ce2" office:value-type="percentage" office:value="0.0468" calcext:value-type="percentage">
            <text:p>4,68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424" calcext:value-type="percentage">
            <text:p>44,24%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1081" calcext:value-type="percentage">
            <text:p>10,81%</text:p>
          </table:table-cell>
          <table:table-cell table:style-name="ce2" office:value-type="percentage" office:value="0.0952" calcext:value-type="percentage">
            <text:p>9,5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5394" calcext:value-type="percentage">
            <text:p>53,94%</text:p>
          </table:table-cell>
          <table:table-cell table:style-name="ce2" office:value-type="percentage" office:value="0.5242" calcext:value-type="percentage">
            <text:p>52,42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number-columns-repeated="2" table:style-name="ce2" office:value-type="percentage" office:value="0.0903" calcext:value-type="percentage">
            <text:p>9,03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636" calcext:value-type="percentage">
            <text:p>46,36%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839" calcext:value-type="percentage">
            <text:p>8,39%</text:p>
          </table:table-cell>
          <table:table-cell table:style-name="ce2" office:value-type="percentage" office:value="0.071" calcext:value-type="percentage">
            <text:p>7,10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503" calcext:value-type="percentage">
            <text:p>50,30%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77" calcext:value-type="percentage">
            <text:p>6,77%</text:p>
          </table:table-cell>
          <table:table-cell table:style-name="ce2" office:value-type="percentage" office:value="0.0694" calcext:value-type="percentage">
            <text:p>6,94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5212" calcext:value-type="percentage">
            <text:p>52,12%</text:p>
          </table:table-cell>
          <table:table-cell table:style-name="ce2" office:value-type="percentage" office:value="0.5455" calcext:value-type="percentage">
            <text:p>54,55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419" calcext:value-type="percentage">
            <text:p>4,19%</text:p>
          </table:table-cell>
          <table:table-cell table:style-name="ce2" office:value-type="percentage" office:value="0.0435" calcext:value-type="percentage">
            <text:p>4,35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2" office:value-type="percentage" office:value="0.5636" calcext:value-type="percentage">
            <text:p>56,36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0823" calcext:value-type="percentage">
            <text:p>8,23%</text:p>
          </table:table-cell>
          <table:table-cell table:style-name="ce2" office:value-type="percentage" office:value="0.0903" calcext:value-type="percentage">
            <text:p>9,03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5242" calcext:value-type="percentage">
            <text:p>52,42%</text:p>
          </table:table-cell>
          <table:table-cell table:style-name="ce2" office:value-type="percentage" office:value="0.5606" calcext:value-type="percentage">
            <text:p>56,06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677" calcext:value-type="percentage">
            <text:p>6,77%</text:p>
          </table:table-cell>
          <table:table-cell table:style-name="ce2" office:value-type="percentage" office:value="0.0612" calcext:value-type="percentage">
            <text:p>6,1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5424" calcext:value-type="percentage">
            <text:p>54,24%</text:p>
          </table:table-cell>
          <table:table-cell table:style-name="ce2" office:value-type="percentage" office:value="0.5364" calcext:value-type="percentage">
            <text:p>53,64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774" calcext:value-type="percentage">
            <text:p>7,74%</text:p>
          </table:table-cell>
          <table:table-cell table:style-name="ce2" office:value-type="percentage" office:value="0.0806" calcext:value-type="percentage">
            <text:p>8,06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455" calcext:value-type="percentage">
            <text:p>54,55%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581" calcext:value-type="percentage">
            <text:p>5,8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40:.B49])" office:value-type="percentage" office:value="0.5012" calcext:value-type="percentage">
            <text:p>50,12%</text:p>
          </table:table-cell>
          <table:table-cell table:style-name="ce1" table:formula="of:=AVERAGE([.C40:.C49])" office:value-type="percentage" office:value="0.5194" calcext:value-type="percentage">
            <text:p>51,94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7241" calcext:value-type="percentage">
            <text:p>7,24%</text:p>
          </table:table-cell>
          <table:table-cell table:style-name="ce1" table:formula="of:=AVERAGE([.G40:.G49])" office:value-type="percentage" office:value="0.07064" calcext:value-type="percentage">
            <text:p>7,0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367" calcext:value-type="percentage">
            <text:p>23,67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857" calcext:value-type="percentage">
            <text:p>48,57%</text:p>
          </table:table-cell>
          <table:table-cell table:style-name="ce2" office:value-type="percentage" office:value="0.5762" calcext:value-type="percentage">
            <text:p>57,62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867" calcext:value-type="percentage">
            <text:p>48,67%</text:p>
          </table:table-cell>
          <table:table-cell table:style-name="ce2" office:value-type="percentage" office:value="0.44" calcext:value-type="percentage">
            <text:p>44,00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6857" calcext:value-type="percentage">
            <text:p>68,57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367" calcext:value-type="percentage">
            <text:p>23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number-columns-repeated="2" table:style-name="ce2" office:value-type="percentage" office:value="0.2967" calcext:value-type="percentage">
            <text:p>29,67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952" calcext:value-type="percentage">
            <text:p>59,52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967" calcext:value-type="percentage">
            <text:p>39,67%</text:p>
          </table:table-cell>
          <table:table-cell table:style-name="ce2" office:value-type="percentage" office:value="0.3633" calcext:value-type="percentage">
            <text:p>36,33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762" calcext:value-type="percentage">
            <text:p>57,62%</text:p>
          </table:table-cell>
          <table:table-cell table:style-name="ce2" office:value-type="percentage" office:value="0.5952" calcext:value-type="percentage">
            <text:p>59,52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3367" calcext:value-type="percentage">
            <text:p>33,67%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5524" calcext:value-type="percentage">
            <text:p>55,24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524" calcext:value-type="percentage">
            <text:p>55,24%</text:p>
          </table:table-cell>
          <table:table-cell table:style-name="ce2" office:value-type="percentage" office:value="0.5238" calcext:value-type="percentage">
            <text:p>52,3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4143" calcext:value-type="percentage">
            <text:p>41,43%</text:p>
          </table:table-cell>
          <table:table-cell table:style-name="ce2"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238" calcext:value-type="percentage">
            <text:p>42,38%</text:p>
          </table:table-cell>
          <table:table-cell table:style-name="ce2" office:value-type="percentage" office:value="0.4286" calcext:value-type="percentage">
            <text:p>42,8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714" calcext:value-type="percentage">
            <text:p>57,14%</text:p>
          </table:table-cell>
          <table:table-cell table:style-name="ce2" office:value-type="percentage" office:value="0.6286" calcext:value-type="percentage">
            <text:p>62,8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3:.B62])" office:value-type="percentage" office:value="0.29435" calcext:value-type="percentage">
            <text:p>29,44%</text:p>
          </table:table-cell>
          <table:table-cell table:style-name="ce1" table:formula="of:=AVERAGE([.C53:.C62])" office:value-type="percentage" office:value="0.28268" calcext:value-type="percentage">
            <text:p>28,27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3428" calcext:value-type="percentage">
            <text:p>53,43%</text:p>
          </table:table-cell>
          <table:table-cell table:style-name="ce1" table:formula="of:=AVERAGE([.G53:.G62])" office:value-type="percentage" office:value="0.5291" calcext:value-type="percentage">
            <text:p>52,91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2" office:value-type="percentage" office:value="0.3074" calcext:value-type="percentage">
            <text:p>30,74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3846" calcext:value-type="percentage">
            <text:p>38,46%</text:p>
          </table:table-cell>
          <table:table-cell table:style-name="ce2"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3538" calcext:value-type="percentage">
            <text:p>35,38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3074" calcext:value-type="percentage">
            <text:p>30,74%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4692" calcext:value-type="percentage">
            <text:p>46,92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925" calcext:value-type="percentage">
            <text:p>19,25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2769" calcext:value-type="percentage">
            <text:p>27,69%</text:p>
          </table:table-cell>
          <table:table-cell table:style-name="ce2"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4308" calcext:value-type="percentage">
            <text:p>43,08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2815" calcext:value-type="percentage">
            <text:p>28,15%</text:p>
          </table:table-cell>
          <table:table-cell table:style-name="ce2" office:value-type="percentage" office:value="0.2519" calcext:value-type="percentage">
            <text:p>25,19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4231" calcext:value-type="percentage">
            <text:p>42,31%</text:p>
          </table:table-cell>
          <table:table-cell table:style-name="ce2" office:value-type="percentage" office:value="0.4462" calcext:value-type="percentage">
            <text:p>4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3222" calcext:value-type="percentage">
            <text:p>32,22%</text:p>
          </table:table-cell>
          <table:table-cell table:style-name="ce2" office:value-type="percentage" office:value="0.3148" calcext:value-type="percentage">
            <text:p>31,48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3462" calcext:value-type="percentage">
            <text:p>34,62%</text:p>
          </table:table-cell>
          <table:table-cell table:style-name="ce2" office:value-type="percentage" office:value="0.2923" calcext:value-type="percentage">
            <text:p>2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2" office:value-type="percentage" office:value="0.2519" calcext:value-type="percentage">
            <text:p>25,19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2"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926" calcext:value-type="percentage">
            <text:p>29,26%</text:p>
          </table:table-cell>
          <table:table-cell table:style-name="ce2" office:value-type="percentage" office:value="0.2704" calcext:value-type="percentage">
            <text:p>27,04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846" calcext:value-type="percentage">
            <text:p>48,46%</text:p>
          </table:table-cell>
          <table:table-cell table:style-name="ce2" office:value-type="percentage" office:value="0.3769" calcext:value-type="percentage">
            <text:p>37,6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6:.B75])" office:value-type="percentage" office:value="0.25628" calcext:value-type="percentage">
            <text:p>25,63%</text:p>
          </table:table-cell>
          <table:table-cell table:style-name="ce1" table:formula="of:=AVERAGE([.C66:.C75])" office:value-type="percentage" office:value="0.23814" calcext:value-type="percentage">
            <text:p>23,81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8615" calcext:value-type="percentage">
            <text:p>38,62%</text:p>
          </table:table-cell>
          <table:table-cell table:style-name="ce1" table:formula="of:=AVERAGE([.G66:.G75])" office:value-type="percentage" office:value="0.3523" calcext:value-type="percentage">
            <text:p>35,2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967" calcext:value-type="percentage">
            <text:p>9,67%</text:p>
          </table:table-cell>
          <table:table-cell table:style-name="ce2"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133" calcext:value-type="percentage">
            <text:p>21,33%</text:p>
          </table:table-cell>
          <table:table-cell table:style-name="ce2" office:value-type="percentage" office:value="0.2767" calcext:value-type="percentage">
            <text:p>27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367" calcext:value-type="percentage">
            <text:p>23,67%</text:p>
          </table:table-cell>
          <table:table-cell table:style-name="ce2"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633" calcext:value-type="percentage">
            <text:p>26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31" calcext:value-type="percentage">
            <text:p>31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733" calcext:value-type="percentage">
            <text:p>17,33%</text:p>
          </table:table-cell>
          <table:table-cell table:style-name="ce2"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833" calcext:value-type="percentage">
            <text:p>18,33%</text:p>
          </table:table-cell>
          <table:table-cell table:style-name="ce2" office:value-type="percentage" office:value="0.2267" calcext:value-type="percentage">
            <text:p>22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9:.B88])" office:value-type="percentage" office:value="0.057" calcext:value-type="percentage">
            <text:p>5,70%</text:p>
          </table:table-cell>
          <table:table-cell table:style-name="ce1" table:formula="of:=AVERAGE([.C79:.C88])" office:value-type="percentage" office:value="0.056" calcext:value-type="percentage">
            <text:p>5,6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2565" calcext:value-type="percentage">
            <text:p>22,57%</text:p>
          </table:table-cell>
          <table:table-cell table:style-name="ce1" table:formula="of:=AVERAGE([.G79:.G88])" office:value-type="percentage" office:value="0.22668" calcext:value-type="percentage">
            <text:p>22,67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829" calcext:value-type="percentage">
            <text:p>18,29%</text:p>
          </table:table-cell>
          <table:table-cell table:style-name="ce2"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1057" calcext:value-type="percentage">
            <text:p>10,57%</text:p>
          </table:table-cell>
          <table:table-cell table:style-name="ce2"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257" calcext:value-type="percentage">
            <text:p>12,57%</text:p>
          </table:table-cell>
          <table:table-cell table:style-name="ce2"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229" calcext:value-type="percentage">
            <text:p>12,29%</text:p>
          </table:table-cell>
          <table:table-cell table:style-name="ce2"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914" calcext:value-type="percentage">
            <text:p>19,14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914" calcext:value-type="percentage">
            <text:p>19,14%</text:p>
          </table:table-cell>
          <table:table-cell table:style-name="ce2" office:value-type="percentage" office:value="0.1571" calcext:value-type="percentage">
            <text:p>15,71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686" calcext:value-type="percentage">
            <text:p>16,86%</text:p>
          </table:table-cell>
          <table:table-cell table:style-name="ce2" office:value-type="percentage" office:value="0.1486" calcext:value-type="percentage">
            <text:p>14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657" calcext:value-type="percentage">
            <text:p>16,57%</text:p>
          </table:table-cell>
          <table:table-cell table:style-name="ce2" office:value-type="percentage" office:value="0.1371" calcext:value-type="percentage">
            <text:p>13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93:.B102])" office:value-type="percentage" office:value="0.06913" calcext:value-type="percentage">
            <text:p>6,91%</text:p>
          </table:table-cell>
          <table:table-cell table:style-name="ce1" table:formula="of:=AVERAGE([.C93:.C102])" office:value-type="percentage" office:value="0.07784" calcext:value-type="percentage">
            <text:p>7,78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5286" calcext:value-type="percentage">
            <text:p>15,29%</text:p>
          </table:table-cell>
          <table:table-cell table:style-name="ce1" table:formula="of:=AVERAGE([.G93:.G102])" office:value-type="percentage" office:value="0.14057" calcext:value-type="percentage">
            <text:p>14,0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2" office:value-type="percentage" office:value="0.3059" calcext:value-type="percentage">
            <text:p>30,59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157" calcext:value-type="percentage">
            <text:p>21,57%</text:p>
          </table:table-cell>
          <table:table-cell table:style-name="ce2" office:value-type="percentage" office:value="0.2265" calcext:value-type="percentage">
            <text:p>22,65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602" calcext:value-type="percentage">
            <text:p>16,02%</text:p>
          </table:table-cell>
          <table:table-cell table:style-name="ce2" office:value-type="percentage" office:value="0.1518" calcext:value-type="percentage">
            <text:p>15,1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2941" calcext:value-type="percentage">
            <text:p>29,41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2133" calcext:value-type="percentage">
            <text:p>21,33%</text:p>
          </table:table-cell>
          <table:table-cell table:style-name="ce2" office:value-type="percentage" office:value="0.1988" calcext:value-type="percentage">
            <text:p>19,8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588" calcext:value-type="percentage">
            <text:p>45,88%</text:p>
          </table:table-cell>
          <table:table-cell table:style-name="ce2" office:value-type="percentage" office:value="0.4559" calcext:value-type="percentage">
            <text:p>45,59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2048" calcext:value-type="percentage">
            <text:p>20,48%</text:p>
          </table:table-cell>
          <table:table-cell table:style-name="ce2" office:value-type="percentage" office:value="0.194" calcext:value-type="percentage">
            <text:p>19,40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059" calcext:value-type="percentage">
            <text:p>30,59%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 office:value-type="percentage" office:value="0.1277" calcext:value-type="percentage">
            <text:p>12,77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824" calcext:value-type="percentage">
            <text:p>28,24%</text:p>
          </table:table-cell>
          <table:table-cell table:style-name="ce2" office:value-type="percentage" office:value="0.2412" calcext:value-type="percentage">
            <text:p>24,12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663" calcext:value-type="percentage">
            <text:p>16,63%</text:p>
          </table:table-cell>
          <table:table-cell table:style-name="ce2" office:value-type="percentage" office:value="0.1627" calcext:value-type="percentage">
            <text:p>16,27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588" calcext:value-type="percentage">
            <text:p>35,88%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747" calcext:value-type="percentage">
            <text:p>17,47%</text:p>
          </table:table-cell>
          <table:table-cell table:style-name="ce2" office:value-type="percentage" office:value="0.1831" calcext:value-type="percentage">
            <text:p>18,3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176" calcext:value-type="percentage">
            <text:p>31,76%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651" calcext:value-type="percentage">
            <text:p>16,51%</text:p>
          </table:table-cell>
          <table:table-cell table:style-name="ce2" office:value-type="percentage" office:value="0.1639" calcext:value-type="percentage">
            <text:p>16,39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2" office:value-type="percentage" office:value="0.4118" calcext:value-type="percentage">
            <text:p>41,18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2036" calcext:value-type="percentage">
            <text:p>20,36%</text:p>
          </table:table-cell>
          <table:table-cell table:style-name="ce2" office:value-type="percentage" office:value="0.1819" calcext:value-type="percentage">
            <text:p>18,19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3176" calcext:value-type="percentage">
            <text:p>31,76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253" calcext:value-type="percentage">
            <text:p>12,53%</text:p>
          </table:table-cell>
          <table:table-cell table:style-name="ce2" office:value-type="percentage" office:value="0.1337" calcext:value-type="percentage">
            <text:p>13,3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6:.B115])" office:value-type="percentage" office:value="0.33176" calcext:value-type="percentage">
            <text:p>33,18%</text:p>
          </table:table-cell>
          <table:table-cell table:style-name="ce1" table:formula="of:=AVERAGE([.C106:.C115])" office:value-type="percentage" office:value="0.33206" calcext:value-type="percentage">
            <text:p>33,21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639" calcext:value-type="percentage">
            <text:p>17,64%</text:p>
          </table:table-cell>
          <table:table-cell table:style-name="ce1" table:formula="of:=AVERAGE([.G106:.G115])" office:value-type="percentage" office:value="0.17241" calcext:value-type="percentage">
            <text:p>17,24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3263" calcext:value-type="percentage">
            <text:p>32,63%</text:p>
          </table:table-cell>
          <table:table-cell table:style-name="ce2" office:value-type="percentage" office:value="0.2434" calcext:value-type="percentage">
            <text:p>24,34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2211" calcext:value-type="percentage">
            <text:p>22,11%</text:p>
          </table:table-cell>
          <table:table-cell table:style-name="ce2" office:value-type="percentage" office:value="0.2421" calcext:value-type="percentage">
            <text:p>24,21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3526" calcext:value-type="percentage">
            <text:p>35,26%</text:p>
          </table:table-cell>
          <table:table-cell table:style-name="ce2" office:value-type="percentage" office:value="0.3539" calcext:value-type="percentage">
            <text:p>35,39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3263" calcext:value-type="percentage">
            <text:p>32,63%</text:p>
          </table:table-cell>
          <table:table-cell table:style-name="ce2" office:value-type="percentage" office:value="0.2737" calcext:value-type="percentage">
            <text:p>27,37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671" calcext:value-type="percentage">
            <text:p>26,71%</text:p>
          </table:table-cell>
          <table:table-cell table:style-name="ce2" office:value-type="percentage" office:value="0.2632" calcext:value-type="percentage">
            <text:p>26,32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645" calcext:value-type="percentage">
            <text:p>26,4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2211" calcext:value-type="percentage">
            <text:p>22,11%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1868" calcext:value-type="percentage">
            <text:p>18,68%</text:p>
          </table:table-cell>
          <table:table-cell table:style-name="ce2" office:value-type="percentage" office:value="0.1934" calcext:value-type="percentage">
            <text:p>19,34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842" calcext:value-type="percentage">
            <text:p>18,42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842" calcext:value-type="percentage">
            <text:p>28,42%</text:p>
          </table:table-cell>
          <table:table-cell table:style-name="ce2" office:value-type="percentage" office:value="0.2658" calcext:value-type="percentage">
            <text:p>26,5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697" calcext:value-type="percentage">
            <text:p>26,97%</text:p>
          </table:table-cell>
          <table:table-cell table:style-name="ce2" office:value-type="percentage" office:value="0.2605" calcext:value-type="percentage">
            <text:p>26,0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842" calcext:value-type="percentage">
            <text:p>18,42%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3105" calcext:value-type="percentage">
            <text:p>31,05%</text:p>
          </table:table-cell>
          <table:table-cell table:style-name="ce2" office:value-type="percentage" office:value="0.3395" calcext:value-type="percentage">
            <text:p>33,9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421" calcext:value-type="percentage">
            <text:p>14,21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579" calcext:value-type="percentage">
            <text:p>35,79%</text:p>
          </table:table-cell>
          <table:table-cell table:style-name="ce2" office:value-type="percentage" office:value="0.3658" calcext:value-type="percentage">
            <text:p>36,5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3039" calcext:value-type="percentage">
            <text:p>30,39%</text:p>
          </table:table-cell>
          <table:table-cell table:style-name="ce2" office:value-type="percentage" office:value="0.3145" calcext:value-type="percentage">
            <text:p>31,4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9:.B128])" office:value-type="percentage" office:value="0.18685" calcext:value-type="percentage">
            <text:p>18,69%</text:p>
          </table:table-cell>
          <table:table-cell table:style-name="ce1" table:formula="of:=AVERAGE([.C119:.C128])" office:value-type="percentage" office:value="0.16578" calcext:value-type="percentage">
            <text:p>16,58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934" calcext:value-type="percentage">
            <text:p>29,34%</text:p>
          </table:table-cell>
          <table:table-cell table:style-name="ce1" table:formula="of:=AVERAGE([.G119:.G128])" office:value-type="percentage" office:value="0.28645" calcext:value-type="percentage">
            <text:p>28,65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778" calcext:value-type="percentage">
            <text:p>7,78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613" calcext:value-type="percentage">
            <text:p>26,13%</text:p>
          </table:table-cell>
          <table:table-cell table:style-name="ce2" office:value-type="percentage" office:value="0.279" calcext:value-type="percentage">
            <text:p>27,90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79" calcext:value-type="percentage">
            <text:p>27,90%</text:p>
          </table:table-cell>
          <table:table-cell table:style-name="ce2" office:value-type="percentage" office:value="0.2968" calcext:value-type="percentage">
            <text:p>29,6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 office:value-type="percentage" office:value="0.0352" calcext:value-type="percentage">
            <text:p>3,52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2" office:value-type="percentage" office:value="0.2677" calcext:value-type="percentage">
            <text:p>26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113" calcext:value-type="percentage">
            <text:p>31,13%</text:p>
          </table:table-cell>
          <table:table-cell table:style-name="ce2" office:value-type="percentage" office:value="0.3161" calcext:value-type="percentage">
            <text:p>31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number-columns-repeated="2" table:style-name="ce2" office:value-type="percentage" office:value="0.063" calcext:value-type="percentage">
            <text:p>6,30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145" calcext:value-type="percentage">
            <text:p>31,45%</text:p>
          </table:table-cell>
          <table:table-cell table:style-name="ce2" office:value-type="percentage" office:value="0.3323" calcext:value-type="percentage">
            <text:p>33,2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2" office:value-type="percentage" office:value="0.0889" calcext:value-type="percentage">
            <text:p>8,89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3613" calcext:value-type="percentage">
            <text:p>36,1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59" calcext:value-type="percentage">
            <text:p>7,59%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2855" calcext:value-type="percentage">
            <text:p>28,55%</text:p>
          </table:table-cell>
          <table:table-cell table:style-name="ce2" office:value-type="percentage" office:value="0.2935" calcext:value-type="percentage">
            <text:p>29,35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574" calcext:value-type="percentage">
            <text:p>5,74%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3016" calcext:value-type="percentage">
            <text:p>30,16%</text:p>
          </table:table-cell>
          <table:table-cell table:style-name="ce2" office:value-type="percentage" office:value="0.2677" calcext:value-type="percentage">
            <text:p>26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71" calcext:value-type="percentage">
            <text:p>27,10%</text:p>
          </table:table-cell>
          <table:table-cell table:style-name="ce2" office:value-type="percentage" office:value="0.2339" calcext:value-type="percentage">
            <text:p>23,39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815" calcext:value-type="percentage">
            <text:p>8,15%</text:p>
          </table:table-cell>
          <table:table-cell table:style-name="ce2" office:value-type="percentage" office:value="0.0944" calcext:value-type="percentage">
            <text:p>9,44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613" calcext:value-type="percentage">
            <text:p>36,13%</text:p>
          </table:table-cell>
          <table:table-cell table:style-name="ce2" office:value-type="percentage" office:value="0.3629" calcext:value-type="percentage">
            <text:p>36,2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33:.B142])" office:value-type="percentage" office:value="0.07149" calcext:value-type="percentage">
            <text:p>7,15%</text:p>
          </table:table-cell>
          <table:table-cell table:style-name="ce1" table:formula="of:=AVERAGE([.C133:.C142])" office:value-type="percentage" office:value="0.06797" calcext:value-type="percentage">
            <text:p>6,80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30323" calcext:value-type="percentage">
            <text:p>30,32%</text:p>
          </table:table-cell>
          <table:table-cell table:style-name="ce1" table:formula="of:=AVERAGE([.G133:.G142])" office:value-type="percentage" office:value="0.30112" calcext:value-type="percentage">
            <text:p>30,11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2891" calcext:value-type="percentage">
            <text:p>28,91%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 office:value-type="percentage" office:value="0.1766" calcext:value-type="percentage">
            <text:p>17,66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2913" calcext:value-type="percentage">
            <text:p>29,13%</text:p>
          </table:table-cell>
          <table:table-cell table:style-name="ce2" office:value-type="percentage" office:value="0.2978" calcext:value-type="percentage">
            <text:p>29,78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2359" calcext:value-type="percentage">
            <text:p>23,59%</text:p>
          </table:table-cell>
          <table:table-cell table:style-name="ce2" office:value-type="percentage" office:value="0.2887" calcext:value-type="percentage">
            <text:p>28,87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283" calcext:value-type="percentage">
            <text:p>42,83%</text:p>
          </table:table-cell>
          <table:table-cell table:style-name="ce2" office:value-type="percentage" office:value="0.4326" calcext:value-type="percentage">
            <text:p>43,26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987" calcext:value-type="percentage">
            <text:p>19,87%</text:p>
          </table:table-cell>
          <table:table-cell table:style-name="ce1" office:value-type="percentage" office:value="0.2034" calcext:value-type="percentage">
            <text:p>20,34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804" calcext:value-type="percentage">
            <text:p>38,04%</text:p>
          </table:table-cell>
          <table:table-cell table:style-name="ce2" office:value-type="percentage" office:value="0.3717" calcext:value-type="percentage">
            <text:p>37,17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2238" calcext:value-type="percentage">
            <text:p>22,38%</text:p>
          </table:table-cell>
          <table:table-cell table:style-name="ce2" office:value-type="percentage" office:value="0.1563" calcext:value-type="percentage">
            <text:p>15,6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2351" calcext:value-type="percentage">
            <text:p>23,51%</text:p>
          </table:table-cell>
          <table:table-cell table:style-name="ce2" office:value-type="percentage" office:value="0.1883" calcext:value-type="percentage">
            <text:p>18,8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2" office:value-type="percentage" office:value="0.3348" calcext:value-type="percentage">
            <text:p>33,48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97" calcext:value-type="percentage">
            <text:p>19,70%</text:p>
          </table:table-cell>
          <table:table-cell table:style-name="ce2" office:value-type="percentage" office:value="0.2074" calcext:value-type="percentage">
            <text:p>20,74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652" calcext:value-type="percentage">
            <text:p>36,52%</text:p>
          </table:table-cell>
          <table:table-cell table:style-name="ce2" office:value-type="percentage" office:value="0.3543" calcext:value-type="percentage">
            <text:p>35,43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2" office:value-type="percentage" office:value="0.1632" calcext:value-type="percentage">
            <text:p>16,32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826" calcext:value-type="percentage">
            <text:p>38,26%</text:p>
          </table:table-cell>
          <table:table-cell table:style-name="ce2" office:value-type="percentage" office:value="0.3957" calcext:value-type="percentage">
            <text:p>39,57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2528" calcext:value-type="percentage">
            <text:p>25,28%</text:p>
          </table:table-cell>
          <table:table-cell table:style-name="ce2" office:value-type="percentage" office:value="0.2424" calcext:value-type="percentage">
            <text:p>24,24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3174" calcext:value-type="percentage">
            <text:p>31,74%</text:p>
          </table:table-cell>
          <table:table-cell table:style-name="ce2" office:value-type="percentage" office:value="0.2739" calcext:value-type="percentage">
            <text:p>27,39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2095" calcext:value-type="percentage">
            <text:p>20,95%</text:p>
          </table:table-cell>
          <table:table-cell table:style-name="ce2" office:value-type="percentage" office:value="0.261" calcext:value-type="percentage">
            <text:p>26,10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348" calcext:value-type="percentage">
            <text:p>33,48%</text:p>
          </table:table-cell>
          <table:table-cell table:style-name="ce2" office:value-type="percentage" office:value="0.3304" calcext:value-type="percentage">
            <text:p>33,04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57" calcext:value-type="percentage">
            <text:p>19,5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6:.B155])" office:value-type="percentage" office:value="0.34108" calcext:value-type="percentage">
            <text:p>34,11%</text:p>
          </table:table-cell>
          <table:table-cell table:style-name="ce1" table:formula="of:=AVERAGE([.C146:.C155])" office:value-type="percentage" office:value="0.34043" calcext:value-type="percentage">
            <text:p>34,04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21944" calcext:value-type="percentage">
            <text:p>21,94%</text:p>
          </table:table-cell>
          <table:table-cell table:style-name="ce1" table:formula="of:=AVERAGE([.G146:.G155])" office:value-type="percentage" office:value="0.2083" calcext:value-type="percentage">
            <text:p>20,8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91" calcext:value-type="percentage">
            <text:p>49,10%</text:p>
          </table:table-cell>
          <table:table-cell table:style-name="ce2" office:value-type="percentage" office:value="0.5055" calcext:value-type="percentage">
            <text:p>50,5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225" calcext:value-type="percentage">
            <text:p>42,25%</text:p>
          </table:table-cell>
          <table:table-cell table:style-name="ce2" office:value-type="percentage" office:value="0.428" calcext:value-type="percentage">
            <text:p>42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65" calcext:value-type="percentage">
            <text:p>26,5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925" calcext:value-type="percentage">
            <text:p>39,25%</text:p>
          </table:table-cell>
          <table:table-cell table:style-name="ce2" office:value-type="percentage" office:value="0.3965" calcext:value-type="percentage">
            <text:p>39,6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402" calcext:value-type="percentage">
            <text:p>40,20%</text:p>
          </table:table-cell>
          <table:table-cell table:style-name="ce2" office:value-type="percentage" office:value="0.409" calcext:value-type="percentage">
            <text:p>40,9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32" calcext:value-type="percentage">
            <text:p>43,20%</text:p>
          </table:table-cell>
          <table:table-cell table:style-name="ce2" office:value-type="percentage" office:value="0.442" calcext:value-type="percentage">
            <text:p>44,2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19" calcext:value-type="percentage">
            <text:p>41,90%</text:p>
          </table:table-cell>
          <table:table-cell table:style-name="ce2" office:value-type="percentage" office:value="0.43" calcext:value-type="percentage">
            <text:p>43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055" calcext:value-type="percentage">
            <text:p>40,55%</text:p>
          </table:table-cell>
          <table:table-cell table:style-name="ce2" office:value-type="percentage" office:value="0.4295" calcext:value-type="percentage">
            <text:p>42,9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45" calcext:value-type="percentage">
            <text:p>14,5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398" calcext:value-type="percentage">
            <text:p>39,80%</text:p>
          </table:table-cell>
          <table:table-cell table:style-name="ce2" office:value-type="percentage" office:value="0.417" calcext:value-type="percentage">
            <text:p>41,7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27" calcext:value-type="percentage">
            <text:p>42,70%</text:p>
          </table:table-cell>
          <table:table-cell table:style-name="ce2" office:value-type="percentage" office:value="0.439" calcext:value-type="percentage">
            <text:p>43,9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418" calcext:value-type="percentage">
            <text:p>41,80%</text:p>
          </table:table-cell>
          <table:table-cell table:style-name="ce2" office:value-type="percentage" office:value="0.391" calcext:value-type="percentage">
            <text:p>39,1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8:.B167])" office:value-type="percentage" office:value="0.2245" calcext:value-type="percentage">
            <text:p>22,45%</text:p>
          </table:table-cell>
          <table:table-cell table:style-name="ce1" table:formula="of:=AVERAGE([.C158:.C167])" office:value-type="percentage" office:value="0.218" calcext:value-type="percentage">
            <text:p>21,80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2075" calcext:value-type="percentage">
            <text:p>42,08%</text:p>
          </table:table-cell>
          <table:table-cell table:style-name="ce1" table:formula="of:=AVERAGE([.G158:.G167])" office:value-type="percentage" office:value="0.42875" calcext:value-type="percentage">
            <text:p>42,88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75" calcext:value-type="percentage">
            <text:p>7,50%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number-columns-repeated="2" table:style-name="ce3" office:value-type="percentage" office:value="0.2473" calcext:value-type="percentage">
            <text:p>24,73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81" calcext:value-type="percentage">
            <text:p>25,81%</text:p>
          </table:table-cell>
          <table:table-cell table:style-name="ce3" office:value-type="percentage" office:value="0.2622" calcext:value-type="percentage">
            <text:p>26,2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716" calcext:value-type="percentage">
            <text:p>27,16%</text:p>
          </table:table-cell>
          <table:table-cell table:style-name="ce3" office:value-type="percentage" office:value="0.2689" calcext:value-type="percentage">
            <text:p>26,8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419" calcext:value-type="percentage">
            <text:p>24,1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9" calcext:value-type="percentage">
            <text:p>9,00%</text:p>
          </table:table-cell>
          <table:table-cell table:style-name="ce2" office:value-type="percentage" office:value="0.095" calcext:value-type="percentage">
            <text:p>9,5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689" calcext:value-type="percentage">
            <text:p>26,89%</text:p>
          </table:table-cell>
          <table:table-cell table:style-name="ce3" office:value-type="percentage" office:value="0.2432" calcext:value-type="percentage">
            <text:p>24,3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878" calcext:value-type="percentage">
            <text:p>28,78%</text:p>
          </table:table-cell>
          <table:table-cell table:style-name="ce3" office:value-type="percentage" office:value="0.277" calcext:value-type="percentage">
            <text:p>27,70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797" calcext:value-type="percentage">
            <text:p>27,97%</text:p>
          </table:table-cell>
          <table:table-cell table:style-name="ce3"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2014" calcext:value-type="percentage">
            <text:p>20,14%</text:p>
          </table:table-cell>
          <table:table-cell table:style-name="ce3" office:value-type="percentage" office:value="0.1811" calcext:value-type="percentage">
            <text:p>18,1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7" calcext:value-type="percentage">
            <text:p>22,70%</text:p>
          </table:table-cell>
          <table:table-cell table:style-name="ce3" office:value-type="percentage" office:value="0.2311" calcext:value-type="percentage">
            <text:p>23,1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number-columns-repeated="2" table:style-name="ce2" office:value-type="percentage" office:value="0.0625" calcext:value-type="percentage">
            <text:p>6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32" calcext:value-type="percentage">
            <text:p>19,32%</text:p>
          </table:table-cell>
          <table:table-cell table:style-name="ce3"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1:.B180])" office:value-type="percentage" office:value="0.061" calcext:value-type="percentage">
            <text:p>6,10%</text:p>
          </table:table-cell>
          <table:table-cell table:style-name="ce1" table:formula="of:=AVERAGE([.C171:.C180])" office:value-type="percentage" office:value="0.06425" calcext:value-type="percentage">
            <text:p>6,43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485" calcext:value-type="percentage">
            <text:p>24,85%</text:p>
          </table:table-cell>
          <table:table-cell table:style-name="ce1" table:formula="of:=AVERAGE([.G171:.G180])" office:value-type="percentage" office:value="0.24311" calcext:value-type="percentage">
            <text:p>24,3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 office:value-type="percentage" office:value="0.0554" calcext:value-type="percentage">
            <text:p>5,54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2765" calcext:value-type="percentage">
            <text:p>27,65%</text:p>
          </table:table-cell>
          <table:table-cell table:style-name="ce2" office:value-type="percentage" office:value="0.1353" calcext:value-type="percentage">
            <text:p>13,53%</text:p>
          </table:table-cell>
          <table:table-cell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294" calcext:value-type="percentage">
            <text:p>12,94%</text:p>
          </table:table-cell>
          <table:table-cell table:style-name="ce2"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089" calcext:value-type="percentage">
            <text:p>10,89%</text:p>
          </table:table-cell>
          <table:table-cell table:style-name="ce2" office:value-type="percentage" office:value="0.1161" calcext:value-type="percentage">
            <text:p>11,61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number-columns-repeated="2" table:style-name="ce2" office:value-type="percentage" office:value="0.2294" calcext:value-type="percentage">
            <text:p>22,94%</text:p>
          </table:table-cell>
          <table:table-cell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765" calcext:value-type="percentage">
            <text:p>7,65%</text:p>
          </table:table-cell>
          <table:table-cell table:style-name="ce2" office:value-type="percentage" office:value="0.0471" calcext:value-type="percentage">
            <text:p>4,71%</text:p>
          </table:table-cell>
          <table:table-cell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464" calcext:value-type="percentage">
            <text:p>4,64%</text:p>
          </table:table-cell>
          <table:table-cell table:style-name="ce2" office:value-type="percentage" office:value="0.0232" calcext:value-type="percentage">
            <text:p>2,32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1118" calcext:value-type="percentage">
            <text:p>11,18%</text:p>
          </table:table-cell>
          <table:table-cell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2059" calcext:value-type="percentage">
            <text:p>20,5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number-columns-repeated="2" table:style-name="ce2" office:value-type="percentage" office:value="0.0929" calcext:value-type="percentage">
            <text:p>9,29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824" calcext:value-type="percentage">
            <text:p>18,24%</text:p>
          </table:table-cell>
          <table:table-cell table:style-name="ce2"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929" calcext:value-type="percentage">
            <text:p>9,29%</text:p>
          </table:table-cell>
          <table:table-cell table:style-name="ce2" office:value-type="percentage" office:value="0.1018" calcext:value-type="percentage">
            <text:p>10,18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75" calcext:value-type="percentage">
            <text:p>7,50%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number-columns-repeated="2" table:style-name="ce2" office:value-type="percentage" office:value="0.0464" calcext:value-type="percentage">
            <text:p>4,64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1471" calcext:value-type="percentage">
            <text:p>14,71%</text:p>
          </table:table-cell>
          <table:table-cell table:style-name="ce2"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83:.B192])" office:value-type="percentage" office:value="0.06463" calcext:value-type="percentage">
            <text:p>6,46%</text:p>
          </table:table-cell>
          <table:table-cell table:style-name="ce1" table:formula="of:=AVERAGE([.C183:.C192])" office:value-type="percentage" office:value="0.06234" calcext:value-type="percentage">
            <text:p>6,23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6355" calcext:value-type="percentage">
            <text:p>16,36%</text:p>
          </table:table-cell>
          <table:table-cell table:style-name="ce1" table:formula="of:=AVERAGE([.G183:.G192])" office:value-type="percentage" office:value="0.14058" calcext:value-type="percentage">
            <text:p>14,0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1133" calcext:value-type="percentage">
            <text:p>11,33%</text:p>
          </table:table-cell>
          <table:table-cell table:style-name="ce3" office:value-type="percentage" office:value="0.1267" calcext:value-type="percentage">
            <text:p>12,67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638" calcext:value-type="percentage">
            <text:p>63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62" calcext:value-type="percentage">
            <text:p>62,00%</text:p>
          </table:table-cell>
          <table:table-cell table:style-name="ce2" office:value-type="percentage" office:value="0.544" calcext:value-type="percentage">
            <text:p>54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367" calcext:value-type="percentage">
            <text:p>13,67%</text:p>
          </table:table-cell>
          <table:table-cell table:style-name="ce3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6" calcext:value-type="percentage">
            <text:p>62,6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8" calcext:value-type="percentage">
            <text:p>8,00%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92" calcext:value-type="percentage">
            <text:p>59,20%</text:p>
          </table:table-cell>
          <table:table-cell table:style-name="ce2" office:value-type="percentage" office:value="0.614" calcext:value-type="percentage">
            <text:p>61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833" calcext:value-type="percentage">
            <text:p>8,33%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706" calcext:value-type="percentage">
            <text:p>70,60%</text:p>
          </table:table-cell>
          <table:table-cell table:style-name="ce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1567" calcext:value-type="percentage">
            <text:p>15,67%</text:p>
          </table:table-cell>
          <table:table-cell table:style-name="ce3" office:value-type="percentage" office:value="0.0433" calcext:value-type="percentage">
            <text:p>4,33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614" calcext:value-type="percentage">
            <text:p>61,40%</text:p>
          </table:table-cell>
          <table:table-cell table:style-name="ce2" office:value-type="percentage" office:value="0.622" calcext:value-type="percentage">
            <text:p>62,2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7" calcext:value-type="percentage">
            <text:p>7,00%</text:p>
          </table:table-cell>
          <table:table-cell table:style-name="ce3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628" calcext:value-type="percentage">
            <text:p>62,8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6" calcext:value-type="percentage">
            <text:p>16,00%</text:p>
          </table:table-cell>
          <table:table-cell table:style-name="ce3" office:value-type="percentage" office:value="0.1467" calcext:value-type="percentage">
            <text:p>14,67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6" calcext:value-type="percentage">
            <text:p>66,00%</text:p>
          </table:table-cell>
          <table:table-cell table:style-name="ce2" office:value-type="percentage" office:value="0.706" calcext:value-type="percentage">
            <text:p>7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2" office:value-type="percentage" office:value="0.09" calcext:value-type="percentage">
            <text:p>9,00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6:.B205])" office:value-type="percentage" office:value="0.108" calcext:value-type="percentage">
            <text:p>10,80%</text:p>
          </table:table-cell>
          <table:table-cell table:style-name="ce1" table:formula="of:=AVERAGE([.C196:.C205])" office:value-type="percentage" office:value="0.09933" calcext:value-type="percentage">
            <text:p>9,93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631555555555556" calcext:value-type="percentage">
            <text:p>63,16%</text:p>
          </table:table-cell>
          <table:table-cell table:style-name="ce1" table:formula="of:=AVERAGE([.G196:.G205])" office:value-type="percentage" office:value="0.6348" calcext:value-type="percentage">
            <text:p>63,4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84" calcext:value-type="percentage">
            <text:p>8,40%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2"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02" calcext:value-type="percentage">
            <text:p>10,2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206" calcext:value-type="percentage">
            <text:p>20,60%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142" calcext:value-type="percentage">
            <text:p>14,20%</text:p>
          </table:table-cell>
          <table:table-cell table:style-name="ce2" office:value-type="percentage" office:value="0.068" calcext:value-type="percentage">
            <text:p>6,8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 office:value-type="percentage" office:value="0.016" calcext:value-type="percentage">
            <text:p>1,6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166" calcext:value-type="percentage">
            <text:p>16,60%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24" calcext:value-type="percentage">
            <text:p>2,40%</text:p>
          </table:table-cell>
          <table:table-cell table:style-name="ce2"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number-columns-repeated="2" table:style-name="ce2" office:value-type="percentage" office:value="0.072" calcext:value-type="percentage">
            <text:p>7,2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2"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186" calcext:value-type="percentage">
            <text:p>18,60%</text:p>
          </table:table-cell>
          <table:table-cell table:style-name="ce2" office:value-type="percentage" office:value="0.112" calcext:value-type="percentage">
            <text:p>11,2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168" calcext:value-type="percentage">
            <text:p>16,80%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2"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8:.B217])" office:value-type="percentage" office:value="0.1244" calcext:value-type="percentage">
            <text:p>12,44%</text:p>
          </table:table-cell>
          <table:table-cell table:style-name="ce1" table:formula="of:=AVERAGE([.C208:.C217])" office:value-type="percentage" office:value="0.078" calcext:value-type="percentage">
            <text:p>7,80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358" calcext:value-type="percentage">
            <text:p>3,58%</text:p>
          </table:table-cell>
          <table:table-cell table:style-name="ce1" table:formula="of:=AVERAGE([.G208:.G217])" office:value-type="percentage" office:value="0.0296" calcext:value-type="percentage">
            <text:p>2,9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number-columns-repeated="2" table:style-name="ce2" office:value-type="percentage" office:value="0.2929" calcext:value-type="percentage">
            <text:p>2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914" calcext:value-type="percentage">
            <text:p>19,14%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2429" calcext:value-type="percentage">
            <text:p>24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number-columns-repeated="2"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571" calcext:value-type="percentage">
            <text:p>25,71%</text:p>
          </table:table-cell>
          <table:table-cell table:style-name="ce2"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0638" calcext:value-type="percentage">
            <text:p>6,38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429" calcext:value-type="percentage">
            <text:p>34,29%</text:p>
          </table:table-cell>
          <table:table-cell table:style-name="ce2" office:value-type="percentage" office:value="0.4357" calcext:value-type="percentage">
            <text:p>4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number-columns-repeated="2"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643" calcext:value-type="percentage">
            <text:p>36,43%</text:p>
          </table:table-cell>
          <table:table-cell table:style-name="ce2" office:value-type="percentage" office:value="0.4357" calcext:value-type="percentage">
            <text:p>4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number-columns-repeated="2"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20:.B229])" office:value-type="percentage" office:value="0.18296" calcext:value-type="percentage">
            <text:p>18,30%</text:p>
          </table:table-cell>
          <table:table-cell table:style-name="ce1" table:formula="of:=AVERAGE([.C220:.C229])" office:value-type="percentage" office:value="0.14254" calcext:value-type="percentage">
            <text:p>14,25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543" calcext:value-type="percentage">
            <text:p>25,43%</text:p>
          </table:table-cell>
          <table:table-cell table:style-name="ce1" table:formula="of:=AVERAGE([.G220:.G229])" office:value-type="percentage" office:value="0.27144" calcext:value-type="percentage">
            <text:p>27,14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648" calcext:value-type="percentage">
            <text:p>16,48%</text:p>
          </table:table-cell>
          <table:table-cell table:style-name="ce2" office:value-type="percentage" office:value="0.1519" calcext:value-type="percentage">
            <text:p>15,19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3037" calcext:value-type="percentage">
            <text:p>30,37%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3074" calcext:value-type="percentage">
            <text:p>30,74%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685" calcext:value-type="percentage">
            <text:p>16,85%</text:p>
          </table:table-cell>
          <table:table-cell table:style-name="ce2" office:value-type="percentage" office:value="0.1648" calcext:value-type="percentage">
            <text:p>16,48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3593" calcext:value-type="percentage">
            <text:p>35,93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426" calcext:value-type="percentage">
            <text:p>14,26%</text:p>
          </table:table-cell>
          <table:table-cell table:style-name="ce2" office:value-type="percentage" office:value="0.1722" calcext:value-type="percentage">
            <text:p>17,22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1463" calcext:value-type="percentage">
            <text:p>14,63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2" office:value-type="percentage" office:value="0.2778" calcext:value-type="percentage">
            <text:p>27,78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63" calcext:value-type="percentage">
            <text:p>16,3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2" office:value-type="percentage" office:value="0.1315" calcext:value-type="percentage">
            <text:p>13,15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611" calcext:value-type="percentage">
            <text:p>16,11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 office:value-type="percentage" office:value="0.1444" calcext:value-type="percentage">
            <text:p>14,44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3296" calcext:value-type="percentage">
            <text:p>32,96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26" calcext:value-type="percentage">
            <text:p>14,26%</text:p>
          </table:table-cell>
          <table:table-cell table:style-name="ce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3:.B242])" office:value-type="percentage" office:value="0.26259" calcext:value-type="percentage">
            <text:p>26,26%</text:p>
          </table:table-cell>
          <table:table-cell table:style-name="ce1" table:formula="of:=AVERAGE([.C233:.C242])" office:value-type="percentage" office:value="0.23963" calcext:value-type="percentage">
            <text:p>23,96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925" calcext:value-type="percentage">
            <text:p>14,93%</text:p>
          </table:table-cell>
          <table:table-cell table:style-name="ce1" table:formula="of:=AVERAGE([.G233:.G242])" office:value-type="percentage" office:value="0.15519" calcext:value-type="percentage">
            <text:p>15,5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3655" calcext:value-type="percentage">
            <text:p>36,55%</text:p>
          </table:table-cell>
          <table:table-cell table:style-name="ce2" office:value-type="percentage" office:value="0.6998" calcext:value-type="percentage">
            <text:p>69,98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587" calcext:value-type="percentage">
            <text:p>5,87%</text:p>
          </table:table-cell>
          <table:table-cell table:style-name="ce2" office:value-type="percentage" office:value="0.0565" calcext:value-type="percentage">
            <text:p>5,65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5816" calcext:value-type="percentage">
            <text:p>58,16%</text:p>
          </table:table-cell>
          <table:table-cell table:style-name="ce2" office:value-type="percentage" office:value="0.3375" calcext:value-type="percentage">
            <text:p>33,7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522" calcext:value-type="percentage">
            <text:p>5,22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4992" calcext:value-type="percentage">
            <text:p>49,92%</text:p>
          </table:table-cell>
          <table:table-cell table:style-name="ce1" office:value-type="percentage" office:value="0.4526" calcext:value-type="percentage">
            <text:p>45,26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696" calcext:value-type="percentage">
            <text:p>6,96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3514" calcext:value-type="percentage">
            <text:p>35,14%</text:p>
          </table:table-cell>
          <table:table-cell table:style-name="ce2" office:value-type="percentage" office:value="0.6221" calcext:value-type="percentage">
            <text:p>62,21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804" calcext:value-type="percentage">
            <text:p>8,04%</text:p>
          </table:table-cell>
          <table:table-cell table:style-name="ce2" office:value-type="percentage" office:value="0.0717" calcext:value-type="percentage">
            <text:p>7,1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4526" calcext:value-type="percentage">
            <text:p>45,26%</text:p>
          </table:table-cell>
          <table:table-cell table:style-name="ce2" office:value-type="percentage" office:value="0.4246" calcext:value-type="percentage">
            <text:p>42,46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6392" calcext:value-type="percentage">
            <text:p>63,92%</text:p>
          </table:table-cell>
          <table:table-cell table:style-name="ce2" office:value-type="percentage" office:value="0.6128" calcext:value-type="percentage">
            <text:p>61,28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74" calcext:value-type="percentage">
            <text:p>6,74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4292" calcext:value-type="percentage">
            <text:p>42,92%</text:p>
          </table:table-cell>
          <table:table-cell table:style-name="ce2" office:value-type="percentage" office:value="0.6858" calcext:value-type="percentage">
            <text:p>68,58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style-name="ce2" office:value-type="percentage" office:value="0.0587" calcext:value-type="percentage">
            <text:p>5,87%</text:p>
          </table:table-cell>
          <table:table-cell table:style-name="ce2" office:value-type="percentage" office:value="0.0674" calcext:value-type="percentage">
            <text:p>6,74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605" calcext:value-type="percentage">
            <text:p>60,50%</text:p>
          </table:table-cell>
          <table:table-cell table:style-name="ce2" office:value-type="percentage" office:value="0.3826" calcext:value-type="percentage">
            <text:p>38,26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348" calcext:value-type="percentage">
            <text:p>3,48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6563" calcext:value-type="percentage">
            <text:p>65,63%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number-columns-repeated="2" table:style-name="ce2"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3017" calcext:value-type="percentage">
            <text:p>30,17%</text:p>
          </table:table-cell>
          <table:table-cell table:style-name="ce2" office:value-type="percentage" office:value="0.4961" calcext:value-type="percentage">
            <text:p>49,61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5:.B254])" office:value-type="percentage" office:value="0.48817" calcext:value-type="percentage">
            <text:p>48,82%</text:p>
          </table:table-cell>
          <table:table-cell table:style-name="ce1" table:formula="of:=AVERAGE([.C245:.C254])" office:value-type="percentage" office:value="0.53406" calcext:value-type="percentage">
            <text:p>53,41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325" calcext:value-type="percentage">
            <text:p>6,33%</text:p>
          </table:table-cell>
          <table:table-cell table:style-name="ce1" table:formula="of:=AVERAGE([.G245:.G254])" office:value-type="percentage" office:value="0.05956" calcext:value-type="percentage">
            <text:p>5,9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4733" calcext:value-type="percentage">
            <text:p>47,33%</text:p>
          </table:table-cell>
          <table:table-cell table:style-name="ce2" office:value-type="percentage" office:value="0.3648" calcext:value-type="percentage">
            <text:p>36,48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number-columns-repeated="2" table:style-name="ce2" office:value-type="percentage" office:value="0.2338" calcext:value-type="percentage">
            <text:p>23,3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6103" calcext:value-type="percentage">
            <text:p>61,03%</text:p>
          </table:table-cell>
          <table:table-cell table:style-name="ce2" office:value-type="percentage" office:value="0.4128" calcext:value-type="percentage">
            <text:p>41,28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405" calcext:value-type="percentage">
            <text:p>24,05%</text:p>
          </table:table-cell>
          <table:table-cell table:style-name="ce2" office:value-type="percentage" office:value="0.2257" calcext:value-type="percentage">
            <text:p>22,57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431" calcext:value-type="percentage">
            <text:p>44,31%</text:p>
          </table:table-cell>
          <table:table-cell table:style-name="ce2" office:value-type="percentage" office:value="0.6388" calcext:value-type="percentage">
            <text:p>63,88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2959" calcext:value-type="percentage">
            <text:p>29,59%</text:p>
          </table:table-cell>
          <table:table-cell table:style-name="ce2" office:value-type="percentage" office:value="0.2054" calcext:value-type="percentage">
            <text:p>20,54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4626" calcext:value-type="percentage">
            <text:p>46,26%</text:p>
          </table:table-cell>
          <table:table-cell table:style-name="ce2" office:value-type="percentage" office:value="0.3915" calcext:value-type="percentage">
            <text:p>39,15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203" calcext:value-type="percentage">
            <text:p>22,03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5694" calcext:value-type="percentage">
            <text:p>56,94%</text:p>
          </table:table-cell>
          <table:table-cell table:style-name="ce2" office:value-type="percentage" office:value="0.4626" calcext:value-type="percentage">
            <text:p>46,26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432" calcext:value-type="percentage">
            <text:p>24,32%</text:p>
          </table:table-cell>
          <table:table-cell table:style-name="ce2" office:value-type="percentage" office:value="0.2419" calcext:value-type="percentage">
            <text:p>24,1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3505" calcext:value-type="percentage">
            <text:p>35,05%</text:p>
          </table:table-cell>
          <table:table-cell table:style-name="ce2" office:value-type="percentage" office:value="0.4982" calcext:value-type="percentage">
            <text:p>49,82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23" calcext:value-type="percentage">
            <text:p>22,30%</text:p>
          </table:table-cell>
          <table:table-cell table:style-name="ce2" office:value-type="percentage" office:value="0.2189" calcext:value-type="percentage">
            <text:p>21,8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412" calcext:value-type="percentage">
            <text:p>44,12%</text:p>
          </table:table-cell>
          <table:table-cell table:style-name="ce2" office:value-type="percentage" office:value="0.3577" calcext:value-type="percentage">
            <text:p>35,77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2162" calcext:value-type="percentage">
            <text:p>21,62%</text:p>
          </table:table-cell>
          <table:table-cell table:style-name="ce2" office:value-type="percentage" office:value="0.2027" calcext:value-type="percentage">
            <text:p>20,27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2" office:value-type="percentage" office:value="0.6263" calcext:value-type="percentage">
            <text:p>62,63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number-columns-repeated="2" table:style-name="ce2" office:value-type="percentage" office:value="0.2149" calcext:value-type="percentage">
            <text:p>21,4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5907" calcext:value-type="percentage">
            <text:p>59,07%</text:p>
          </table:table-cell>
          <table:table-cell table:style-name="ce2" office:value-type="percentage" office:value="0.4751" calcext:value-type="percentage">
            <text:p>47,51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149" calcext:value-type="percentage">
            <text:p>21,4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3665" calcext:value-type="percentage">
            <text:p>36,65%</text:p>
          </table:table-cell>
          <table:table-cell table:style-name="ce2" office:value-type="percentage" office:value="0.4875" calcext:value-type="percentage">
            <text:p>48,75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2176" calcext:value-type="percentage">
            <text:p>21,76%</text:p>
          </table:table-cell>
          <table:table-cell table:style-name="ce2" office:value-type="percentage" office:value="0.1865" calcext:value-type="percentage">
            <text:p>18,6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7:.B266])" office:value-type="percentage" office:value="0.48236" calcext:value-type="percentage">
            <text:p>48,24%</text:p>
          </table:table-cell>
          <table:table-cell table:style-name="ce1" table:formula="of:=AVERAGE([.C257:.C266])" office:value-type="percentage" office:value="0.47153" calcext:value-type="percentage">
            <text:p>47,15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304" calcext:value-type="percentage">
            <text:p>23,04%</text:p>
          </table:table-cell>
          <table:table-cell table:style-name="ce1" table:formula="of:=AVERAGE([.G257:.G266])" office:value-type="percentage" office:value="0.21447" calcext:value-type="percentage">
            <text:p>21,45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1" table:number-columns-repeated="2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32.246" calcext:value-type="float">
            <text:p>1432,24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791" calcext:value-type="float">
            <text:p>7,91E-02</text:p>
          </table:table-cell>
          <table:table-cell table:style-name="ce10" office:value-type="float" office:value="0.881" calcext:value-type="float">
            <text:p>8,81E-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57.9793" calcext:value-type="float">
            <text:p>1757,9793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344" calcext:value-type="float">
            <text:p>3,44E-02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163.261" calcext:value-type="float">
            <text:p>2163,261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3.437" calcext:value-type="float">
            <text:p>3,437</text:p>
          </table:table-cell>
          <table:table-cell table:style-name="ce6" office:value-type="float" office:value="6.031" calcext:value-type="float">
            <text:p>6,0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0.7" calcext:value-type="float">
            <text:p>7,00E-01</text:p>
          </table:table-cell>
          <table:table-cell table:style-name="ce10" office:value-type="float" office:value="0.0894" calcext:value-type="float">
            <text:p>8,94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table:number-columns-repeated="3"/>
          <table:table-cell table:style-name="ce6" office:value-type="string" calcext:value-type="string">
            <text:p>BL_5</text:p>
          </table:table-cell>
          <table:table-cell table:style-name="ce10" office:value-type="float" office:value="12.515" calcext:value-type="float">
            <text:p>1,25E+01</text:p>
          </table:table-cell>
          <table:table-cell table:style-name="ce10" office:value-type="float" office:value="0.0606" calcext:value-type="float">
            <text:p>6,06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0.1" calcext:value-type="float">
            <text:p>1,00E-01</text:p>
          </table:table-cell>
          <table:table-cell table:style-name="ce10" office:value-type="float" office:value="10.569" calcext:value-type="float">
            <text:p>1,06E+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0904" calcext:value-type="float">
            <text:p>9,04E-02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11.189" calcext:value-type="float">
            <text:p>1,12E+01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270:.B279])" office:value-type="float" office:value="1784.49543333333" calcext:value-type="float">
            <text:p>1784,49543333333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2.84159" calcext:value-type="float">
            <text:p>2,84159</text:p>
          </table:table-cell>
          <table:table-cell table:style-name="ce11" table:formula="of:=AVERAGE([.G270:.G279])" office:value-type="float" office:value="2.94288333333333" calcext:value-type="float">
            <text:p>2,94E+00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1"/>
          <table:table-cell table:style-name="ce5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3372.974" calcext:value-type="float">
            <text:p>3372,974</text:p>
          </table:table-cell>
          <table:table-cell table:style-name="ce6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2659.334" calcext:value-type="float">
            <text:p>2659,3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4298.878" calcext:value-type="float">
            <text:p>4298,87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1.902" calcext:value-type="float">
            <text:p>1,902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4245.117" calcext:value-type="float">
            <text:p>4245,11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3262.873" calcext:value-type="float">
            <text:p>3262,8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2574.642" calcext:value-type="float">
            <text:p>2574,64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83" calcext:value-type="float">
            <text:p>0,08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3966.326" calcext:value-type="float">
            <text:p>3966,3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4467.252" calcext:value-type="float">
            <text:p>4467,25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3278.998" calcext:value-type="float">
            <text:p>3278,99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0814" calcext:value-type="float">
            <text:p>0,0814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3689.7499" calcext:value-type="float">
            <text:p>3689,749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82:.B291])" office:value-type="float" office:value="0.40384" calcext:value-type="float">
            <text:p>0,40384</text:p>
          </table:table-cell>
          <table:table-cell table:style-name="ce5" table:formula="of:=AVERAGE([.C282:.C291])" office:value-type="float" office:value="0.37375" calcext:value-type="float">
            <text:p>0,37375</text:p>
          </table:table-cell>
          <table:table-cell table:style-name="ce5" table:number-columns-repeated="2"/>
          <table:table-cell table:style-name="ce5" table:formula="of:=AVERAGE([.F282:.F291])" office:value-type="float" office:value="3581.61439" calcext:value-type="float">
            <text:p>3581,61439</text:p>
          </table:table-cell>
          <table:table-cell table:style-name="ce5" table:formula="of:=AVERAGE([.G282:.G291])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7.17" calcext:value-type="float">
            <text:p>7,17</text:p>
          </table:table-cell>
          <table:table-cell table:style-name="ce6" office:value-type="float" office:value="9.73" calcext:value-type="float">
            <text:p>9,73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7.03" calcext:value-type="float">
            <text:p>7,03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54" calcext:value-type="float">
            <text:p>0,154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9.83" calcext:value-type="float">
            <text:p>9,8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7.57" calcext:value-type="float">
            <text:p>7,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9.302" calcext:value-type="float">
            <text:p>9,3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" calcext:value-type="float">
            <text:p>0,13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1.58" calcext:value-type="float">
            <text:p>11,5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6.71" calcext:value-type="float">
            <text:p>6,7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204" calcext:value-type="float">
            <text:p>0,204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7.47" calcext:value-type="float">
            <text:p>7,4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5.75" calcext:value-type="float">
            <text:p>5,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58" calcext:value-type="float">
            <text:p>0,158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7.64" calcext:value-type="float">
            <text:p>7,6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94:.B303])" office:value-type="float" office:value="0.1772" calcext:value-type="float">
            <text:p>0,1772</text:p>
          </table:table-cell>
          <table:table-cell table:style-name="ce5" table:formula="of:=AVERAGE([.C294:.C30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4:.F303])" office:value-type="float" office:value="8.0052" calcext:value-type="float">
            <text:p>8,0052</text:p>
          </table:table-cell>
          <table:table-cell table:style-name="ce5" table:formula="of:=AVERAGE([.G294:.G303])" office:value-type="float" office:value="9.73" calcext:value-type="float">
            <text:p>9,73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459" calcext:value-type="float">
            <text:p>0,459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752" calcext:value-type="float">
            <text:p>0,752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3" calcext:value-type="float">
            <text:p>0,3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697" calcext:value-type="float">
            <text:p>0,6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663" calcext:value-type="float">
            <text:p>0,663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226" calcext:value-type="float">
            <text:p>1,2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1.41" calcext:value-type="float">
            <text:p>1,4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71" calcext:value-type="float">
            <text:p>0,371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0.893" calcext:value-type="float">
            <text:p>0,8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725" calcext:value-type="float">
            <text:p>0,725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.648" calcext:value-type="float">
            <text:p>1,6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662" calcext:value-type="float">
            <text:p>0,662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8297" calcext:value-type="float">
            <text:p>0,82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1.2796" calcext:value-type="float">
            <text:p>1,2796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99" calcext:value-type="float">
            <text:p>0,299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07:.B316])" office:value-type="float" office:value="0.53756" calcext:value-type="float">
            <text:p>0,53756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1.05563333333333" calcext:value-type="float">
            <text:p>1,05563333333333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4.555" calcext:value-type="float">
            <text:p>4,555</text:p>
          </table:table-cell>
          <table:table-cell table:style-name="ce6" office:value-type="float" office:value="2.377" calcext:value-type="float">
            <text:p>2,377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447" calcext:value-type="float">
            <text:p>0,044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2.178" calcext:value-type="float">
            <text:p>2,17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0.519" calcext:value-type="float">
            <text:p>0,519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3.414" calcext:value-type="float">
            <text:p>3,4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464" calcext:value-type="float">
            <text:p>1,464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618" calcext:value-type="float">
            <text:p>0,61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1.158" calcext:value-type="float">
            <text:p>1,158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103" calcext:value-type="float">
            <text:p>0,1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0.765" calcext:value-type="float">
            <text:p>0,765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0948" calcext:value-type="float">
            <text:p>0,09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5397" calcext:value-type="float">
            <text:p>0,5397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0.998" calcext:value-type="float">
            <text:p>0,998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0.139" calcext:value-type="float">
            <text:p>0,13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488" calcext:value-type="float">
            <text:p>0,488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373" calcext:value-type="float">
            <text:p>0,03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548" calcext:value-type="float">
            <text:p>0,54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19:.B328])" office:value-type="float" office:value="2.46647" calcext:value-type="float">
            <text:p>2,46647</text:p>
          </table:table-cell>
          <table:table-cell table:style-name="ce5" table:formula="of:=AVERAGE([.C319:.C328])" office:value-type="float" office:value="2.377" calcext:value-type="float">
            <text:p>2,377</text:p>
          </table:table-cell>
          <table:table-cell table:style-name="ce5" table:number-columns-repeated="2"/>
          <table:table-cell table:style-name="ce5" table:formula="of:=AVERAGE([.F319:.F328])" office:value-type="float" office:value="0.56718" calcext:value-type="float">
            <text:p>0,56718</text:p>
          </table:table-cell>
          <table:table-cell table:style-name="ce5" table:formula="of:=AVERAGE([.G319:.G3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2367.037" calcext:value-type="float">
            <text:p>2367,037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57.356" calcext:value-type="float">
            <text:p>157,35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2538.235" calcext:value-type="float">
            <text:p>2538,235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110.942" calcext:value-type="float">
            <text:p>110,94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2003.881" calcext:value-type="float">
            <text:p>2003,881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113.732" calcext:value-type="float">
            <text:p>113,73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3362.189" calcext:value-type="float">
            <text:p>3362,18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82.64" calcext:value-type="float">
            <text:p>182,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2861.368" calcext:value-type="float">
            <text:p>2861,368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06.899" calcext:value-type="float">
            <text:p>106,8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3225.166" calcext:value-type="float">
            <text:p>3225,166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1.601" calcext:value-type="float">
            <text:p>231,60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2565.856" calcext:value-type="float">
            <text:p>2565,856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67.099" calcext:value-type="float">
            <text:p>167,0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2134.215" calcext:value-type="float">
            <text:p>2134,215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75.467" calcext:value-type="float">
            <text:p>175,4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624.534" calcext:value-type="float">
            <text:p>2624,53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122.207" calcext:value-type="float">
            <text:p>122,2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859.305" calcext:value-type="float">
            <text:p>1859,305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40.208" calcext:value-type="float">
            <text:p>140,2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32:.B341])" office:value-type="float" office:value="2554.1786" calcext:value-type="float">
            <text:p>2554,1786</text:p>
          </table:table-cell>
          <table:table-cell table:style-name="ce5" table:formula="of:=AVERAGE([.C332:.C34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2:.F341])" office:value-type="float" office:value="150.8151" calcext:value-type="float">
            <text:p>150,8151</text:p>
          </table:table-cell>
          <table:table-cell table:style-name="ce5" table:formula="of:=AVERAGE([.G332:.G3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0.235" calcext:value-type="float">
            <text:p>0,235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3.71" calcext:value-type="float">
            <text:p>3,7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3.631" calcext:value-type="float">
            <text:p>3,631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579" calcext:value-type="float">
            <text:p>3,57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0.334" calcext:value-type="float">
            <text:p>0,334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287" calcext:value-type="float">
            <text:p>3,28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312" calcext:value-type="float">
            <text:p>3,3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2.188" calcext:value-type="float">
            <text:p>2,188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877" calcext:value-type="float">
            <text:p>3,87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2.384" calcext:value-type="float">
            <text:p>2,384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309" calcext:value-type="float">
            <text:p>3,3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3.043" calcext:value-type="float">
            <text:p>3,043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928" calcext:value-type="float">
            <text:p>4,92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542" calcext:value-type="float">
            <text:p>3,54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0.3497" calcext:value-type="float">
            <text:p>0,3497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367" calcext:value-type="float">
            <text:p>3,3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27.962" calcext:value-type="float">
            <text:p>27,962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3.108" calcext:value-type="float">
            <text:p>3,1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45:.B354])" office:value-type="float" office:value="4.07497" calcext:value-type="float">
            <text:p>4,07497</text:p>
          </table:table-cell>
          <table:table-cell table:style-name="ce5" table:formula="of:=AVERAGE([.C345:.C35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5:.F354])" office:value-type="float" office:value="3.6019" calcext:value-type="float">
            <text:p>3,6019</text:p>
          </table:table-cell>
          <table:table-cell table:style-name="ce5" table:formula="of:=AVERAGE([.G345:.G3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5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898" calcext:value-type="float">
            <text:p>8,898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11.428" calcext:value-type="float">
            <text:p>11,428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26.908" calcext:value-type="float">
            <text:p>26,908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18.125" calcext:value-type="float">
            <text:p>18,125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14.709" calcext:value-type="float">
            <text:p>14,70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18.005" calcext:value-type="float">
            <text:p>18,005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624" calcext:value-type="float">
            <text:p>7,624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7.269" calcext:value-type="float">
            <text:p>7,269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328" calcext:value-type="float">
            <text:p>7,328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21.023" calcext:value-type="float">
            <text:p>21,02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12.503" calcext:value-type="float">
            <text:p>12,503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16.494" calcext:value-type="float">
            <text:p>16,494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356" calcext:value-type="float">
            <text:p>9,356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.623" calcext:value-type="float">
            <text:p>1,62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11.936" calcext:value-type="float">
            <text:p>11,936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2.392" calcext:value-type="float">
            <text:p>2,392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501" calcext:value-type="float">
            <text:p>6,501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1.692" calcext:value-type="float">
            <text:p>1,692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6.936" calcext:value-type="float">
            <text:p>6,936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5"/>
          <table:table-cell table:style-name="ce5" table:formula="of:=AVERAGE([.B358:.B367])" office:value-type="float" office:value="11.2699" calcext:value-type="float">
            <text:p>11,2699</text:p>
          </table:table-cell>
          <table:table-cell table:style-name="ce5" table:formula="of:=AVERAGE([.C358:.C3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58:.F367])" office:value-type="float" office:value="10.8945555555556" calcext:value-type="float">
            <text:p>10,8945555555556</text:p>
          </table:table-cell>
          <table:table-cell table:style-name="ce5" table:formula="of:=AVERAGE([.G358:.G3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8.35" calcext:value-type="float">
            <text:p>148,35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266.563" calcext:value-type="float">
            <text:p>266,56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6.114" calcext:value-type="float">
            <text:p>126,114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float" office:value="214.164" calcext:value-type="float">
            <text:p>214,1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60.366" calcext:value-type="float">
            <text:p>160,366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office:value-type="float" office:value="198.293" calcext:value-type="float">
            <text:p>198,2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float" office:value="173.047" calcext:value-type="float">
            <text:p>173,047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office:value-type="float" office:value="181.914" calcext:value-type="float">
            <text:p>181,9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office:value-type="float" office:value="156.265" calcext:value-type="float">
            <text:p>156,265</text:p>
          </table:table-cell>
          <table:table-cell table:style-name="ce6" table:number-columns-repeated="2"/>
          <table:table-cell table:style-name="ce2" office:value-type="string" calcext:value-type="string">
            <text:p>Treasury_5</text:p>
          </table:table-cell>
          <table:table-cell table:style-name="ce6" office:value-type="float" office:value="234.793" calcext:value-type="float">
            <text:p>234,7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office:value-type="float" office:value="129.221" calcext:value-type="float">
            <text:p>129,221</text:p>
          </table:table-cell>
          <table:table-cell table:style-name="ce6" table:number-columns-repeated="2"/>
          <table:table-cell table:style-name="ce2" office:value-type="string" calcext:value-type="string">
            <text:p>Treasury_6</text:p>
          </table:table-cell>
          <table:table-cell table:style-name="ce6" office:value-type="float" office:value="221.545" calcext:value-type="float">
            <text:p>221,54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office:value-type="float" office:value="168.027" calcext:value-type="float">
            <text:p>168,027</text:p>
          </table:table-cell>
          <table:table-cell table:style-name="ce6" table:number-columns-repeated="2"/>
          <table:table-cell table:style-name="ce2" office:value-type="string" calcext:value-type="string">
            <text:p>Treasury_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office:value-type="float" office:value="156.647" calcext:value-type="float">
            <text:p>156,647</text:p>
          </table:table-cell>
          <table:table-cell table:style-name="ce6" table:number-columns-repeated="2"/>
          <table:table-cell table:style-name="ce2" office:value-type="string" calcext:value-type="string">
            <text:p>Treasury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office:value-type="float" office:value="165.565" calcext:value-type="float">
            <text:p>165,565</text:p>
          </table:table-cell>
          <table:table-cell table:style-name="ce6" table:number-columns-repeated="2"/>
          <table:table-cell table:style-name="ce2" office:value-type="string" calcext:value-type="string">
            <text:p>Treasury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Treasury_1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71:.B380])" office:value-type="float" office:value="153.733555555556" calcext:value-type="float">
            <text:p>153,733555555556</text:p>
          </table:table-cell>
          <table:table-cell table:style-name="ce5" table:formula="of:=AVERAGE([.C371:.C380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1:.F380])" office:value-type="float" office:value="219.545333333333" calcext:value-type="float">
            <text:p>219,545333333333</text:p>
          </table:table-cell>
          <table:table-cell table:style-name="ce5" table:formula="of:=AVERAGE([.G371:.G3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486.429" calcext:value-type="float">
            <text:p>486,429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454.718" calcext:value-type="float">
            <text:p>454,71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480.335" calcext:value-type="float">
            <text:p>480,335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486.896" calcext:value-type="float">
            <text:p>486,89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float" office:value="530.698" calcext:value-type="float">
            <text:p>530,698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714.812" calcext:value-type="float">
            <text:p>714,81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office:value-type="float" office:value="489.669" calcext:value-type="float">
            <text:p>489,669</text:p>
          </table:table-cell>
          <table:table-cell table:style-name="ce6" table:number-columns-repeated="2"/>
          <table:table-cell table:style-name="ce2" office:value-type="string" calcext:value-type="string">
            <text:p>Auto_4</text:p>
          </table:table-cell>
          <table:table-cell table:style-name="ce6" office:value-type="float" office:value="933.57" calcext:value-type="float">
            <text:p>933,5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office:value-type="float" office:value="753.86" calcext:value-type="float">
            <text:p>753,86</text:p>
          </table:table-cell>
          <table:table-cell table:style-name="ce6" table:number-columns-repeated="2"/>
          <table:table-cell table:style-name="ce2" office:value-type="string" calcext:value-type="string">
            <text:p>Auto_5</text:p>
          </table:table-cell>
          <table:table-cell table:style-name="ce6" office:value-type="float" office:value="766.518" calcext:value-type="float">
            <text:p>766,51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office:value-type="float" office:value="580.786" calcext:value-type="float">
            <text:p>580,786</text:p>
          </table:table-cell>
          <table:table-cell table:style-name="ce6" table:number-columns-repeated="2"/>
          <table:table-cell table:style-name="ce2" office:value-type="string" calcext:value-type="string">
            <text:p>Auto_6</text:p>
          </table:table-cell>
          <table:table-cell table:style-name="ce6" office:value-type="float" office:value="447.774" calcext:value-type="float">
            <text:p>447,77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office:value-type="float" office:value="542.841" calcext:value-type="float">
            <text:p>542,841</text:p>
          </table:table-cell>
          <table:table-cell table:style-name="ce6" table:number-columns-repeated="2"/>
          <table:table-cell table:style-name="ce2" office:value-type="string" calcext:value-type="string">
            <text:p>Auto_7</text:p>
          </table:table-cell>
          <table:table-cell table:style-name="ce6" office:value-type="float" office:value="538.191" calcext:value-type="float">
            <text:p>538,191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8</text:p>
          </table:table-cell>
          <table:table-cell table:style-name="ce6" office:value-type="float" office:value="836.72" calcext:value-type="float">
            <text:p>836,7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office:value-type="float" office:value="503.89" calcext:value-type="float">
            <text:p>503,89</text:p>
          </table:table-cell>
          <table:table-cell table:style-name="ce6" table:number-columns-repeated="2"/>
          <table:table-cell table:style-name="ce2" office:value-type="string" calcext:value-type="string">
            <text:p>Auto_9</text:p>
          </table:table-cell>
          <table:table-cell table:style-name="ce6" office:value-type="float" office:value="858.696" calcext:value-type="float">
            <text:p>858,69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office:value-type="float" office:value="562.178" calcext:value-type="float">
            <text:p>562,178</text:p>
          </table:table-cell>
          <table:table-cell table:style-name="ce6" table:number-columns-repeated="2"/>
          <table:table-cell table:style-name="ce2" office:value-type="string" calcext:value-type="string">
            <text:p>Auto_10</text:p>
          </table:table-cell>
          <table:table-cell table:style-name="ce6" office:value-type="float" office:value="613.011" calcext:value-type="float">
            <text:p>613,011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84:.B393])" office:value-type="float" office:value="547.854" calcext:value-type="float">
            <text:p>547,854</text:p>
          </table:table-cell>
          <table:table-cell table:style-name="ce5" table:formula="of:=AVERAGE([.C384:.C393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4:.F393])" office:value-type="float" office:value="665.0906" calcext:value-type="float">
            <text:p>665,0906</text:p>
          </table:table-cell>
          <table:table-cell table:style-name="ce5" table:formula="of:=AVERAGE([.G384:.G393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73.464" calcext:value-type="float">
            <text:p>473,464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48" calcext:value-type="float">
            <text:p>0,34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float" office:value="395.907" calcext:value-type="float">
            <text:p>395,907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7099" calcext:value-type="float">
            <text:p>0,709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454.064" calcext:value-type="float">
            <text:p>454,064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539.505" calcext:value-type="float">
            <text:p>539,505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2" calcext:value-type="float">
            <text:p>0,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489" calcext:value-type="float">
            <text:p>479,489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93" calcext:value-type="float">
            <text:p>0,493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457.681" calcext:value-type="float">
            <text:p>457,681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827" calcext:value-type="float">
            <text:p>0,082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85.499" calcext:value-type="float">
            <text:p>385,499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327" calcext:value-type="float">
            <text:p>0,3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95.928" calcext:value-type="float">
            <text:p>495,928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70.386" calcext:value-type="float">
            <text:p>470,386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238" calcext:value-type="float">
            <text:p>0,238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Plastic_10</text:p>
          </table:table-cell>
          <table:table-cell table:style-name="ce6" office:value-type="float" office:value="419.014" calcext:value-type="float">
            <text:p>419,01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97:.B406])" office:value-type="float" office:value="457.0937" calcext:value-type="float">
            <text:p>457,0937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7:.F406])" office:value-type="float" office:value="0.31186" calcext:value-type="float">
            <text:p>0,31186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283" calcext:value-type="float">
            <text:p>1,28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57" calcext:value-type="float">
            <text:p>0,0357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5" calcext:value-type="float">
            <text:p>0,115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44" calcext:value-type="float">
            <text:p>0,4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82" calcext:value-type="float">
            <text:p>0,0982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7197" calcext:value-type="float">
            <text:p>0,71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2" calcext:value-type="float">
            <text:p>0,122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1" calcext:value-type="float">
            <text:p>0,043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08" calcext:value-type="float">
            <text:p>0,0608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81" calcext:value-type="float">
            <text:p>0,0381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NT_8</text:p>
          </table:table-cell>
          <table:table-cell table:style-name="ce6" office:value-type="float" office:value="0.0769" calcext:value-type="float">
            <text:p>0,0769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0.619" calcext:value-type="float">
            <text:p>0,6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69" calcext:value-type="float">
            <text:p>0,0969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65" calcext:value-type="float">
            <text:p>0,0665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21" calcext:value-type="float">
            <text:p>0,21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409:.B418])" office:value-type="float" office:value="0.08151" calcext:value-type="float">
            <text:p>0,08151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09:.F418])" office:value-type="float" office:value="0.45586" calcext:value-type="float">
            <text:p>0,45586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1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hreads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4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50" office:value-type="percentage" office:value="0.218" calcext:value-type="percentage">
            <text:p>21,80%</text:p>
          </table:table-cell>
          <table:table-cell table:style-name="ce50" office:value-type="percentage" office:value="0.222" calcext:value-type="percentage">
            <text:p>22,20%</text:p>
          </table:table-cell>
          <table:table-cell table:style-name="ce50" office:value-type="percentage" office:value="0.237" calcext:value-type="percentage">
            <text:p>23,70%</text:p>
          </table:table-cell>
          <table:table-cell table:style-name="ce16" office:value-type="percentage" office:value="0.181" calcext:value-type="percentage">
            <text:p>18,1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50" office:value-type="percentage" office:value="0.1719" calcext:value-type="percentage">
            <text:p>17,19%</text:p>
          </table:table-cell>
          <table:table-cell table:style-name="ce50" office:value-type="percentage" office:value="0.1425" calcext:value-type="percentage">
            <text:p>14,25%</text:p>
          </table:table-cell>
          <table:table-cell table:style-name="ce50" office:value-type="percentage" office:value="0.183" calcext:value-type="percentage">
            <text:p>18,30%</text:p>
          </table:table-cell>
          <table:table-cell table:style-name="ce16" office:value-type="percentage" office:value="0.3957" calcext:value-type="percentage">
            <text:p>39,57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50" office:value-type="percentage" office:value="0.2807" calcext:value-type="percentage">
            <text:p>28,07%</text:p>
          </table:table-cell>
          <table:table-cell table:style-name="ce50" office:value-type="percentage" office:value="0.2842" calcext:value-type="percentage">
            <text:p>28,42%</text:p>
          </table:table-cell>
          <table:table-cell table:style-name="ce50" office:value-type="percentage" office:value="0.27" calcext:value-type="percentage">
            <text:p>27,00%</text:p>
          </table:table-cell>
          <table:table-cell table:style-name="ce16" office:value-type="percentage" office:value="0.3221" calcext:value-type="percentage">
            <text:p>32,21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50" office:value-type="percentage" office:value="0.0755" calcext:value-type="percentage">
            <text:p>7,55%</text:p>
          </table:table-cell>
          <table:table-cell table:style-name="ce50" office:value-type="percentage" office:value="0.0706" calcext:value-type="percentage">
            <text:p>7,06%</text:p>
          </table:table-cell>
          <table:table-cell table:style-name="ce50" office:value-type="percentage" office:value="0.0724" calcext:value-type="percentage">
            <text:p>7,24%</text:p>
          </table:table-cell>
          <table:table-cell table:style-name="ce16" office:value-type="percentage" office:value="0.0897" calcext:value-type="percentage">
            <text:p>8,97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50" office:value-type="percentage" office:value="0.0436" calcext:value-type="percentage">
            <text:p>4,36%</text:p>
          </table:table-cell>
          <table:table-cell table:style-name="ce50" office:value-type="percentage" office:value="0.0418" calcext:value-type="percentage">
            <text:p>4,18%</text:p>
          </table:table-cell>
          <table:table-cell table:style-name="ce50" office:value-type="percentage" office:value="0.044" calcext:value-type="percentage">
            <text:p>4,40%</text:p>
          </table:table-cell>
          <table:table-cell table:style-name="ce16" office:value-type="percentage" office:value="0.0599" calcext:value-type="percentage">
            <text:p>5,99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50" office:value-type="percentage" office:value="0.4659" calcext:value-type="percentage">
            <text:p>46,59%</text:p>
          </table:table-cell>
          <table:table-cell table:style-name="ce50" office:value-type="percentage" office:value="0.4741" calcext:value-type="percentage">
            <text:p>47,41%</text:p>
          </table:table-cell>
          <table:table-cell table:style-name="ce50" office:value-type="percentage" office:value="0.4559" calcext:value-type="percentage">
            <text:p>45,59%</text:p>
          </table:table-cell>
          <table:table-cell table:style-name="ce16" office:value-type="percentage" office:value="0.516" calcext:value-type="percentage">
            <text:p>51,60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50" office:value-type="percentage" office:value="0.1003" calcext:value-type="percentage">
            <text:p>10,03%</text:p>
          </table:table-cell>
          <table:table-cell table:style-name="ce50" office:value-type="percentage" office:value="0.1163" calcext:value-type="percentage">
            <text:p>11,63%</text:p>
          </table:table-cell>
          <table:table-cell table:style-name="ce50" office:value-type="percentage" office:value="0.1263" calcext:value-type="percentage">
            <text:p>12,63%</text:p>
          </table:table-cell>
          <table:table-cell table:style-name="ce16" office:value-type="percentage" office:value="0.3058" calcext:value-type="percentage">
            <text:p>30,58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50" office:value-type="percentage" office:value="0.4949" calcext:value-type="percentage">
            <text:p>49,49%</text:p>
          </table:table-cell>
          <table:table-cell table:style-name="ce50" office:value-type="percentage" office:value="0.5194" calcext:value-type="percentage">
            <text:p>51,94%</text:p>
          </table:table-cell>
          <table:table-cell table:style-name="ce50" office:value-type="percentage" office:value="0.5012" calcext:value-type="percentage">
            <text:p>50,12%</text:p>
          </table:table-cell>
          <table:table-cell table:style-name="ce16" office:value-type="percentage" office:value="0.5467" calcext:value-type="percentage">
            <text:p>54,67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50" office:value-type="percentage" office:value="0.259" calcext:value-type="percentage">
            <text:p>25,90%</text:p>
          </table:table-cell>
          <table:table-cell table:style-name="ce50" office:value-type="percentage" office:value="0.261" calcext:value-type="percentage">
            <text:p>26,10%</text:p>
          </table:table-cell>
          <table:table-cell table:style-name="ce50" office:value-type="percentage" office:value="0.264" calcext:value-type="percentage">
            <text:p>26,40%</text:p>
          </table:table-cell>
          <table:table-cell table:style-name="ce16" office:value-type="percentage" office:value="0.285" calcext:value-type="percentage">
            <text:p>28,50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50" office:value-type="percentage" office:value="0.2677" calcext:value-type="percentage">
            <text:p>26,77%</text:p>
          </table:table-cell>
          <table:table-cell table:style-name="ce50" office:value-type="percentage" office:value="0.2827" calcext:value-type="percentage">
            <text:p>28,27%</text:p>
          </table:table-cell>
          <table:table-cell table:style-name="ce50" office:value-type="percentage" office:value="0.2944" calcext:value-type="percentage">
            <text:p>29,44%</text:p>
          </table:table-cell>
          <table:table-cell table:style-name="ce16" office:value-type="percentage" office:value="0.2866" calcext:value-type="percentage">
            <text:p>28,66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50" office:value-type="percentage" office:value="0.35" calcext:value-type="percentage">
            <text:p>35,00%</text:p>
          </table:table-cell>
          <table:table-cell table:style-name="ce50" office:value-type="percentage" office:value="0.3523" calcext:value-type="percentage">
            <text:p>35,23%</text:p>
          </table:table-cell>
          <table:table-cell table:style-name="ce50" office:value-type="percentage" office:value="0.3862" calcext:value-type="percentage">
            <text:p>38,62%</text:p>
          </table:table-cell>
          <table:table-cell table:style-name="ce16" office:value-type="percentage" office:value="0.5618" calcext:value-type="percentage">
            <text:p>56,18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50" office:value-type="percentage" office:value="0.207" calcext:value-type="percentage">
            <text:p>20,70%</text:p>
          </table:table-cell>
          <table:table-cell table:style-name="ce50" office:value-type="percentage" office:value="0.2381" calcext:value-type="percentage">
            <text:p>23,81%</text:p>
          </table:table-cell>
          <table:table-cell table:style-name="ce50" office:value-type="percentage" office:value="0.2563" calcext:value-type="percentage">
            <text:p>25,63%</text:p>
          </table:table-cell>
          <table:table-cell table:style-name="ce16" office:value-type="percentage" office:value="0.2834" calcext:value-type="percentage">
            <text:p>28,34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50" office:value-type="percentage" office:value="0.2183" calcext:value-type="percentage">
            <text:p>21,83%</text:p>
          </table:table-cell>
          <table:table-cell table:style-name="ce50" office:value-type="percentage" office:value="0.2267" calcext:value-type="percentage">
            <text:p>22,67%</text:p>
          </table:table-cell>
          <table:table-cell table:style-name="ce50" office:value-type="percentage" office:value="0.2257" calcext:value-type="percentage">
            <text:p>22,57%</text:p>
          </table:table-cell>
          <table:table-cell table:style-name="ce16" office:value-type="percentage" office:value="0.2903" calcext:value-type="percentage">
            <text:p>29,03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50" office:value-type="percentage" office:value="0.0696" calcext:value-type="percentage">
            <text:p>6,96%</text:p>
          </table:table-cell>
          <table:table-cell table:style-name="ce50" office:value-type="percentage" office:value="0.0778" calcext:value-type="percentage">
            <text:p>7,78%</text:p>
          </table:table-cell>
          <table:table-cell table:style-name="ce50" office:value-type="percentage" office:value="0.0691" calcext:value-type="percentage">
            <text:p>6,91%</text:p>
          </table:table-cell>
          <table:table-cell table:style-name="ce16" office:value-type="percentage" office:value="0.0662" calcext:value-type="percentage">
            <text:p>6,62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50" office:value-type="percentage" office:value="0.1503" calcext:value-type="percentage">
            <text:p>15,03%</text:p>
          </table:table-cell>
          <table:table-cell table:style-name="ce50" office:value-type="percentage" office:value="0.1406" calcext:value-type="percentage">
            <text:p>14,06%</text:p>
          </table:table-cell>
          <table:table-cell table:style-name="ce50" office:value-type="percentage" office:value="0.1529" calcext:value-type="percentage">
            <text:p>15,29%</text:p>
          </table:table-cell>
          <table:table-cell table:style-name="ce16" office:value-type="percentage" office:value="0.1515" calcext:value-type="percentage">
            <text:p>15,15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50" office:value-type="percentage" office:value="0.3444" calcext:value-type="percentage">
            <text:p>34,44%</text:p>
          </table:table-cell>
          <table:table-cell table:style-name="ce50" office:value-type="percentage" office:value="0.3321" calcext:value-type="percentage">
            <text:p>33,21%</text:p>
          </table:table-cell>
          <table:table-cell table:style-name="ce50" office:value-type="percentage" office:value="0.3318" calcext:value-type="percentage">
            <text:p>33,18%</text:p>
          </table:table-cell>
          <table:table-cell table:style-name="ce16" office:value-type="percentage" office:value="0.3111" calcext:value-type="percentage">
            <text:p>31,1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50" office:value-type="percentage" office:value="0.2636" calcext:value-type="percentage">
            <text:p>26,36%</text:p>
          </table:table-cell>
          <table:table-cell table:style-name="ce50" office:value-type="percentage" office:value="0.2714" calcext:value-type="percentage">
            <text:p>27,14%</text:p>
          </table:table-cell>
          <table:table-cell table:style-name="ce50" office:value-type="percentage" office:value="0.2543" calcext:value-type="percentage">
            <text:p>25,43%</text:p>
          </table:table-cell>
          <table:table-cell table:style-name="ce16" office:value-type="percentage" office:value="0.2842" calcext:value-type="percentage">
            <text:p>28,42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50" office:value-type="percentage" office:value="0.1735" calcext:value-type="percentage">
            <text:p>17,35%</text:p>
          </table:table-cell>
          <table:table-cell table:style-name="ce50" office:value-type="percentage" office:value="0.1724" calcext:value-type="percentage">
            <text:p>17,24%</text:p>
          </table:table-cell>
          <table:table-cell table:style-name="ce50" office:value-type="percentage" office:value="0.1764" calcext:value-type="percentage">
            <text:p>17,64%</text:p>
          </table:table-cell>
          <table:table-cell table:style-name="ce16" office:value-type="percentage" office:value="0.1988" calcext:value-type="percentage">
            <text:p>19,88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50" office:value-type="percentage" office:value="0.5009" calcext:value-type="percentage">
            <text:p>50,09%</text:p>
          </table:table-cell>
          <table:table-cell table:style-name="ce50" office:value-type="percentage" office:value="0.4715" calcext:value-type="percentage">
            <text:p>47,15%</text:p>
          </table:table-cell>
          <table:table-cell table:style-name="ce50" office:value-type="percentage" office:value="0.4824" calcext:value-type="percentage">
            <text:p>48,24%</text:p>
          </table:table-cell>
          <table:table-cell table:style-name="ce16" office:value-type="percentage" office:value="0.6781" calcext:value-type="percentage">
            <text:p>67,81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50" office:value-type="percentage" office:value="0.1526" calcext:value-type="percentage">
            <text:p>15,26%</text:p>
          </table:table-cell>
          <table:table-cell table:style-name="ce50" office:value-type="percentage" office:value="0.1658" calcext:value-type="percentage">
            <text:p>16,58%</text:p>
          </table:table-cell>
          <table:table-cell table:style-name="ce50" office:value-type="percentage" office:value="0.1869" calcext:value-type="percentage">
            <text:p>18,69%</text:p>
          </table:table-cell>
          <table:table-cell table:style-name="ce16" office:value-type="percentage" office:value="0.1805" calcext:value-type="percentage">
            <text:p>18,05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50" office:value-type="percentage" office:value="0.1509" calcext:value-type="percentage">
            <text:p>15,09%</text:p>
          </table:table-cell>
          <table:table-cell table:style-name="ce50" office:value-type="percentage" office:value="0.1552" calcext:value-type="percentage">
            <text:p>15,52%</text:p>
          </table:table-cell>
          <table:table-cell table:style-name="ce50" office:value-type="percentage" office:value="0.1493" calcext:value-type="percentage">
            <text:p>14,93%</text:p>
          </table:table-cell>
          <table:table-cell table:style-name="ce16" office:value-type="percentage" office:value="0.1555" calcext:value-type="percentage">
            <text:p>15,55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number-columns-repeated="2" table:style-name="ce50" office:value-type="percentage" office:value="0.2865" calcext:value-type="percentage">
            <text:p>28,65%</text:p>
          </table:table-cell>
          <table:table-cell table:style-name="ce50" office:value-type="percentage" office:value="0.2934" calcext:value-type="percentage">
            <text:p>29,34%</text:p>
          </table:table-cell>
          <table:table-cell table:style-name="ce16" office:value-type="percentage" office:value="0.3219" calcext:value-type="percentage">
            <text:p>32,19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50" office:value-type="percentage" office:value="0.0683" calcext:value-type="percentage">
            <text:p>6,83%</text:p>
          </table:table-cell>
          <table:table-cell table:style-name="ce50" office:value-type="percentage" office:value="0.068" calcext:value-type="percentage">
            <text:p>6,80%</text:p>
          </table:table-cell>
          <table:table-cell table:style-name="ce50" office:value-type="percentage" office:value="0.0715" calcext:value-type="percentage">
            <text:p>7,15%</text:p>
          </table:table-cell>
          <table:table-cell table:style-name="ce16" office:value-type="percentage" office:value="0.0594" calcext:value-type="percentage">
            <text:p>5,94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50" office:value-type="percentage" office:value="0.2834" calcext:value-type="percentage">
            <text:p>28,34%</text:p>
          </table:table-cell>
          <table:table-cell table:style-name="ce50" office:value-type="percentage" office:value="0.3011" calcext:value-type="percentage">
            <text:p>30,11%</text:p>
          </table:table-cell>
          <table:table-cell table:style-name="ce50" office:value-type="percentage" office:value="0.3032" calcext:value-type="percentage">
            <text:p>30,32%</text:p>
          </table:table-cell>
          <table:table-cell table:style-name="ce16" office:value-type="percentage" office:value="0.2939" calcext:value-type="percentage">
            <text:p>29,39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50" office:value-type="percentage" office:value="0.2096" calcext:value-type="percentage">
            <text:p>20,96%</text:p>
          </table:table-cell>
          <table:table-cell table:style-name="ce50" office:value-type="percentage" office:value="0.2145" calcext:value-type="percentage">
            <text:p>21,45%</text:p>
          </table:table-cell>
          <table:table-cell table:style-name="ce50" office:value-type="percentage" office:value="0.2304" calcext:value-type="percentage">
            <text:p>23,04%</text:p>
          </table:table-cell>
          <table:table-cell table:style-name="ce16" office:value-type="percentage" office:value="0.196" calcext:value-type="percentage">
            <text:p>19,60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50" office:value-type="percentage" office:value="0.3278" calcext:value-type="percentage">
            <text:p>32,78%</text:p>
          </table:table-cell>
          <table:table-cell table:style-name="ce50" office:value-type="percentage" office:value="0.3404" calcext:value-type="percentage">
            <text:p>34,04%</text:p>
          </table:table-cell>
          <table:table-cell table:style-name="ce50" office:value-type="percentage" office:value="0.3411" calcext:value-type="percentage">
            <text:p>34,11%</text:p>
          </table:table-cell>
          <table:table-cell table:style-name="ce16" office:value-type="percentage" office:value="0.3486" calcext:value-type="percentage">
            <text:p>34,86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50" office:value-type="percentage" office:value="0.5409" calcext:value-type="percentage">
            <text:p>54,09%</text:p>
          </table:table-cell>
          <table:table-cell table:style-name="ce50" office:value-type="percentage" office:value="0.5341" calcext:value-type="percentage">
            <text:p>53,41%</text:p>
          </table:table-cell>
          <table:table-cell table:style-name="ce50" office:value-type="percentage" office:value="0.4882" calcext:value-type="percentage">
            <text:p>48,82%</text:p>
          </table:table-cell>
          <table:table-cell table:style-name="ce16" office:value-type="percentage" office:value="0.5454" calcext:value-type="percentage">
            <text:p>54,54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50" office:value-type="percentage" office:value="0.1983" calcext:value-type="percentage">
            <text:p>19,83%</text:p>
          </table:table-cell>
          <table:table-cell table:style-name="ce50" office:value-type="percentage" office:value="0.2083" calcext:value-type="percentage">
            <text:p>20,83%</text:p>
          </table:table-cell>
          <table:table-cell table:style-name="ce50" office:value-type="percentage" office:value="0.2194" calcext:value-type="percentage">
            <text:p>21,94%</text:p>
          </table:table-cell>
          <table:table-cell table:style-name="ce16" office:value-type="percentage" office:value="0.5772" calcext:value-type="percentage">
            <text:p>57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50" office:value-type="percentage" office:value="0.2065" calcext:value-type="percentage">
            <text:p>20,65%</text:p>
          </table:table-cell>
          <table:table-cell table:style-name="ce50" office:value-type="percentage" office:value="0.218" calcext:value-type="percentage">
            <text:p>21,80%</text:p>
          </table:table-cell>
          <table:table-cell table:style-name="ce50" office:value-type="percentage" office:value="0.2245" calcext:value-type="percentage">
            <text:p>22,45%</text:p>
          </table:table-cell>
          <table:table-cell table:style-name="ce16" office:value-type="percentage" office:value="0.224" calcext:value-type="percentage">
            <text:p>22,40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50" office:value-type="percentage" office:value="0.063" calcext:value-type="percentage">
            <text:p>6,30%</text:p>
          </table:table-cell>
          <table:table-cell table:style-name="ce50" office:value-type="percentage" office:value="0.0596" calcext:value-type="percentage">
            <text:p>5,96%</text:p>
          </table:table-cell>
          <table:table-cell table:style-name="ce50" office:value-type="percentage" office:value="0.0633" calcext:value-type="percentage">
            <text:p>6,33%</text:p>
          </table:table-cell>
          <table:table-cell table:style-name="ce16" office:value-type="percentage" office:value="0.0637" calcext:value-type="percentage">
            <text:p>6,37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50" office:value-type="percentage" office:value="0.4275" calcext:value-type="percentage">
            <text:p>42,75%</text:p>
          </table:table-cell>
          <table:table-cell table:style-name="ce50" office:value-type="percentage" office:value="0.4288" calcext:value-type="percentage">
            <text:p>42,88%</text:p>
          </table:table-cell>
          <table:table-cell table:style-name="ce50" office:value-type="percentage" office:value="0.4208" calcext:value-type="percentage">
            <text:p>42,08%</text:p>
          </table:table-cell>
          <table:table-cell table:style-name="ce16"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50" office:value-type="percentage" office:value="0.213" calcext:value-type="percentage">
            <text:p>21,30%</text:p>
          </table:table-cell>
          <table:table-cell table:style-name="ce50" office:value-type="percentage" office:value="0.2396" calcext:value-type="percentage">
            <text:p>23,96%</text:p>
          </table:table-cell>
          <table:table-cell table:style-name="ce50" office:value-type="percentage" office:value="0.2626" calcext:value-type="percentage">
            <text:p>26,26%</text:p>
          </table:table-cell>
          <table:table-cell table:style-name="ce16" office:value-type="percentage" office:value="0.2725" calcext:value-type="percentage">
            <text:p>27,25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50" office:value-type="percentage" office:value="0.0623" calcext:value-type="percentage">
            <text:p>6,23%</text:p>
          </table:table-cell>
          <table:table-cell table:style-name="ce50" office:value-type="percentage" office:value="0.0643" calcext:value-type="percentage">
            <text:p>6,43%</text:p>
          </table:table-cell>
          <table:table-cell table:style-name="ce50" office:value-type="percentage" office:value="0.061" calcext:value-type="percentage">
            <text:p>6,10%</text:p>
          </table:table-cell>
          <table:table-cell table:style-name="ce16" office:value-type="percentage" office:value="0.0561" calcext:value-type="percentage">
            <text:p>5,61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50" office:value-type="percentage" office:value="0.2401" calcext:value-type="percentage">
            <text:p>24,01%</text:p>
          </table:table-cell>
          <table:table-cell table:style-name="ce50" office:value-type="percentage" office:value="0.2431" calcext:value-type="percentage">
            <text:p>24,31%</text:p>
          </table:table-cell>
          <table:table-cell table:style-name="ce50" office:value-type="percentage" office:value="0.2485" calcext:value-type="percentage">
            <text:p>24,85%</text:p>
          </table:table-cell>
          <table:table-cell table:style-name="ce16"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50" office:value-type="percentage" office:value="0.0747" calcext:value-type="percentage">
            <text:p>7,47%</text:p>
          </table:table-cell>
          <table:table-cell table:style-name="ce50" office:value-type="percentage" office:value="0.0623" calcext:value-type="percentage">
            <text:p>6,23%</text:p>
          </table:table-cell>
          <table:table-cell table:style-name="ce50" office:value-type="percentage" office:value="0.0646" calcext:value-type="percentage">
            <text:p>6,46%</text:p>
          </table:table-cell>
          <table:table-cell table:style-name="ce16" office:value-type="percentage" office:value="0.0856" calcext:value-type="percentage">
            <text:p>8,56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50" office:value-type="percentage" office:value="0.1547" calcext:value-type="percentage">
            <text:p>15,47%</text:p>
          </table:table-cell>
          <table:table-cell table:style-name="ce50" office:value-type="percentage" office:value="0.1406" calcext:value-type="percentage">
            <text:p>14,06%</text:p>
          </table:table-cell>
          <table:table-cell table:style-name="ce50" office:value-type="percentage" office:value="0.1636" calcext:value-type="percentage">
            <text:p>16,36%</text:p>
          </table:table-cell>
          <table:table-cell table:style-name="ce16" office:value-type="percentage" office:value="0.192" calcext:value-type="percentage">
            <text:p>19,20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50" office:value-type="percentage" office:value="0.0964" calcext:value-type="percentage">
            <text:p>9,64%</text:p>
          </table:table-cell>
          <table:table-cell table:style-name="ce50" office:value-type="percentage" office:value="0.0993" calcext:value-type="percentage">
            <text:p>9,93%</text:p>
          </table:table-cell>
          <table:table-cell table:style-name="ce50" office:value-type="percentage" office:value="0.108" calcext:value-type="percentage">
            <text:p>10,80%</text:p>
          </table:table-cell>
          <table:table-cell table:style-name="ce16" office:value-type="percentage" office:value="0.1073" calcext:value-type="percentage">
            <text:p>10,73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50" office:value-type="percentage" office:value="0.0753" calcext:value-type="percentage">
            <text:p>7,53%</text:p>
          </table:table-cell>
          <table:table-cell table:style-name="ce50" office:value-type="percentage" office:value="0.078" calcext:value-type="percentage">
            <text:p>7,80%</text:p>
          </table:table-cell>
          <table:table-cell table:style-name="ce50" office:value-type="percentage" office:value="0.1244" calcext:value-type="percentage">
            <text:p>12,44%</text:p>
          </table:table-cell>
          <table:table-cell table:style-name="ce16" office:value-type="percentage" office:value="0.2154" calcext:value-type="percentage">
            <text:p>21,54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50" office:value-type="percentage" office:value="0.0287" calcext:value-type="percentage">
            <text:p>2,87%</text:p>
          </table:table-cell>
          <table:table-cell table:style-name="ce50" office:value-type="percentage" office:value="0.0296" calcext:value-type="percentage">
            <text:p>2,96%</text:p>
          </table:table-cell>
          <table:table-cell table:style-name="ce50" office:value-type="percentage" office:value="0.0358" calcext:value-type="percentage">
            <text:p>3,58%</text:p>
          </table:table-cell>
          <table:table-cell table:style-name="ce16" office:value-type="percentage" office:value="0.0436" calcext:value-type="percentage">
            <text:p>4,36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50" office:value-type="percentage" office:value="0.054" calcext:value-type="percentage">
            <text:p>5,40%</text:p>
          </table:table-cell>
          <table:table-cell table:style-name="ce50" office:value-type="percentage" office:value="0.056" calcext:value-type="percentage">
            <text:p>5,60%</text:p>
          </table:table-cell>
          <table:table-cell table:style-name="ce50" office:value-type="percentage" office:value="0.057" calcext:value-type="percentage">
            <text:p>5,70%</text:p>
          </table:table-cell>
          <table:table-cell table:style-name="ce16" office:value-type="percentage" office:value="0.095" calcext:value-type="percentage">
            <text:p>9,5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2])" office:value-type="percentage" office:value="0.26457" calcext:value-type="percentage">
            <text:p>26,46%</text:p>
          </table:table-cell>
          <table:table-cell table:style-name="ce17" table:formula="of:=AVERAGE([.C3:.C42])" office:value-type="percentage" office:value="0.21424" calcext:value-type="percentage">
            <text:p>21,42%</text:p>
          </table:table-cell>
          <table:table-cell table:style-name="ce17" table:formula="of:=AVERAGE([.D3:.D42])" office:value-type="percentage" office:value="0.217265" calcext:value-type="percentage">
            <text:p>21,73%</text:p>
          </table:table-cell>
          <table:table-cell table:style-name="ce17" table:formula="of:=AVERAGE([.E3:.E42])" office:value-type="percentage" office:value="0.22252" calcext:value-type="percentage">
            <text:p>22,25%</text:p>
          </table:table-cell>
          <table:table-cell table:style-name="ce17" table:formula="of:=AVERAGE([.F3:.F42])" office:value-type="percentage" office:value="0.26457" calcext:value-type="percentage">
            <text:p>26,46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40"/>
          <table:table-cell table:style-name="ce18" office:value-type="string" calcext:value-type="string">
            <text:p>GAIN:</text:p>
          </table:table-cell>
          <table:table-cell table:style-name="ce18" table:formula="of:=([.B43]-[.C43])/[.B43]" office:value-type="percentage" office:value="0.190233208602638" calcext:value-type="percentage">
            <text:p>19,02%</text:p>
          </table:table-cell>
          <table:table-cell table:style-name="ce18" table:formula="of:=([.B43]-[.D43])/[.B43]" office:value-type="percentage" office:value="0.178799561552708" calcext:value-type="percentage">
            <text:p>17,88%</text:p>
          </table:table-cell>
          <table:table-cell table:style-name="ce18" table:formula="of:=([.B43]-[.E43])/[.B43]" office:value-type="percentage" office:value="0.158937143289111" calcext:value-type="percentage">
            <text:p>15,89%</text:p>
          </table:table-cell>
          <table:table-cell table:style-name="ce18"/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40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40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26" table:formula="of:=0.1772/150" office:value-type="float" office:value="0.00118133333333333" calcext:value-type="float">
            <text:p>0,00118133333333333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style-name="ce26" table:formula="of:=665.0906/39" office:value-type="float" office:value="17.0536051282051" calcext:value-type="float">
            <text:p>17,0536051282051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26" table:formula="of:=0.40384/9" office:value-type="float" office:value="0.0448711111111111" calcext:value-type="float">
            <text:p>0,0448711111111111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26" table:formula="of:=2.84159/4" office:value-type="float" office:value="0.7103975" calcext:value-type="float">
            <text:p>0,7103975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26" table:formula="of:=3581.61439/33" office:value-type="float" office:value="108.533769393939" calcext:value-type="float">
            <text:p>108,533769393939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26" table:formula="of:=0.53756/103" office:value-type="float" office:value="0.00521902912621359" calcext:value-type="float">
            <text:p>0,00521902912621359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style-name="ce26" table:formula="of:=8.0052/36" office:value-type="float" office:value="0.222366666666667" calcext:value-type="float">
            <text:p>0,22236666666666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26" table:formula="of:=2.46647/12" office:value-type="float" office:value="0.205539166666667" calcext:value-type="float">
            <text:p>0,20553916666666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style-name="ce26" table:formula="of:=2554.1786/50" office:value-type="float" office:value="51.083572" calcext:value-type="float">
            <text:p>51,083572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26" table:formula="of:=0.56718/99" office:value-type="float" office:value="0.00572909090909091" calcext:value-type="float">
            <text:p>0,00572909090909091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26" table:formula="of:=4.07497/18" office:value-type="float" office:value="0.226387222222222" calcext:value-type="float">
            <text:p>0,226387222222222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26" table:formula="of:=0.31186/6" office:value-type="float" office:value="0.0519766666666667" calcext:value-type="float">
            <text:p>0,051976666666666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style-name="ce26" table:formula="of:=150.8151/104" office:value-type="float" office:value="1.45014519230769" calcext:value-type="float">
            <text:p>1,45014519230769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style-name="ce26" table:formula="of:=0.08151/13" office:value-type="float" office:value="0.00627" calcext:value-type="float">
            <text:p>0,0062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26" table:formula="of:=3.6019/165" office:value-type="float" office:value="0.021829696969697" calcext:value-type="float">
            <text:p>0,02182969696969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style-name="ce26" table:formula="of:=0.45586/7" office:value-type="float" office:value="0.0651228571428571" calcext:value-type="float">
            <text:p>0,0651228571428571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style-name="ce26" table:formula="of:=457.0937/165" office:value-type="float" office:value="2.77026484848485" calcext:value-type="float">
            <text:p>2,77026484848485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26" table:formula="of:=11.2699/217" office:value-type="float" office:value="0.0519350230414747" calcext:value-type="float">
            <text:p>0,051935023041474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style-name="ce26" table:number-columns-repeated="4"/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 office:value-type="string" calcext:value-type="string">
            <text:p>AVERAGES</text:p>
          </table:table-cell>
          <table:table-cell table:style-name="ce21" table:formula="of:=AVERAGE([.B49:.B72])" office:value-type="float" office:value="8.1731625" calcext:value-type="float">
            <text:p>8,1731625</text:p>
          </table:table-cell>
          <table:table-cell table:style-name="ce13" table:formula="of:=AVERAGE([.C49:.C72])" office:value-type="float" office:value="10.1394545514885" calcext:value-type="float">
            <text:p>10,1394545514885</text:p>
          </table:table-cell>
          <table:table-cell table:style-name="ce13" table:formula="of:=AVERAGE([.D49:.D72])" office:value-type="string" office:string-value="" calcext:value-type="error">
            <text:p>#DIV/0!</text:p>
          </table:table-cell>
          <table:table-cell table:style-name="ce13" table:formula="of:=AVERAGE([.E49:.E72])" office:value-type="string" office:string-value="" calcext:value-type="error">
            <text:p>#DIV/0!</text:p>
          </table:table-cell>
          <table:table-cell table:style-name="ce13" table:formula="of:=AVERAGE([.F49:.F72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40" office:value-type="string" calcext:value-type="string">
            <text:p>GAIN:</text:p>
          </table:table-cell>
          <table:table-cell table:style-name="ce22"/>
          <table:table-cell table:style-name="ce18" table:formula="of:=([.B74]-[.C74])/[.B74]" office:value-type="percentage" office:value="-0.240579096706875" calcext:value-type="percentage">
            <text:p>-24,06%</text:p>
          </table:table-cell>
          <table:table-cell table:style-name="ce18" table:formula="of:=([.C74]-[.D74])/[.C74]" office:value-type="string" office:string-value="" calcext:value-type="error">
            <text:p>#DIV/0!</text:p>
          </table:table-cell>
          <table:table-cell table:style-name="ce18" table:formula="of:=([.D74]-[.E74])/[.D74]" office:value-type="string" office:string-value="" calcext:value-type="error">
            <text:p>#DIV/0!</text:p>
          </table:table-cell>
          <table:table-cell table:style-name="ce18" table:formula="of:=([.C74]-[.F74])/[.C74]" office:value-type="string" office:string-value="" calcext:value-type="error">
            <text:p>#DIV/0!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9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08:10:38.40224982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9:32:05.396428555</meta:creation-date>
    <dc:date>2026-07-07T18:45:54.601162089</dc:date>
    <meta:editing-duration>P1DT7H31M4S</meta:editing-duration>
    <meta:editing-cycles>1006</meta:editing-cycles>
    <meta:generator>LibreOffice/25.2.3.2$Linux_X86_64 LibreOffice_project/520$Build-2</meta:generator>
    <meta:document-statistic meta:table-count="2" meta:cell-count="2359" meta:object-count="0"/>
  </office:meta>
</office:document-meta>
</file>