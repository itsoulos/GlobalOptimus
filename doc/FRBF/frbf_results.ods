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28" style:family="table-cell" style:parent-style-name="Default" style:data-style-name="N11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6" calcext:value-type="percentage">
            <text:p>12,7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149" calcext:value-type="percentage">
            <text:p>1,49%</text:p>
          </table:table-cell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2" table:style-name="ce3" office:value-type="percentage" office:value="0.0662" calcext:value-type="percentage">
            <text:p>6,62%</text:p>
          </table:table-cell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135" calcext:value-type="percentage">
            <text:p>1,35%</text:p>
          </table:table-cell>
          <table:table-cell table:style-name="ce3" office:value-type="percentage" office:value="0.0649" calcext:value-type="percentage">
            <text:p>6,49%</text:p>
          </table:table-cell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2" table:style-name="ce3" office:value-type="percentage" office:value="0.0635" calcext:value-type="percentage">
            <text:p>6,35%</text:p>
          </table:table-cell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064" calcext:value-type="percentage">
            <text:p>10,64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2" table:style-name="ce3"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553" calcext:value-type="percentage">
            <text:p>25,53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064" calcext:value-type="percentage">
            <text:p>10,64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0426" calcext:value-type="percentage">
            <text:p>20,43%</text:p>
          </table:table-cell>
          <table:table-cell table:style-name="ce1" table:formula="of:=AVERAGE([.C2:.C11])" office:value-type="percentage" office:value="0.20211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5054" calcext:value-type="percentage">
            <text:p>5,05%</text:p>
          </table:table-cell>
          <table:table-cell table:style-name="ce1" table:formula="of:=AVERAGE([.G2:.G11])" office:value-type="percentage" office:value="0.05568" calcext:value-type="percentage">
            <text:p>5,57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296" calcext:value-type="percentage">
            <text:p>22,96%</text:p>
          </table:table-cell>
          <table:table-cell table:style-name="ce3" office:value-type="percentage" office:value="0.1963" calcext:value-type="percentage">
            <text:p>19,63%</text:p>
          </table:table-cell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852" calcext:value-type="percentage">
            <text:p>18,52%</text:p>
          </table:table-cell>
          <table:table-cell table:style-name="ce3" office:value-type="percentage" office:value="0.1704" calcext:value-type="percentage">
            <text:p>17,04%</text:p>
          </table:table-cell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44" calcext:value-type="percentage">
            <text:p>14,44%</text:p>
          </table:table-cell>
          <table:table-cell/>
          <table:table-cell office:value-type="string" calcext:value-type="string">
            <text:p>Statheart_3</text:p>
          </table:table-cell>
          <table:table-cell table:number-columns-repeated="2" table:style-name="ce3" office:value-type="percentage" office:value="0.2296" calcext:value-type="percentage">
            <text:p>22,96%</text:p>
          </table:table-cell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4</text:p>
          </table:table-cell>
          <table:table-cell table:style-name="ce3" office:value-type="percentage" office:value="0.2926" calcext:value-type="percentage">
            <text:p>29,26%</text:p>
          </table:table-cell>
          <table:table-cell table:style-name="ce3" office:value-type="percentage" office:value="0.2963" calcext:value-type="percentage">
            <text:p>29,63%</text:p>
          </table:table-cell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2"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778" calcext:value-type="percentage">
            <text:p>27,78%</text:p>
          </table:table-cell>
          <table:table-cell table:style-name="ce3" office:value-type="percentage" office:value="0.263" calcext:value-type="percentage">
            <text:p>26,30%</text:p>
          </table:table-cell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337" calcext:value-type="percentage">
            <text:p>33,70%</text:p>
          </table:table-cell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2185" calcext:value-type="percentage">
            <text:p>21,85%</text:p>
          </table:table-cell>
          <table:table-cell table:style-name="ce3" office:value-type="percentage" office:value="0.2148" calcext:value-type="percentage">
            <text:p>21,48%</text:p>
          </table:table-cell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8</text:p>
          </table:table-cell>
          <table:table-cell table:number-columns-repeated="2" table:style-name="ce3" office:value-type="percentage" office:value="0.2593" calcext:value-type="percentage">
            <text:p>25,93%</text:p>
          </table:table-cell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259" calcext:value-type="percentage">
            <text:p>12,59%</text:p>
          </table:table-cell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463" calcext:value-type="percentage">
            <text:p>14,63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15593" calcext:value-type="percentage">
            <text:p>15,59%</text:p>
          </table:table-cell>
          <table:table-cell table:style-name="ce1" table:formula="of:=AVERAGE([.C14:.C23])" office:value-type="percentage" office:value="0.15815" calcext:value-type="percentage">
            <text:p>15,82%</text:p>
          </table:table-cell>
          <table:table-cell/>
          <table:table-cell table:style-name="ce1"/>
          <table:table-cell table:style-name="ce1" table:formula="of:=AVERAGE([.F14:.F23])" office:value-type="percentage" office:value="0.23889" calcext:value-type="percentage">
            <text:p>23,89%</text:p>
          </table:table-cell>
          <table:table-cell table:style-name="ce1" table:formula="of:=AVERAGE([.G14:.G23])" office:value-type="percentage" office:value="0.23259" calcext:value-type="percentage">
            <text:p>23,2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4357" calcext:value-type="percentage">
            <text:p>43,57%</text:p>
          </table:table-cell>
          <table:table-cell table:style-name="ce3"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2143" calcext:value-type="percentage">
            <text:p>21,43%</text:p>
          </table:table-cell>
          <table:table-cell table:style-name="ce3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string" calcext:value-type="string">
            <text:p>x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/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/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3571" calcext:value-type="percentage">
            <text:p>35,71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/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/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786" calcext:value-type="percentage">
            <text:p>17,86%</text:p>
          </table:table-cell>
          <table:table-cell table:style-name="ce3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/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1786" calcext:value-type="percentage">
            <text:p>17,86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/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/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714" calcext:value-type="percentage">
            <text:p>27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:.B35])" office:value-type="percentage" office:value="0.55245" calcext:value-type="percentage">
            <text:p>55,25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4572" calcext:value-type="percentage">
            <text:p>24,57%</text:p>
          </table:table-cell>
          <table:table-cell table:style-name="ce1" table:formula="of:=AVERAGE([.G26:.G35])" office:value-type="percentage" office:value="0.23357" calcext:value-type="percentage">
            <text:p>23,3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1042" calcext:value-type="percentage">
            <text:p>10,42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22" calcext:value-type="percentage">
            <text:p>10,22%</text:p>
          </table:table-cell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table:number-columns-repeated="2"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43" calcext:value-type="percentage">
            <text:p>10,43%</text:p>
          </table:table-cell>
          <table:table-cell table:style-name="ce3" office:value-type="percentage" office:value="0.1065" calcext:value-type="percentage">
            <text:p>10,65%</text:p>
          </table:table-cell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98" calcext:value-type="percentage">
            <text:p>8,98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2"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859" calcext:value-type="percentage">
            <text:p>8,59%</text:p>
          </table:table-cell>
          <table:table-cell office:value-type="percentage" office:value="0.0896" calcext:value-type="percentage">
            <text:p>8,96%</text:p>
          </table:table-cell>
          <table:table-cell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2" office:value-type="percentage" office:value="0.0932" calcext:value-type="percentage">
            <text:p>9,32%</text:p>
          </table:table-cell>
          <table:table-cell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09469" calcext:value-type="percentage">
            <text:p>9,47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54" calcext:value-type="percentage">
            <text:p>10,54%</text:p>
          </table:table-cell>
          <table:table-cell table:style-name="ce1" table:formula="of:=AVERAGE([.G38:.G47])" office:value-type="percentage" office:value="0.10435" calcext:value-type="percentage">
            <text:p>10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3333" calcext:value-type="percentage">
            <text:p>33,33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101" calcext:value-type="percentage">
            <text:p>11,01%</text:p>
          </table:table-cell>
          <table:table-cell table:style-name="ce3" office:value-type="percentage" office:value="0.1217" calcext:value-type="percentage">
            <text:p>12,17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928" calcext:value-type="percentage">
            <text:p>19,28%</text:p>
          </table:table-cell>
          <table:table-cell table:style-name="ce3" office:value-type="percentage" office:value="0.2072" calcext:value-type="percentage">
            <text:p>20,72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841" calcext:value-type="percentage">
            <text:p>18,41%</text:p>
          </table:table-cell>
          <table:table-cell table:style-name="ce3" office:value-type="percentage" office:value="0.1942" calcext:value-type="percentage">
            <text:p>19,42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246" calcext:value-type="percentage">
            <text:p>12,46%</text:p>
          </table:table-cell>
          <table:table-cell table:style-name="ce3" office:value-type="percentage" office:value="0.1348" calcext:value-type="percentage">
            <text:p>13,48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783" calcext:value-type="percentage">
            <text:p>17,83%</text:p>
          </table:table-cell>
          <table:table-cell table:style-name="ce3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928" calcext:value-type="percentage">
            <text:p>29,28%</text:p>
          </table:table-cell>
          <table:table-cell table:style-name="ce3" office:value-type="percentage" office:value="0.2884" calcext:value-type="percentage">
            <text:p>28,84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362" calcext:value-type="percentage">
            <text:p>13,62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812" calcext:value-type="percentage">
            <text:p>18,1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0:.B59])" office:value-type="percentage" office:value="0.178" calcext:value-type="percentage">
            <text:p>17,80%</text:p>
          </table:table-cell>
          <table:table-cell table:style-name="ce1" table:formula="of:=AVERAGE([.C50:.C59])" office:value-type="percentage" office:value="0.185" calcext:value-type="percentage">
            <text:p>18,50%</text:p>
          </table:table-cell>
          <table:table-cell/>
          <table:table-cell table:style-name="ce1"/>
          <table:table-cell table:style-name="ce1" table:formula="of:=AVERAGE([.F50:.F59])" office:value-type="percentage" office:value="0.18899" calcext:value-type="percentage">
            <text:p>18,90%</text:p>
          </table:table-cell>
          <table:table-cell table:style-name="ce1" table:formula="of:=AVERAGE([.G50:.G59])" office:value-type="percentage" office:value="0.20129" calcext:value-type="percentage">
            <text:p>20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444" calcext:value-type="percentage">
            <text:p>34,44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3417" calcext:value-type="percentage">
            <text:p>34,17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65" calcext:value-type="percentage">
            <text:p>6,5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3" calcext:value-type="percentage">
            <text:p>5,3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583" calcext:value-type="percentage">
            <text:p>15,83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9" calcext:value-type="percentage">
            <text:p>7,9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2:.B71])" office:value-type="percentage" office:value="0.36277" calcext:value-type="percentage">
            <text:p>36,28%</text:p>
          </table:table-cell>
          <table:table-cell table:style-name="ce1" table:formula="of:=AVERAGE([.C62:.C71])" office:value-type="percentage" office:value="0.34138" calcext:value-type="percentage">
            <text:p>34,14%</text:p>
          </table:table-cell>
          <table:table-cell/>
          <table:table-cell table:style-name="ce1"/>
          <table:table-cell table:style-name="ce1" table:formula="of:=AVERAGE([.F62:.F71])" office:value-type="percentage" office:value="0.05042" calcext:value-type="percentage">
            <text:p>5,04%</text:p>
          </table:table-cell>
          <table:table-cell table:style-name="ce1" table:formula="of:=AVERAGE([.G62:.G71])" office:value-type="percentage" office:value="0.0376" calcext:value-type="percentage">
            <text:p>3,7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379" calcext:value-type="percentage">
            <text:p>63,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43" calcext:value-type="percentage">
            <text:p>37,43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2"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229" calcext:value-type="percentage">
            <text:p>42,29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4057" calcext:value-type="percentage">
            <text:p>40,57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314" calcext:value-type="percentage">
            <text:p>53,14%</text:p>
          </table:table-cell>
          <table:table-cell office:value-type="percentage" office:value="0.4571" calcext:value-type="percentage">
            <text:p>45,71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86" calcext:value-type="percentage">
            <text:p>35,86%</text:p>
          </table:table-cell>
          <table:table-cell office:value-type="percentage" office:value="0.3621" calcext:value-type="percentage">
            <text:p>36,21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257" calcext:value-type="percentage">
            <text:p>32,57%</text:p>
          </table:table-cell>
          <table:table-cell office:value-type="percentage" office:value="0.36" calcext:value-type="percentage">
            <text:p>36,00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543" calcext:value-type="percentage">
            <text:p>35,43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724" calcext:value-type="percentage">
            <text:p>47,24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029" calcext:value-type="percentage">
            <text:p>40,29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143" calcext:value-type="percentage">
            <text:p>41,43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10</text:p>
          </table:table-cell>
          <table:table-cell table:number-columns-repeated="2" office:value-type="percentage" office:value="0.3314" calcext:value-type="percentage">
            <text:p>33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5:.B84])" office:value-type="percentage" office:value="0.50138" calcext:value-type="percentage">
            <text:p>50,14%</text:p>
          </table:table-cell>
          <table:table-cell table:style-name="ce1" table:formula="of:=AVERAGE([.C75:.C84])" office:value-type="percentage" office:value="0.50277" calcext:value-type="percentage">
            <text:p>50,28%</text:p>
          </table:table-cell>
          <table:table-cell/>
          <table:table-cell table:style-name="ce1"/>
          <table:table-cell table:style-name="ce1" table:formula="of:=AVERAGE([.F75:.F84])" office:value-type="percentage" office:value="0.398" calcext:value-type="percentage">
            <text:p>39,80%</text:p>
          </table:table-cell>
          <table:table-cell table:style-name="ce1" table:formula="of:=AVERAGE([.G75:.G84])" office:value-type="percentage" office:value="0.38258" calcext:value-type="percentage">
            <text:p>38,2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5121" calcext:value-type="percentage">
            <text:p>51,21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4" calcext:value-type="percentage">
            <text:p>24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697" calcext:value-type="percentage">
            <text:p>66,9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1" calcext:value-type="percentage">
            <text:p>31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18" calcext:value-type="percentage">
            <text:p>58,18%</text:p>
          </table:table-cell>
          <table:table-cell office:value-type="percentage" office:value="0.6242" calcext:value-type="percentage">
            <text:p>62,42%</text:p>
          </table:table-cell>
          <table:table-cell/>
          <table:table-cell office:value-type="string" calcext:value-type="string">
            <text:p>Fert_4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table:number-columns-repeated="2" office:value-type="percentage" office:value="0.5545" calcext:value-type="percentage">
            <text:p>55,45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636" calcext:value-type="percentage">
            <text:p>66,36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5879" calcext:value-type="percentage">
            <text:p>58,79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10</text:p>
          </table:table-cell>
          <table:table-cell table:number-columns-repeated="2"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88:.B97])" office:value-type="percentage" office:value="0.58362" calcext:value-type="percentage">
            <text:p>58,36%</text:p>
          </table:table-cell>
          <table:table-cell table:style-name="ce1" table:formula="of:=AVERAGE([.C88:.C97])" office:value-type="percentage" office:value="0.59605" calcext:value-type="percentage">
            <text:p>59,61%</text:p>
          </table:table-cell>
          <table:table-cell/>
          <table:table-cell table:style-name="ce1"/>
          <table:table-cell table:style-name="ce1" table:formula="of:=AVERAGE([.F88:.F97])" office:value-type="percentage" office:value="0.214" calcext:value-type="percentage">
            <text:p>21,40%</text:p>
          </table:table-cell>
          <table:table-cell table:style-name="ce1" table:formula="of:=AVERAGE([.G88:.G97])" office:value-type="percentage" office:value="0.217" calcext:value-type="percentage">
            <text:p>21,7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758" calcext:value-type="percentage">
            <text:p>17,5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565" calcext:value-type="percentage">
            <text:p>15,65%</text:p>
          </table:table-cell>
          <table:table-cell/>
          <table:table-cell office:value-type="string" calcext:value-type="string">
            <text:p>Glass_2</text:p>
          </table:table-cell>
          <table:table-cell table:number-columns-repeated="2" office:value-type="percentage" office:value="0.7476" calcext:value-type="percentage">
            <text:p>74,76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306" calcext:value-type="percentage">
            <text:p>23,06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23" calcext:value-type="percentage">
            <text:p>13,23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823" calcext:value-type="percentage">
            <text:p>18,2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77" calcext:value-type="percentage">
            <text:p>21,77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381" calcext:value-type="percentage">
            <text:p>53,81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3667" calcext:value-type="percentage">
            <text:p>36,67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306" calcext:value-type="percentage">
            <text:p>23,06%</text:p>
          </table:table-cell>
          <table:table-cell office:value-type="percentage" office:value="0.2468" calcext:value-type="percentage">
            <text:p>24,68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1:.B110])" office:value-type="percentage" office:value="0.175" calcext:value-type="percentage">
            <text:p>17,50%</text:p>
          </table:table-cell>
          <table:table-cell table:style-name="ce1" table:formula="of:=AVERAGE([.C101:.C110])" office:value-type="percentage" office:value="0.18274" calcext:value-type="percentage">
            <text:p>18,27%</text:p>
          </table:table-cell>
          <table:table-cell/>
          <table:table-cell table:style-name="ce1"/>
          <table:table-cell table:style-name="ce1" table:formula="of:=AVERAGE([.F101:.F110])" office:value-type="percentage" office:value="0.56761" calcext:value-type="percentage">
            <text:p>56,76%</text:p>
          </table:table-cell>
          <table:table-cell table:style-name="ce1" table:formula="of:=AVERAGE([.G101:.G110])" office:value-type="percentage" office:value="0.51286" calcext:value-type="percentage">
            <text:p>51,29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077" calcext:value-type="percentage">
            <text:p>50,77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615" calcext:value-type="percentage">
            <text:p>46,1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4:.B123])" office:value-type="percentage" office:value="0.27367" calcext:value-type="percentage">
            <text:p>27,37%</text:p>
          </table:table-cell>
          <table:table-cell table:style-name="ce1" table:formula="of:=AVERAGE([.C114:.C123])" office:value-type="percentage" office:value="0.27132" calcext:value-type="percentage">
            <text:p>27,13%</text:p>
          </table:table-cell>
          <table:table-cell/>
          <table:table-cell table:style-name="ce1"/>
          <table:table-cell table:style-name="ce1" table:formula="of:=AVERAGE([.F114:.F123])" office:value-type="percentage" office:value="0.40077" calcext:value-type="percentage">
            <text:p>40,08%</text:p>
          </table:table-cell>
          <table:table-cell table:style-name="ce1" table:formula="of:=AVERAGE([.G114:.G123])" office:value-type="percentage" office:value="0.37306" calcext:value-type="percentage">
            <text:p>37,3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44" calcext:value-type="percentage">
            <text:p>24,44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33" calcext:value-type="percentage">
            <text:p>26,33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3" calcext:value-type="percentage">
            <text:p>6,33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67" calcext:value-type="percentage">
            <text:p>12,67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81" calcext:value-type="percentage">
            <text:p>24,81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7" calcext:value-type="percentage">
            <text:p>13,7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037" calcext:value-type="percentage">
            <text:p>30,37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27:.B136])" office:value-type="percentage" office:value="0.21999" calcext:value-type="percentage">
            <text:p>22,00%</text:p>
          </table:table-cell>
          <table:table-cell table:style-name="ce1" table:formula="of:=AVERAGE([.C127:.C136])" office:value-type="percentage" office:value="0.20851" calcext:value-type="percentage">
            <text:p>20,85%</text:p>
          </table:table-cell>
          <table:table-cell/>
          <table:table-cell table:style-name="ce1"/>
          <table:table-cell table:style-name="ce1" table:formula="of:=AVERAGE([.F127:.F136])" office:value-type="percentage" office:value="0.19133" calcext:value-type="percentage">
            <text:p>19,13%</text:p>
          </table:table-cell>
          <table:table-cell table:style-name="ce1" table:formula="of:=AVERAGE([.G127:.G136])" office:value-type="percentage" office:value="0.19167" calcext:value-type="percentage">
            <text:p>19,17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867" calcext:value-type="percentage">
            <text:p>68,6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Zoo_9</text:p>
          </table:table-cell>
          <table:table-cell table:number-columns-repeated="2"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0:.B149])" office:value-type="percentage" office:value="0.54533" calcext:value-type="percentage">
            <text:p>54,53%</text:p>
          </table:table-cell>
          <table:table-cell table:style-name="ce1" table:formula="of:=AVERAGE([.C140:.C149])" office:value-type="percentage" office:value="0.512" calcext:value-type="percentage">
            <text:p>51,20%</text:p>
          </table:table-cell>
          <table:table-cell/>
          <table:table-cell table:style-name="ce1"/>
          <table:table-cell table:style-name="ce1" table:formula="of:=AVERAGE([.F140:.F149])" office:value-type="percentage" office:value="0.106" calcext:value-type="percentage">
            <text:p>10,60%</text:p>
          </table:table-cell>
          <table:table-cell table:style-name="ce1" table:formula="of:=AVERAGE([.G140:.G149])" office:value-type="percentage" office:value="0.095" calcext:value-type="percentage">
            <text:p>9,5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657" calcext:value-type="percentage">
            <text:p>16,57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514" calcext:value-type="percentage">
            <text:p>15,14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543" calcext:value-type="percentage">
            <text:p>15,43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3:.B162])" office:value-type="percentage" office:value="0.0461" calcext:value-type="percentage">
            <text:p>4,61%</text:p>
          </table:table-cell>
          <table:table-cell table:style-name="ce1" table:formula="of:=AVERAGE([.C153:.C162])" office:value-type="percentage" office:value="0.05001" calcext:value-type="percentage">
            <text:p>5,00%</text:p>
          </table:table-cell>
          <table:table-cell/>
          <table:table-cell table:style-name="ce1"/>
          <table:table-cell table:style-name="ce1" table:formula="of:=AVERAGE([.F153:.F162])" office:value-type="percentage" office:value="0.12829" calcext:value-type="percentage">
            <text:p>12,83%</text:p>
          </table:table-cell>
          <table:table-cell table:style-name="ce1" table:formula="of:=AVERAGE([.G153:.G162])" office:value-type="percentage" office:value="0.12428" calcext:value-type="percentage">
            <text:p>12,43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2133" calcext:value-type="percentage">
            <text:p>21,33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217" calcext:value-type="percentage">
            <text:p>22,17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382" calcext:value-type="percentage">
            <text:p>43,82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059" calcext:value-type="percentage">
            <text:p>30,5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289" calcext:value-type="percentage">
            <text:p>12,89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1912" calcext:value-type="percentage">
            <text:p>19,1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554" calcext:value-type="percentage">
            <text:p>15,54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71" calcext:value-type="percentage">
            <text:p>34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1928" calcext:value-type="percentage">
            <text:p>19,28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65" calcext:value-type="percentage">
            <text:p>22,6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651" calcext:value-type="percentage">
            <text:p>16,51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94" calcext:value-type="percentage">
            <text:p>32,94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349" calcext:value-type="percentage">
            <text:p>13,4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66:.B175])" office:value-type="percentage" office:value="0.30412" calcext:value-type="percentage">
            <text:p>30,41%</text:p>
          </table:table-cell>
          <table:table-cell table:style-name="ce1" table:formula="of:=AVERAGE([.C166:.C175])" office:value-type="percentage" office:value="0.29559" calcext:value-type="percentage">
            <text:p>29,56%</text:p>
          </table:table-cell>
          <table:table-cell/>
          <table:table-cell table:style-name="ce1"/>
          <table:table-cell table:style-name="ce1" table:formula="of:=AVERAGE([.F166:.F175])" office:value-type="percentage" office:value="0.17723" calcext:value-type="percentage">
            <text:p>17,72%</text:p>
          </table:table-cell>
          <table:table-cell table:style-name="ce1" table:formula="of:=AVERAGE([.G166:.G175])" office:value-type="percentage" office:value="0.17796" calcext:value-type="percentage">
            <text:p>17,8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132" calcext:value-type="percentage">
            <text:p>21,32%</text:p>
          </table:table-cell>
          <table:table-cell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645" calcext:value-type="percentage">
            <text:p>26,45%</text:p>
          </table:table-cell>
          <table:table-cell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947" calcext:value-type="percentage">
            <text:p>29,47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671" calcext:value-type="percentage">
            <text:p>26,71%</text:p>
          </table:table-cell>
          <table:table-cell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61" calcext:value-type="percentage">
            <text:p>19,61%</text:p>
          </table:table-cell>
          <table:table-cell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74" calcext:value-type="percentage">
            <text:p>24,74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26" calcext:value-type="percentage">
            <text:p>15,26%</text:p>
          </table:table-cell>
          <table:table-cell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658" calcext:value-type="percentage">
            <text:p>26,58%</text:p>
          </table:table-cell>
          <table:table-cell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7</text:p>
          </table:table-cell>
          <table:table-cell table:number-columns-repeated="2" office:value-type="percentage" office:value="0.2184" calcext:value-type="percentage">
            <text:p>21,84%</text:p>
          </table:table-cell>
          <table:table-cell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724" calcext:value-type="percentage">
            <text:p>27,24%</text:p>
          </table:table-cell>
          <table:table-cell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75" calcext:value-type="percentage">
            <text:p>27,50%</text:p>
          </table:table-cell>
          <table:table-cell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461" calcext:value-type="percentage">
            <text:p>24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9:.B188])" office:value-type="percentage" office:value="0.15525" calcext:value-type="percentage">
            <text:p>15,53%</text:p>
          </table:table-cell>
          <table:table-cell table:style-name="ce1" table:formula="of:=AVERAGE([.C179:.C188])" office:value-type="percentage" office:value="0.15367" calcext:value-type="percentage">
            <text:p>15,37%</text:p>
          </table:table-cell>
          <table:table-cell/>
          <table:table-cell table:style-name="ce1"/>
          <table:table-cell table:style-name="ce1" table:formula="of:=AVERAGE([.F179:.F188])" office:value-type="percentage" office:value="0.23593" calcext:value-type="percentage">
            <text:p>23,59%</text:p>
          </table:table-cell>
          <table:table-cell table:style-name="ce1" table:formula="of:=AVERAGE([.G179:.G188])" office:value-type="percentage" office:value="0.23712" calcext:value-type="percentage">
            <text:p>23,7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291" calcext:value-type="percentage">
            <text:p>2,91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065" calcext:value-type="percentage">
            <text:p>30,65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6" calcext:value-type="percentage">
            <text:p>32,2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2:.B201])" office:value-type="percentage" office:value="0.05612" calcext:value-type="percentage">
            <text:p>5,61%</text:p>
          </table:table-cell>
          <table:table-cell table:style-name="ce1" table:formula="of:=AVERAGE([.C192:.C201])" office:value-type="percentage" office:value="0.0563" calcext:value-type="percentage">
            <text:p>5,63%</text:p>
          </table:table-cell>
          <table:table-cell/>
          <table:table-cell table:style-name="ce1"/>
          <table:table-cell table:style-name="ce1" table:formula="of:=AVERAGE([.F192:.F201])" office:value-type="percentage" office:value="0.25708" calcext:value-type="percentage">
            <text:p>25,71%</text:p>
          </table:table-cell>
          <table:table-cell table:style-name="ce1" table:formula="of:=AVERAGE([.G192:.G201])" office:value-type="percentage" office:value="0.25645" calcext:value-type="percentage">
            <text:p>25,65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109" calcext:value-type="percentage">
            <text:p>21,09%</text:p>
          </table:table-cell>
          <table:table-cell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117" calcext:value-type="percentage">
            <text:p>31,17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463" calcext:value-type="percentage">
            <text:p>34,63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3203" calcext:value-type="percentage">
            <text:p>32,03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5" calcext:value-type="percentage">
            <text:p>35,50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304" calcext:value-type="percentage">
            <text:p>23,04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377" calcext:value-type="percentage">
            <text:p>33,77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2857" calcext:value-type="percentage">
            <text:p>28,57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636" calcext:value-type="percentage">
            <text:p>36,36%</text:p>
          </table:table-cell>
          <table:table-cell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2"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29" calcext:value-type="percentage">
            <text:p>32,90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543" calcext:value-type="percentage">
            <text:p>25,4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5:.B214])" office:value-type="percentage" office:value="0.28892" calcext:value-type="percentage">
            <text:p>28,89%</text:p>
          </table:table-cell>
          <table:table-cell table:style-name="ce1" table:formula="of:=AVERAGE([.C205:.C214])" office:value-type="percentage" office:value="0.28781" calcext:value-type="percentage">
            <text:p>28,78%</text:p>
          </table:table-cell>
          <table:table-cell/>
          <table:table-cell table:style-name="ce1"/>
          <table:table-cell table:style-name="ce1" table:formula="of:=AVERAGE([.F205:.F214])" office:value-type="percentage" office:value="0.32467" calcext:value-type="percentage">
            <text:p>32,47%</text:p>
          </table:table-cell>
          <table:table-cell table:style-name="ce1" table:formula="of:=AVERAGE([.G205:.G214])" office:value-type="percentage" office:value="0.33333" calcext:value-type="percentage">
            <text:p>33,3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1</text:p>
          </table:table-cell>
          <table:table-cell table:number-columns-repeated="2" table:style-name="ce9" office:value-type="percentage" office:value="0.38" calcext:value-type="percentage">
            <text:p>38,00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2</text:p>
          </table:table-cell>
          <table:table-cell table:style-name="ce9" office:value-type="percentage" office:value="0.391" calcext:value-type="percentage">
            <text:p>39,10%</text:p>
          </table:table-cell>
          <table:table-cell table:style-name="ce9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3</text:p>
          </table:table-cell>
          <table:table-cell table:style-name="ce9" office:value-type="percentage" office:value="0.4055" calcext:value-type="percentage">
            <text:p>40,55%</text:p>
          </table:table-cell>
          <table:table-cell table:style-name="ce9" office:value-type="percentage" office:value="0.405" calcext:value-type="percentage">
            <text:p>40,50%</text:p>
          </table:table-cell>
          <table:table-cell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4</text:p>
          </table:table-cell>
          <table:table-cell table:style-name="ce9" office:value-type="percentage" office:value="0.4405" calcext:value-type="percentage">
            <text:p>44,05%</text:p>
          </table:table-cell>
          <table:table-cell table:style-name="ce9" office:value-type="percentage" office:value="0.4445" calcext:value-type="percentage">
            <text:p>44,45%</text:p>
          </table:table-cell>
          <table:table-cell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35" calcext:value-type="percentage">
            <text:p>13,50%</text:p>
          </table:table-cell>
          <table:table-cell/>
          <table:table-cell office:value-type="string" calcext:value-type="string">
            <text:p>Spiral_5</text:p>
          </table:table-cell>
          <table:table-cell table:style-name="ce9" office:value-type="percentage" office:value="0.4305" calcext:value-type="percentage">
            <text:p>43,05%</text:p>
          </table:table-cell>
          <table:table-cell table:style-name="ce9" office:value-type="percentage" office:value="0.451" calcext:value-type="percentage">
            <text:p>45,10%</text:p>
          </table:table-cell>
          <table:table-cell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2" table:style-name="ce9" office:value-type="percentage" office:value="0.41" calcext:value-type="percentage">
            <text:p>41,00%</text:p>
          </table:table-cell>
          <table:table-cell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2"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table:style-name="ce9" office:value-type="percentage" office:value="0.399" calcext:value-type="percentage">
            <text:p>39,90%</text:p>
          </table:table-cell>
          <table:table-cell table:style-name="ce9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8</text:p>
          </table:table-cell>
          <table:table-cell table:style-name="ce9" office:value-type="percentage" office:value="0.3915" calcext:value-type="percentage">
            <text:p>39,15%</text:p>
          </table:table-cell>
          <table:table-cell table:style-name="ce9" office:value-type="percentage" office:value="0.3875" calcext:value-type="percentage">
            <text:p>38,75%</text:p>
          </table:table-cell>
          <table:table-cell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9</text:p>
          </table:table-cell>
          <table:table-cell table:style-name="ce9" office:value-type="percentage" office:value="0.422" calcext:value-type="percentage">
            <text:p>42,20%</text:p>
          </table:table-cell>
          <table:table-cell table:style-name="ce9" office:value-type="percentage" office:value="0.4255" calcext:value-type="percentage">
            <text:p>42,55%</text:p>
          </table:table-cell>
          <table:table-cell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10</text:p>
          </table:table-cell>
          <table:table-cell table:style-name="ce9" office:value-type="percentage" office:value="0.4325" calcext:value-type="percentage">
            <text:p>43,25%</text:p>
          </table:table-cell>
          <table:table-cell table:style-name="ce9" office:value-type="percentage" office:value="0.435" calcext:value-type="percentage">
            <text:p>43,5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17:.B226])" office:value-type="percentage" office:value="0.24" calcext:value-type="percentage">
            <text:p>24,00%</text:p>
          </table:table-cell>
          <table:table-cell table:style-name="ce1" table:formula="of:=AVERAGE([.C217:.C226])" office:value-type="percentage" office:value="0.2205" calcext:value-type="percentage">
            <text:p>22,05%</text:p>
          </table:table-cell>
          <table:table-cell/>
          <table:table-cell table:style-name="ce1"/>
          <table:table-cell table:style-name="ce1" table:formula="of:=AVERAGE([.F217:.F226])" office:value-type="percentage" office:value="0.41025" calcext:value-type="percentage">
            <text:p>41,03%</text:p>
          </table:table-cell>
          <table:table-cell table:style-name="ce1" table:formula="of:=AVERAGE([.G217:.G226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0325" calcext:value-type="percentage">
            <text:p>3,25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392" calcext:value-type="percentage">
            <text:p>23,92%</text:p>
          </table:table-cell>
          <table:table-cell table:style-name="ce9" office:value-type="percentage" office:value="0.227" calcext:value-type="percentage">
            <text:p>22,70%</text:p>
          </table:table-cell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649" calcext:value-type="percentage">
            <text:p>26,49%</text:p>
          </table:table-cell>
          <table:table-cell table:style-name="ce9" office:value-type="percentage" office:value="0.2459" calcext:value-type="percentage">
            <text:p>24,59%</text:p>
          </table:table-cell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676" calcext:value-type="percentage">
            <text:p>26,76%</text:p>
          </table:table-cell>
          <table:table-cell table:style-name="ce9" office:value-type="percentage" office:value="0.2514" calcext:value-type="percentage">
            <text:p>25,14%</text:p>
          </table:table-cell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office:value-type="percentage" office:value="0.2905" calcext:value-type="percentage">
            <text:p>29,05%</text:p>
          </table:table-cell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784" calcext:value-type="percentage">
            <text:p>27,84%</text:p>
          </table:table-cell>
          <table:table-cell table:style-name="ce9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122" calcext:value-type="percentage">
            <text:p>21,22%</text:p>
          </table:table-cell>
          <table:table-cell table:style-name="ce9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15" calcext:value-type="percentage">
            <text:p>1,50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311" calcext:value-type="percentage">
            <text:p>23,11%</text:p>
          </table:table-cell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125" calcext:value-type="percentage">
            <text:p>1,25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1959" calcext:value-type="percentage">
            <text:p>19,59%</text:p>
          </table:table-cell>
          <table:table-cell table:style-name="ce9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12425" calcext:value-type="percentage">
            <text:p>12,43%</text:p>
          </table:table-cell>
          <table:table-cell table:style-name="ce1" table:formula="of:=AVERAGE([.C230:.C239])" office:value-type="percentage" office:value="0.0425" calcext:value-type="percentage">
            <text:p>4,25%</text:p>
          </table:table-cell>
          <table:table-cell/>
          <table:table-cell table:style-name="ce1"/>
          <table:table-cell table:style-name="ce1" table:formula="of:=AVERAGE([.F230:.F239])" office:value-type="percentage" office:value="0.2523" calcext:value-type="percentage">
            <text:p>25,23%</text:p>
          </table:table-cell>
          <table:table-cell table:style-name="ce1" table:formula="of:=AVERAGE([.G230:.G239])" office:value-type="percentage" office:value="0.24648" calcext:value-type="percentage">
            <text:p>24,65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35" calcext:value-type="percentage">
            <text:p>12,35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Wine_3</text:p>
          </table:table-cell>
          <table:table-cell table:number-columns-repeated="2" office:value-type="percentage" office:value="0.1706" calcext:value-type="percentage">
            <text:p>17,06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5" calcext:value-type="percentage">
            <text:p>2,35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5</text:p>
          </table:table-cell>
          <table:table-cell table:number-columns-repeated="2" office:value-type="percentage" office:value="0.1588" calcext:value-type="percentage">
            <text:p>15,88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353" calcext:value-type="percentage">
            <text:p>3,53%</text:p>
          </table:table-cell>
          <table:table-cell/>
        </table:table-row>
        <table:table-row table:style-name="ro2">
          <table:table-cell office:value-type="string" calcext:value-type="string">
            <text:p>Wdbc_8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2:.B251])" office:value-type="percentage" office:value="0.04194" calcext:value-type="percentage">
            <text:p>4,19%</text:p>
          </table:table-cell>
          <table:table-cell table:style-name="ce1" table:formula="of:=AVERAGE([.C242:.C251])" office:value-type="percentage" office:value="0.04374" calcext:value-type="percentage">
            <text:p>4,37%</text:p>
          </table:table-cell>
          <table:table-cell/>
          <table:table-cell table:style-name="ce1"/>
          <table:table-cell table:style-name="ce1" table:formula="of:=AVERAGE([.F242:.F251])" office:value-type="percentage" office:value="0.10588" calcext:value-type="percentage">
            <text:p>10,59%</text:p>
          </table:table-cell>
          <table:table-cell table:style-name="ce1" table:formula="of:=AVERAGE([.G242:.G251])" office:value-type="percentage" office:value="0.1041" calcext:value-type="percentage">
            <text:p>10,4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644" calcext:value-type="percentage">
            <text:p>64,40%</text:p>
          </table:table-cell>
          <table:table-cell office:value-type="percentage" office:value="0.734" calcext:value-type="percentage">
            <text:p>73,4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86" calcext:value-type="percentage">
            <text:p>68,6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32" calcext:value-type="percentage">
            <text:p>63,20%</text:p>
          </table:table-cell>
          <table:table-cell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644" calcext:value-type="percentage">
            <text:p>64,4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76" calcext:value-type="percentage">
            <text:p>76,0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66" calcext:value-type="percentage">
            <text:p>66,00%</text:p>
          </table:table-cell>
          <table:table-cell/>
        </table:table-row>
        <table:table-row table:style-name="ro2">
          <table:table-cell office:value-type="string" calcext:value-type="string">
            <text:p>z_f_s_9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84" calcext:value-type="percentage">
            <text:p>68,4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5:.B264])" office:value-type="percentage" office:value="0.04677" calcext:value-type="percentage">
            <text:p>4,68%</text:p>
          </table:table-cell>
          <table:table-cell table:style-name="ce1" table:formula="of:=AVERAGE([.C255:.C264])" office:value-type="percentage" office:value="0.05366" calcext:value-type="percentage">
            <text:p>5,37%</text:p>
          </table:table-cell>
          <table:table-cell/>
          <table:table-cell table:style-name="ce1"/>
          <table:table-cell table:style-name="ce1" table:formula="of:=AVERAGE([.F255:.F264])" office:value-type="percentage" office:value="0.6368" calcext:value-type="percentage">
            <text:p>63,68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/>
          <table:table-cell office:value-type="string" calcext:value-type="string">
            <text:p>zonf_s_2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4" calcext:value-type="percentage">
            <text:p>6,4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4" calcext:value-type="percentage">
            <text:p>12,4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2" calcext:value-type="percentage">
            <text:p>3,2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7:.B276])" office:value-type="percentage" office:value="0.0547" calcext:value-type="percentage">
            <text:p>5,47%</text:p>
          </table:table-cell>
          <table:table-cell table:style-name="ce1" table:formula="of:=AVERAGE([.C267:.C276])" office:value-type="percentage" office:value="0.0722" calcext:value-type="percentage">
            <text:p>7,22%</text:p>
          </table:table-cell>
          <table:table-cell/>
          <table:table-cell table:style-name="ce1"/>
          <table:table-cell table:style-name="ce1" table:formula="of:=AVERAGE([.F267:.F276])" office:value-type="percentage" office:value="0.0182" calcext:value-type="percentage">
            <text:p>1,82%</text:p>
          </table:table-cell>
          <table:table-cell table:style-name="ce1" table:formula="of:=AVERAGE([.G267:.G276])" office:value-type="percentage" office:value="0.023" calcext:value-type="percentage">
            <text:p>2,3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percentage" office:value="0.3297" calcext:value-type="percentage">
            <text:p>32,97%</text:p>
          </table:table-cell>
          <table:table-cell table:style-name="ce1" table:formula="of:=AVERAGE([.C279:.C288])" office:value-type="percentage" office:value="0.3468" calcext:value-type="percentage">
            <text:p>34,68%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297" calcext:value-type="float">
            <text:p>4,30E-01</text:p>
          </table:table-cell>
          <table:table-cell table:style-name="ce10" office:value-type="float" office:value="0.406" calcext:value-type="float">
            <text:p>4,06E-01</text:p>
          </table:table-cell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414" calcext:value-type="float">
            <text:p>0,414</text:p>
          </table:table-cell>
          <table:table-cell table:style-name="ce6" office:value-type="float" office:value="0.384" calcext:value-type="float">
            <text:p>0,384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67" calcext:value-type="float">
            <text:p>8,67E-01</text:p>
          </table:table-cell>
          <table:table-cell table:style-name="ce10" office:value-type="float" office:value="0.886" calcext:value-type="float">
            <text:p>8,86E-01</text:p>
          </table:table-cell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0.677" calcext:value-type="float">
            <text:p>0,677</text:p>
          </table:table-cell>
          <table:table-cell table:style-name="ce6" office:value-type="float" office:value="0.577" calcext:value-type="float">
            <text:p>0,57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office:value-type="float" office:value="0.227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59" calcext:value-type="float">
            <text:p>0,859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11" calcext:value-type="float">
            <text:p>1,11E-01</text:p>
          </table:table-cell>
          <table:table-cell table:style-name="ce10" office:value-type="float" office:value="0.128" calcext:value-type="float">
            <text:p>1,28E-01</text:p>
          </table:table-cell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539" calcext:value-type="float">
            <text:p>0,539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33" calcext:value-type="float">
            <text:p>6,33E-01</text:p>
          </table:table-cell>
          <table:table-cell table:style-name="ce10" office:value-type="float" office:value="0.598" calcext:value-type="float">
            <text:p>5,98E-01</text:p>
          </table:table-cell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223" calcext:value-type="float">
            <text:p>0,223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63" calcext:value-type="float">
            <text:p>1,63E-01</text:p>
          </table:table-cell>
          <table:table-cell table:style-name="ce10" office:value-type="float" office:value="0.0866" calcext:value-type="float">
            <text:p>8,66E-02</text:p>
          </table:table-cell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366" calcext:value-type="float">
            <text:p>0,366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1.029" calcext:value-type="float">
            <text:p>1,029</text:p>
          </table:table-cell>
          <table:table-cell table:style-name="ce6" office:value-type="float" office:value="0.641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682" calcext:value-type="float">
            <text:p>0,682</text:p>
          </table:table-cell>
          <table:table-cell table:style-name="ce6" office:value-type="float" office:value="0.466" calcext:value-type="float">
            <text:p>0,466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154" calcext:value-type="float">
            <text:p>1,54E-01</text:p>
          </table:table-cell>
          <table:table-cell table:style-name="ce10" office:value-type="float" office:value="0.256" calcext:value-type="float">
            <text:p>2,56E-01</text:p>
          </table:table-cell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43" calcext:value-type="float">
            <text:p>0,24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79" calcext:value-type="float">
            <text:p>1,79E-01</text:p>
          </table:table-cell>
          <table:table-cell table:style-name="ce10" office:value-type="float" office:value="0.192" calcext:value-type="float">
            <text:p>1,92E-01</text:p>
          </table:table-cell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147" calcext:value-type="float">
            <text:p>0,14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292:.B301])" office:value-type="float" office:value="0.48198" calcext:value-type="float">
            <text:p>0,48198</text:p>
          </table:table-cell>
          <table:table-cell table:style-name="ce7" table:formula="of:=AVERAGE([.C292:.C301])" office:value-type="float" office:value="0.4236" calcext:value-type="float">
            <text:p>0,4236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9467" calcext:value-type="float">
            <text:p>0,39467</text:p>
          </table:table-cell>
          <table:table-cell table:style-name="ce11" table:formula="of:=AVERAGE([.G292:.G301])" office:value-type="float" office:value="0.35676" calcext:value-type="float">
            <text:p>3,57E-01</text:p>
          </table:table-cell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99" calcext:value-type="float">
            <text:p>4,60E-01</text:p>
          </table:table-cell>
          <table:table-cell table:style-name="ce10" office:value-type="float" office:value="0.4492" calcext:value-type="float">
            <text:p>4,49E-01</text:p>
          </table:table-cell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 office:value-type="float" office:value="0.0601" calcext:value-type="float">
            <text:p>0,0601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516" calcext:value-type="float">
            <text:p>5,16E-02</text:p>
          </table:table-cell>
          <table:table-cell table:style-name="ce10" office:value-type="float" office:value="0.0673" calcext:value-type="float">
            <text:p>6,73E-02</text:p>
          </table:table-cell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 office:value-type="float" office:value="0.0528" calcext:value-type="float">
            <text:p>0,0528</text:p>
          </table:table-cell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9" calcext:value-type="float">
            <text:p>0,0869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" calcext:value-type="float">
            <text:p>4,70E-02</text:p>
          </table:table-cell>
          <table:table-cell table:style-name="ce10" office:value-type="float" office:value="0.037" calcext:value-type="float">
            <text:p>3,70E-02</text:p>
          </table:table-cell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452" calcext:value-type="float">
            <text:p>4,52E-02</text:p>
          </table:table-cell>
          <table:table-cell table:style-name="ce10" office:value-type="float" office:value="0.0233" calcext:value-type="float">
            <text:p>2,33E-02</text:p>
          </table:table-cell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36" calcext:value-type="float">
            <text:p>1,36E-01</text:p>
          </table:table-cell>
          <table:table-cell table:style-name="ce10" office:value-type="float" office:value="0.14" calcext:value-type="float">
            <text:p>1,40E-01</text:p>
          </table:table-cell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float" office:value="0.0275" calcext:value-type="float">
            <text:p>0,0275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09" calcext:value-type="float">
            <text:p>0,109</text:p>
          </table:table-cell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6" calcext:value-type="float">
            <text:p>0,0896</text:p>
          </table:table-cell>
          <table:table-cell table:style-name="ce6" office:value-type="float" office:value="0.0898" calcext:value-type="float">
            <text:p>0,0898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42" calcext:value-type="float">
            <text:p>2,42E-02</text:p>
          </table:table-cell>
          <table:table-cell table:style-name="ce10" office:value-type="float" office:value="0.0393" calcext:value-type="float">
            <text:p>3,93E-02</text:p>
          </table:table-cell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46" calcext:value-type="float">
            <text:p>0,0946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293" calcext:value-type="float">
            <text:p>2,93E-02</text:p>
          </table:table-cell>
          <table:table-cell table:style-name="ce10" office:value-type="float" office:value="0.0272" calcext:value-type="float">
            <text:p>2,72E-02</text:p>
          </table:table-cell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0514" calcext:value-type="float">
            <text:p>0,0514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0.0226" calcext:value-type="float">
            <text:p>0,022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04:.B313])" office:value-type="float" office:value="0.08165" calcext:value-type="float">
            <text:p>0,08165</text:p>
          </table:table-cell>
          <table:table-cell table:style-name="ce7" table:formula="of:=AVERAGE([.C304:.C313])" office:value-type="float" office:value="0.08166" calcext:value-type="float">
            <text:p>0,08166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366" calcext:value-type="float">
            <text:p>0,10366</text:p>
          </table:table-cell>
          <table:table-cell table:style-name="ce11" table:formula="of:=AVERAGE([.G304:.G313])" office:value-type="float" office:value="0.09677" calcext:value-type="float">
            <text:p>9,68E-02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269.082" calcext:value-type="float">
            <text:p>2269,082</text:p>
          </table:table-cell>
          <table:table-cell table:style-name="ce6" office:value-type="float" office:value="2052.171" calcext:value-type="float">
            <text:p>2052,171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206" calcext:value-type="float">
            <text:p>2,06E-03</text:p>
          </table:table-cell>
          <table:table-cell table:style-name="ce10" office:value-type="float" office:value="0.00119" calcext:value-type="float">
            <text:p>1,19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871.417" calcext:value-type="float">
            <text:p>2871,417</text:p>
          </table:table-cell>
          <table:table-cell table:style-name="ce6" office:value-type="float" office:value="2462.331" calcext:value-type="float">
            <text:p>2462,331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419" calcext:value-type="float">
            <text:p>4,19E-04</text:p>
          </table:table-cell>
          <table:table-cell table:style-name="ce10" office:value-type="float" office:value="0.000123" calcext:value-type="float">
            <text:p>1,23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3001.615" calcext:value-type="float">
            <text:p>3001,615</text:p>
          </table:table-cell>
          <table:table-cell table:style-name="ce6" office:value-type="float" office:value="2694.621" calcext:value-type="float">
            <text:p>2694,62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366" calcext:value-type="float">
            <text:p>0,00366</text:p>
          </table:table-cell>
          <table:table-cell table:style-name="ce6" office:value-type="float" office:value="0.000984" calcext:value-type="float">
            <text:p>0,00098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526.465" calcext:value-type="float">
            <text:p>2526,465</text:p>
          </table:table-cell>
          <table:table-cell table:style-name="ce6" office:value-type="float" office:value="2380.062" calcext:value-type="float">
            <text:p>2380,062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0895" calcext:value-type="float">
            <text:p>8,95E-04</text:p>
          </table:table-cell>
          <table:table-cell table:style-name="ce10" office:value-type="float" office:value="0.000489" calcext:value-type="float">
            <text:p>4,8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754.664" calcext:value-type="float">
            <text:p>2754,664</text:p>
          </table:table-cell>
          <table:table-cell table:style-name="ce6" office:value-type="float" office:value="2616.789" calcext:value-type="float">
            <text:p>2616,789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136" calcext:value-type="float">
            <text:p>1,36E-03</text:p>
          </table:table-cell>
          <table:table-cell table:style-name="ce10" office:value-type="float" office:value="0.00191" calcext:value-type="float">
            <text:p>1,9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460.266" calcext:value-type="float">
            <text:p>2460,266</text:p>
          </table:table-cell>
          <table:table-cell table:style-name="ce6" office:value-type="float" office:value="2142.921" calcext:value-type="float">
            <text:p>2142,921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152" calcext:value-type="float">
            <text:p>1,52E-04</text:p>
          </table:table-cell>
          <table:table-cell table:style-name="ce10" office:value-type="float" office:value="0.000179" calcext:value-type="float">
            <text:p>1,7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488.059" calcext:value-type="float">
            <text:p>2488,059</text:p>
          </table:table-cell>
          <table:table-cell table:style-name="ce6" office:value-type="float" office:value="2308.339" calcext:value-type="float">
            <text:p>2308,339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0119" calcext:value-type="float">
            <text:p>0,000119</text:p>
          </table:table-cell>
          <table:table-cell table:style-name="ce6" office:value-type="float" office:value="0.094" calcext:value-type="float">
            <text:p>0,09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143.5696" calcext:value-type="float">
            <text:p>3143,5696</text:p>
          </table:table-cell>
          <table:table-cell table:style-name="ce6" office:value-type="float" office:value="2785.982" calcext:value-type="float">
            <text:p>2785,982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555" calcext:value-type="float">
            <text:p>5,55E-04</text:p>
          </table:table-cell>
          <table:table-cell table:style-name="ce10" office:value-type="float" office:value="0.00007961" calcext:value-type="float">
            <text:p>7,96E-05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506.643" calcext:value-type="float">
            <text:p>2506,643</text:p>
          </table:table-cell>
          <table:table-cell table:style-name="ce6" office:value-type="float" office:value="2451.796" calcext:value-type="float">
            <text:p>2451,796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725" calcext:value-type="float">
            <text:p>7,25E-03</text:p>
          </table:table-cell>
          <table:table-cell table:style-name="ce10" office:value-type="float" office:value="0.00221" calcext:value-type="float">
            <text:p>2,2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559.495" calcext:value-type="float">
            <text:p>2559,495</text:p>
          </table:table-cell>
          <table:table-cell table:style-name="ce6" office:value-type="float" office:value="2399.124" calcext:value-type="float">
            <text:p>2399,124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319" calcext:value-type="float">
            <text:p>0,00319</text:p>
          </table:table-cell>
          <table:table-cell table:style-name="ce6" office:value-type="float" office:value="0.000449" calcext:value-type="float">
            <text:p>0,000449</text:p>
          </table:table-cell>
          <table:table-cell table:style-name="ce6"/>
        </table:table-row>
        <table:table-row table:style-name="ro3">
          <table:table-cell table:style-name="ce4"/>
          <table:table-cell table:style-name="ce7" table:formula="of:=AVERAGE([.B317:.B326])" office:value-type="float" office:value="2658.12756" calcext:value-type="float">
            <text:p>2658,12756</text:p>
          </table:table-cell>
          <table:table-cell table:style-name="ce7" table:formula="of:=AVERAGE([.C317:.C326])" office:value-type="float" office:value="2429.4136" calcext:value-type="float">
            <text:p>2429,4136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1966" calcext:value-type="float">
            <text:p>0,001966</text:p>
          </table:table-cell>
          <table:table-cell table:style-name="ce11" table:formula="of:=AVERAGE([.G317:.G326])" office:value-type="float" office:value="0.010161361" calcext:value-type="float">
            <text:p>1,02E-02</text:p>
          </table:table-cell>
          <table:table-cell table:style-name="ce7"/>
        </table:table-row>
        <table:table-row table:style-name="ro3"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4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11" calcext:value-type="float">
            <text:p>0,211</text:p>
          </table:table-cell>
          <table:table-cell table:style-name="ce6" office:value-type="float" office:value="0.1697" calcext:value-type="float">
            <text:p>0,1697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59.319" calcext:value-type="float">
            <text:p>1959,319</text:p>
          </table:table-cell>
          <table:table-cell table:style-name="ce6" office:value-type="float" office:value="1522.981" calcext:value-type="float">
            <text:p>1522,981</text:p>
          </table:table-cell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42" calcext:value-type="float">
            <text:p>0,142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163.913" calcext:value-type="float">
            <text:p>1163,913</text:p>
          </table:table-cell>
          <table:table-cell table:style-name="ce6" office:value-type="float" office:value="888.315" calcext:value-type="float">
            <text:p>888,315</text:p>
          </table:table-cell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106.645" calcext:value-type="float">
            <text:p>2106,645</text:p>
          </table:table-cell>
          <table:table-cell table:style-name="ce6" office:value-type="float" office:value="1907.829" calcext:value-type="float">
            <text:p>1907,829</text:p>
          </table:table-cell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48" calcext:value-type="float">
            <text:p>0,348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372.074" calcext:value-type="float">
            <text:p>2372,074</text:p>
          </table:table-cell>
          <table:table-cell table:style-name="ce6" office:value-type="float" office:value="2554.626" calcext:value-type="float">
            <text:p>2554,626</text:p>
          </table:table-cell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347.448" calcext:value-type="float">
            <text:p>1347,448</text:p>
          </table:table-cell>
          <table:table-cell table:style-name="ce6" office:value-type="float" office:value="1188.789" calcext:value-type="float">
            <text:p>1188,789</text:p>
          </table:table-cell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299" calcext:value-type="float">
            <text:p>0,1299</text:p>
          </table:table-cell>
          <table:table-cell table:style-name="ce6" office:value-type="float" office:value="0.0907" calcext:value-type="float">
            <text:p>0,0907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750.447" calcext:value-type="float">
            <text:p>750,447</text:p>
          </table:table-cell>
          <table:table-cell table:style-name="ce6" office:value-type="float" office:value="641.623" calcext:value-type="float">
            <text:p>641,623</text:p>
          </table:table-cell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27" calcext:value-type="float">
            <text:p>0,0727</text:p>
          </table:table-cell>
          <table:table-cell table:style-name="ce6" office:value-type="float" office:value="0.0694" calcext:value-type="float">
            <text:p>0,0694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554.558" calcext:value-type="float">
            <text:p>1554,558</text:p>
          </table:table-cell>
          <table:table-cell table:style-name="ce6" office:value-type="float" office:value="1512.354" calcext:value-type="float">
            <text:p>1512,354</text:p>
          </table:table-cell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3.272" calcext:value-type="float">
            <text:p>2683,272</text:p>
          </table:table-cell>
          <table:table-cell table:style-name="ce6" office:value-type="float" office:value="2713.331" calcext:value-type="float">
            <text:p>2713,331</text:p>
          </table:table-cell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office:value-type="float" office:value="0.2097" calcext:value-type="float">
            <text:p>0,2097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1855.027" calcext:value-type="float">
            <text:p>1855,027</text:p>
          </table:table-cell>
          <table:table-cell table:style-name="ce6" office:value-type="float" office:value="2208.317" calcext:value-type="float">
            <text:p>2208,317</text:p>
          </table:table-cell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764.727" calcext:value-type="float">
            <text:p>1764,727</text:p>
          </table:table-cell>
          <table:table-cell table:style-name="ce6" office:value-type="float" office:value="1783.144" calcext:value-type="float">
            <text:p>1783,144</text:p>
          </table:table-cell>
          <table:table-cell/>
        </table:table-row>
        <table:table-row table:style-name="ro3">
          <table:table-cell table:style-name="ce1"/>
          <table:table-cell table:style-name="ce5" table:formula="of:=AVERAGE([.B329:.B338])" office:value-type="float" office:value="0.18796" calcext:value-type="float">
            <text:p>0,18796</text:p>
          </table:table-cell>
          <table:table-cell table:style-name="ce5" table:formula="of:=AVERAGE([.C329:.C338])" office:value-type="float" office:value="0.16395" calcext:value-type="float">
            <text:p>0,16395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755.743" calcext:value-type="float">
            <text:p>1755,743</text:p>
          </table:table-cell>
          <table:table-cell table:style-name="ce7" table:formula="of:=AVERAGE([.G329:.G338])" office:value-type="float" office:value="1692.1309" calcext:value-type="float">
            <text:p>1692,1309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52" calcext:value-type="float">
            <text:p>0,652</text:p>
          </table:table-cell>
          <table:table-cell table:style-name="ce6" office:value-type="float" office:value="0.621" calcext:value-type="float">
            <text:p>0,621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589" calcext:value-type="float">
            <text:p>0,589</text:p>
          </table:table-cell>
          <table:table-cell table:style-name="ce6" office:value-type="float" office:value="0.569" calcext:value-type="float">
            <text:p>0,569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597" calcext:value-type="float">
            <text:p>4,597</text:p>
          </table:table-cell>
          <table:table-cell table:style-name="ce6" office:value-type="float" office:value="4.76" calcext:value-type="float">
            <text:p>4,76</text:p>
          </table:table-cell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0.58" calcext:value-type="float">
            <text:p>0,58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5.74" calcext:value-type="float">
            <text:p>5,74</text:p>
          </table:table-cell>
          <table:table-cell table:style-name="ce6" office:value-type="float" office:value="5.77" calcext:value-type="float">
            <text:p>5,77</text:p>
          </table:table-cell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24" calcext:value-type="float">
            <text:p>0,524</text:p>
          </table:table-cell>
          <table:table-cell table:style-name="ce6" office:value-type="float" office:value="0.5" calcext:value-type="float">
            <text:p>0,5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4.19" calcext:value-type="float">
            <text:p>4,19</text:p>
          </table:table-cell>
          <table:table-cell table:style-name="ce6" office:value-type="float" office:value="4.66" calcext:value-type="float">
            <text:p>4,66</text:p>
          </table:table-cell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74" calcext:value-type="float">
            <text:p>0,574</text:p>
          </table:table-cell>
          <table:table-cell table:style-name="ce6" office:value-type="float" office:value="0.534" calcext:value-type="float">
            <text:p>0,534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16" calcext:value-type="float">
            <text:p>6,16</text:p>
          </table:table-cell>
          <table:table-cell table:style-name="ce6" office:value-type="float" office:value="6.29" calcext:value-type="float">
            <text:p>6,29</text:p>
          </table:table-cell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7.66" calcext:value-type="float">
            <text:p>7,66</text:p>
          </table:table-cell>
          <table:table-cell table:style-name="ce6" office:value-type="float" office:value="8.68" calcext:value-type="float">
            <text:p>8,68</text:p>
          </table:table-cell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39" calcext:value-type="float">
            <text:p>0,539</text:p>
          </table:table-cell>
          <table:table-cell table:style-name="ce6" office:value-type="float" office:value="0.543" calcext:value-type="float">
            <text:p>0,543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8.91" calcext:value-type="float">
            <text:p>8,91</text:p>
          </table:table-cell>
          <table:table-cell table:style-name="ce6" office:value-type="float" office:value="9.26" calcext:value-type="float">
            <text:p>9,26</text:p>
          </table:table-cell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798" calcext:value-type="float">
            <text:p>0,5798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5.03" calcext:value-type="float">
            <text:p>5,03</text:p>
          </table:table-cell>
          <table:table-cell table:style-name="ce6" office:value-type="float" office:value="4.65" calcext:value-type="float">
            <text:p>4,65</text:p>
          </table:table-cell>
          <table:table-cell/>
        </table:table-row>
        <table:table-row table:style-name="ro2">
          <table:table-cell office:value-type="string" calcext:value-type="string">
            <text:p>Airfoil_9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715" calcext:value-type="float">
            <text:p>0,715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5.44" calcext:value-type="float">
            <text:p>5,44</text:p>
          </table:table-cell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32" calcext:value-type="float">
            <text:p>0,632</text:p>
          </table:table-cell>
          <table:table-cell table:style-name="ce6" office:value-type="float" office:value="0.616" calcext:value-type="float">
            <text:p>0,616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13" calcext:value-type="float">
            <text:p>3,13</text:p>
          </table:table-cell>
          <table:table-cell table:style-name="ce6" office:value-type="float" office:value="3.29" calcext:value-type="float">
            <text:p>3,29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41:.B350])" office:value-type="float" office:value="0.58498" calcext:value-type="float">
            <text:p>0,58498</text:p>
          </table:table-cell>
          <table:table-cell table:style-name="ce7" table:formula="of:=AVERAGE([.C341:.C350])" office:value-type="float" office:value="0.56746" calcext:value-type="float">
            <text:p>0,56746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5.12" calcext:value-type="float">
            <text:p>5,12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6117" calcext:value-type="float">
            <text:p>5,6117</text:p>
          </table:table-cell>
          <table:table-cell table:style-name="ce7" table:formula="of:=AVERAGE([.G342:.G351])" office:value-type="float" office:value="5.792" calcext:value-type="float">
            <text:p>5,792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909" calcext:value-type="float">
            <text:p>0,909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office:value-type="float" office:value="0.189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68" calcext:value-type="float">
            <text:p>0,768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68" calcext:value-type="float">
            <text:p>0,68</text:p>
          </table:table-cell>
          <table:table-cell table:style-name="ce6" office:value-type="float" office:value="0.552" calcext:value-type="float">
            <text:p>0,552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22" calcext:value-type="float">
            <text:p>0,522</text:p>
          </table:table-cell>
          <table:table-cell table:style-name="ce6" office:value-type="float" office:value="0.468" calcext:value-type="float">
            <text:p>0,468</text:p>
          </table:table-cell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1.095" calcext:value-type="float">
            <text:p>1,095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 office:value-type="float" office:value="0.249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686" calcext:value-type="float">
            <text:p>0,686</text:p>
          </table:table-cell>
          <table:table-cell table:style-name="ce6" office:value-type="float" office:value="0.732" calcext:value-type="float">
            <text:p>0,732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 office:value-type="float" office:value="0.481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287" calcext:value-type="float">
            <text:p>0,287</text:p>
          </table:table-cell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691" calcext:value-type="float">
            <text:p>0,691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 office:value-type="float" office:value="0.231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office:value-type="float" office:value="0.443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804" calcext:value-type="float">
            <text:p>0,804</text:p>
          </table:table-cell>
          <table:table-cell table:style-name="ce6" office:value-type="float" office:value="0.764" calcext:value-type="float">
            <text:p>0,764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9" calcext:value-type="float">
            <text:p>0,2199</text:p>
          </table:table-cell>
          <table:table-cell table:style-name="ce6" office:value-type="float" office:value="0.2" calcext:value-type="float">
            <text:p>0,2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54:.B363])" office:value-type="float" office:value="0.7884" calcext:value-type="float">
            <text:p>0,7884</text:p>
          </table:table-cell>
          <table:table-cell table:style-name="ce7" table:formula="of:=AVERAGE([.C354:.C363])" office:value-type="float" office:value="0.5375" calcext:value-type="float">
            <text:p>0,5375</text:p>
          </table:table-cell>
          <table:table-cell table:style-name="ce7" table:number-columns-repeated="2"/>
          <table:table-cell table:style-name="ce7" table:formula="of:=AVERAGE([.F354:.F363])" office:value-type="float" office:value="0.34259" calcext:value-type="float">
            <text:p>0,34259</text:p>
          </table:table-cell>
          <table:table-cell table:style-name="ce7" table:formula="of:=AVERAGE([.G354:.G363])" office:value-type="float" office:value="0.3318" calcext:value-type="float">
            <text:p>0,331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office:value-type="float" office:value="1.183" calcext:value-type="float">
            <text:p>1,183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2.186" calcext:value-type="float">
            <text:p>2,186</text:p>
          </table:table-cell>
          <table:table-cell table:style-name="ce6" office:value-type="float" office:value="3.285" calcext:value-type="float">
            <text:p>3,285</text:p>
          </table:table-cell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27" calcext:value-type="float">
            <text:p>0,527</text:p>
          </table:table-cell>
          <table:table-cell table:style-name="ce6" office:value-type="float" office:value="0.602" calcext:value-type="float">
            <text:p>0,602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2.979" calcext:value-type="float">
            <text:p>2,979</text:p>
          </table:table-cell>
          <table:table-cell table:style-name="ce6" office:value-type="float" office:value="1.628" calcext:value-type="float">
            <text:p>1,628</text:p>
          </table:table-cell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8797" calcext:value-type="float">
            <text:p>0,8797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1.865" calcext:value-type="float">
            <text:p>1,865</text:p>
          </table:table-cell>
          <table:table-cell table:style-name="ce6" office:value-type="float" office:value="0.228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1.7299" calcext:value-type="float">
            <text:p>1,7299</text:p>
          </table:table-cell>
          <table:table-cell table:style-name="ce6" office:value-type="float" office:value="0.801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1.976" calcext:value-type="float">
            <text:p>1,976</text:p>
          </table:table-cell>
          <table:table-cell table:style-name="ce6" office:value-type="float" office:value="0.594" calcext:value-type="float">
            <text:p>0,594</text:p>
          </table:table-cell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601" calcext:value-type="float">
            <text:p>0,60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487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37" calcext:value-type="float">
            <text:p>0,37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931" calcext:value-type="float">
            <text:p>0,931</text:p>
          </table:table-cell>
          <table:table-cell table:style-name="ce6" office:value-type="float" office:value="0.28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3.474" calcext:value-type="float">
            <text:p>3,474</text:p>
          </table:table-cell>
          <table:table-cell table:style-name="ce6" office:value-type="float" office:value="0.336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56" calcext:value-type="float">
            <text:p>0,45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267" calcext:value-type="float">
            <text:p>0,26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67:.B376])" office:value-type="float" office:value="0.61067" calcext:value-type="float">
            <text:p>0,61067</text:p>
          </table:table-cell>
          <table:table-cell table:style-name="ce7" table:formula="of:=AVERAGE([.C367:.C376])" office:value-type="float" office:value="0.6355" calcext:value-type="float">
            <text:p>0,6355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2.958" calcext:value-type="float">
            <text:p>2,958</text:p>
          </table:table-cell>
          <table:table-cell table:style-name="ce6" office:value-type="float" office:value="0.957" calcext:value-type="float">
            <text:p>0,957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96189" calcext:value-type="float">
            <text:p>1,96189</text:p>
          </table:table-cell>
          <table:table-cell table:style-name="ce7" table:formula="of:=AVERAGE([.G368:.G377])" office:value-type="float" office:value="0.8865" calcext:value-type="float">
            <text:p>0,8865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20.366" calcext:value-type="float">
            <text:p>320,366</text:p>
          </table:table-cell>
          <table:table-cell table:style-name="ce6" office:value-type="float" office:value="355.736" calcext:value-type="float">
            <text:p>355,73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631.641" calcext:value-type="float">
            <text:p>631,641</text:p>
          </table:table-cell>
          <table:table-cell table:style-name="ce6" office:value-type="float" office:value="775.283" calcext:value-type="float">
            <text:p>775,283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1.854" calcext:value-type="float">
            <text:p>1,854</text:p>
          </table:table-cell>
          <table:table-cell table:style-name="ce6" office:value-type="float" office:value="1.391" calcext:value-type="float">
            <text:p>1,391</text:p>
          </table:table-cell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23.888" calcext:value-type="float">
            <text:p>623,888</text:p>
          </table:table-cell>
          <table:table-cell table:style-name="ce6" office:value-type="float" office:value="730.547" calcext:value-type="float">
            <text:p>730,547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952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393.455" calcext:value-type="float">
            <text:p>393,455</text:p>
          </table:table-cell>
          <table:table-cell table:style-name="ce6" office:value-type="float" office:value="647.308" calcext:value-type="float">
            <text:p>647,30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 office:value-type="float" office:value="0.6099" calcext:value-type="float">
            <text:p>0,6099</text:p>
          </table:table-cell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52.84" calcext:value-type="float">
            <text:p>652,84</text:p>
          </table:table-cell>
          <table:table-cell table:style-name="ce6" office:value-type="float" office:value="725.344" calcext:value-type="float">
            <text:p>725,344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14" calcext:value-type="float">
            <text:p>0,914</text:p>
          </table:table-cell>
          <table:table-cell table:style-name="ce6" office:value-type="float" office:value="1.21" calcext:value-type="float">
            <text:p>1,21</text:p>
          </table:table-cell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476.915" calcext:value-type="float">
            <text:p>476,915</text:p>
          </table:table-cell>
          <table:table-cell table:style-name="ce6" office:value-type="float" office:value="725.087" calcext:value-type="float">
            <text:p>725,087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.162" calcext:value-type="float">
            <text:p>1,162</text:p>
          </table:table-cell>
          <table:table-cell table:style-name="ce6" office:value-type="float" office:value="1.382" calcext:value-type="float">
            <text:p>1,382</text:p>
          </table:table-cell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29.846" calcext:value-type="float">
            <text:p>429,846</text:p>
          </table:table-cell>
          <table:table-cell table:style-name="ce6" office:value-type="float" office:value="441.97" calcext:value-type="float">
            <text:p>441,97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4" calcext:value-type="float">
            <text:p>1,04</text:p>
          </table:table-cell>
          <table:table-cell table:style-name="ce6" office:value-type="float" office:value="1.238" calcext:value-type="float">
            <text:p>1,238</text:p>
          </table:table-cell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505.516" calcext:value-type="float">
            <text:p>505,516</text:p>
          </table:table-cell>
          <table:table-cell table:style-name="ce6" office:value-type="float" office:value="484.522" calcext:value-type="float">
            <text:p>484,52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 office:value-type="float" office:value="0.866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567.851" calcext:value-type="float">
            <text:p>567,851</text:p>
          </table:table-cell>
          <table:table-cell table:style-name="ce6" office:value-type="float" office:value="474.867" calcext:value-type="float">
            <text:p>474,867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901" calcext:value-type="float">
            <text:p>0,901</text:p>
          </table:table-cell>
          <table:table-cell table:style-name="ce6" office:value-type="float" office:value="1.1199" calcext:value-type="float">
            <text:p>1,1199</text:p>
          </table:table-cell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78.888" calcext:value-type="float">
            <text:p>578,888</text:p>
          </table:table-cell>
          <table:table-cell table:style-name="ce6" office:value-type="float" office:value="487.051" calcext:value-type="float">
            <text:p>487,051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0.969" calcext:value-type="float">
            <text:p>0,969</text:p>
          </table:table-cell>
          <table:table-cell table:style-name="ce6" office:value-type="float" office:value="1.146" calcext:value-type="float">
            <text:p>1,14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80:.B389])" office:value-type="float" office:value="518.1206" calcext:value-type="float">
            <text:p>518,1206</text:p>
          </table:table-cell>
          <table:table-cell table:style-name="ce7" table:formula="of:=AVERAGE([.C380:.C389])" office:value-type="float" office:value="584.7715" calcext:value-type="float">
            <text:p>584,7715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0.959" calcext:value-type="float">
            <text:p>0,959</text:p>
          </table:table-cell>
          <table:table-cell table:style-name="ce6" office:value-type="float" office:value="1.151" calcext:value-type="float">
            <text:p>1,1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0.9946" calcext:value-type="float">
            <text:p>0,9946</text:p>
          </table:table-cell>
          <table:table-cell table:style-name="ce7" table:formula="of:=AVERAGE([.G381:.G390])" office:value-type="float" office:value="1.10658" calcext:value-type="float">
            <text:p>1,1065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4.711" calcext:value-type="float">
            <text:p>4,711</text:p>
          </table:table-cell>
          <table:table-cell table:style-name="ce6" office:value-type="float" office:value="3.857" calcext:value-type="float">
            <text:p>3,857</text:p>
          </table:table-cell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19" calcext:value-type="float">
            <text:p>3,719</text:p>
          </table:table-cell>
          <table:table-cell table:style-name="ce6" office:value-type="float" office:value="3.614" calcext:value-type="float">
            <text:p>3,614</text:p>
          </table:table-cell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695" calcext:value-type="float">
            <text:p>3,695</text:p>
          </table:table-cell>
          <table:table-cell table:style-name="ce6" office:value-type="float" office:value="3.452" calcext:value-type="float">
            <text:p>3,452</text:p>
          </table:table-cell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 office:value-type="float" office:value="0.242" calcext:value-type="float">
            <text:p>0,242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64" calcext:value-type="float">
            <text:p>3,264</text:p>
          </table:table-cell>
          <table:table-cell table:style-name="ce6" office:value-type="float" office:value="3.123" calcext:value-type="float">
            <text:p>3,123</text:p>
          </table:table-cell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853" calcext:value-type="float">
            <text:p>3,853</text:p>
          </table:table-cell>
          <table:table-cell table:style-name="ce6" office:value-type="float" office:value="3.822" calcext:value-type="float">
            <text:p>3,822</text:p>
          </table:table-cell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0902" calcext:value-type="float">
            <text:p>0,0902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556" calcext:value-type="float">
            <text:p>3,556</text:p>
          </table:table-cell>
          <table:table-cell table:style-name="ce6" office:value-type="float" office:value="3.308" calcext:value-type="float">
            <text:p>3,308</text:p>
          </table:table-cell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369" calcext:value-type="float">
            <text:p>0,369</text:p>
          </table:table-cell>
          <table:table-cell table:style-name="ce6" office:value-type="float" office:value="0.0787" calcext:value-type="float">
            <text:p>0,0787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073" calcext:value-type="float">
            <text:p>5,073</text:p>
          </table:table-cell>
          <table:table-cell table:style-name="ce6" office:value-type="float" office:value="4.833" calcext:value-type="float">
            <text:p>4,833</text:p>
          </table:table-cell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3" calcext:value-type="float">
            <text:p>0,23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21" calcext:value-type="float">
            <text:p>3,721</text:p>
          </table:table-cell>
          <table:table-cell table:style-name="ce6" office:value-type="float" office:value="3.615" calcext:value-type="float">
            <text:p>3,615</text:p>
          </table:table-cell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421" calcext:value-type="float">
            <text:p>0,421</text:p>
          </table:table-cell>
          <table:table-cell table:style-name="ce6" office:value-type="float" office:value="0.277" calcext:value-type="float">
            <text:p>0,277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775" calcext:value-type="float">
            <text:p>3,775</text:p>
          </table:table-cell>
          <table:table-cell table:style-name="ce6" office:value-type="float" office:value="3.505" calcext:value-type="float">
            <text:p>3,50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93:.B402])" office:value-type="float" office:value="0.28052" calcext:value-type="float">
            <text:p>0,28052</text:p>
          </table:table-cell>
          <table:table-cell table:style-name="ce7" table:formula="of:=AVERAGE([.C393:.C402])" office:value-type="float" office:value="0.24347" calcext:value-type="float">
            <text:p>0,24347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431" calcext:value-type="float">
            <text:p>3,431</text:p>
          </table:table-cell>
          <table:table-cell table:style-name="ce6" office:value-type="float" office:value="3.251" calcext:value-type="float">
            <text:p>3,2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3.8798" calcext:value-type="float">
            <text:p>3,8798</text:p>
          </table:table-cell>
          <table:table-cell table:style-name="ce7" table:formula="of:=AVERAGE([.G394:.G403])" office:value-type="float" office:value="3.638" calcext:value-type="float">
            <text:p>3,63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508.451" calcext:value-type="float">
            <text:p>508,451</text:p>
          </table:table-cell>
          <table:table-cell table:style-name="ce6" office:value-type="float" office:value="446.233" calcext:value-type="float">
            <text:p>446,233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0937" calcext:value-type="float">
            <text:p>0,0937</text:p>
          </table:table-cell>
          <table:table-cell/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12.354" calcext:value-type="float">
            <text:p>312,354</text:p>
          </table:table-cell>
          <table:table-cell table:style-name="ce6" office:value-type="float" office:value="309.51" calcext:value-type="float">
            <text:p>309,51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75" calcext:value-type="float">
            <text:p>0,0775</text:p>
          </table:table-cell>
          <table:table-cell table:style-name="ce6" office:value-type="float" office:value="0.0656" calcext:value-type="float">
            <text:p>0,0656</text:p>
          </table:table-cell>
          <table:table-cell/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390.839" calcext:value-type="float">
            <text:p>390,839</text:p>
          </table:table-cell>
          <table:table-cell table:style-name="ce6" office:value-type="float" office:value="391.235" calcext:value-type="float">
            <text:p>391,235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377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42.098" calcext:value-type="float">
            <text:p>542,098</text:p>
          </table:table-cell>
          <table:table-cell table:style-name="ce6" office:value-type="float" office:value="475.559" calcext:value-type="float">
            <text:p>475,559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331" calcext:value-type="float">
            <text:p>0,331</text:p>
          </table:table-cell>
          <table:table-cell/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60.534" calcext:value-type="float">
            <text:p>460,534</text:p>
          </table:table-cell>
          <table:table-cell table:style-name="ce6" office:value-type="float" office:value="457.924" calcext:value-type="float">
            <text:p>457,924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office:value-type="float" office:value="0.168" calcext:value-type="float">
            <text:p>0,168</text:p>
          </table:table-cell>
          <table:table-cell/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294.987" calcext:value-type="float">
            <text:p>294,987</text:p>
          </table:table-cell>
          <table:table-cell table:style-name="ce6" office:value-type="float" office:value="181.028" calcext:value-type="float">
            <text:p>181,028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4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7.559" calcext:value-type="float">
            <text:p>217,559</text:p>
          </table:table-cell>
          <table:table-cell table:style-name="ce6" office:value-type="float" office:value="214.955" calcext:value-type="float">
            <text:p>214,955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88" calcext:value-type="float">
            <text:p>0,0988</text:p>
          </table:table-cell>
          <table:table-cell table:style-name="ce6" office:value-type="float" office:value="0.0754" calcext:value-type="float">
            <text:p>0,0754</text:p>
          </table:table-cell>
          <table:table-cell/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532.182" calcext:value-type="float">
            <text:p>532,182</text:p>
          </table:table-cell>
          <table:table-cell table:style-name="ce6" office:value-type="float" office:value="569.303" calcext:value-type="float">
            <text:p>569,303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113" calcext:value-type="float">
            <text:p>2,113</text:p>
          </table:table-cell>
          <table:table-cell table:style-name="ce6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1.191" calcext:value-type="float">
            <text:p>311,191</text:p>
          </table:table-cell>
          <table:table-cell table:style-name="ce6" office:value-type="float" office:value="343.523" calcext:value-type="float">
            <text:p>343,52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7.162" calcext:value-type="float">
            <text:p>337,162</text:p>
          </table:table-cell>
          <table:table-cell table:style-name="ce6" office:value-type="float" office:value="329.073" calcext:value-type="float">
            <text:p>329,073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 office:value-type="float" office:value="0.225" calcext:value-type="float">
            <text:p>0,22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06:.B415])" office:value-type="float" office:value="390.7357" calcext:value-type="float">
            <text:p>390,7357</text:p>
          </table:table-cell>
          <table:table-cell table:style-name="ce7" table:formula="of:=AVERAGE([.C406:.C415])" office:value-type="float" office:value="371.8343" calcext:value-type="float">
            <text:p>371,8343</text:p>
          </table:table-cell>
          <table:table-cell table:style-name="ce7" table:number-columns-repeated="2"/>
          <table:table-cell table:style-name="ce7" table:formula="of:=AVERAGE([.F406:.F415])" office:value-type="float" office:value="0.51653" calcext:value-type="float">
            <text:p>0,51653</text:p>
          </table:table-cell>
          <table:table-cell table:style-name="ce7" table:formula="of:=AVERAGE([.G406:.G415])" office:value-type="float" office:value="0.45697" calcext:value-type="float">
            <text:p>0,45697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99" calcext:value-type="float">
            <text:p>8,499</text:p>
          </table:table-cell>
          <table:table-cell table:style-name="ce6" office:value-type="float" office:value="8.479" calcext:value-type="float">
            <text:p>8,479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418" calcext:value-type="float">
            <text:p>1,418</text:p>
          </table:table-cell>
          <table:table-cell table:style-name="ce6" office:value-type="float" office:value="1.535" calcext:value-type="float">
            <text:p>1,535</text:p>
          </table:table-cell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76" calcext:value-type="float">
            <text:p>7,476</text:p>
          </table:table-cell>
          <table:table-cell table:style-name="ce6" office:value-type="float" office:value="7.479" calcext:value-type="float">
            <text:p>7,479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396" calcext:value-type="float">
            <text:p>1,396</text:p>
          </table:table-cell>
          <table:table-cell table:style-name="ce6" office:value-type="float" office:value="1.176" calcext:value-type="float">
            <text:p>1,176</text:p>
          </table:table-cell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3" calcext:value-type="float">
            <text:p>9,03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85" calcext:value-type="float">
            <text:p>1,485</text:p>
          </table:table-cell>
          <table:table-cell table:style-name="ce6" office:value-type="float" office:value="1.38" calcext:value-type="float">
            <text:p>1,3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653" calcext:value-type="float">
            <text:p>7,65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211" calcext:value-type="float">
            <text:p>1,211</text:p>
          </table:table-cell>
          <table:table-cell table:style-name="ce6" office:value-type="float" office:value="1.274" calcext:value-type="float">
            <text:p>1,274</text:p>
          </table:table-cell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number-columns-repeated="2" table:style-name="ce6" office:value-type="float" office:value="7.276" calcext:value-type="float">
            <text:p>7,276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249" calcext:value-type="float">
            <text:p>1,249</text:p>
          </table:table-cell>
          <table:table-cell table:style-name="ce6" office:value-type="float" office:value="1.448" calcext:value-type="float">
            <text:p>1,44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9" calcext:value-type="float">
            <text:p>7,99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02" calcext:value-type="float">
            <text:p>1,02</text:p>
          </table:table-cell>
          <table:table-cell table:style-name="ce6" office:value-type="float" office:value="1.103" calcext:value-type="float">
            <text:p>1,10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number-columns-repeated="2" table:style-name="ce6" office:value-type="float" office:value="9.127" calcext:value-type="float">
            <text:p>9,127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13" calcext:value-type="float">
            <text:p>1,613</text:p>
          </table:table-cell>
          <table:table-cell table:style-name="ce6" office:value-type="float" office:value="1.743" calcext:value-type="float">
            <text:p>1,74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416" calcext:value-type="float">
            <text:p>7,416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151" calcext:value-type="float">
            <text:p>1,151</text:p>
          </table:table-cell>
          <table:table-cell table:style-name="ce6" office:value-type="float" office:value="0.933" calcext:value-type="float">
            <text:p>0,93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08" calcext:value-type="float">
            <text:p>6,408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25" calcext:value-type="float">
            <text:p>1,425</text:p>
          </table:table-cell>
          <table:table-cell table:style-name="ce6" office:value-type="float" office:value="1.389" calcext:value-type="float">
            <text:p>1,389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26" calcext:value-type="float">
            <text:p>7,226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563" calcext:value-type="float">
            <text:p>1,563</text:p>
          </table:table-cell>
          <table:table-cell table:style-name="ce6" office:value-type="float" office:value="1.307" calcext:value-type="float">
            <text:p>1,307</text:p>
          </table:table-cell>
          <table:table-cell/>
        </table:table-row>
        <table:table-row table:style-name="ro3">
          <table:table-cell table:style-name="ce7"/>
          <table:table-cell table:style-name="ce7" table:formula="of:=AVERAGE([.B419:.B428])" office:value-type="float" office:value="7.8046" calcext:value-type="float">
            <text:p>7,8046</text:p>
          </table:table-cell>
          <table:table-cell table:style-name="ce7" table:formula="of:=AVERAGE([.C419:.C428])" office:value-type="float" office:value="7.8093" calcext:value-type="float">
            <text:p>7,8093</text:p>
          </table:table-cell>
          <table:table-cell table:style-name="ce7" table:number-columns-repeated="2"/>
          <table:table-cell table:style-name="ce7" table:formula="of:=AVERAGE([.F419:.F428])" office:value-type="float" office:value="1.3531" calcext:value-type="float">
            <text:p>1,3531</text:p>
          </table:table-cell>
          <table:table-cell table:style-name="ce7" table:formula="of:=AVERAGE([.G419:.G428])" office:value-type="float" office:value="1.3288" calcext:value-type="float">
            <text:p>1,328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76.896" calcext:value-type="float">
            <text:p>176,896</text:p>
          </table:table-cell>
          <table:table-cell table:style-name="ce6" office:value-type="float" office:value="92.593" calcext:value-type="float">
            <text:p>92,593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338.008" calcext:value-type="float">
            <text:p>338,008</text:p>
          </table:table-cell>
          <table:table-cell table:style-name="ce6" office:value-type="float" office:value="327.903" calcext:value-type="float">
            <text:p>327,903</text:p>
          </table:table-cell>
          <table:table-cell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08.663" calcext:value-type="float">
            <text:p>108,663</text:p>
          </table:table-cell>
          <table:table-cell table:style-name="ce6" office:value-type="float" office:value="99.703" calcext:value-type="float">
            <text:p>99,703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7.962" calcext:value-type="float">
            <text:p>337,962</text:p>
          </table:table-cell>
          <table:table-cell table:style-name="ce6" office:value-type="float" office:value="332.714" calcext:value-type="float">
            <text:p>332,714</text:p>
          </table:table-cell>
          <table:table-cell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10.455" calcext:value-type="float">
            <text:p>110,455</text:p>
          </table:table-cell>
          <table:table-cell table:style-name="ce6" office:value-type="float" office:value="103.948" calcext:value-type="float">
            <text:p>103,948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57.297" calcext:value-type="float">
            <text:p>357,297</text:p>
          </table:table-cell>
          <table:table-cell table:style-name="ce6" office:value-type="float" office:value="360.8096" calcext:value-type="float">
            <text:p>360,8096</text:p>
          </table:table-cell>
          <table:table-cell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58.743" calcext:value-type="float">
            <text:p>158,743</text:p>
          </table:table-cell>
          <table:table-cell table:style-name="ce6" office:value-type="float" office:value="103.132" calcext:value-type="float">
            <text:p>103,132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84.364" calcext:value-type="float">
            <text:p>384,364</text:p>
          </table:table-cell>
          <table:table-cell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83.305" calcext:value-type="float">
            <text:p>83,305</text:p>
          </table:table-cell>
          <table:table-cell table:style-name="ce6" office:value-type="float" office:value="91.667" calcext:value-type="float">
            <text:p>91,667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57.144" calcext:value-type="float">
            <text:p>357,144</text:p>
          </table:table-cell>
          <table:table-cell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01.716" calcext:value-type="float">
            <text:p>101,716</text:p>
          </table:table-cell>
          <table:table-cell table:style-name="ce6" office:value-type="float" office:value="95.211" calcext:value-type="float">
            <text:p>95,211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71.002" calcext:value-type="float">
            <text:p>471,002</text:p>
          </table:table-cell>
          <table:table-cell table:style-name="ce6" office:value-type="float" office:value="428.908" calcext:value-type="float">
            <text:p>428,908</text:p>
          </table:table-cell>
          <table:table-cell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84.44" calcext:value-type="float">
            <text:p>84,44</text:p>
          </table:table-cell>
          <table:table-cell table:style-name="ce6" office:value-type="float" office:value="85.723" calcext:value-type="float">
            <text:p>85,72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43.813" calcext:value-type="float">
            <text:p>343,813</text:p>
          </table:table-cell>
          <table:table-cell table:style-name="ce6" office:value-type="float" office:value="340.821" calcext:value-type="float">
            <text:p>340,821</text:p>
          </table:table-cell>
          <table:table-cell/>
        </table:table-row>
        <table:table-row table:style-name="ro2">
          <table:table-cell office:value-type="string" calcext:value-type="string">
            <text:p>stock_8</text:p>
          </table:table-cell>
          <table:table-cell table:style-name="ce6" office:value-type="float" office:value="109.795" calcext:value-type="float">
            <text:p>109,795</text:p>
          </table:table-cell>
          <table:table-cell table:style-name="ce6" office:value-type="float" office:value="98.391" calcext:value-type="float">
            <text:p>98,391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21.103" calcext:value-type="float">
            <text:p>421,103</text:p>
          </table:table-cell>
          <table:table-cell table:style-name="ce6" office:value-type="float" office:value="404.336" calcext:value-type="float">
            <text:p>404,336</text:p>
          </table:table-cell>
          <table:table-cell/>
        </table:table-row>
        <table:table-row table:style-name="ro2">
          <table:table-cell office:value-type="string" calcext:value-type="string">
            <text:p>stock_9</text:p>
          </table:table-cell>
          <table:table-cell table:style-name="ce6" office:value-type="float" office:value="87.533" calcext:value-type="float">
            <text:p>87,533</text:p>
          </table:table-cell>
          <table:table-cell table:style-name="ce6" office:value-type="float" office:value="135.066" calcext:value-type="float">
            <text:p>135,066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409.696" calcext:value-type="float">
            <text:p>409,696</text:p>
          </table:table-cell>
          <table:table-cell table:style-name="ce6" office:value-type="float" office:value="387.365" calcext:value-type="float">
            <text:p>387,365</text:p>
          </table:table-cell>
          <table:table-cell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25.597" calcext:value-type="float">
            <text:p>125,597</text:p>
          </table:table-cell>
          <table:table-cell table:style-name="ce6" office:value-type="float" office:value="123.109" calcext:value-type="float">
            <text:p>123,1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383.283" calcext:value-type="float">
            <text:p>383,283</text:p>
          </table:table-cell>
          <table:table-cell table:style-name="ce6" office:value-type="float" office:value="371.091" calcext:value-type="float">
            <text:p>371,091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32:.B441])" office:value-type="float" office:value="114.7143" calcext:value-type="float">
            <text:p>114,7143</text:p>
          </table:table-cell>
          <table:table-cell table:style-name="ce7" table:formula="of:=AVERAGE([.C432:.C441])" office:value-type="float" office:value="102.8543" calcext:value-type="float">
            <text:p>102,854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380.2022" calcext:value-type="float">
            <text:p>380,2022</text:p>
          </table:table-cell>
          <table:table-cell table:style-name="ce7" table:formula="of:=AVERAGE([.G432:.G441])" office:value-type="float" office:value="369.54556" calcext:value-type="float">
            <text:p>369,54556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764" calcext:value-type="float">
            <text:p>3,764</text:p>
          </table:table-cell>
          <table:table-cell table:style-name="ce6" office:value-type="float" office:value="4.033" calcext:value-type="float">
            <text:p>4,033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592" calcext:value-type="float">
            <text:p>4,592</text:p>
          </table:table-cell>
          <table:table-cell table:style-name="ce6" office:value-type="float" office:value="4.362" calcext:value-type="float">
            <text:p>4,36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53" calcext:value-type="float">
            <text:p>6,53</text:p>
          </table:table-cell>
          <table:table-cell table:style-name="ce6" office:value-type="float" office:value="7.348" calcext:value-type="float">
            <text:p>7,34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27" calcext:value-type="float">
            <text:p>2,827</text:p>
          </table:table-cell>
          <table:table-cell table:style-name="ce6" office:value-type="float" office:value="2.878" calcext:value-type="float">
            <text:p>2,87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77" calcext:value-type="float">
            <text:p>6,177</text:p>
          </table:table-cell>
          <table:table-cell table:style-name="ce6" office:value-type="float" office:value="6.969" calcext:value-type="float">
            <text:p>6,969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7.387" calcext:value-type="float">
            <text:p>7,387</text:p>
          </table:table-cell>
          <table:table-cell table:style-name="ce6" office:value-type="float" office:value="8.256" calcext:value-type="float">
            <text:p>8,256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333" calcext:value-type="float">
            <text:p>5,333</text:p>
          </table:table-cell>
          <table:table-cell table:style-name="ce6" office:value-type="float" office:value="5.967" calcext:value-type="float">
            <text:p>5,967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5.024" calcext:value-type="float">
            <text:p>5,024</text:p>
          </table:table-cell>
          <table:table-cell table:style-name="ce6" office:value-type="float" office:value="4.965" calcext:value-type="float">
            <text:p>4,965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894" calcext:value-type="float">
            <text:p>2,894</text:p>
          </table:table-cell>
          <table:table-cell table:style-name="ce6" office:value-type="float" office:value="3.432" calcext:value-type="float">
            <text:p>3,43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38" calcext:value-type="float">
            <text:p>4,438</text:p>
          </table:table-cell>
          <table:table-cell table:style-name="ce6" office:value-type="float" office:value="5.428" calcext:value-type="float">
            <text:p>5,42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3">
          <table:table-cell table:style-name="ce4"/>
          <table:table-cell table:style-name="ce7" table:formula="of:=AVERAGE([.B445:.B454])" office:value-type="float" office:value="4.8966" calcext:value-type="float">
            <text:p>4,8966</text:p>
          </table:table-cell>
          <table:table-cell table:style-name="ce7" table:formula="of:=AVERAGE([.C445:.C454])" office:value-type="float" office:value="5.3638" calcext:value-type="float">
            <text:p>5,3638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16"/>
        <table:table-column table:style-name="co9" table:default-cell-style-name="Default"/>
        <table:table-column table:style-name="co9" table:number-columns-repeated="16378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76" calcext:value-type="percentage">
            <text:p>17,60%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78" calcext:value-type="percentage">
            <text:p>17,80%</text:p>
          </table:table-cell>
          <table:table-cell office:value-type="percentage" office:value="0.185" calcext:value-type="percentage">
            <text:p>18,50%</text:p>
          </table:table-cell>
          <table:table-cell/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021" calcext:value-type="percentage">
            <text:p>20,21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013" calcext:value-type="percentage">
            <text:p>20,13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3497" calcext:value-type="percentage">
            <text:p>34,97%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27" calcext:value-type="percentage">
            <text:p>18,27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3503" calcext:value-type="percentage">
            <text:p>35,03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3414" calcext:value-type="percentage">
            <text:p>34,14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376" calcext:value-type="percentage">
            <text:p>3,76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38" calcext:value-type="percentage">
            <text:p>48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5014" calcext:value-type="percentage">
            <text:p>50,14%</text:p>
          </table:table-cell>
          <table:table-cell office:value-type="percentage" office:value="0.5028" calcext:value-type="percentage">
            <text:p>50,28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826" calcext:value-type="percentage">
            <text:p>38,26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5961" calcext:value-type="percentage">
            <text:p>59,61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" calcext:value-type="percentage">
            <text:p>22,80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17" calcext:value-type="percentage">
            <text:p>21,70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5365" calcext:value-type="percentage">
            <text:p>53,65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129" calcext:value-type="percentage">
            <text:p>51,29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13" calcext:value-type="percentage">
            <text:p>27,13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5392" calcext:value-type="percentage">
            <text:p>53,92%</text:p>
          </table:table-cell>
          <table:table-cell office:value-type="percentage" office:value="0.4008" calcext:value-type="percentage">
            <text:p>40,08%</text:p>
          </table:table-cell>
          <table:table-cell office:value-type="percentage" office:value="0.3731" calcext:value-type="percentage">
            <text:p>37,31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085" calcext:value-type="percentage">
            <text:p>20,85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003" calcext:value-type="percentage">
            <text:p>20,0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13" calcext:value-type="percentage">
            <text:p>19,13%</text:p>
          </table:table-cell>
          <table:table-cell office:value-type="percentage" office:value="0.1917" calcext:value-type="percentage">
            <text:p>19,17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5" calcext:value-type="percentage">
            <text:p>5,00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351" calcext:value-type="percentage">
            <text:p>13,51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243" calcext:value-type="percentage">
            <text:p>12,43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3041" calcext:value-type="percentage">
            <text:p>30,41%</text:p>
          </table:table-cell>
          <table:table-cell office:value-type="percentage" office:value="0.2956" calcext:value-type="percentage">
            <text:p>29,56%</text:p>
          </table:table-cell>
          <table:table-cell/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336" calcext:value-type="percentage">
            <text:p>23,36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8" calcext:value-type="percentage">
            <text:p>17,80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37" calcext:value-type="percentage">
            <text:p>15,37%</text:p>
          </table:table-cell>
          <table:table-cell/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8" calcext:value-type="percentage">
            <text:p>9,4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936" calcext:value-type="percentage">
            <text:p>9,36%</text:p>
          </table:table-cell>
          <table:table-cell/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582" calcext:value-type="percentage">
            <text:p>15,82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371" calcext:value-type="percentage">
            <text:p>23,71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63" calcext:value-type="percentage">
            <text:p>5,63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5" calcext:value-type="percentage">
            <text:p>25,65%</text:p>
          </table:table-cell>
          <table:table-cell/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RING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557" calcext:value-type="percentage">
            <text:p>5,57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78" calcext:value-type="percentage">
            <text:p>28,78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3333" calcext:value-type="percentage">
            <text:p>33,33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4405" calcext:value-type="percentage">
            <text:p>44,05%</text:p>
          </table:table-cell>
          <table:table-cell office:value-type="percentage" office:value="0.2945" calcext:value-type="percentage">
            <text:p>29,45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05" calcext:value-type="percentage">
            <text:p>22,05%</text:p>
          </table:table-cell>
          <table:table-cell/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4" calcext:value-type="percentage">
            <text:p>10,44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149" calcext:value-type="percentage">
            <text:p>41,49%</text:p>
          </table:table-cell>
          <table:table-cell/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326" calcext:value-type="percentage">
            <text:p>23,26%</text:p>
          </table:table-cell>
          <table:table-cell/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0425" calcext:value-type="percentage">
            <text:p>4,25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2465" calcext:value-type="percentage">
            <text:p>24,65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37" calcext:value-type="percentage">
            <text:p>4,37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041" calcext:value-type="percentage">
            <text:p>10,41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03" calcext:value-type="percentage">
            <text:p>5,0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537" calcext:value-type="percentage">
            <text:p>5,37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722" calcext:value-type="percentage">
            <text:p>7,22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82" calcext:value-type="percentage">
            <text:p>1,82%</text:p>
          </table:table-cell>
          <table:table-cell office:value-type="percentage" office:value="0.023" calcext:value-type="percentage">
            <text:p>2,30%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5" calcext:value-type="percentage">
            <text:p>9,50%</text:p>
          </table:table-cell>
          <table:table-cell/>
          <table:table-cell table:style-name="Default" table:number-columns-repeated="16378"/>
        </table:table-row>
        <table:table-row table:style-name="ro5">
          <table:table-cell table:style-name="ce14"/>
          <table:table-cell table:style-name="ce17" table:formula="of:=AVERAGE([.B3:.B44])" office:value-type="percentage" office:value="0.259278571428571" calcext:value-type="percentage">
            <text:p>25,93%</text:p>
          </table:table-cell>
          <table:table-cell table:style-name="ce17" table:formula="of:=AVERAGE([.C3:.C44])" office:value-type="percentage" office:value="0.228540476190476" calcext:value-type="percentage">
            <text:p>22,85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237380952381" calcext:value-type="percentage">
            <text:p>21,24%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12" table:number-columns-repeated="5"/>
          <table:table-cell/>
          <table:table-cell table:style-name="Default" table:number-columns-repeated="16378"/>
        </table:table-row>
        <table:table-row table:style-name="ro3">
          <table:table-cell table:style-name="ce36"/>
          <table:table-cell table:style-name="ce36" office:value-type="string" calcext:value-type="string">
            <text:p>GAIN</text:p>
          </table:table-cell>
          <table:table-cell table:style-name="ce42" table:formula="of:=([.B45]-[.C45])/[.B45]" office:value-type="percentage" office:value="0.118552393546195" calcext:value-type="percentage">
            <text:p>11,86%</text:p>
          </table:table-cell>
          <table:table-cell table:style-name="ce42" table:formula="of:=([.B45]-[.D45])/[.B45]" office:value-type="percentage" office:value="0.167580374114989" calcext:value-type="percentage">
            <text:p>16,76%</text:p>
          </table:table-cell>
          <table:table-cell table:style-name="ce42" table:formula="of:=([.B45]-[.E45])/[.B45]" office:value-type="percentage" office:value="0.180904891778469" calcext:value-type="percentage">
            <text:p>18,09%</text:p>
          </table:table-cell>
          <table:table-cell table:style-name="ce44" table:number-columns-repeated="16379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  <table:table-cell table:style-name="Default"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  <table:table-cell table:style-name="Default" table:number-columns-repeated="16378"/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4301.5293/417" office:value-type="float" office:value="10.3154179856115" calcext:value-type="float">
            <text:p>10,3154179856115</text:p>
          </table:table-cell>
          <table:table-cell table:style-name="ce13" table:formula="of:=3235.858/417" office:value-type="float" office:value="7.75985131894484" calcext:value-type="float">
            <text:p>7,75985131894484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3" table:formula="of:=2429.4136/417" office:value-type="float" office:value="5.82593189448441" calcext:value-type="float">
            <text:p>5,82593189448441</text:p>
          </table:table-cell>
          <table:table-cell office:value-type="float" office:value="417" calcext:value-type="float">
            <text:p>417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7775/150" office:value-type="float" office:value="0.00385166666666667" calcext:value-type="float">
            <text:p>0,00385166666666667</text:p>
          </table:table-cell>
          <table:table-cell table:style-name="ce13" table:formula="of:=0.59957/150" office:value-type="float" office:value="0.00399713333333333" calcext:value-type="float">
            <text:p>0,00399713333333333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3" table:formula="of:=0.56746/150" office:value-type="float" office:value="0.00378306666666667" calcext:value-type="float">
            <text:p>0,00378306666666667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92.4522/39" office:value-type="float" office:value="10.0628769230769" calcext:value-type="float">
            <text:p>10,0628769230769</text:p>
          </table:table-cell>
          <table:table-cell table:style-name="ce13" table:formula="of:=377.4047/39" office:value-type="float" office:value="9.67704358974359" calcext:value-type="float">
            <text:p>9,67704358974359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3" table:formula="of:=371.8343/39" office:value-type="float" office:value="9.53421282051282" calcext:value-type="float">
            <text:p>9,53421282051282</text:p>
          </table:table-cell>
          <table:table-cell table:style-name="ce19"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225/9" office:value-type="float" office:value="0.025" calcext:value-type="float">
            <text:p>0,025</text:p>
          </table:table-cell>
          <table:table-cell table:style-name="ce13" table:formula="of:=0.18446/9" office:value-type="float" office:value="0.0204955555555556" calcext:value-type="float">
            <text:p>0,0204955555555556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3" table:formula="of:=0.0102/4" office:value-type="float" office:value="0.00255" calcext:value-type="float">
            <text:p>0,00255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39072/4" office:value-type="float" office:value="0.009768" calcext:value-type="float">
            <text:p>0,009768</text:p>
          </table:table-cell>
          <table:table-cell table:style-name="ce13" table:formula="of:=0.0206/4" office:value-type="float" office:value="0.00515" calcext:value-type="float">
            <text:p>0,0051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3" table:formula="of:=0.16395/4" office:value-type="float" office:value="0.0409875" calcext:value-type="float">
            <text:p>0,040987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2228.9029/33" office:value-type="float" office:value="67.5425121212121" calcext:value-type="float">
            <text:p>67,5425121212121</text:p>
          </table:table-cell>
          <table:table-cell table:style-name="ce13" table:formula="of:=1968.3891/33" office:value-type="float" office:value="59.6481545454545" calcext:value-type="float">
            <text:p>59,6481545454545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3" table:formula="of:=1692.1309/33" office:value-type="float" office:value="51.2766939393939" calcext:value-type="float">
            <text:p>51,2766939393939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2.83033333333333/103" office:value-type="float" office:value="0.0274789644012945" calcext:value-type="float">
            <text:p>0,0274789644012945</text:p>
          </table:table-cell>
          <table:table-cell table:style-name="ce13" table:formula="of:=2.2736/103" office:value-type="float" office:value="0.022073786407767" calcext:value-type="float">
            <text:p>0,022073786407767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3" table:formula="of:=0.5375/103" office:value-type="float" office:value="0.00521844660194175" calcext:value-type="float">
            <text:p>0,00521844660194175</text:p>
          </table:table-cell>
          <table:table-cell office:value-type="float" office:value="103" calcext:value-type="float">
            <text:p>103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5.6332/36" office:value-type="float" office:value="0.156477777777778" calcext:value-type="float">
            <text:p>0,156477777777778</text:p>
          </table:table-cell>
          <table:table-cell table:style-name="ce13" table:formula="of:=5.6779/36" office:value-type="float" office:value="0.157719444444444" calcext:value-type="float">
            <text:p>0,157719444444444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3" table:formula="of:=5.792/36" office:value-type="float" office:value="0.160888888888889" calcext:value-type="float">
            <text:p>0,160888888888889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5074/25" office:value-type="float" office:value="0.020296" calcext:value-type="float">
            <text:p>0,020296</text:p>
          </table:table-cell>
          <table:table-cell table:style-name="ce13" table:formula="of:=0.4772/25" office:value-type="float" office:value="0.019088" calcext:value-type="float">
            <text:p>0,01908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3" table:formula="of:=0.4236/25" office:value-type="float" office:value="0.016944" calcext:value-type="float">
            <text:p>0,016944</text:p>
          </table:table-cell>
          <table:table-cell table:style-name="ce19"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5/12" office:value-type="float" office:value="0.0458333333333333" calcext:value-type="float">
            <text:p>0,0458333333333333</text:p>
          </table:table-cell>
          <table:table-cell table:style-name="ce13" table:formula="of:=0.5644/12" office:value-type="float" office:value="0.0470333333333333" calcext:value-type="float">
            <text:p>0,0470333333333333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3" table:formula="of:=0.6355/12" office:value-type="float" office:value="0.0529583333333333" calcext:value-type="float">
            <text:p>0,052958333333333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66/50" office:value-type="float" office:value="0.00732" calcext:value-type="float">
            <text:p>0,00732</text:p>
          </table:table-cell>
          <table:table-cell table:style-name="ce13" table:formula="of:=0.3585/50" office:value-type="float" office:value="0.00717" calcext:value-type="float">
            <text:p>0,00717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3" table:formula="of:=0.3318/50" office:value-type="float" office:value="0.006636" calcext:value-type="float">
            <text:p>0,00663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621.2897/50" office:value-type="float" office:value="12.425794" calcext:value-type="float">
            <text:p>12,425794</text:p>
          </table:table-cell>
          <table:table-cell table:style-name="ce13" table:formula="of:=522.46265/50" office:value-type="float" office:value="10.449253" calcext:value-type="float">
            <text:p>10,449253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3" table:formula="of:=584.7715/50" office:value-type="float" office:value="11.69543" calcext:value-type="float">
            <text:p>11,69543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9.4683/99" office:value-type="float" office:value="0.0956393939393939" calcext:value-type="float">
            <text:p>0,0956393939393939</text:p>
          </table:table-cell>
          <table:table-cell table:style-name="ce13" table:formula="of:=4.3839/99" office:value-type="float" office:value="0.0442818181818182" calcext:value-type="float">
            <text:p>0,0442818181818182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3" table:formula="of:=0.8865/99" office:value-type="float" office:value="0.00895454545454546" calcext:value-type="float">
            <text:p>0,00895454545454546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57257/18" office:value-type="float" office:value="0.0318094444444444" calcext:value-type="float">
            <text:p>0,0318094444444444</text:p>
          </table:table-cell>
          <table:table-cell table:style-name="ce13" table:formula="of:=0.5063/18" office:value-type="float" office:value="0.0281277777777778" calcext:value-type="float">
            <text:p>0,0281277777777778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3" table:formula="of:=0.24347/18" office:value-type="float" office:value="0.0135261111111111" calcext:value-type="float">
            <text:p>0,0135261111111111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40454/6" office:value-type="float" office:value="0.0674233333333333" calcext:value-type="float">
            <text:p>0,0674233333333333</text:p>
          </table:table-cell>
          <table:table-cell table:style-name="ce13" table:formula="of:=0.396/6" office:value-type="float" office:value="0.066" calcext:value-type="float">
            <text:p>0,066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3" table:formula="of:=0.357/6" office:value-type="float" office:value="0.0595" calcext:value-type="float">
            <text:p>0,0595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1385/104" office:value-type="float" office:value="0.0109471153846154" calcext:value-type="float">
            <text:p>0,0109471153846154</text:p>
          </table:table-cell>
          <table:table-cell table:style-name="ce13" table:formula="of:=0.95131/104" office:value-type="float" office:value="0.00914721153846154" calcext:value-type="float">
            <text:p>0,00914721153846154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3" table:formula="of:=1.10658/104" office:value-type="float" office:value="0.0106401923076923" calcext:value-type="float">
            <text:p>0,0106401923076923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62/13" office:value-type="float" office:value="0.00627846153846154" calcext:value-type="float">
            <text:p>0,00627846153846154</text:p>
          </table:table-cell>
          <table:table-cell table:style-name="ce13" table:formula="of:=0.08143/13" office:value-type="float" office:value="0.00626384615384615" calcext:value-type="float">
            <text:p>0,00626384615384615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3" table:formula="of:=0.08166/13" office:value-type="float" office:value="0.00628153846153846" calcext:value-type="float">
            <text:p>0,00628153846153846</text:p>
          </table:table-cell>
          <table:table-cell table:style-name="ce13"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1937.37768/165" office:value-type="float" office:value="11.7416829090909" calcext:value-type="float">
            <text:p>11,7416829090909</text:p>
          </table:table-cell>
          <table:table-cell table:style-name="ce13" table:formula="of:=1759.5029/165" office:value-type="float" office:value="10.6636539393939" calcext:value-type="float">
            <text:p>10,6636539393939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3" table:formula="of:=369.54556/165" office:value-type="float" office:value="2.23967006060606" calcext:value-type="float">
            <text:p>2,23967006060606</text:p>
          </table:table-cell>
          <table:table-cell table:style-name="ce13" office:value-type="float" office:value="165" calcext:value-type="float">
            <text:p>165</text:p>
          </table:table-cell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20136/7" office:value-type="float" office:value="0.0287657142857143" calcext:value-type="float">
            <text:p>0,0287657142857143</text:p>
          </table:table-cell>
          <table:table-cell table:style-name="ce13" table:formula="of:=0.116/7" office:value-type="float" office:value="0.0165714285714286" calcext:value-type="float">
            <text:p>0,0165714285714286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3" table:formula="of:=0.0968/7" office:value-type="float" office:value="0.0138285714285714" calcext:value-type="float">
            <text:p>0,0138285714285714</text:p>
          </table:table-cell>
          <table:table-cell table:style-name="ce13"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19.2794/165" office:value-type="float" office:value="0.116844848484848" calcext:value-type="float">
            <text:p>0,116844848484848</text:p>
          </table:table-cell>
          <table:table-cell table:style-name="ce13" table:formula="of:=17.5382/165" office:value-type="float" office:value="0.106292121212121" calcext:value-type="float">
            <text:p>0,106292121212121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3" table:formula="of:=3.638/165" office:value-type="float" office:value="0.0220484848484849" calcext:value-type="float">
            <text:p>0,0220484848484849</text:p>
          </table:table-cell>
          <table:table-cell office:value-type="float" office:value="165" calcext:value-type="float">
            <text:p>165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7952/217" office:value-type="float" office:value="0.0359225806451613" calcext:value-type="float">
            <text:p>0,0359225806451613</text:p>
          </table:table-cell>
          <table:table-cell table:style-name="ce13" table:formula="of:=7.8032/217" office:value-type="float" office:value="0.0359594470046083" calcext:value-type="float">
            <text:p>0,0359594470046083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93/217" office:value-type="float" office:value="0.0359875576036866" calcext:value-type="float">
            <text:p>0,0359875576036866</text:p>
          </table:table-cell>
          <table:table-cell office:value-type="float" office:value="217" calcext:value-type="float">
            <text:p>217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7925/57" office:value-type="float" office:value="0.0314473684210526" calcext:value-type="float">
            <text:p>0,0314473684210526</text:p>
          </table:table-cell>
          <table:table-cell table:style-name="ce13" table:formula="of:=1.43788/57" office:value-type="float" office:value="0.0252259649122807" calcext:value-type="float">
            <text:p>0,0252259649122807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3" table:formula="of:=1.3288/57" office:value-type="float" office:value="0.0233122807017544" calcext:value-type="float">
            <text:p>0,02331228070175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406.64227/95" office:value-type="float" office:value="4.28044494736842" calcext:value-type="float">
            <text:p>4,28044494736842</text:p>
          </table:table-cell>
          <table:table-cell table:style-name="ce13" table:formula="of:=182.75549/95" office:value-type="float" office:value="1.923742" calcext:value-type="float">
            <text:p>1,923742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3" table:formula="of:=102.8543/95" office:value-type="float" office:value="1.08267684210526" calcext:value-type="float">
            <text:p>1,08267684210526</text:p>
          </table:table-cell>
          <table:table-cell table:style-name="ce13"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30977/104" office:value-type="float" office:value="0.0414400961538462" calcext:value-type="float">
            <text:p>0,0414400961538462</text:p>
          </table:table-cell>
          <table:table-cell table:style-name="ce13" table:formula="of:=4.5481/104" office:value-type="float" office:value="0.0437317307692308" calcext:value-type="float">
            <text:p>0,0437317307692308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3" table:formula="of:=5.3638/104" office:value-type="float" office:value="0.051575" calcext:value-type="float">
            <text:p>0,051575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78"/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33303/13" office:value-type="float" office:value="0.0256176923076923" calcext:value-type="float">
            <text:p>0,0256176923076923</text:p>
          </table:table-cell>
          <table:table-cell table:style-name="ce13" table:formula="of:=0.4484/13" office:value-type="float" office:value="0.0344923076923077" calcext:value-type="float">
            <text:p>0,0344923076923077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3" table:formula="of:=0.45697/13" office:value-type="float" office:value="0.0351515384615385" calcext:value-type="float">
            <text:p>0,0351515384615385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4">
          <table:table-cell/>
          <table:table-cell table:style-name="Default" table:number-columns-repeated="4"/>
          <table:table-cell/>
          <table:table-cell table:style-name="Default" table:number-columns-repeated="16378"/>
        </table:table-row>
        <table:table-row table:style-name="ro5">
          <table:table-cell/>
          <table:table-cell table:style-name="Default" table:number-columns-repeated="4"/>
          <table:table-cell table:style-name="ce14"/>
          <table:table-cell table:style-name="Default" table:number-columns-repeated="16378"/>
        </table:table-row>
        <table:table-row table:style-name="ro5">
          <table:table-cell table:style-name="ce14"/>
          <table:table-cell table:style-name="ce14" table:formula="of:=AVERAGE([.B50:.B74])" office:value-type="float" office:value="4.6862756270991" calcext:value-type="float">
            <text:p>4,6862756270991</text:p>
          </table:table-cell>
          <table:table-cell table:style-name="ce14" table:formula="of:=AVERAGE([.C50:.C74])" office:value-type="float" office:value="4.03282077201701" calcext:value-type="float">
            <text:p>4,03282077201701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28901550451889" calcext:value-type="float">
            <text:p>3,28901550451889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12"/>
          <table:table-cell table:style-name="ce12" office:value-type="string" calcext:value-type="string">
            <text:p>GAIN</text:p>
          </table:table-cell>
          <table:table-cell table:style-name="ce18" table:formula="of:=([.B77]-[.C77])/[.B77]" office:value-type="percentage" office:value="0.13944012411549" calcext:value-type="percentage">
            <text:p>13,94%</text:p>
          </table:table-cell>
          <table:table-cell table:style-name="ce18" table:formula="of:=([.B77]-[.D77])/[.B77]" office:value-type="percentage" office:value="0.282675666533509" calcext:value-type="percentage">
            <text:p>28,27%</text:p>
          </table:table-cell>
          <table:table-cell table:style-name="ce18" table:formula="of:=([.B77]-[.E77])/[.B77]" office:value-type="percentage" office:value="0.298160038752382" calcext:value-type="percentage">
            <text:p>29,82%</text:p>
          </table:table-cell>
          <table:table-cell table:style-name="ce12" table:number-columns-repeated="16379"/>
        </table:table-row>
      </table:table>
      <table:table table:name="methods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28"/>
        <table:table-column table:style-name="co11" table:default-cell-style-name="ce16"/>
        <table:table-column table:style-name="co12" table:number-columns-repeated="2" table:default-cell-style-name="ce16"/>
        <table:table-row table:style-name="ro3">
          <table:table-cell table:number-columns-repeated="2"/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style-name="ce38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4">
          <table:table-cell office:value-type="string" calcext:value-type="string">
            <text:p>Appendicitis</text:p>
          </table:table-cell>
          <table:table-cell table:style-name="ce28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4">
          <table:table-cell office:value-type="string" calcext:value-type="string">
            <text:p>Australian</text:p>
          </table:table-cell>
          <table:table-cell table:style-name="ce28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table:style-name="ce28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4">
          <table:table-cell office:value-type="string" calcext:value-type="string">
            <text:p>Banana</text:p>
          </table:table-cell>
          <table:table-cell table:style-name="ce28"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4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table:style-name="ce28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4">
          <table:table-cell office:value-type="string" calcext:value-type="string">
            <text:p>Contraceptiv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Dermatology</text:p>
          </table:table-cell>
          <table:table-cell table:style-name="ce28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4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table:style-name="ce28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table:style-name="ce28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4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table:style-name="ce28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table:style-name="ce28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table:style-name="ce28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4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4">
          <table:table-cell office:value-type="string" calcext:value-type="string">
            <text:p>Mammographic</text:p>
          </table:table-cell>
          <table:table-cell table:style-name="ce28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arkinsons</text:p>
          </table:table-cell>
          <table:table-cell table:style-name="ce28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4">
          <table:table-cell office:value-type="string" calcext:value-type="string">
            <text:p>Pima</text:p>
          </table:table-cell>
          <table:table-cell table:style-name="ce28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Pirvision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opfailures</text:p>
          </table:table-cell>
          <table:table-cell table:style-name="ce28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table:style-name="ce28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4">
          <table:table-cell office:value-type="string" calcext:value-type="string">
            <text:p>Saheart</text:p>
          </table:table-cell>
          <table:table-cell table:style-name="ce28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Segment</text:p>
          </table:table-cell>
          <table:table-cell table:style-name="ce28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4">
          <table:table-cell office:value-type="string" calcext:value-type="string">
            <text:p>Spiral</text:p>
          </table:table-cell>
          <table:table-cell table:style-name="ce28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4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table:style-name="ce28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table:style-name="ce28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table:style-name="ce28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4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table:style-name="ce28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table:style-name="ce28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table:style-name="ce28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5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36" office:value-type="string" calcext:value-type="string" table:number-columns-spanned="3" table:number-rows-spanned="1">
            <text:p>REGRESSION DATASETS</text:p>
          </table:table-cell>
          <table:covered-table-cell table:style-name="ce36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4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4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5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table table:name="nc_exp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2766" calcext:value-type="percentage">
            <text:p>27,6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2</text:p>
          </table:table-cell>
          <table:table-cell table:style-name="ce3" office:value-type="percentage" office:value="0.0297" calcext:value-type="percentage">
            <text:p>2,97%</text:p>
          </table:table-cell>
          <table:table-cell table:style-name="ce3" office:value-type="percentage" office:value="0.0662" calcext:value-type="percentage">
            <text:p>6,62%</text:p>
          </table:table-cell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style-name="ce3" office:value-type="percentage" office:value="0.0257" calcext:value-type="percentage">
            <text:p>2,57%</text:p>
          </table:table-cell>
          <table:table-cell table:style-name="ce3" office:value-type="percentage" office:value="0.0459" calcext:value-type="percentage">
            <text:p>4,59%</text:p>
          </table:table-cell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527" calcext:value-type="percentage">
            <text:p>5,27%</text:p>
          </table:table-cell>
          <table:table-cell table:style-name="ce3" office:value-type="percentage" office:value="0.0649" calcext:value-type="percentage">
            <text:p>6,49%</text:p>
          </table:table-cell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6</text:p>
          </table:table-cell>
          <table:table-cell table:style-name="ce3" office:value-type="percentage" office:value="0.0378" calcext:value-type="percentage">
            <text:p>3,78%</text:p>
          </table:table-cell>
          <table:table-cell table:style-name="ce3" office:value-type="percentage" office:value="0.0635" calcext:value-type="percentage">
            <text:p>6,35%</text:p>
          </table:table-cell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style-name="ce3" office:value-type="percentage" office:value="0.0122" calcext:value-type="percentage">
            <text:p>1,22%</text:p>
          </table:table-cell>
          <table:table-cell table:style-name="ce3" office:value-type="percentage" office:value="0.0595" calcext:value-type="percentage">
            <text:p>5,95%</text:p>
          </table:table-cell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8</text:p>
          </table:table-cell>
          <table:table-cell table:style-name="ce3" office:value-type="percentage" office:value="0.0514" calcext:value-type="percentage">
            <text:p>5,14%</text:p>
          </table:table-cell>
          <table:table-cell table:style-name="ce3" office:value-type="percentage" office:value="0.0514" calcext:value-type="percentage">
            <text:p>5,14%</text:p>
          </table:table-cell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</table:table-row>
        <table:table-row table:style-name="ro1">
          <table:table-cell table:style-name="ce1"/>
          <table:table-cell table:style-name="ce1" table:formula="of:=AVERAGE([.B2:.B11])" office:value-type="percentage" office:value="0.1936" calcext:value-type="percentage">
            <text:p>19,36%</text:p>
          </table:table-cell>
          <table:table-cell table:style-name="ce1" table:formula="of:=AVERAGE([.C2:.C11])" office:value-type="percentage" office:value="0.20212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4459" calcext:value-type="percentage">
            <text:p>4,46%</text:p>
          </table:table-cell>
          <table:table-cell table:style-name="ce1" table:formula="of:=AVERAGE([.G2:.G11])" office:value-type="percentage" office:value="0.05878" calcext:value-type="percentage">
            <text:p>5,8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074" calcext:value-type="percentage">
            <text:p>20,74%</text:p>
          </table:table-cell>
          <table:table-cell table:style-name="ce3" office:value-type="percentage" office:value="0.2148" calcext:value-type="percentage">
            <text:p>21,48%</text:p>
          </table:table-cell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704" calcext:value-type="percentage">
            <text:p>17,04%</text:p>
          </table:table-cell>
          <table:table-cell table:style-name="ce3" office:value-type="percentage" office:value="0.2074" calcext:value-type="percentage">
            <text:p>20,74%</text:p>
          </table:table-cell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407" calcext:value-type="percentage">
            <text:p>14,07%</text:p>
          </table:table-cell>
          <table:table-cell/>
          <table:table-cell office:value-type="string" calcext:value-type="string">
            <text:p>Statheart_3</text:p>
          </table:table-cell>
          <table:table-cell table:style-name="ce3" office:value-type="percentage" office:value="0.2481" calcext:value-type="percentage">
            <text:p>24,81%</text:p>
          </table:table-cell>
          <table:table-cell table:style-name="ce3" office:value-type="percentage" office:value="0.2074" calcext:value-type="percentage">
            <text:p>20,74%</text:p>
          </table:table-cell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4</text:p>
          </table:table-cell>
          <table:table-cell table:number-columns-repeated="2" table:style-name="ce3"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889" calcext:value-type="percentage">
            <text:p>28,89%</text:p>
          </table:table-cell>
          <table:table-cell table:style-name="ce3" office:value-type="percentage" office:value="0.2815" calcext:value-type="percentage">
            <text:p>28,15%</text:p>
          </table:table-cell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185" calcext:value-type="percentage">
            <text:p>31,85%</text:p>
          </table:table-cell>
          <table:table-cell table:style-name="ce3" office:value-type="percentage" office:value="0.3222" calcext:value-type="percentage">
            <text:p>32,22%</text:p>
          </table:table-cell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3185" calcext:value-type="percentage">
            <text:p>31,85%</text:p>
          </table:table-cell>
          <table:table-cell table:style-name="ce3"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Phoneme_8</text:p>
          </table:table-cell>
          <table:table-cell table:number-columns-repeated="2" office:value-type="percentage" office:value="0.1741" calcext:value-type="percentage">
            <text:p>17,41%</text:p>
          </table:table-cell>
          <table:table-cell/>
          <table:table-cell office:value-type="string" calcext:value-type="string">
            <text:p>Statheart_8</text:p>
          </table:table-cell>
          <table:table-cell table:style-name="ce3" office:value-type="percentage" office:value="0.2741" calcext:value-type="percentage">
            <text:p>27,41%</text:p>
          </table:table-cell>
          <table:table-cell table:style-name="ce3" office:value-type="percentage" office:value="0.2704" calcext:value-type="percentage">
            <text:p>27,04%</text:p>
          </table:table-cell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1537" calcext:value-type="percentage">
            <text:p>15,37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407" calcext:value-type="percentage">
            <text:p>14,07%</text:p>
          </table:table-cell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8" calcext:value-type="percentage">
            <text:p>12,78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593" calcext:value-type="percentage">
            <text:p>25,93%</text:p>
          </table:table-cell>
        </table:table-row>
        <table:table-row table:style-name="ro1">
          <table:table-cell table:style-name="ce1"/>
          <table:table-cell table:style-name="ce1" table:formula="of:=AVERAGE([.B14:.B23])" office:value-type="percentage" office:value="0.16371" calcext:value-type="percentage">
            <text:p>16,37%</text:p>
          </table:table-cell>
          <table:table-cell table:style-name="ce1" table:formula="of:=AVERAGE([.C14:.C23])" office:value-type="percentage" office:value="0.15538" calcext:value-type="percentage">
            <text:p>15,54%</text:p>
          </table:table-cell>
          <table:table-cell/>
          <table:table-cell table:style-name="ce1"/>
          <table:table-cell table:style-name="ce1" table:formula="of:=AVERAGE([.F14:.F23])" office:value-type="percentage" office:value="0.25112" calcext:value-type="percentage">
            <text:p>25,11%</text:p>
          </table:table-cell>
          <table:table-cell table:style-name="ce1" table:formula="of:=AVERAGE([.G14:.G23])" office:value-type="percentage" office:value="0.24297" calcext:value-type="percentage">
            <text:p>24,30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string" calcext:value-type="string">
            <text:p>x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35" calcext:value-type="percentage">
            <text:p>35,00%</text:p>
          </table:table-cell>
          <table:table-cell table:style-name="ce3" office:value-type="percentage" office:value="0.3714" calcext:value-type="percentage">
            <text:p>37,14%</text:p>
          </table:table-cell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2857" calcext:value-type="percentage">
            <text:p>28,57%</text:p>
          </table:table-cell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percentage" office:value="0.5463" calcext:value-type="percentage">
            <text:p>54,63%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071" calcext:value-type="percentage">
            <text:p>20,71%</text:p>
          </table:table-cell>
          <table:table-cell table:style-name="ce3" office:value-type="percentage" office:value="0.2786" calcext:value-type="percentage">
            <text:p>27,86%</text:p>
          </table:table-cell>
        </table:table-row>
        <table:table-row table:style-name="ro1">
          <table:table-cell office:value-type="string" calcext:value-type="string">
            <text:p>Optdigits_4</text:p>
          </table:table-cell>
          <table:table-cell office:value-type="percentage" office:value="0.5107" calcext:value-type="percentage">
            <text:p>51,07%</text:p>
          </table:table-cell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214" calcext:value-type="percentage">
            <text:p>12,14%</text:p>
          </table:table-cell>
          <table:table-cell table:style-name="ce3" office:value-type="percentage" office:value="0.1357" calcext:value-type="percentage">
            <text:p>13,57%</text:p>
          </table:table-cell>
        </table:table-row>
        <table:table-row table:style-name="ro1">
          <table:table-cell office:value-type="string" calcext:value-type="string">
            <text:p>Optdigits_5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3929" calcext:value-type="percentage">
            <text:p>39,29%</text:p>
          </table:table-cell>
          <table:table-cell table:style-name="ce3" office:value-type="percentage" office:value="0.4429" calcext:value-type="percentage">
            <text:p>44,29%</text:p>
          </table:table-cell>
        </table:table-row>
        <table:table-row table:style-name="ro1">
          <table:table-cell office:value-type="string" calcext:value-type="string">
            <text:p>Optdigits_6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571" calcext:value-type="percentage">
            <text:p>25,71%</text:p>
          </table:table-cell>
        </table:table-row>
        <table:table-row table:style-name="ro1">
          <table:table-cell office:value-type="string" calcext:value-type="string">
            <text:p>Optdigits_7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643" calcext:value-type="percentage">
            <text:p>16,43%</text:p>
          </table:table-cell>
          <table:table-cell table:style-name="ce3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Optdigits_8</text:p>
          </table:table-cell>
          <table:table-cell office:value-type="percentage" office:value="0.5338" calcext:value-type="percentage">
            <text:p>53,38%</text:p>
          </table:table-cell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286" calcext:value-type="percentage">
            <text:p>12,86%</text:p>
          </table:table-cell>
          <table:table-cell table:style-name="ce3" office:value-type="percentage" office:value="0.2286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Optdigits_9</text:p>
          </table:table-cell>
          <table:table-cell office:value-type="percentage" office:value="0.5409" calcext:value-type="percentage">
            <text:p>54,09%</text:p>
          </table:table-cell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3214" calcext:value-type="percentage">
            <text:p>32,14%</text:p>
          </table:table-cell>
        </table:table-row>
        <table:table-row table:style-name="ro1">
          <table:table-cell office:value-type="string" calcext:value-type="string">
            <text:p>Optdigits_10</text:p>
          </table:table-cell>
          <table:table-cell office:value-type="percentage" office:value="0.5694" calcext:value-type="percentage">
            <text:p>56,94%</text:p>
          </table:table-cell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3571" calcext:value-type="percentage">
            <text:p>35,71%</text:p>
          </table:table-cell>
        </table:table-row>
        <table:table-row table:style-name="ro1">
          <table:table-cell table:style-name="ce1"/>
          <table:table-cell table:style-name="ce1" table:formula="of:=AVERAGE([.B26:.B35])" office:value-type="percentage" office:value="0.546844444444445" calcext:value-type="percentage">
            <text:p>54,68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2428" calcext:value-type="percentage">
            <text:p>22,43%</text:p>
          </table:table-cell>
          <table:table-cell table:style-name="ce1" table:formula="of:=AVERAGE([.G26:.G35])" office:value-type="percentage" office:value="0.29785" calcext:value-type="percentage">
            <text:p>29,79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106" calcext:value-type="percentage">
            <text:p>10,60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0957" calcext:value-type="percentage">
            <text:p>9,57%</text:p>
          </table:table-cell>
          <table:table-cell table:style-name="ce3" office:value-type="percentage" office:value="0.1043" calcext:value-type="percentage">
            <text:p>10,43%</text:p>
          </table:table-cell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87" calcext:value-type="percentage">
            <text:p>10,87%</text:p>
          </table:table-cell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3</text:p>
          </table:table-cell>
          <table:table-cell table:style-name="ce3"/>
          <table:table-cell table:style-name="ce3" office:value-type="percentage" office:value="0.1197" calcext:value-type="percentage">
            <text:p>11,97%</text:p>
          </table:table-cell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9" calcext:value-type="percentage">
            <text:p>10,79%</text:p>
          </table:table-cell>
          <table:table-cell/>
          <table:table-cell office:value-type="string" calcext:value-type="string">
            <text:p>Spambase_4</text:p>
          </table:table-cell>
          <table:table-cell table:style-name="ce3"/>
          <table:table-cell table:style-name="ce3" office:value-type="percentage" office:value="0.1109" calcext:value-type="percentage">
            <text:p>11,09%</text:p>
          </table:table-cell>
        </table:table-row>
        <table:table-row table:style-name="ro1">
          <table:table-cell office:value-type="string" calcext:value-type="string">
            <text:p>PageBlocks_5</text:p>
          </table:table-cell>
          <table:table-cell/>
          <table:table-cell office:value-type="percentage" office:value="0.1024" calcext:value-type="percentage">
            <text:p>10,24%</text:p>
          </table:table-cell>
          <table:table-cell/>
          <table:table-cell office:value-type="string" calcext:value-type="string">
            <text:p>Spambase_5</text:p>
          </table:table-cell>
          <table:table-cell table:style-name="ce3"/>
          <table:table-cell table:style-name="ce3" office:value-type="percentage" office:value="0.0935" calcext:value-type="percentage">
            <text:p>9,35%</text:p>
          </table:table-cell>
        </table:table-row>
        <table:table-row table:style-name="ro1">
          <table:table-cell office:value-type="string" calcext:value-type="string">
            <text:p>PageBlocks_6</text:p>
          </table:table-cell>
          <table:table-cell/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6</text:p>
          </table:table-cell>
          <table:table-cell table:style-name="ce3"/>
          <table:table-cell table:style-name="ce3" office:value-type="percentage" office:value="0.1087" calcext:value-type="percentage">
            <text:p>10,87%</text:p>
          </table:table-cell>
        </table:table-row>
        <table:table-row table:style-name="ro1">
          <table:table-cell office:value-type="string" calcext:value-type="string">
            <text:p>PageBlocks_7</text:p>
          </table:table-cell>
          <table:table-cell/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/>
          <table:table-cell table:style-name="ce3" office:value-type="percentage" office:value="0.1978" calcext:value-type="percentage">
            <text:p>19,78%</text:p>
          </table:table-cell>
        </table:table-row>
        <table:table-row table:style-name="ro1">
          <table:table-cell office:value-type="string" calcext:value-type="string">
            <text:p>PageBlocks_8</text:p>
          </table:table-cell>
          <table:table-cell/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8</text:p>
          </table:table-cell>
          <table:table-cell table:style-name="ce3"/>
          <table:table-cell table:style-name="ce3" office:value-type="percentage" office:value="0.0957" calcext:value-type="percentage">
            <text:p>9,57%</text:p>
          </table:table-cell>
        </table:table-row>
        <table:table-row table:style-name="ro1">
          <table:table-cell office:value-type="string" calcext:value-type="string">
            <text:p>PageBlocks_9</text:p>
          </table:table-cell>
          <table:table-cell/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9</text:p>
          </table:table-cell>
          <table:table-cell table:style-name="ce3"/>
          <table:table-cell table:style-name="ce3" office:value-type="percentage" office:value="0.1109" calcext:value-type="percentage">
            <text:p>11,09%</text:p>
          </table:table-cell>
        </table:table-row>
        <table:table-row table:style-name="ro1">
          <table:table-cell office:value-type="string" calcext:value-type="string">
            <text:p>PageBlocks_10</text:p>
          </table:table-cell>
          <table:table-cell/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/>
          <table:table-cell office:value-type="percentage" office:value="0.1239" calcext:value-type="percentage">
            <text:p>12,39%</text:p>
          </table:table-cell>
        </table:table-row>
        <table:table-row table:style-name="ro1">
          <table:table-cell table:style-name="ce1"/>
          <table:table-cell table:style-name="ce1" table:formula="of:=AVERAGE([.B38:.B47])" office:value-type="percentage" office:value="0.10925" calcext:value-type="percentage">
            <text:p>10,93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11" calcext:value-type="percentage">
            <text:p>10,11%</text:p>
          </table:table-cell>
          <table:table-cell table:style-name="ce1" table:formula="of:=AVERAGE([.G38:.G47])" office:value-type="percentage" office:value="0.11741" calcext:value-type="percentage">
            <text:p>11,7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16" calcext:value-type="percentage">
            <text:p>31,16%</text:p>
          </table:table-cell>
          <table:table-cell table:style-name="ce3" office:value-type="percentage" office:value="0.3159" calcext:value-type="percentage">
            <text:p>31,59%</text:p>
          </table:table-cell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014" calcext:value-type="percentage">
            <text:p>10,14%</text:p>
          </table:table-cell>
          <table:table-cell table:style-name="ce3" office:value-type="percentage" office:value="0.1203" calcext:value-type="percentage">
            <text:p>12,03%</text:p>
          </table:table-cell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71" calcext:value-type="percentage">
            <text:p>17,10%</text:p>
          </table:table-cell>
          <table:table-cell table:style-name="ce3" office:value-type="percentage" office:value="0.2058" calcext:value-type="percentage">
            <text:p>20,58%</text:p>
          </table:table-cell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913" calcext:value-type="percentage">
            <text:p>19,13%</text:p>
          </table:table-cell>
          <table:table-cell table:style-name="ce3" office:value-type="percentage" office:value="0.1942" calcext:value-type="percentage">
            <text:p>19,42%</text:p>
          </table:table-cell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536" calcext:value-type="percentage">
            <text:p>15,36%</text:p>
          </table:table-cell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681" calcext:value-type="percentage">
            <text:p>16,81%</text:p>
          </table:table-cell>
          <table:table-cell table:style-name="ce3" office:value-type="percentage" office:value="0.2246" calcext:value-type="percentage">
            <text:p>22,46%</text:p>
          </table:table-cell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536" calcext:value-type="percentage">
            <text:p>25,36%</text:p>
          </table:table-cell>
          <table:table-cell table:style-name="ce3" office:value-type="percentage" office:value="0.2957" calcext:value-type="percentage">
            <text:p>29,57%</text:p>
          </table:table-cell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304" calcext:value-type="percentage">
            <text:p>13,04%</text:p>
          </table:table-cell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1971" calcext:value-type="percentage">
            <text:p>19,71%</text:p>
          </table:table-cell>
          <table:table-cell table:style-name="ce3" office:value-type="percentage" office:value="0.2638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1899" calcext:value-type="percentage">
            <text:p>18,99%</text:p>
          </table:table-cell>
        </table:table-row>
        <table:table-row table:style-name="ro1">
          <table:table-cell table:style-name="ce1"/>
          <table:table-cell table:style-name="ce1" table:formula="of:=AVERAGE([.B50:.B59])" office:value-type="percentage" office:value="0.154" calcext:value-type="percentage">
            <text:p>15,40%</text:p>
          </table:table-cell>
          <table:table-cell table:style-name="ce1" table:formula="of:=AVERAGE([.C50:.C59])" office:value-type="percentage" office:value="0.194" calcext:value-type="percentage">
            <text:p>19,40%</text:p>
          </table:table-cell>
          <table:table-cell/>
          <table:table-cell table:style-name="ce1"/>
          <table:table-cell table:style-name="ce1" table:formula="of:=AVERAGE([.F50:.F59])" office:value-type="percentage" office:value="0.1781" calcext:value-type="percentage">
            <text:p>17,81%</text:p>
          </table:table-cell>
          <table:table-cell table:style-name="ce1" table:formula="of:=AVERAGE([.G50:.G59])" office:value-type="percentage" office:value="0.20942" calcext:value-type="percentage">
            <text:p>20,9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425" calcext:value-type="percentage">
            <text:p>42,50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Bands_5</text:p>
          </table:table-cell>
          <table:table-cell table:number-columns-repeated="2" office:value-type="percentage" office:value="0.4111" calcext:value-type="percentage">
            <text:p>41,11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861" calcext:value-type="percentage">
            <text:p>48,61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861" calcext:value-type="percentage">
            <text:p>28,61%</text:p>
          </table:table-cell>
          <table:table-cell office:value-type="percentage" office:value="0.3056" calcext:value-type="percentage">
            <text:p>30,56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306" calcext:value-type="percentage">
            <text:p>43,06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table:style-name="ce1"/>
          <table:table-cell table:style-name="ce1" table:formula="of:=AVERAGE([.B62:.B71])" office:value-type="percentage" office:value="0.36167" calcext:value-type="percentage">
            <text:p>36,17%</text:p>
          </table:table-cell>
          <table:table-cell table:style-name="ce1" table:formula="of:=AVERAGE([.C62:.C71])" office:value-type="percentage" office:value="0.36611" calcext:value-type="percentage">
            <text:p>36,61%</text:p>
          </table:table-cell>
          <table:table-cell/>
          <table:table-cell table:style-name="ce1"/>
          <table:table-cell table:style-name="ce1" table:formula="of:=AVERAGE([.F62:.F71])" office:value-type="percentage" office:value="0.0529" calcext:value-type="percentage">
            <text:p>5,29%</text:p>
          </table:table-cell>
          <table:table-cell table:style-name="ce1" table:formula="of:=AVERAGE([.G62:.G71])" office:value-type="percentage" office:value="0.0642" calcext:value-type="percentage">
            <text:p>6,4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6483" calcext:value-type="percentage">
            <text:p>64,83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943" calcext:value-type="percentage">
            <text:p>39,43%</text:p>
          </table:table-cell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069" calcext:value-type="percentage">
            <text:p>50,69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3943" calcext:value-type="percentage">
            <text:p>39,43%</text:p>
          </table:table-cell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241" calcext:value-type="percentage">
            <text:p>52,41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114" calcext:value-type="percentage">
            <text:p>41,14%</text:p>
          </table:table-cell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3743" calcext:value-type="percentage">
            <text:p>37,43%</text:p>
          </table:table-cell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414" calcext:value-type="percentage">
            <text:p>54,14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543" calcext:value-type="percentage">
            <text:p>55,43%</text:p>
          </table:table-cell>
          <table:table-cell office:value-type="percentage" office:value="0.5229" calcext:value-type="percentage">
            <text:p>52,29%</text:p>
          </table:table-cell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414" calcext:value-type="percentage">
            <text:p>34,1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86" calcext:value-type="percentage">
            <text:p>40,86%</text:p>
          </table:table-cell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4029" calcext:value-type="percentage">
            <text:p>40,29%</text:p>
          </table:table-cell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4571" calcext:value-type="percentage">
            <text:p>45,71%</text:p>
          </table:table-cell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4543" calcext:value-type="percentage">
            <text:p>45,43%</text:p>
          </table:table-cell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743" calcext:value-type="percentage">
            <text:p>37,43%</text:p>
          </table:table-cell>
        </table:table-row>
        <table:table-row table:style-name="ro1">
          <table:table-cell table:style-name="ce1"/>
          <table:table-cell table:style-name="ce1" table:formula="of:=AVERAGE([.B75:.B84])" office:value-type="percentage" office:value="0.5038" calcext:value-type="percentage">
            <text:p>50,38%</text:p>
          </table:table-cell>
          <table:table-cell table:style-name="ce1" table:formula="of:=AVERAGE([.C75:.C84])" office:value-type="percentage" office:value="0.48863" calcext:value-type="percentage">
            <text:p>48,86%</text:p>
          </table:table-cell>
          <table:table-cell/>
          <table:table-cell table:style-name="ce1"/>
          <table:table-cell table:style-name="ce1" table:formula="of:=AVERAGE([.F75:.F84])" office:value-type="percentage" office:value="0.40829" calcext:value-type="percentage">
            <text:p>40,83%</text:p>
          </table:table-cell>
          <table:table-cell table:style-name="ce1" table:formula="of:=AVERAGE([.G75:.G84])" office:value-type="percentage" office:value="0.41944" calcext:value-type="percentage">
            <text:p>41,94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6364" calcext:value-type="percentage">
            <text:p>63,64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182" calcext:value-type="percentage">
            <text:p>51,82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576" calcext:value-type="percentage">
            <text:p>65,76%</text:p>
          </table:table-cell>
          <table:table-cell office:value-type="percentage" office:value="0.6727" calcext:value-type="percentage">
            <text:p>67,2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603" calcext:value-type="percentage">
            <text:p>60,30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879" calcext:value-type="percentage">
            <text:p>68,79%</text:p>
          </table:table-cell>
          <table:table-cell office:value-type="percentage" office:value="0.6818" calcext:value-type="percentage">
            <text:p>68,18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576" calcext:value-type="percentage">
            <text:p>55,76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Fert_6</text:p>
          </table:table-cell>
          <table:table-cell table:number-columns-repeated="2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758" calcext:value-type="percentage">
            <text:p>67,58%</text:p>
          </table:table-cell>
          <table:table-cell office:value-type="percentage" office:value="0.697" calcext:value-type="percentage">
            <text:p>69,70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636" calcext:value-type="percentage">
            <text:p>56,36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545" calcext:value-type="percentage">
            <text:p>65,45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table:style-name="ce1"/>
          <table:table-cell table:style-name="ce1" table:formula="of:=AVERAGE([.B88:.B97])" office:value-type="percentage" office:value="0.59515" calcext:value-type="percentage">
            <text:p>59,52%</text:p>
          </table:table-cell>
          <table:table-cell table:style-name="ce1" table:formula="of:=AVERAGE([.C88:.C97])" office:value-type="percentage" office:value="0.60758" calcext:value-type="percentage">
            <text:p>60,76%</text:p>
          </table:table-cell>
          <table:table-cell/>
          <table:table-cell table:style-name="ce1"/>
          <table:table-cell table:style-name="ce1" table:formula="of:=AVERAGE([.F88:.F97])" office:value-type="percentage" office:value="0.24" calcext:value-type="percentage">
            <text:p>24,00%</text:p>
          </table:table-cell>
          <table:table-cell table:style-name="ce1" table:formula="of:=AVERAGE([.G88:.G97])" office:value-type="percentage" office:value="0.211" calcext:value-type="percentage">
            <text:p>21,1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429" calcext:value-type="percentage">
            <text:p>64,29%</text:p>
          </table:table-cell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1468" calcext:value-type="percentage">
            <text:p>14,68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381" calcext:value-type="percentage">
            <text:p>63,81%</text:p>
          </table:table-cell>
          <table:table-cell office:value-type="percentage" office:value="0.7857" calcext:value-type="percentage">
            <text:p>78,57%</text:p>
          </table:table-cell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6857" calcext:value-type="percentage">
            <text:p>68,57%</text:p>
          </table:table-cell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403" calcext:value-type="percentage">
            <text:p>14,03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5905" calcext:value-type="percentage">
            <text:p>59,05%</text:p>
          </table:table-cell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871" calcext:value-type="percentage">
            <text:p>18,71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5857" calcext:value-type="percentage">
            <text:p>58,57%</text:p>
          </table:table-cell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903" calcext:value-type="percentage">
            <text:p>9,03%</text:p>
          </table:table-cell>
          <table:table-cell office:value-type="percentage" office:value="0.0758" calcext:value-type="percentage">
            <text:p>7,58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286" calcext:value-type="percentage">
            <text:p>52,86%</text:p>
          </table:table-cell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113" calcext:value-type="percentage">
            <text:p>21,13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1452" calcext:value-type="percentage">
            <text:p>14,5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5952" calcext:value-type="percentage">
            <text:p>59,52%</text:p>
          </table:table-cell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4286" calcext:value-type="percentage">
            <text:p>42,86%</text:p>
          </table:table-cell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7381" calcext:value-type="percentage">
            <text:p>73,81%</text:p>
          </table:table-cell>
        </table:table-row>
        <table:table-row table:style-name="ro1">
          <table:table-cell table:style-name="ce1"/>
          <table:table-cell table:style-name="ce1" table:formula="of:=AVERAGE([.B101:.B110])" office:value-type="percentage" office:value="0.17839" calcext:value-type="percentage">
            <text:p>17,84%</text:p>
          </table:table-cell>
          <table:table-cell table:style-name="ce1" table:formula="of:=AVERAGE([.C101:.C110])" office:value-type="percentage" office:value="0.16968" calcext:value-type="percentage">
            <text:p>16,97%</text:p>
          </table:table-cell>
          <table:table-cell/>
          <table:table-cell table:style-name="ce1"/>
          <table:table-cell table:style-name="ce1" table:formula="of:=AVERAGE([.F101:.F110])" office:value-type="percentage" office:value="0.51618" calcext:value-type="percentage">
            <text:p>51,62%</text:p>
          </table:table-cell>
          <table:table-cell table:style-name="ce1" table:formula="of:=AVERAGE([.G101:.G110])" office:value-type="percentage" office:value="0.62143" calcext:value-type="percentage">
            <text:p>62,14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077" calcext:value-type="percentage">
            <text:p>40,77%</text:p>
          </table:table-cell>
          <table:table-cell office:value-type="percentage" office:value="0.5308" calcext:value-type="percentage">
            <text:p>53,08%</text:p>
          </table:table-cell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846" calcext:value-type="percentage">
            <text:p>28,46%</text:p>
          </table:table-cell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154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077" calcext:value-type="percentage">
            <text:p>60,77%</text:p>
          </table:table-cell>
          <table:table-cell office:value-type="percentage" office:value="0.5769" calcext:value-type="percentage">
            <text:p>57,69%</text:p>
          </table:table-cell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4077" calcext:value-type="percentage">
            <text:p>40,77%</text:p>
          </table:table-cell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5231" calcext:value-type="percentage">
            <text:p>52,31%</text:p>
          </table:table-cell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54" calcext:value-type="percentage">
            <text:p>31,54%</text:p>
          </table:table-cell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4077" calcext:value-type="percentage">
            <text:p>40,77%</text:p>
          </table:table-cell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769" calcext:value-type="percentage">
            <text:p>47,69%</text:p>
          </table:table-cell>
        </table:table-row>
        <table:table-row table:style-name="ro1">
          <table:table-cell table:style-name="ce1"/>
          <table:table-cell table:style-name="ce1" table:formula="of:=AVERAGE([.B114:.B123])" office:value-type="percentage" office:value="0.27533" calcext:value-type="percentage">
            <text:p>27,53%</text:p>
          </table:table-cell>
          <table:table-cell table:style-name="ce1" table:formula="of:=AVERAGE([.C114:.C123])" office:value-type="percentage" office:value="0.26767" calcext:value-type="percentage">
            <text:p>26,77%</text:p>
          </table:table-cell>
          <table:table-cell/>
          <table:table-cell table:style-name="ce1"/>
          <table:table-cell table:style-name="ce1" table:formula="of:=AVERAGE([.F114:.F123])" office:value-type="percentage" office:value="0.38076" calcext:value-type="percentage">
            <text:p>38,08%</text:p>
          </table:table-cell>
          <table:table-cell table:style-name="ce1" table:formula="of:=AVERAGE([.G114:.G123])" office:value-type="percentage" office:value="0.42385" calcext:value-type="percentage">
            <text:p>42,39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eart_1</text:p>
          </table:table-cell>
          <table:table-cell table:number-columns-repeated="2"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33" calcext:value-type="percentage">
            <text:p>26,33%</text:p>
          </table:table-cell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33" calcext:value-type="percentage">
            <text:p>20,33%</text:p>
          </table:table-cell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37" calcext:value-type="percentage">
            <text:p>23,70%</text:p>
          </table:table-cell>
          <table:table-cell/>
          <table:table-cell office:value-type="string" calcext:value-type="string">
            <text:p>HeartAttack_4</text:p>
          </table:table-cell>
          <table:table-cell table:number-columns-repeated="2"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926" calcext:value-type="percentage">
            <text:p>19,2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HeartAttack_6</text:p>
          </table:table-cell>
          <table:table-cell table:number-columns-repeated="2" office:value-type="percentage" office:value="0.2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67" calcext:value-type="percentage">
            <text:p>12,67%</text:p>
          </table:table-cell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926" calcext:value-type="percentage">
            <text:p>39,26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667" calcext:value-type="percentage">
            <text:p>16,67%</text:p>
          </table:table-cell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967" calcext:value-type="percentage">
            <text:p>19,67%</text:p>
          </table:table-cell>
        </table:table-row>
        <table:table-row table:style-name="ro1">
          <table:table-cell table:style-name="ce1"/>
          <table:table-cell table:style-name="ce1" table:formula="of:=AVERAGE([.B127:.B136])" office:value-type="percentage" office:value="0.21594" calcext:value-type="percentage">
            <text:p>21,59%</text:p>
          </table:table-cell>
          <table:table-cell table:style-name="ce1" table:formula="of:=AVERAGE([.C127:.C136])" office:value-type="percentage" office:value="0.23335" calcext:value-type="percentage">
            <text:p>23,34%</text:p>
          </table:table-cell>
          <table:table-cell/>
          <table:table-cell table:style-name="ce1"/>
          <table:table-cell table:style-name="ce1" table:formula="of:=AVERAGE([.F127:.F136])" office:value-type="percentage" office:value="0.18833" calcext:value-type="percentage">
            <text:p>18,83%</text:p>
          </table:table-cell>
          <table:table-cell table:style-name="ce1" table:formula="of:=AVERAGE([.G127:.G136])" office:value-type="percentage" office:value="0.18867" calcext:value-type="percentage">
            <text:p>18,87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6" calcext:value-type="percentage">
            <text:p>56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7067" calcext:value-type="percentage">
            <text:p>70,67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133" calcext:value-type="percentage">
            <text:p>51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933" calcext:value-type="percentage">
            <text:p>69,33%</text:p>
          </table:table-cell>
          <table:table-cell office:value-type="percentage" office:value="0.62" calcext:value-type="percentage">
            <text:p>62,00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733" calcext:value-type="percentage">
            <text:p>57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5467" calcext:value-type="percentage">
            <text:p>54,67%</text:p>
          </table:table-cell>
          <table:table-cell/>
          <table:table-cell office:value-type="string" calcext:value-type="string">
            <text:p>Zoo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4133" calcext:value-type="percentage">
            <text:p>41,33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table:style-name="ce1"/>
          <table:table-cell table:style-name="ce1" table:formula="of:=AVERAGE([.B140:.B149])" office:value-type="percentage" office:value="0.506" calcext:value-type="percentage">
            <text:p>50,60%</text:p>
          </table:table-cell>
          <table:table-cell table:style-name="ce1" table:formula="of:=AVERAGE([.C140:.C149])" office:value-type="percentage" office:value="0.50533" calcext:value-type="percentage">
            <text:p>50,53%</text:p>
          </table:table-cell>
          <table:table-cell/>
          <table:table-cell table:style-name="ce1"/>
          <table:table-cell table:style-name="ce1" table:formula="of:=AVERAGE([.F140:.F149])" office:value-type="percentage" office:value="0.104" calcext:value-type="percentage">
            <text:p>10,40%</text:p>
          </table:table-cell>
          <table:table-cell table:style-name="ce1" table:formula="of:=AVERAGE([.G140:.G149])" office:value-type="percentage" office:value="0.119" calcext:value-type="percentage">
            <text:p>11,90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229" calcext:value-type="percentage">
            <text:p>12,29%</text:p>
          </table:table-cell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697" calcext:value-type="percentage">
            <text:p>6,97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1343" calcext:value-type="percentage">
            <text:p>13,43%</text:p>
          </table:table-cell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217" calcext:value-type="percentage">
            <text:p>12,1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943" calcext:value-type="percentage">
            <text:p>9,43%</text:p>
          </table:table-cell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2114" calcext:value-type="percentage">
            <text:p>21,14%</text:p>
          </table:table-cell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629" calcext:value-type="percentage">
            <text:p>6,29%</text:p>
          </table:table-cell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71" calcext:value-type="percentage">
            <text:p>23,71%</text:p>
          </table:table-cell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829" calcext:value-type="percentage">
            <text:p>18,29%</text:p>
          </table:table-cell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string" calcext:value-type="string">
            <text:p>x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2286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696" calcext:value-type="percentage">
            <text:p>6,96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971" calcext:value-type="percentage">
            <text:p>9,71%</text:p>
          </table:table-cell>
        </table:table-row>
        <table:table-row table:style-name="ro1">
          <table:table-cell table:style-name="ce1"/>
          <table:table-cell table:style-name="ce1" table:formula="of:=AVERAGE([.B153:.B162])" office:value-type="percentage" office:value="0.0589333333333333" calcext:value-type="percentage">
            <text:p>5,89%</text:p>
          </table:table-cell>
          <table:table-cell table:style-name="ce1" table:formula="of:=AVERAGE([.C153:.C162])" office:value-type="percentage" office:value="0.06349" calcext:value-type="percentage">
            <text:p>6,35%</text:p>
          </table:table-cell>
          <table:table-cell/>
          <table:table-cell table:style-name="ce1"/>
          <table:table-cell table:style-name="ce1" table:formula="of:=AVERAGE([.F153:.F162])" office:value-type="percentage" office:value="0.11829" calcext:value-type="percentage">
            <text:p>11,83%</text:p>
          </table:table-cell>
          <table:table-cell table:style-name="ce1" table:formula="of:=AVERAGE([.G153:.G162])" office:value-type="percentage" office:value="0.14115" calcext:value-type="percentage">
            <text:p>14,1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235" calcext:value-type="percentage">
            <text:p>22,35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2" calcext:value-type="percentage">
            <text:p>21,20%</text:p>
          </table:table-cell>
          <table:table-cell office:value-type="percentage" office:value="0.2036" calcext:value-type="percentage">
            <text:p>20,36%</text:p>
          </table:table-cell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441" calcext:value-type="percentage">
            <text:p>24,41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1602" calcext:value-type="percentage">
            <text:p>16,02%</text:p>
          </table:table-cell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2824" calcext:value-type="percentage">
            <text:p>2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31" calcext:value-type="percentage">
            <text:p>18,31%</text:p>
          </table:table-cell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529" calcext:value-type="percentage">
            <text:p>45,29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169" calcext:value-type="percentage">
            <text:p>21,69%</text:p>
          </table:table-cell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301" calcext:value-type="percentage">
            <text:p>13,01%</text:p>
          </table:table-cell>
          <table:table-cell office:value-type="percentage" office:value="0.1349" calcext:value-type="percentage">
            <text:p>13,49%</text:p>
          </table:table-cell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1711" calcext:value-type="percentage">
            <text:p>17,11%</text:p>
          </table:table-cell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2313" calcext:value-type="percentage">
            <text:p>23,13%</text:p>
          </table:table-cell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2412" calcext:value-type="percentage">
            <text:p>24,12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325" calcext:value-type="percentage">
            <text:p>13,25%</text:p>
          </table:table-cell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048" calcext:value-type="percentage">
            <text:p>20,48%</text:p>
          </table:table-cell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string" calcext:value-type="string">
            <text:p>x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10</text:p>
          </table:table-cell>
          <table:table-cell office:value-type="string" calcext:value-type="string">
            <text:p>x</text:p>
          </table:table-cell>
          <table:table-cell office:value-type="percentage" office:value="0.1386" calcext:value-type="percentage">
            <text:p>13,86%</text:p>
          </table:table-cell>
        </table:table-row>
        <table:table-row table:style-name="ro1">
          <table:table-cell table:style-name="ce1"/>
          <table:table-cell table:style-name="ce1" table:formula="of:=AVERAGE([.B166:.B175])" office:value-type="percentage" office:value="0.296422222222222" calcext:value-type="percentage">
            <text:p>29,64%</text:p>
          </table:table-cell>
          <table:table-cell table:style-name="ce1" table:formula="of:=AVERAGE([.C166:.C175])" office:value-type="percentage" office:value="0.29587" calcext:value-type="percentage">
            <text:p>29,59%</text:p>
          </table:table-cell>
          <table:table-cell/>
          <table:table-cell table:style-name="ce1"/>
          <table:table-cell table:style-name="ce1" table:formula="of:=AVERAGE([.F166:.F175])" office:value-type="percentage" office:value="0.184044444444444" calcext:value-type="percentage">
            <text:p>18,40%</text:p>
          </table:table-cell>
          <table:table-cell table:style-name="ce1" table:formula="of:=AVERAGE([.G166:.G175])" office:value-type="percentage" office:value="0.1777" calcext:value-type="percentage">
            <text:p>17,77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11" calcext:value-type="percentage">
            <text:p>22,11%</text:p>
          </table:table-cell>
          <table:table-cell office:value-type="percentage" office:value="0.2237" calcext:value-type="percentage">
            <text:p>22,37%</text:p>
          </table:table-cell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84" calcext:value-type="percentage">
            <text:p>16,84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447" calcext:value-type="percentage">
            <text:p>24,47%</text:p>
          </table:table-cell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789" calcext:value-type="percentage">
            <text:p>27,89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434" calcext:value-type="percentage">
            <text:p>24,34%</text:p>
          </table:table-cell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1895" calcext:value-type="percentage">
            <text:p>18,95%</text:p>
          </table:table-cell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211" calcext:value-type="percentage">
            <text:p>22,11%</text:p>
          </table:table-cell>
          <table:table-cell/>
          <table:table-cell office:value-type="string" calcext:value-type="string">
            <text:p>Pima_5</text:p>
          </table:table-cell>
          <table:table-cell office:value-type="string" calcext:value-type="string">
            <text:p>x</text:p>
          </table:table-cell>
          <table:table-cell office:value-type="percentage" office:value="0.1566" calcext:value-type="percentage">
            <text:p>15,66%</text:p>
          </table:table-cell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474" calcext:value-type="percentage">
            <text:p>4,74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868" calcext:value-type="percentage">
            <text:p>28,68%</text:p>
          </table:table-cell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303" calcext:value-type="percentage">
            <text:p>23,03%</text:p>
          </table:table-cell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string" calcext:value-type="string">
            <text:p>x</text:p>
          </table:table-cell>
          <table:table-cell office:value-type="percentage" office:value="0.1789" calcext:value-type="percentage">
            <text:p>17,89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605" calcext:value-type="percentage">
            <text:p>26,05%</text:p>
          </table:table-cell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1211" calcext:value-type="percentage">
            <text:p>12,11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842" calcext:value-type="percentage">
            <text:p>28,42%</text:p>
          </table:table-cell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474" calcext:value-type="percentage">
            <text:p>4,74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447" calcext:value-type="percentage">
            <text:p>24,47%</text:p>
          </table:table-cell>
          <table:table-cell office:value-type="percentage" office:value="0.2461" calcext:value-type="percentage">
            <text:p>24,61%</text:p>
          </table:table-cell>
        </table:table-row>
        <table:table-row table:style-name="ro1">
          <table:table-cell table:style-name="ce1"/>
          <table:table-cell table:style-name="ce1" table:formula="of:=AVERAGE([.B179:.B188])" office:value-type="percentage" office:value="0.157311111111111" calcext:value-type="percentage">
            <text:p>15,73%</text:p>
          </table:table-cell>
          <table:table-cell table:style-name="ce1" table:formula="of:=AVERAGE([.C179:.C188])" office:value-type="percentage" office:value="0.15684" calcext:value-type="percentage">
            <text:p>15,68%</text:p>
          </table:table-cell>
          <table:table-cell/>
          <table:table-cell table:style-name="ce1"/>
          <table:table-cell table:style-name="ce1" table:formula="of:=AVERAGE([.F179:.F188])" office:value-type="percentage" office:value="0.241966666666667" calcext:value-type="percentage">
            <text:p>24,20%</text:p>
          </table:table-cell>
          <table:table-cell table:style-name="ce1" table:formula="of:=AVERAGE([.G179:.G188])" office:value-type="percentage" office:value="0.23658" calcext:value-type="percentage">
            <text:p>23,6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952" calcext:value-type="percentage">
            <text:p>19,52%</text:p>
          </table:table-cell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Regions2_3</text:p>
          </table:table-cell>
          <table:table-cell office:value-type="string" calcext:value-type="string">
            <text:p>x</text:p>
          </table:table-cell>
          <table:table-cell office:value-type="percentage" office:value="0.2581" calcext:value-type="percentage">
            <text:p>25,81%</text:p>
          </table:table-cell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string" calcext:value-type="string">
            <text:p>x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065" calcext:value-type="percentage">
            <text:p>30,65%</text:p>
          </table:table-cell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742" calcext:value-type="percentage">
            <text:p>27,42%</text:p>
          </table:table-cell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6" calcext:value-type="percentage">
            <text:p>32,26%</text:p>
          </table:table-cell>
        </table:table-row>
        <table:table-row table:style-name="ro1">
          <table:table-cell table:style-name="ce1"/>
          <table:table-cell table:style-name="ce1" table:formula="of:=AVERAGE([.B192:.B201])" office:value-type="percentage" office:value="0.0530777777777778" calcext:value-type="percentage">
            <text:p>5,31%</text:p>
          </table:table-cell>
          <table:table-cell table:style-name="ce1" table:formula="of:=AVERAGE([.C192:.C201])" office:value-type="percentage" office:value="0.06334" calcext:value-type="percentage">
            <text:p>6,33%</text:p>
          </table:table-cell>
          <table:table-cell/>
          <table:table-cell table:style-name="ce1"/>
          <table:table-cell table:style-name="ce1" table:formula="of:=AVERAGE([.F192:.F201])" office:value-type="percentage" office:value="0.256788888888889" calcext:value-type="percentage">
            <text:p>25,68%</text:p>
          </table:table-cell>
          <table:table-cell table:style-name="ce1" table:formula="of:=AVERAGE([.G192:.G201])" office:value-type="percentage" office:value="0.25662" calcext:value-type="percentage">
            <text:p>25,66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1957" calcext:value-type="percentage">
            <text:p>19,57%</text:p>
          </table:table-cell>
          <table:table-cell office:value-type="percentage" office:value="0.2087" calcext:value-type="percentage">
            <text:p>20,87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203" calcext:value-type="percentage">
            <text:p>32,03%</text:p>
          </table:table-cell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413" calcext:value-type="percentage">
            <text:p>34,1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891" calcext:value-type="percentage">
            <text:p>38,91%</text:p>
          </table:table-cell>
          <table:table-cell office:value-type="percentage" office:value="0.3848" calcext:value-type="percentage">
            <text:p>38,48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074" calcext:value-type="percentage">
            <text:p>30,74%</text:p>
          </table:table-cell>
        </table:table-row>
        <table:table-row table:style-name="ro1">
          <table:table-cell office:value-type="string" calcext:value-type="string">
            <text:p>Saheart_4</text:p>
          </table:table-cell>
          <table:table-cell office:value-type="string" calcext:value-type="string">
            <text:p>x</text:p>
          </table:table-cell>
          <table:table-cell office:value-type="percentage" office:value="0.3283" calcext:value-type="percentage">
            <text:p>32,8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377" calcext:value-type="percentage">
            <text:p>33,77%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074" calcext:value-type="percentage">
            <text:p>30,74%</text:p>
          </table:table-cell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03" calcext:value-type="percentage">
            <text:p>32,03%</text:p>
          </table:table-cell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63" calcext:value-type="percentage">
            <text:p>2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3377" calcext:value-type="percentage">
            <text:p>33,77%</text:p>
          </table:table-cell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283" calcext:value-type="percentage">
            <text:p>22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117" calcext:value-type="percentage">
            <text:p>31,17%</text:p>
          </table:table-cell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table:style-name="ce1"/>
          <table:table-cell table:style-name="ce1" table:formula="of:=AVERAGE([.B205:.B214])" office:value-type="percentage" office:value="0.281155555555556" calcext:value-type="percentage">
            <text:p>28,12%</text:p>
          </table:table-cell>
          <table:table-cell table:style-name="ce1" table:formula="of:=AVERAGE([.C205:.C214])" office:value-type="percentage" office:value="0.27999" calcext:value-type="percentage">
            <text:p>28,00%</text:p>
          </table:table-cell>
          <table:table-cell/>
          <table:table-cell table:style-name="ce1"/>
          <table:table-cell table:style-name="ce1" table:formula="of:=AVERAGE([.F205:.F214])" office:value-type="percentage" office:value="0.31947" calcext:value-type="percentage">
            <text:p>31,95%</text:p>
          </table:table-cell>
          <table:table-cell table:style-name="ce1" table:formula="of:=AVERAGE([.G205:.G214])" office:value-type="percentage" office:value="0.32728" calcext:value-type="percentage">
            <text:p>32,7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onar_1</text:p>
          </table:table-cell>
          <table:table-cell office:value-type="string" calcext:value-type="string">
            <text:p>x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Spiral_1</text:p>
          </table:table-cell>
          <table:table-cell table:style-name="ce28" office:value-type="percentage" office:value="0.3805" calcext:value-type="percentage">
            <text:p>38,05%</text:p>
          </table:table-cell>
          <table:table-cell table:style-name="ce28"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Spiral_2</text:p>
          </table:table-cell>
          <table:table-cell table:style-name="ce28" office:value-type="percentage" office:value="0.39" calcext:value-type="percentage">
            <text:p>39,00%</text:p>
          </table:table-cell>
          <table:table-cell table:style-name="ce28" office:value-type="percentage" office:value="0.3875" calcext:value-type="percentage">
            <text:p>38,75%</text:p>
          </table:table-cell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3</text:p>
          </table:table-cell>
          <table:table-cell table:style-name="ce28" office:value-type="percentage" office:value="0.407" calcext:value-type="percentage">
            <text:p>40,70%</text:p>
          </table:table-cell>
          <table:table-cell table:style-name="ce28"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4</text:p>
          </table:table-cell>
          <table:table-cell table:style-name="ce28" office:value-type="percentage" office:value="0.4425" calcext:value-type="percentage">
            <text:p>44,25%</text:p>
          </table:table-cell>
          <table:table-cell table:style-name="ce28" office:value-type="percentage" office:value="0.4445" calcext:value-type="percentage">
            <text:p>44,45%</text:p>
          </table:table-cell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Spiral_5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75" calcext:value-type="percentage">
            <text:p>17,50%</text:p>
          </table:table-cell>
          <table:table-cell/>
          <table:table-cell office:value-type="string" calcext:value-type="string">
            <text:p>Spiral_6</text:p>
          </table:table-cell>
          <table:table-cell table:style-name="ce28" office:value-type="percentage" office:value="0.411" calcext:value-type="percentage">
            <text:p>41,10%</text:p>
          </table:table-cell>
          <table:table-cell table:style-name="ce28" office:value-type="percentage" office:value="0.4125" calcext:value-type="percentage">
            <text:p>41,25%</text:p>
          </table:table-cell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7</text:p>
          </table:table-cell>
          <table:table-cell table:style-name="ce28" office:value-type="percentage" office:value="0.408" calcext:value-type="percentage">
            <text:p>40,80%</text:p>
          </table:table-cell>
          <table:table-cell table:style-name="ce28" office:value-type="percentage" office:value="0.4145" calcext:value-type="percentage">
            <text:p>41,45%</text:p>
          </table:table-cell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8</text:p>
          </table:table-cell>
          <table:table-cell table:style-name="ce28" office:value-type="percentage" office:value="0.3895" calcext:value-type="percentage">
            <text:p>38,95%</text:p>
          </table:table-cell>
          <table:table-cell table:style-name="ce28"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Spiral_9</text:p>
          </table:table-cell>
          <table:table-cell table:style-name="ce28" office:value-type="percentage" office:value="0.3845" calcext:value-type="percentage">
            <text:p>38,45%</text:p>
          </table:table-cell>
          <table:table-cell table:style-name="ce28"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Spiral_10</text:p>
          </table:table-cell>
          <table:table-cell table:style-name="ce28" office:value-type="percentage" office:value="0.4295" calcext:value-type="percentage">
            <text:p>42,95%</text:p>
          </table:table-cell>
          <table:table-cell table:style-name="ce28" office:value-type="percentage" office:value="0.434" calcext:value-type="percentage">
            <text:p>43,40%</text:p>
          </table:table-cell>
        </table:table-row>
        <table:table-row table:style-name="ro1">
          <table:table-cell table:style-name="ce1"/>
          <table:table-cell table:style-name="ce1" table:formula="of:=AVERAGE([.B217:.B226])" office:value-type="percentage" office:value="0.258888888888889" calcext:value-type="percentage">
            <text:p>25,89%</text:p>
          </table:table-cell>
          <table:table-cell table:style-name="ce1" table:formula="of:=AVERAGE([.C217:.C226])" office:value-type="percentage" office:value="0.25" calcext:value-type="percentage">
            <text:p>25,00%</text:p>
          </table:table-cell>
          <table:table-cell/>
          <table:table-cell table:style-name="ce1"/>
          <table:table-cell table:style-name="ce1" table:formula="of:=AVERAGE([.F217:.F226])" office:value-type="percentage" office:value="0.404722222222222" calcext:value-type="percentage">
            <text:p>40,47%</text:p>
          </table:table-cell>
          <table:table-cell table:style-name="ce1" table:formula="of:=AVERAGE([.G217:.G226])" office:value-type="percentage" office:value="0.4139" calcext:value-type="percentage">
            <text:p>41,39%</text:p>
          </table:table-cell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1825" calcext:value-type="percentage">
            <text:p>18,25%</text:p>
          </table:table-cell>
          <table:table-cell/>
          <table:table-cell office:value-type="string" calcext:value-type="string">
            <text:p>Transfusion_1</text:p>
          </table:table-cell>
          <table:table-cell table:style-name="ce28" office:value-type="percentage" office:value="0.2703" calcext:value-type="percentage">
            <text:p>27,03%</text:p>
          </table:table-cell>
          <table:table-cell table:style-name="ce28" office:value-type="percentage" office:value="0.2716" calcext:value-type="percentage">
            <text:p>27,16%</text:p>
          </table:table-cell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15" calcext:value-type="percentage">
            <text:p>21,50%</text:p>
          </table:table-cell>
          <table:table-cell/>
          <table:table-cell office:value-type="string" calcext:value-type="string">
            <text:p>Transfusion_2</text:p>
          </table:table-cell>
          <table:table-cell table:style-name="ce28" office:value-type="percentage" office:value="0.2338" calcext:value-type="percentage">
            <text:p>23,38%</text:p>
          </table:table-cell>
          <table:table-cell table:style-name="ce28" office:value-type="percentage" office:value="0.2378" calcext:value-type="percentage">
            <text:p>23,78%</text:p>
          </table:table-cell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Transfusion_3</text:p>
          </table:table-cell>
          <table:table-cell table:style-name="ce28" office:value-type="percentage" office:value="0.2811" calcext:value-type="percentage">
            <text:p>28,11%</text:p>
          </table:table-cell>
          <table:table-cell table:style-name="ce28" office:value-type="percentage" office:value="0.2716" calcext:value-type="percentage">
            <text:p>27,16%</text:p>
          </table:table-cell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55" calcext:value-type="percentage">
            <text:p>15,50%</text:p>
          </table:table-cell>
          <table:table-cell/>
          <table:table-cell office:value-type="string" calcext:value-type="string">
            <text:p>Transfusion_4</text:p>
          </table:table-cell>
          <table:table-cell table:style-name="ce28" office:value-type="percentage" office:value="0.2919" calcext:value-type="percentage">
            <text:p>29,19%</text:p>
          </table:table-cell>
          <table:table-cell table:style-name="ce28" office:value-type="percentage" office:value="0.2932" calcext:value-type="percentage">
            <text:p>29,32%</text:p>
          </table:table-cell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175" calcext:value-type="percentage">
            <text:p>21,75%</text:p>
          </table:table-cell>
          <table:table-cell/>
          <table:table-cell office:value-type="string" calcext:value-type="string">
            <text:p>Transfusion_5</text:p>
          </table:table-cell>
          <table:table-cell table:style-name="ce28" office:value-type="percentage" office:value="0.2851" calcext:value-type="percentage">
            <text:p>28,51%</text:p>
          </table:table-cell>
          <table:table-cell table:style-name="ce28"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Transfusion_6</text:p>
          </table:table-cell>
          <table:table-cell table:style-name="ce28" office:value-type="percentage" office:value="0.2932" calcext:value-type="percentage">
            <text:p>29,32%</text:p>
          </table:table-cell>
          <table:table-cell table:style-name="ce28" office:value-type="percentage" office:value="0.2851" calcext:value-type="percentage">
            <text:p>28,51%</text:p>
          </table:table-cell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3025" calcext:value-type="percentage">
            <text:p>30,25%</text:p>
          </table:table-cell>
          <table:table-cell office:value-type="percentage" office:value="0.2125" calcext:value-type="percentage">
            <text:p>21,25%</text:p>
          </table:table-cell>
          <table:table-cell/>
          <table:table-cell office:value-type="string" calcext:value-type="string">
            <text:p>Transfusion_7</text:p>
          </table:table-cell>
          <table:table-cell table:style-name="ce28" office:value-type="percentage" office:value="0.3027" calcext:value-type="percentage">
            <text:p>30,27%</text:p>
          </table:table-cell>
          <table:table-cell table:style-name="ce28" office:value-type="percentage" office:value="0.3054" calcext:value-type="percentage">
            <text:p>30,54%</text:p>
          </table:table-cell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Transfusion_8</text:p>
          </table:table-cell>
          <table:table-cell table:number-columns-repeated="2" table:style-name="ce28" office:value-type="percentage" office:value="0.2081" calcext:value-type="percentage">
            <text:p>20,81%</text:p>
          </table:table-cell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Transfusion_9</text:p>
          </table:table-cell>
          <table:table-cell table:number-columns-repeated="2" table:style-name="ce28" office:value-type="percentage" office:value="0.2311" calcext:value-type="percentage">
            <text:p>23,11%</text:p>
          </table:table-cell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85" calcext:value-type="percentage">
            <text:p>8,50%</text:p>
          </table:table-cell>
          <table:table-cell/>
          <table:table-cell office:value-type="string" calcext:value-type="string">
            <text:p>Transfusion_10</text:p>
          </table:table-cell>
          <table:table-cell table:number-columns-repeated="2" table:style-name="ce28" office:value-type="percentage" office:value="0.1932" calcext:value-type="percentage">
            <text:p>19,32%</text:p>
          </table:table-cell>
        </table:table-row>
        <table:table-row table:style-name="ro1">
          <table:table-cell table:style-name="ce1"/>
          <table:table-cell table:style-name="ce1" table:formula="of:=AVERAGE([.B230:.B239])" office:value-type="percentage" office:value="0.22175" calcext:value-type="percentage">
            <text:p>22,18%</text:p>
          </table:table-cell>
          <table:table-cell table:style-name="ce1" table:formula="of:=AVERAGE([.C230:.C239])" office:value-type="percentage" office:value="0.171" calcext:value-type="percentage">
            <text:p>17,10%</text:p>
          </table:table-cell>
          <table:table-cell/>
          <table:table-cell table:style-name="ce1"/>
          <table:table-cell table:style-name="ce1" table:formula="of:=AVERAGE([.F230:.F239])" office:value-type="percentage" office:value="0.25905" calcext:value-type="percentage">
            <text:p>25,91%</text:p>
          </table:table-cell>
          <table:table-cell table:style-name="ce1" table:formula="of:=AVERAGE([.G230:.G239])" office:value-type="percentage" office:value="0.25741" calcext:value-type="percentage">
            <text:p>25,7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Wdbc_1</text:p>
          </table:table-cell>
          <table:table-cell table:number-columns-repeated="2" office:value-type="percentage" office:value="0.0214" calcext:value-type="percentage">
            <text:p>2,1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0882" calcext:value-type="percentage">
            <text:p>8,82%</text:p>
          </table:table-cell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1054" calcext:value-type="percentage">
            <text:p>10,54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61" calcext:value-type="percentage">
            <text:p>1,61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0471" calcext:value-type="percentage">
            <text:p>4,71%</text:p>
          </table:table-cell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36" calcext:value-type="percentage">
            <text:p>5,36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294" calcext:value-type="percentage">
            <text:p>12,94%</text:p>
          </table:table-cell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1647" calcext:value-type="percentage">
            <text:p>16,47%</text:p>
          </table:table-cell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529" calcext:value-type="percentage">
            <text:p>5,29%</text:p>
          </table:table-cell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18" calcext:value-type="percentage">
            <text:p>11,18%</text:p>
          </table:table-cell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706" calcext:value-type="percentage">
            <text:p>17,06%</text:p>
          </table:table-cell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765" calcext:value-type="percentage">
            <text:p>7,65%</text:p>
          </table:table-cell>
        </table:table-row>
        <table:table-row table:style-name="ro1">
          <table:table-cell table:style-name="ce1"/>
          <table:table-cell table:style-name="ce1" table:formula="of:=AVERAGE([.B242:.B251])" office:value-type="percentage" office:value="0.04536" calcext:value-type="percentage">
            <text:p>4,54%</text:p>
          </table:table-cell>
          <table:table-cell table:style-name="ce1" table:formula="of:=AVERAGE([.C242:.C251])" office:value-type="percentage" office:value="0.04537" calcext:value-type="percentage">
            <text:p>4,54%</text:p>
          </table:table-cell>
          <table:table-cell/>
          <table:table-cell table:style-name="ce1"/>
          <table:table-cell table:style-name="ce1" table:formula="of:=AVERAGE([.F242:.F251])" office:value-type="percentage" office:value="0.11001" calcext:value-type="percentage">
            <text:p>11,00%</text:p>
          </table:table-cell>
          <table:table-cell table:style-name="ce1" table:formula="of:=AVERAGE([.G242:.G251])" office:value-type="percentage" office:value="0.10117" calcext:value-type="percentage">
            <text:p>10,12%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792" calcext:value-type="percentage">
            <text:p>79,20%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z_f_s_3</text:p>
          </table:table-cell>
          <table:table-cell table:number-columns-repeated="2" office:value-type="percentage" office:value="0.1467" calcext:value-type="percentage">
            <text:p>14,6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738" calcext:value-type="percentage">
            <text:p>73,80%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708" calcext:value-type="percentage">
            <text:p>70,80%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756" calcext:value-type="percentage">
            <text:p>75,60%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2"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748" calcext:value-type="percentage">
            <text:p>74,8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2"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table:style-name="ce1"/>
          <table:table-cell table:style-name="ce1" table:formula="of:=AVERAGE([.B255:.B264])" office:value-type="percentage" office:value="0.05901" calcext:value-type="percentage">
            <text:p>5,90%</text:p>
          </table:table-cell>
          <table:table-cell table:style-name="ce1" table:formula="of:=AVERAGE([.C255:.C264])" office:value-type="percentage" office:value="0.05433" calcext:value-type="percentage">
            <text:p>5,43%</text:p>
          </table:table-cell>
          <table:table-cell/>
          <table:table-cell table:style-name="ce1"/>
          <table:table-cell table:style-name="ce1" table:formula="of:=AVERAGE([.F255:.F264])" office:value-type="percentage" office:value="0.7082" calcext:value-type="percentage">
            <text:p>70,82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36" calcext:value-type="percentage">
            <text:p>3,6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zonf_s_3</text:p>
          </table:table-cell>
          <table:table-cell table:number-columns-repeated="2"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8" calcext:value-type="percentage">
            <text:p>1,8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76" calcext:value-type="percentage">
            <text:p>17,6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zo_nf_s_7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string" calcext:value-type="string">
            <text:p>zonf_s_8</text:p>
          </table:table-cell>
          <table:table-cell table:number-columns-repeated="2"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2" calcext:value-type="percentage">
            <text:p>10,2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zonf_s_10</text:p>
          </table:table-cell>
          <table:table-cell table:number-columns-repeated="2" office:value-type="percentage" office:value="0.044" calcext:value-type="percentage">
            <text:p>4,40%</text:p>
          </table:table-cell>
        </table:table-row>
        <table:table-row table:style-name="ro1">
          <table:table-cell table:style-name="ce1"/>
          <table:table-cell table:style-name="ce1" table:formula="of:=AVERAGE([.B267:.B276])" office:value-type="percentage" office:value="0.0774" calcext:value-type="percentage">
            <text:p>7,74%</text:p>
          </table:table-cell>
          <table:table-cell table:style-name="ce1" table:formula="of:=AVERAGE([.C267:.C276])" office:value-type="percentage" office:value="0.0734" calcext:value-type="percentage">
            <text:p>7,34%</text:p>
          </table:table-cell>
          <table:table-cell/>
          <table:table-cell table:style-name="ce1"/>
          <table:table-cell table:style-name="ce1" table:formula="of:=AVERAGE([.F267:.F276])" office:value-type="percentage" office:value="0.0326" calcext:value-type="percentage">
            <text:p>3,26%</text:p>
          </table:table-cell>
          <table:table-cell table:style-name="ce1" table:formula="of:=AVERAGE([.G267:.G276])" office:value-type="percentage" office:value="0.0252" calcext:value-type="percentage">
            <text:p>2,52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406" calcext:value-type="percentage">
            <text:p>34,0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2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3</text:p>
          </table:table-cell>
          <table:table-cell/>
          <table:table-cell table:style-name="ce28" office:value-type="percentage" office:value="0.3904" calcext:value-type="percentage">
            <text:p>39,0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4</text:p>
          </table:table-cell>
          <table:table-cell/>
          <table:table-cell office:value-type="percentage" office:value="0.3717" calcext:value-type="percentage">
            <text:p>37,1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5</text:p>
          </table:table-cell>
          <table:table-cell/>
          <table:table-cell office:value-type="percentage" office:value="0.3499" calcext:value-type="percentage">
            <text:p>34,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6</text:p>
          </table:table-cell>
          <table:table-cell/>
          <table:table-cell office:value-type="percentage" office:value="0.3188" calcext:value-type="percentage">
            <text:p>31,8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7</text:p>
          </table:table-cell>
          <table:table-cell/>
          <table:table-cell office:value-type="percentage" office:value="0.3328" calcext:value-type="percentage">
            <text:p>33,2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8</text:p>
          </table:table-cell>
          <table:table-cell/>
          <table:table-cell office:value-type="percentage" office:value="0.3624" calcext:value-type="percentage">
            <text:p>36,2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9</text:p>
          </table:table-cell>
          <table:table-cell/>
          <table:table-cell office:value-type="percentage" office:value="0.3313" calcext:value-type="percentage">
            <text:p>33,1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mage_10</text:p>
          </table:table-cell>
          <table:table-cell/>
          <table:table-cell office:value-type="percentage" office:value="0.3639" calcext:value-type="percentage">
            <text:p>36,39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AVERAGE([.B279:.B288])" office:value-type="percentage" office:value="0.3515" calcext:value-type="percentage">
            <text:p>35,15%</text:p>
          </table:table-cell>
          <table:table-cell table:style-name="ce1" table:formula="of:=AVERAGE([.C279:.C288])" office:value-type="percentage" office:value="0.35211" calcext:value-type="percentage">
            <text:p>35,21%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96" calcext:value-type="float">
            <text:p>0,496</text:p>
          </table:table-cell>
          <table:table-cell table:style-name="ce6" office:value-type="float" office:value="0.365" calcext:value-type="float">
            <text:p>0,365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number-columns-repeated="2" table:style-name="ce10" office:value-type="float" office:value="0.402" calcext:value-type="float">
            <text:p>4,02E-01</text:p>
          </table:table-cell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514" calcext:value-type="float">
            <text:p>0,514</text:p>
          </table:table-cell>
          <table:table-cell table:style-name="ce6" office:value-type="float" office:value="0.481" calcext:value-type="float">
            <text:p>0,481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79" calcext:value-type="float">
            <text:p>8,79E-01</text:p>
          </table:table-cell>
          <table:table-cell table:style-name="ce10" office:value-type="float" office:value="0.865" calcext:value-type="float">
            <text:p>8,65E-01</text:p>
          </table:table-cell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1.339" calcext:value-type="float">
            <text:p>1,339</text:p>
          </table:table-cell>
          <table:table-cell table:style-name="ce6" office:value-type="float" office:value="0.7697" calcext:value-type="float">
            <text:p>0,769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698" calcext:value-type="float">
            <text:p>0,1698</text:p>
          </table:table-cell>
          <table:table-cell table:style-name="ce6" office:value-type="float" office:value="0.133" calcext:value-type="float">
            <text:p>0,133</text:p>
          </table:table-cell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9" calcext:value-type="float">
            <text:p>0,839</text:p>
          </table:table-cell>
          <table:table-cell table:style-name="ce6" office:value-type="float" office:value="0.838" calcext:value-type="float">
            <text:p>0,838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09" calcext:value-type="float">
            <text:p>1,09E-01</text:p>
          </table:table-cell>
          <table:table-cell table:style-name="ce10" office:value-type="float" office:value="0.198" calcext:value-type="float">
            <text:p>1,98E-01</text:p>
          </table:table-cell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654" calcext:value-type="float">
            <text:p>0,654</text:p>
          </table:table-cell>
          <table:table-cell table:style-name="ce6" office:value-type="float" office:value="0.6" calcext:value-type="float">
            <text:p>0,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41" calcext:value-type="float">
            <text:p>6,41E-01</text:p>
          </table:table-cell>
          <table:table-cell table:style-name="ce10" office:value-type="float" office:value="0.671" calcext:value-type="float">
            <text:p>6,71E-01</text:p>
          </table:table-cell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469" calcext:value-type="float">
            <text:p>0,469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4" calcext:value-type="float">
            <text:p>1,40E-01</text:p>
          </table:table-cell>
          <table:table-cell table:style-name="ce10" office:value-type="float" office:value="0.146" calcext:value-type="float">
            <text:p>1,46E-01</text:p>
          </table:table-cell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27" calcext:value-type="float">
            <text:p>0,27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0.693" calcext:value-type="float">
            <text:p>0,693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805" calcext:value-type="float">
            <text:p>0,805</text:p>
          </table:table-cell>
          <table:table-cell table:style-name="ce6" office:value-type="float" office:value="0.888" calcext:value-type="float">
            <text:p>0,888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205" calcext:value-type="float">
            <text:p>2,05E-01</text:p>
          </table:table-cell>
          <table:table-cell table:style-name="ce10" office:value-type="float" office:value="0.193" calcext:value-type="float">
            <text:p>1,93E-01</text:p>
          </table:table-cell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63" calcext:value-type="float">
            <text:p>0,263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44" calcext:value-type="float">
            <text:p>1,44E-01</text:p>
          </table:table-cell>
          <table:table-cell table:style-name="ce10" office:value-type="float" office:value="0.121" calcext:value-type="float">
            <text:p>1,21E-01</text:p>
          </table:table-cell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679" calcext:value-type="float">
            <text:p>0,679</text:p>
          </table:table-cell>
          <table:table-cell table:style-name="ce6" office:value-type="float" office:value="0.668" calcext:value-type="float">
            <text:p>0,668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23" calcext:value-type="float">
            <text:p>0,23</text:p>
          </table:table-cell>
        </table:table-row>
        <table:table-row table:style-name="ro3">
          <table:table-cell table:style-name="ce4"/>
          <table:table-cell table:style-name="ce7" table:formula="of:=AVERAGE([.B292:.B301])" office:value-type="float" office:value="0.6328" calcext:value-type="float">
            <text:p>0,6328</text:p>
          </table:table-cell>
          <table:table-cell table:style-name="ce7" table:formula="of:=AVERAGE([.C292:.C301])" office:value-type="float" office:value="0.55987" calcext:value-type="float">
            <text:p>0,55987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6068" calcext:value-type="float">
            <text:p>0,36068</text:p>
          </table:table-cell>
          <table:table-cell table:style-name="ce11" table:formula="of:=AVERAGE([.G292:.G301])" office:value-type="float" office:value="0.3799" calcext:value-type="float">
            <text:p>3,80E-01</text:p>
          </table:table-cell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2" calcext:value-type="float">
            <text:p>0,112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3" calcext:value-type="float">
            <text:p>4,53E-01</text:p>
          </table:table-cell>
          <table:table-cell table:style-name="ce10" office:value-type="float" office:value="0.5" calcext:value-type="float">
            <text:p>5,00E-01</text:p>
          </table:table-cell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4" calcext:value-type="float">
            <text:p>0,054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69" calcext:value-type="float">
            <text:p>6,90E-02</text:p>
          </table:table-cell>
          <table:table-cell table:style-name="ce10" office:value-type="float" office:value="0.0736" calcext:value-type="float">
            <text:p>7,36E-02</text:p>
          </table:table-cell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97" calcext:value-type="float">
            <text:p>0,1097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12" calcext:value-type="float">
            <text:p>0,112</text:p>
          </table:table-cell>
          <table:table-cell table:style-name="ce6"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2" table:style-name="ce6" office:value-type="float" office:value="0.0876" calcext:value-type="float">
            <text:p>0,0876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1" calcext:value-type="float">
            <text:p>4,71E-02</text:p>
          </table:table-cell>
          <table:table-cell table:style-name="ce10" office:value-type="float" office:value="0.0429" calcext:value-type="float">
            <text:p>4,29E-02</text:p>
          </table:table-cell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556" calcext:value-type="float">
            <text:p>5,56E-02</text:p>
          </table:table-cell>
          <table:table-cell table:style-name="ce10" office:value-type="float" office:value="0.0473" calcext:value-type="float">
            <text:p>4,73E-02</text:p>
          </table:table-cell>
        </table:table-row>
        <table:table-row table:style-name="ro1">
          <table:table-cell office:value-type="string" calcext:value-type="string">
            <text:p>NT_6</text:p>
          </table:table-cell>
          <table:table-cell table:number-columns-repeated="2"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28" calcext:value-type="float">
            <text:p>1,28E-01</text:p>
          </table:table-cell>
          <table:table-cell table:style-name="ce10" office:value-type="float" office:value="0.118" calcext:value-type="float">
            <text:p>1,18E-01</text:p>
          </table:table-cell>
        </table:table-row>
        <table:table-row table:style-name="ro1">
          <table:table-cell office:value-type="string" calcext:value-type="string">
            <text:p>NT_7</text:p>
          </table:table-cell>
          <table:table-cell table:number-columns-repeated="2" table:style-name="ce6" office:value-type="float" office:value="0.0388" calcext:value-type="float">
            <text:p>0,0388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9" calcext:value-type="float">
            <text:p>0,0899</text:p>
          </table:table-cell>
          <table:table-cell table:style-name="ce6" office:value-type="float" office:value="0.09" calcext:value-type="float">
            <text:p>0,09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62" calcext:value-type="float">
            <text:p>2,62E-02</text:p>
          </table:table-cell>
          <table:table-cell table:style-name="ce10" office:value-type="float" office:value="0.0284" calcext:value-type="float">
            <text:p>2,84E-02</text:p>
          </table:table-cell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59" calcext:value-type="float">
            <text:p>0,0959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32" calcext:value-type="float">
            <text:p>3,20E-02</text:p>
          </table:table-cell>
          <table:table-cell table:style-name="ce10" office:value-type="float" office:value="0.0543" calcext:value-type="float">
            <text:p>5,43E-02</text:p>
          </table:table-cell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22" calcext:value-type="float">
            <text:p>0,0422</text:p>
          </table:table-cell>
          <table:table-cell table:style-name="ce6" office:value-type="float" office:value="0.0423" calcext:value-type="float">
            <text:p>0,0423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15" calcext:value-type="float">
            <text:p>0,0315</text:p>
          </table:table-cell>
          <table:table-cell table:style-name="ce6" office:value-type="float" office:value="0.0321" calcext:value-type="float">
            <text:p>0,0321</text:p>
          </table:table-cell>
        </table:table-row>
        <table:table-row table:style-name="ro3">
          <table:table-cell table:style-name="ce4"/>
          <table:table-cell table:style-name="ce7" table:formula="of:=AVERAGE([.B304:.B313])" office:value-type="float" office:value="0.08156" calcext:value-type="float">
            <text:p>0,08156</text:p>
          </table:table-cell>
          <table:table-cell table:style-name="ce7" table:formula="of:=AVERAGE([.C304:.C313])" office:value-type="float" office:value="0.08203" calcext:value-type="float">
            <text:p>0,08203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684" calcext:value-type="float">
            <text:p>0,10684</text:p>
          </table:table-cell>
          <table:table-cell table:style-name="ce11" table:formula="of:=AVERAGE([.G304:.G313])" office:value-type="float" office:value="0.11406" calcext:value-type="float">
            <text:p>1,14E-01</text:p>
          </table:table-cell>
        </table:table-row>
        <table:table-row table:style-name="ro1">
          <table:table-cell table:style-name="Default" table:number-columns-repeated="6"/>
          <table:table-cell table:style-name="ce1"/>
        </table:table-row>
        <table:table-row table:style-name="ro3"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  <table:table-cell table:style-name="ce1"/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225.239" calcext:value-type="float">
            <text:p>2225,239</text:p>
          </table:table-cell>
          <table:table-cell table:style-name="ce6" office:value-type="float" office:value="2488.966" calcext:value-type="float">
            <text:p>2488,966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627" calcext:value-type="float">
            <text:p>6,27E-03</text:p>
          </table:table-cell>
          <table:table-cell table:style-name="ce10" office:value-type="float" office:value="0.00619" calcext:value-type="float">
            <text:p>6,19E-03</text:p>
          </table:table-cell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769.296" calcext:value-type="float">
            <text:p>2769,296</text:p>
          </table:table-cell>
          <table:table-cell table:style-name="ce6" office:value-type="float" office:value="3234.763" calcext:value-type="float">
            <text:p>3234,763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629" calcext:value-type="float">
            <text:p>6,29E-04</text:p>
          </table:table-cell>
          <table:table-cell table:style-name="ce10" office:value-type="float" office:value="0.00024" calcext:value-type="float">
            <text:p>2,40E-04</text:p>
          </table:table-cell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3162.861" calcext:value-type="float">
            <text:p>3162,86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427" calcext:value-type="float">
            <text:p>0,00427</text:p>
          </table:table-cell>
          <table:table-cell table:style-name="ce6" office:value-type="float" office:value="0.0058" calcext:value-type="float">
            <text:p>0,0058</text:p>
          </table:table-cell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751.937" calcext:value-type="float">
            <text:p>2751,937</text:p>
          </table:table-cell>
          <table:table-cell table:style-name="ce6" office:value-type="float" office:value="2685.587" calcext:value-type="float">
            <text:p>2685,587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119" calcext:value-type="float">
            <text:p>1,19E-03</text:p>
          </table:table-cell>
          <table:table-cell table:style-name="ce10" office:value-type="float" office:value="0.00175" calcext:value-type="float">
            <text:p>1,75E-03</text:p>
          </table:table-cell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3111.179" calcext:value-type="float">
            <text:p>3111,179</text:p>
          </table:table-cell>
          <table:table-cell table:style-name="ce6" office:value-type="float" office:value="2922.704" calcext:value-type="float">
            <text:p>2922,704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09" calcext:value-type="float">
            <text:p>9,00E-04</text:p>
          </table:table-cell>
          <table:table-cell table:style-name="ce10" office:value-type="float" office:value="0.00282" calcext:value-type="float">
            <text:p>2,82E-03</text:p>
          </table:table-cell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906.665" calcext:value-type="float">
            <text:p>2906,665</text:p>
          </table:table-cell>
          <table:table-cell table:style-name="ce6" office:value-type="float" office:value="2919.348" calcext:value-type="float">
            <text:p>2919,348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138" calcext:value-type="float">
            <text:p>1,38E-03</text:p>
          </table:table-cell>
          <table:table-cell table:style-name="ce10" office:value-type="float" office:value="0.000417" calcext:value-type="float">
            <text:p>4,17E-04</text:p>
          </table:table-cell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876.449" calcext:value-type="float">
            <text:p>2876,449</text:p>
          </table:table-cell>
          <table:table-cell table:style-name="ce6" office:value-type="float" office:value="2608.345" calcext:value-type="float">
            <text:p>2608,345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311" calcext:value-type="float">
            <text:p>0,00311</text:p>
          </table:table-cell>
          <table:table-cell table:style-name="ce6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367.648" calcext:value-type="float">
            <text:p>3367,648</text:p>
          </table:table-cell>
          <table:table-cell table:style-name="ce6" office:value-type="float" office:value="3405.391" calcext:value-type="float">
            <text:p>3405,391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72" calcext:value-type="float">
            <text:p>7,20E-04</text:p>
          </table:table-cell>
          <table:table-cell table:style-name="ce10" office:value-type="float" office:value="0.00067" calcext:value-type="float">
            <text:p>6,70E-04</text:p>
          </table:table-cell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868.456" calcext:value-type="float">
            <text:p>2868,456</text:p>
          </table:table-cell>
          <table:table-cell table:style-name="ce6" office:value-type="float" office:value="2641.373" calcext:value-type="float">
            <text:p>2641,373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688" calcext:value-type="float">
            <text:p>6,88E-03</text:p>
          </table:table-cell>
          <table:table-cell table:style-name="ce10" office:value-type="float" office:value="0.00262" calcext:value-type="float">
            <text:p>2,62E-03</text:p>
          </table:table-cell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800.854" calcext:value-type="float">
            <text:p>2800,854</text:p>
          </table:table-cell>
          <table:table-cell table:style-name="ce6" office:value-type="float" office:value="2707.366" calcext:value-type="float">
            <text:p>2707,366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2" calcext:value-type="float">
            <text:p>0,002</text:p>
          </table:table-cell>
          <table:table-cell table:style-name="ce6" office:value-type="float" office:value="0.00231" calcext:value-type="float">
            <text:p>0,00231</text:p>
          </table:table-cell>
        </table:table-row>
        <table:table-row table:style-name="ro3">
          <table:table-cell table:style-name="ce4"/>
          <table:table-cell table:style-name="ce7" table:formula="of:=AVERAGE([.B317:.B326])" office:value-type="float" office:value="2853.08033333333" calcext:value-type="float">
            <text:p>2853,08033333333</text:p>
          </table:table-cell>
          <table:table-cell table:style-name="ce7" table:formula="of:=AVERAGE([.C317:.C326])" office:value-type="float" office:value="2877.6704" calcext:value-type="float">
            <text:p>2877,6704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27349" calcext:value-type="float">
            <text:p>0,0027349</text:p>
          </table:table-cell>
          <table:table-cell table:style-name="ce11" table:formula="of:=AVERAGE([.G317:.G326])" office:value-type="float" office:value="0.0024097" calcext:value-type="float">
            <text:p>2,41E-03</text:p>
          </table:table-cell>
        </table:table-row>
        <table:table-row table:style-name="ro3">
          <table:table-cell table:style-name="ce4"/>
          <table:table-cell table:style-name="ce4" office:value-type="string" calcext:value-type="string">
            <text:p>NC=1000</text:p>
          </table:table-cell>
          <table:table-cell table:style-name="ce4" office:value-type="string" calcext:value-type="string">
            <text:p>NC=200</text:p>
          </table:table-cell>
          <table:table-cell table:style-name="ce4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199" calcext:value-type="float">
            <text:p>0,199</text:p>
          </table:table-cell>
          <table:table-cell table:style-name="ce6" office:value-type="float" office:value="0.246" calcext:value-type="float">
            <text:p>0,246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847.837" calcext:value-type="float">
            <text:p>1847,837</text:p>
          </table:table-cell>
          <table:table-cell table:style-name="ce6" office:value-type="float" office:value="1857.95" calcext:value-type="float">
            <text:p>1857,95</text:p>
          </table:table-cell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office:value-type="float" office:value="0.189" calcext:value-type="float">
            <text:p>0,189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005.373" calcext:value-type="float">
            <text:p>1005,373</text:p>
          </table:table-cell>
          <table:table-cell table:style-name="ce6" office:value-type="float" office:value="958.275" calcext:value-type="float">
            <text:p>958,275</text:p>
          </table:table-cell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96" calcext:value-type="float">
            <text:p>0,1496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1927.967" calcext:value-type="float">
            <text:p>1927,967</text:p>
          </table:table-cell>
          <table:table-cell table:style-name="ce6" office:value-type="float" office:value="2155.326" calcext:value-type="float">
            <text:p>2155,326</text:p>
          </table:table-cell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196" calcext:value-type="float">
            <text:p>0,196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971.604" calcext:value-type="float">
            <text:p>2971,604</text:p>
          </table:table-cell>
          <table:table-cell table:style-name="ce6" office:value-type="float" office:value="2402.069" calcext:value-type="float">
            <text:p>2402,069</text:p>
          </table:table-cell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 office:value-type="float" office:value="0.343" calcext:value-type="float">
            <text:p>0,34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319.251" calcext:value-type="float">
            <text:p>1319,251</text:p>
          </table:table-cell>
          <table:table-cell table:style-name="ce6" office:value-type="float" office:value="1385.471" calcext:value-type="float">
            <text:p>1385,471</text:p>
          </table:table-cell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069" calcext:value-type="float">
            <text:p>0,069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698.307" calcext:value-type="float">
            <text:p>698,307</text:p>
          </table:table-cell>
          <table:table-cell table:style-name="ce6" office:value-type="float" office:value="704.963" calcext:value-type="float">
            <text:p>704,963</text:p>
          </table:table-cell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7" calcext:value-type="float">
            <text:p>0,067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982.343" calcext:value-type="float">
            <text:p>1982,343</text:p>
          </table:table-cell>
          <table:table-cell table:style-name="ce6" office:value-type="float" office:value="1973.622" calcext:value-type="float">
            <text:p>1973,622</text:p>
          </table:table-cell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9.256" calcext:value-type="float">
            <text:p>2689,256</text:p>
          </table:table-cell>
          <table:table-cell table:style-name="ce6" office:value-type="float" office:value="2582.138" calcext:value-type="float">
            <text:p>2582,138</text:p>
          </table:table-cell>
        </table:table-row>
        <table:table-row table:style-name="ro2">
          <table:table-cell office:value-type="string" calcext:value-type="string">
            <text:p>BK_9</text:p>
          </table:table-cell>
          <table:table-cell table:style-name="ce6" office:value-type="float" office:value="0.228" calcext:value-type="float">
            <text:p>0,228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45.297" calcext:value-type="float">
            <text:p>2345,297</text:p>
          </table:table-cell>
          <table:table-cell table:style-name="ce6" office:value-type="float" office:value="2015.852" calcext:value-type="float">
            <text:p>2015,852</text:p>
          </table:table-cell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22" calcext:value-type="float">
            <text:p>0,122</text:p>
          </table:table-cell>
          <table:table-cell table:style-name="ce6" office:value-type="float" office:value="0.131" calcext:value-type="float">
            <text:p>0,131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840.703" calcext:value-type="float">
            <text:p>1840,703</text:p>
          </table:table-cell>
          <table:table-cell table:style-name="ce6" office:value-type="float" office:value="1681.286" calcext:value-type="float">
            <text:p>1681,286</text:p>
          </table:table-cell>
        </table:table-row>
        <table:table-row table:style-name="ro3">
          <table:table-cell table:style-name="ce1"/>
          <table:table-cell table:style-name="ce5" table:formula="of:=AVERAGE([.B329:.B338])" office:value-type="float" office:value="0.17612" calcext:value-type="float">
            <text:p>0,17612</text:p>
          </table:table-cell>
          <table:table-cell table:style-name="ce5" table:formula="of:=AVERAGE([.C329:.C338])" office:value-type="float" office:value="0.17956" calcext:value-type="float">
            <text:p>0,17956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862.7938" calcext:value-type="float">
            <text:p>1862,7938</text:p>
          </table:table-cell>
          <table:table-cell table:style-name="ce7" table:formula="of:=AVERAGE([.G329:.G338])" office:value-type="float" office:value="1771.6952" calcext:value-type="float">
            <text:p>1771,6952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39" calcext:value-type="float">
            <text:p>0,639</text:p>
          </table:table-cell>
          <table:table-cell table:style-name="ce6" office:value-type="float" office:value="0.682" calcext:value-type="float">
            <text:p>0,682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609" calcext:value-type="float">
            <text:p>0,609</text:p>
          </table:table-cell>
          <table:table-cell table:style-name="ce6" office:value-type="float" office:value="0.583" calcext:value-type="float">
            <text:p>0,583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76" calcext:value-type="float">
            <text:p>4,76</text:p>
          </table:table-cell>
          <table:table-cell table:style-name="ce6"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78" calcext:value-type="float">
            <text:p>0,578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21.52" calcext:value-type="float">
            <text:p>21,52</text:p>
          </table:table-cell>
          <table:table-cell table:style-name="ce6"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5.17" calcext:value-type="float">
            <text:p>5,17</text:p>
          </table:table-cell>
          <table:table-cell table:style-name="ce6" office:value-type="float" office:value="4.83" calcext:value-type="float">
            <text:p>4,83</text:p>
          </table:table-cell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76" calcext:value-type="float">
            <text:p>6,76</text:p>
          </table:table-cell>
          <table:table-cell table:style-name="ce6" office:value-type="float" office:value="6.84" calcext:value-type="float">
            <text:p>6,84</text:p>
          </table:table-cell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8.63" calcext:value-type="float">
            <text:p>8,63</text:p>
          </table:table-cell>
          <table:table-cell table:style-name="ce6"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508" calcext:value-type="float">
            <text:p>0,508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12.99" calcext:value-type="float">
            <text:p>12,99</text:p>
          </table:table-cell>
          <table:table-cell table:style-name="ce6" office:value-type="float" office:value="8.99" calcext:value-type="float">
            <text:p>8,99</text:p>
          </table:table-cell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85" calcext:value-type="float">
            <text:p>0,585</text:p>
          </table:table-cell>
          <table:table-cell table:style-name="ce6" office:value-type="float" office:value="0.578" calcext:value-type="float">
            <text:p>0,578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4.59" calcext:value-type="float">
            <text:p>4,59</text:p>
          </table:table-cell>
          <table:table-cell table:style-name="ce6"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7697" calcext:value-type="float">
            <text:p>0,7697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7.25" calcext:value-type="float">
            <text:p>7,25</text:p>
          </table:table-cell>
          <table:table-cell table:style-name="ce6" office:value-type="float" office:value="5.53" calcext:value-type="float">
            <text:p>5,53</text:p>
          </table:table-cell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36" calcext:value-type="float">
            <text:p>0,636</text:p>
          </table:table-cell>
          <table:table-cell table:style-name="ce6" office:value-type="float" office:value="0.642" calcext:value-type="float">
            <text:p>0,642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35" calcext:value-type="float">
            <text:p>3,35</text:p>
          </table:table-cell>
          <table:table-cell table:style-name="ce6" office:value-type="float" office:value="3.11" calcext:value-type="float">
            <text:p>3,11</text:p>
          </table:table-cell>
        </table:table-row>
        <table:table-row table:style-name="ro3">
          <table:table-cell table:style-name="ce4"/>
          <table:table-cell table:style-name="ce7" table:formula="of:=AVERAGE([.B341:.B350])" office:value-type="float" office:value="0.58936" calcext:value-type="float">
            <text:p>0,58936</text:p>
          </table:table-cell>
          <table:table-cell table:style-name="ce7" table:formula="of:=AVERAGE([.C341:.C350])" office:value-type="float" office:value="0.58927" calcext:value-type="float">
            <text:p>0,58927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7.73" calcext:value-type="float">
            <text:p>7,73</text:p>
          </table:table-cell>
          <table:table-cell table:style-name="ce6" office:value-type="float" office:value="5.15" calcext:value-type="float">
            <text:p>5,15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8.275" calcext:value-type="float">
            <text:p>8,275</text:p>
          </table:table-cell>
          <table:table-cell table:style-name="ce7" table:formula="of:=AVERAGE([.G342:.G351])" office:value-type="float" office:value="5.771" calcext:value-type="float">
            <text:p>5,77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763" calcext:value-type="float">
            <text:p>0,763</text:p>
          </table:table-cell>
          <table:table-cell table:style-name="ce6" office:value-type="float" office:value="0.819" calcext:value-type="float">
            <text:p>0,819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596" calcext:value-type="float">
            <text:p>0,1596</text:p>
          </table:table-cell>
          <table:table-cell table:style-name="ce6" office:value-type="float" office:value="0.195" calcext:value-type="float">
            <text:p>0,195</text:p>
          </table:table-cell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34" calcext:value-type="float">
            <text:p>0,734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306" calcext:value-type="float">
            <text:p>0,306</text:p>
          </table:table-cell>
          <table:table-cell table:style-name="ce6" office:value-type="float" office:value="0.299" calcext:value-type="float">
            <text:p>0,299</text:p>
          </table:table-cell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63" calcext:value-type="float">
            <text:p>0,663</text:p>
          </table:table-cell>
          <table:table-cell table:style-name="ce6" office:value-type="float" office:value="0.678" calcext:value-type="float">
            <text:p>0,67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73" calcext:value-type="float">
            <text:p>0,573</text:p>
          </table:table-cell>
          <table:table-cell table:style-name="ce6" office:value-type="float" office:value="0.678" calcext:value-type="float">
            <text:p>0,678</text:p>
          </table:table-cell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646" calcext:value-type="float">
            <text:p>0,646</text:p>
          </table:table-cell>
          <table:table-cell table:style-name="ce6" office:value-type="float" office:value="0.733" calcext:value-type="float">
            <text:p>0,733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465" calcext:value-type="float">
            <text:p>0,465</text:p>
          </table:table-cell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0.872" calcext:value-type="float">
            <text:p>0,872</text:p>
          </table:table-cell>
          <table:table-cell table:style-name="ce6" office:value-type="float" office:value="1.204" calcext:value-type="float">
            <text:p>1,204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office:value-type="float" office:value="0.219" calcext:value-type="float">
            <text:p>0,219</text:p>
          </table:table-cell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9688" calcext:value-type="float">
            <text:p>0,9688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24" calcext:value-type="float">
            <text:p>0,24</text:p>
          </table:table-cell>
          <table:table-cell table:style-name="ce6" office:value-type="float" office:value="0.432" calcext:value-type="float">
            <text:p>0,432</text:p>
          </table:table-cell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054" calcext:value-type="float">
            <text:p>1,054</text:p>
          </table:table-cell>
          <table:table-cell table:style-name="ce6" office:value-type="float" office:value="0.803" calcext:value-type="float">
            <text:p>0,803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91" calcext:value-type="float">
            <text:p>0,391</text:p>
          </table:table-cell>
          <table:table-cell table:style-name="ce6" office:value-type="float" office:value="0.424" calcext:value-type="float">
            <text:p>0,424</text:p>
          </table:table-cell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758" calcext:value-type="float">
            <text:p>0,758</text:p>
          </table:table-cell>
          <table:table-cell table:style-name="ce6" office:value-type="float" office:value="0.917" calcext:value-type="float">
            <text:p>0,9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41" calcext:value-type="float">
            <text:p>0,241</text:p>
          </table:table-cell>
          <table:table-cell table:style-name="ce6" office:value-type="float" office:value="0.201" calcext:value-type="float">
            <text:p>0,201</text:p>
          </table:table-cell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6" calcext:value-type="float">
            <text:p>0,46</text:p>
          </table:table-cell>
          <table:table-cell table:style-name="ce6" office:value-type="float" office:value="0.489" calcext:value-type="float">
            <text:p>0,489</text:p>
          </table:table-cell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748" calcext:value-type="float">
            <text:p>0,748</text:p>
          </table:table-cell>
          <table:table-cell table:style-name="ce6" office:value-type="float" office:value="1.059" calcext:value-type="float">
            <text:p>1,059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7" calcext:value-type="float">
            <text:p>0,2197</text:p>
          </table:table-cell>
          <table:table-cell table:style-name="ce6" office:value-type="float" office:value="0.215" calcext:value-type="float">
            <text:p>0,215</text:p>
          </table:table-cell>
        </table:table-row>
        <table:table-row table:style-name="ro3">
          <table:table-cell table:style-name="ce4"/>
          <table:table-cell table:style-name="ce7" table:formula="of:=AVERAGE([.B354:.B363])" office:value-type="float" office:value="0.7557" calcext:value-type="float">
            <text:p>0,7557</text:p>
          </table:table-cell>
          <table:table-cell table:style-name="ce7" table:formula="of:=AVERAGE([.C354:.C363])" office:value-type="float" office:value="0.87988" calcext:value-type="float">
            <text:p>0,87988</text:p>
          </table:table-cell>
          <table:table-cell table:style-name="ce7" table:number-columns-repeated="2"/>
          <table:table-cell table:style-name="ce7" table:formula="of:=AVERAGE([.F354:.F363])" office:value-type="float" office:value="0.35033" calcext:value-type="float">
            <text:p>0,35033</text:p>
          </table:table-cell>
          <table:table-cell table:style-name="ce7" table:formula="of:=AVERAGE([.G354:.G363])" office:value-type="float" office:value="0.3617" calcext:value-type="float">
            <text:p>0,3617</text:p>
          </table:table-cell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6" calcext:value-type="float">
            <text:p>1,06</text:p>
          </table:table-cell>
          <table:table-cell table:style-name="ce6" office:value-type="float" office:value="1.072" calcext:value-type="float">
            <text:p>1,072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283" calcext:value-type="float">
            <text:p>0,283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469" calcext:value-type="float">
            <text:p>0,469</text:p>
          </table:table-cell>
          <table:table-cell table:style-name="ce6" office:value-type="float" office:value="2.959" calcext:value-type="float">
            <text:p>2,959</text:p>
          </table:table-cell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94" calcext:value-type="float">
            <text:p>0,594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98" calcext:value-type="float">
            <text:p>0,98</text:p>
          </table:table-cell>
          <table:table-cell table:style-name="ce6" office:value-type="float" office:value="2.682" calcext:value-type="float">
            <text:p>2,682</text:p>
          </table:table-cell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 office:value-type="float" office:value="0.784" calcext:value-type="float">
            <text:p>0,784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544" calcext:value-type="float">
            <text:p>0,544</text:p>
          </table:table-cell>
          <table:table-cell table:style-name="ce6" office:value-type="float" office:value="3.183" calcext:value-type="float">
            <text:p>3,183</text:p>
          </table:table-cell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027" calcext:value-type="float">
            <text:p>1,027</text:p>
          </table:table-cell>
          <table:table-cell table:style-name="ce6" office:value-type="float" office:value="1.094" calcext:value-type="float">
            <text:p>1,094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2.917" calcext:value-type="float">
            <text:p>2,917</text:p>
          </table:table-cell>
          <table:table-cell table:style-name="ce6" office:value-type="float" office:value="2.959" calcext:value-type="float">
            <text:p>2,959</text:p>
          </table:table-cell>
        </table:table-row>
        <table:table-row table:style-name="ro1">
          <table:table-cell office:value-type="string" calcext:value-type="string">
            <text:p>Fy_6</text:p>
          </table:table-cell>
          <table:table-cell table:number-columns-repeated="2" table:style-name="ce6" office:value-type="float" office:value="0.362" calcext:value-type="float">
            <text:p>0,362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2.299" calcext:value-type="float">
            <text:p>2,299</text:p>
          </table:table-cell>
          <table:table-cell table:style-name="ce6" office:value-type="float" office:value="0.847" calcext:value-type="float">
            <text:p>0,847</text:p>
          </table:table-cell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9" calcext:value-type="float">
            <text:p>0,529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 office:value-type="float" office:value="0.556" calcext:value-type="float">
            <text:p>0,556</text:p>
          </table:table-cell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5.105" calcext:value-type="float">
            <text:p>5,105</text:p>
          </table:table-cell>
          <table:table-cell table:style-name="ce6" office:value-type="float" office:value="1.281" calcext:value-type="float">
            <text:p>1,281</text:p>
          </table:table-cell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54" calcext:value-type="float">
            <text:p>0,454</text:p>
          </table:table-cell>
          <table:table-cell table:style-name="ce6" office:value-type="float" office:value="0.4498" calcext:value-type="float">
            <text:p>0,4498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1.694" calcext:value-type="float">
            <text:p>1,694</text:p>
          </table:table-cell>
          <table:table-cell table:style-name="ce6" office:value-type="float" office:value="3.6399" calcext:value-type="float">
            <text:p>3,6399</text:p>
          </table:table-cell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42" calcext:value-type="float">
            <text:p>0,42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1.157" calcext:value-type="float">
            <text:p>1,157</text:p>
          </table:table-cell>
          <table:table-cell table:style-name="ce6" office:value-type="float" office:value="3.669" calcext:value-type="float">
            <text:p>3,669</text:p>
          </table:table-cell>
        </table:table-row>
        <table:table-row table:style-name="ro3">
          <table:table-cell table:style-name="ce4"/>
          <table:table-cell table:style-name="ce7" table:formula="of:=AVERAGE([.B367:.B376])" office:value-type="float" office:value="0.591" calcext:value-type="float">
            <text:p>0,591</text:p>
          </table:table-cell>
          <table:table-cell table:style-name="ce7" table:formula="of:=AVERAGE([.C367:.C376])" office:value-type="float" office:value="0.59298" calcext:value-type="float">
            <text:p>0,59298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3.191" calcext:value-type="float">
            <text:p>3,19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73477777777778" calcext:value-type="float">
            <text:p>1,73477777777778</text:p>
          </table:table-cell>
          <table:table-cell table:style-name="ce7" table:formula="of:=AVERAGE([.G368:.G377])" office:value-type="float" office:value="2.49669" calcext:value-type="float">
            <text:p>2,49669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98.634" calcext:value-type="float">
            <text:p>398,634</text:p>
          </table:table-cell>
          <table:table-cell table:style-name="ce6" office:value-type="float" office:value="340.435" calcext:value-type="float">
            <text:p>340,435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625.765" calcext:value-type="float">
            <text:p>625,765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.984" calcext:value-type="float">
            <text:p>1,984</text:p>
          </table:table-cell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33.639" calcext:value-type="float">
            <text:p>633,639</text:p>
          </table:table-cell>
          <table:table-cell table:style-name="ce6" office:value-type="float" office:value="700.214" calcext:value-type="float">
            <text:p>700,214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797" calcext:value-type="float">
            <text:p>0,797</text:p>
          </table:table-cell>
          <table:table-cell table:style-name="ce6" office:value-type="float" office:value="0.812" calcext:value-type="float">
            <text:p>0,812</text:p>
          </table:table-cell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417.417" calcext:value-type="float">
            <text:p>417,417</text:p>
          </table:table-cell>
          <table:table-cell table:style-name="ce6" office:value-type="float" office:value="586.238" calcext:value-type="float">
            <text:p>586,23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 office:value-type="float" office:value="0.576" calcext:value-type="float">
            <text:p>0,576</text:p>
          </table:table-cell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47.949" calcext:value-type="float">
            <text:p>647,949</text:p>
          </table:table-cell>
          <table:table-cell table:style-name="ce6" office:value-type="float" office:value="617.542" calcext:value-type="float">
            <text:p>617,542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19" calcext:value-type="float">
            <text:p>0,919</text:p>
          </table:table-cell>
          <table:table-cell table:style-name="ce6"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505.958" calcext:value-type="float">
            <text:p>505,958</text:p>
          </table:table-cell>
          <table:table-cell table:style-name="ce6" office:value-type="float" office:value="755.416" calcext:value-type="float">
            <text:p>755,416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float" office:value="0.889" calcext:value-type="float">
            <text:p>0,889</text:p>
          </table:table-cell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20.275" calcext:value-type="float">
            <text:p>420,275</text:p>
          </table:table-cell>
          <table:table-cell table:style-name="ce6" office:value-type="float" office:value="423.94" calcext:value-type="float">
            <text:p>423,94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79" calcext:value-type="float">
            <text:p>1,079</text:p>
          </table:table-cell>
          <table:table-cell table:style-name="ce6" office:value-type="float" office:value="1.014" calcext:value-type="float">
            <text:p>1,014</text:p>
          </table:table-cell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612.136" calcext:value-type="float">
            <text:p>612,136</text:p>
          </table:table-cell>
          <table:table-cell table:style-name="ce6" office:value-type="float" office:value="358.844" calcext:value-type="float">
            <text:p>358,844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773" calcext:value-type="float">
            <text:p>0,773</text:p>
          </table:table-cell>
          <table:table-cell table:style-name="ce6" office:value-type="float" office:value="0.737" calcext:value-type="float">
            <text:p>0,737</text:p>
          </table:table-cell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433.675" calcext:value-type="float">
            <text:p>433,675</text:p>
          </table:table-cell>
          <table:table-cell table:style-name="ce6" office:value-type="float" office:value="434.163" calcext:value-type="float">
            <text:p>434,163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879" calcext:value-type="float">
            <text:p>0,879</text:p>
          </table:table-cell>
          <table:table-cell table:style-name="ce6" office:value-type="float" office:value="0.878" calcext:value-type="float">
            <text:p>0,878</text:p>
          </table:table-cell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618.479" calcext:value-type="float">
            <text:p>618,479</text:p>
          </table:table-cell>
          <table:table-cell table:style-name="ce6" office:value-type="float" office:value="616.932" calcext:value-type="float">
            <text:p>616,932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1.059" calcext:value-type="float">
            <text:p>1,059</text:p>
          </table:table-cell>
          <table:table-cell table:style-name="ce6" office:value-type="float" office:value="1.024" calcext:value-type="float">
            <text:p>1,024</text:p>
          </table:table-cell>
        </table:table-row>
        <table:table-row table:style-name="ro3">
          <table:table-cell table:style-name="ce4"/>
          <table:table-cell table:style-name="ce7" table:formula="of:=AVERAGE([.B380:.B389])" office:value-type="float" office:value="520.906888888889" calcext:value-type="float">
            <text:p>520,906888888889</text:p>
          </table:table-cell>
          <table:table-cell table:style-name="ce7" table:formula="of:=AVERAGE([.C380:.C389])" office:value-type="float" office:value="545.9489" calcext:value-type="float">
            <text:p>545,9489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1.055" calcext:value-type="float">
            <text:p>1,055</text:p>
          </table:table-cell>
          <table:table-cell table:style-name="ce6" office:value-type="float" office:value="1.033" calcext:value-type="float">
            <text:p>1,033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0.894222222222222" calcext:value-type="float">
            <text:p>0,894222222222222</text:p>
          </table:table-cell>
          <table:table-cell table:style-name="ce7" table:formula="of:=AVERAGE([.G381:.G390])" office:value-type="float" office:value="0.9077" calcext:value-type="float">
            <text:p>0,907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 office:value-type="float" office:value="0.404" calcext:value-type="float">
            <text:p>0,404</text:p>
          </table:table-cell>
          <table:table-cell table:style-name="ce6"/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569" calcext:value-type="float">
            <text:p>0,569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0.518" calcext:value-type="float">
            <text:p>10,518</text:p>
          </table:table-cell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353" calcext:value-type="float">
            <text:p>0,353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6.462" calcext:value-type="float">
            <text:p>6,462</text:p>
          </table:table-cell>
          <table:table-cell table:style-name="ce6" office:value-type="float" office:value="4.899" calcext:value-type="float">
            <text:p>4,899</text:p>
          </table:table-cell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 office:value-type="float" office:value="0.454" calcext:value-type="float">
            <text:p>0,454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6.916" calcext:value-type="float">
            <text:p>6,916</text:p>
          </table:table-cell>
          <table:table-cell table:style-name="ce6" office:value-type="float" office:value="4.195" calcext:value-type="float">
            <text:p>4,195</text:p>
          </table:table-cell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8.03" calcext:value-type="float">
            <text:p>8,03</text:p>
          </table:table-cell>
          <table:table-cell table:style-name="ce6" office:value-type="float" office:value="4.554" calcext:value-type="float">
            <text:p>4,554</text:p>
          </table:table-cell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7.525" calcext:value-type="float">
            <text:p>7,525</text:p>
          </table:table-cell>
          <table:table-cell table:style-name="ce6" office:value-type="float" office:value="4.531" calcext:value-type="float">
            <text:p>4,531</text:p>
          </table:table-cell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0914" calcext:value-type="float">
            <text:p>0,0914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6.363" calcext:value-type="float">
            <text:p>6,363</text:p>
          </table:table-cell>
          <table:table-cell table:style-name="ce6" office:value-type="float" office:value="4.613" calcext:value-type="float">
            <text:p>4,613</text:p>
          </table:table-cell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7.265" calcext:value-type="float">
            <text:p>7,265</text:p>
          </table:table-cell>
          <table:table-cell table:style-name="ce6" office:value-type="float" office:value="5.34" calcext:value-type="float">
            <text:p>5,34</text:p>
          </table:table-cell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72" calcext:value-type="float">
            <text:p>0,272</text:p>
          </table:table-cell>
          <table:table-cell table:style-name="ce6" office:value-type="float" office:value="0.26" calcext:value-type="float">
            <text:p>0,26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5.082" calcext:value-type="float">
            <text:p>5,082</text:p>
          </table:table-cell>
          <table:table-cell table:style-name="ce6" office:value-type="float" office:value="4.645" calcext:value-type="float">
            <text:p>4,645</text:p>
          </table:table-cell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565" calcext:value-type="float">
            <text:p>0,565</text:p>
          </table:table-cell>
          <table:table-cell table:style-name="ce6" office:value-type="float" office:value="0.416" calcext:value-type="float">
            <text:p>0,416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6.725" calcext:value-type="float">
            <text:p>6,725</text:p>
          </table:table-cell>
          <table:table-cell table:style-name="ce6" office:value-type="float" office:value="5.771" calcext:value-type="float">
            <text:p>5,771</text:p>
          </table:table-cell>
        </table:table-row>
        <table:table-row table:style-name="ro3">
          <table:table-cell table:style-name="ce4"/>
          <table:table-cell table:style-name="ce7" table:formula="of:=AVERAGE([.B393:.B402])" office:value-type="float" office:value="0.362" calcext:value-type="float">
            <text:p>0,362</text:p>
          </table:table-cell>
          <table:table-cell table:style-name="ce7" table:formula="of:=AVERAGE([.C393:.C402])" office:value-type="float" office:value="0.32224" calcext:value-type="float">
            <text:p>0,32224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6.975" calcext:value-type="float">
            <text:p>6,975</text:p>
          </table:table-cell>
          <table:table-cell table:style-name="ce6" office:value-type="float" office:value="4.331" calcext:value-type="float">
            <text:p>4,331</text:p>
          </table:table-cell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6.81588888888889" calcext:value-type="float">
            <text:p>6,81588888888889</text:p>
          </table:table-cell>
          <table:table-cell table:style-name="ce7" table:formula="of:=AVERAGE([.G394:.G403])" office:value-type="float" office:value="5.3397" calcext:value-type="float">
            <text:p>5,339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1"/>
          <table:table-cell table:style-name="ce1" office:value-type="string" calcext:value-type="string">
            <text:p>NC=1000</text:p>
          </table:table-cell>
          <table:table-cell table:style-name="ce1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408.394" calcext:value-type="float">
            <text:p>408,394</text:p>
          </table:table-cell>
          <table:table-cell table:style-name="ce6" office:value-type="float" office:value="472.294" calcext:value-type="float">
            <text:p>472,294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24" calcext:value-type="float">
            <text:p>0,124</text:p>
          </table:table-cell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33.841" calcext:value-type="float">
            <text:p>333,841</text:p>
          </table:table-cell>
          <table:table-cell table:style-name="ce6" office:value-type="float" office:value="321.309" calcext:value-type="float">
            <text:p>321,309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68" calcext:value-type="float">
            <text:p>0,0768</text:p>
          </table:table-cell>
          <table:table-cell table:style-name="ce6" office:value-type="float" office:value="0.0708" calcext:value-type="float">
            <text:p>0,0708</text:p>
          </table:table-cell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403.671" calcext:value-type="float">
            <text:p>403,671</text:p>
          </table:table-cell>
          <table:table-cell table:style-name="ce6" office:value-type="float" office:value="396.707" calcext:value-type="float">
            <text:p>396,707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39.026" calcext:value-type="float">
            <text:p>539,026</text:p>
          </table:table-cell>
          <table:table-cell table:style-name="ce6" office:value-type="float" office:value="545.418" calcext:value-type="float">
            <text:p>545,418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 office:value-type="float" office:value="0.378" calcext:value-type="float">
            <text:p>0,378</text:p>
          </table:table-cell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54.554" calcext:value-type="float">
            <text:p>454,554</text:p>
          </table:table-cell>
          <table:table-cell table:style-name="ce6" office:value-type="float" office:value="450.463" calcext:value-type="float">
            <text:p>450,463</text:p>
          </table:table-cell>
          <table:table-cell table:style-name="ce6"/>
          <table:table-cell office:value-type="string" calcext:value-type="string">
            <text:p>VE_5</text:p>
          </table:table-cell>
          <table:table-cell table:number-columns-repeated="2" table:style-name="ce6"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310.472" calcext:value-type="float">
            <text:p>310,472</text:p>
          </table:table-cell>
          <table:table-cell table:style-name="ce6" office:value-type="float" office:value="180.351" calcext:value-type="float">
            <text:p>180,351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11" calcext:value-type="float">
            <text:p>0,311</text:p>
          </table:table-cell>
          <table:table-cell table:style-name="ce6" office:value-type="float" office:value="0.291" calcext:value-type="float">
            <text:p>0,291</text:p>
          </table:table-cell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1.032" calcext:value-type="float">
            <text:p>211,032</text:p>
          </table:table-cell>
          <table:table-cell table:style-name="ce6" office:value-type="float" office:value="206.288" calcext:value-type="float">
            <text:p>206,288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18" calcext:value-type="float">
            <text:p>0,0918</text:p>
          </table:table-cell>
          <table:table-cell table:style-name="ce6" office:value-type="float" office:value="0.0889" calcext:value-type="float">
            <text:p>0,0889</text:p>
          </table:table-cell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481.999" calcext:value-type="float">
            <text:p>481,999</text:p>
          </table:table-cell>
          <table:table-cell table:style-name="ce6" office:value-type="float" office:value="516.378" calcext:value-type="float">
            <text:p>516,378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09" calcext:value-type="float">
            <text:p>2,09</text:p>
          </table:table-cell>
          <table:table-cell table:style-name="ce6" office:value-type="float" office:value="2.264" calcext:value-type="float">
            <text:p>2,264</text:p>
          </table:table-cell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8.032" calcext:value-type="float">
            <text:p>318,032</text:p>
          </table:table-cell>
          <table:table-cell table:style-name="ce6" office:value-type="float" office:value="316.133" calcext:value-type="float">
            <text:p>316,13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097" calcext:value-type="float">
            <text:p>1,097</text:p>
          </table:table-cell>
          <table:table-cell table:style-name="ce6" office:value-type="float" office:value="1.258" calcext:value-type="float">
            <text:p>1,258</text:p>
          </table:table-cell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22.249" calcext:value-type="float">
            <text:p>322,249</text:p>
          </table:table-cell>
          <table:table-cell table:style-name="ce6" office:value-type="float" office:value="328.859" calcext:value-type="float">
            <text:p>328,859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598" calcext:value-type="float">
            <text:p>0,2598</text:p>
          </table:table-cell>
          <table:table-cell table:style-name="ce6" office:value-type="float" office:value="0.253" calcext:value-type="float">
            <text:p>0,253</text:p>
          </table:table-cell>
        </table:table-row>
        <table:table-row table:style-name="ro3">
          <table:table-cell table:style-name="ce4"/>
          <table:table-cell table:style-name="ce7" table:formula="of:=AVERAGE([.B406:.B415])" office:value-type="float" office:value="378.327" calcext:value-type="float">
            <text:p>378,327</text:p>
          </table:table-cell>
          <table:table-cell table:style-name="ce7" table:formula="of:=AVERAGE([.C406:.C415])" office:value-type="float" office:value="373.42" calcext:value-type="float">
            <text:p>373,42</text:p>
          </table:table-cell>
          <table:table-cell table:style-name="ce7" table:number-columns-repeated="2"/>
          <table:table-cell table:style-name="ce7" table:formula="of:=AVERAGE([.F406:.F415])" office:value-type="float" office:value="0.51074" calcext:value-type="float">
            <text:p>0,51074</text:p>
          </table:table-cell>
          <table:table-cell table:style-name="ce7" table:formula="of:=AVERAGE([.G406:.G415])" office:value-type="float" office:value="0.54037" calcext:value-type="float">
            <text:p>0,54037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99" calcext:value-type="float">
            <text:p>8,499</text:p>
          </table:table-cell>
          <table:table-cell table:style-name="ce6" office:value-type="float" office:value="8.5" calcext:value-type="float">
            <text:p>8,5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562" calcext:value-type="float">
            <text:p>1,562</text:p>
          </table:table-cell>
          <table:table-cell table:style-name="ce6" office:value-type="float" office:value="1.649" calcext:value-type="float">
            <text:p>1,649</text:p>
          </table:table-cell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76" calcext:value-type="float">
            <text:p>7,476</text:p>
          </table:table-cell>
          <table:table-cell table:style-name="ce6" office:value-type="float" office:value="7.396" calcext:value-type="float">
            <text:p>7,396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1.306" calcext:value-type="float">
            <text:p>1,306</text:p>
          </table:table-cell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79" calcext:value-type="float">
            <text:p>9,079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56" calcext:value-type="float">
            <text:p>1,456</text:p>
          </table:table-cell>
          <table:table-cell table:style-name="ce6" office:value-type="float" office:value="1.305" calcext:value-type="float">
            <text:p>1,305</text:p>
          </table:table-cell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563" calcext:value-type="float">
            <text:p>7,56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165" calcext:value-type="float">
            <text:p>1,165</text:p>
          </table:table-cell>
          <table:table-cell table:style-name="ce6" office:value-type="float" office:value="1.192" calcext:value-type="float">
            <text:p>1,192</text:p>
          </table:table-cell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276" calcext:value-type="float">
            <text:p>7,276</text:p>
          </table:table-cell>
          <table:table-cell table:style-name="ce6" office:value-type="float" office:value="7.301" calcext:value-type="float">
            <text:p>7,301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403" calcext:value-type="float">
            <text:p>1,403</text:p>
          </table:table-cell>
          <table:table-cell table:style-name="ce6" office:value-type="float" office:value="1.095" calcext:value-type="float">
            <text:p>1,095</text:p>
          </table:table-cell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5" calcext:value-type="float">
            <text:p>7,995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203" calcext:value-type="float">
            <text:p>1,203</text:p>
          </table:table-cell>
          <table:table-cell table:style-name="ce6" office:value-type="float" office:value="1.296" calcext:value-type="float">
            <text:p>1,296</text:p>
          </table:table-cell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127" calcext:value-type="float">
            <text:p>9,127</text:p>
          </table:table-cell>
          <table:table-cell table:style-name="ce6" office:value-type="float" office:value="9.146" calcext:value-type="float">
            <text:p>9,146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75" calcext:value-type="float">
            <text:p>1,75</text:p>
          </table:table-cell>
          <table:table-cell table:style-name="ce6" office:value-type="float" office:value="1.634" calcext:value-type="float">
            <text:p>1,634</text:p>
          </table:table-cell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331" calcext:value-type="float">
            <text:p>7,331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128" calcext:value-type="float">
            <text:p>1,128</text:p>
          </table:table-cell>
          <table:table-cell table:style-name="ce6" office:value-type="float" office:value="1.132" calcext:value-type="float">
            <text:p>1,132</text:p>
          </table:table-cell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3" calcext:value-type="float">
            <text:p>6,43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154" calcext:value-type="float">
            <text:p>1,154</text:p>
          </table:table-cell>
          <table:table-cell table:style-name="ce6" office:value-type="float" office:value="1.247" calcext:value-type="float">
            <text:p>1,247</text:p>
          </table:table-cell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75" calcext:value-type="float">
            <text:p>7,275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357" calcext:value-type="float">
            <text:p>1,357</text:p>
          </table:table-cell>
          <table:table-cell table:style-name="ce6" office:value-type="float" office:value="1.136" calcext:value-type="float">
            <text:p>1,136</text:p>
          </table:table-cell>
        </table:table-row>
        <table:table-row table:style-name="ro3">
          <table:table-cell table:style-name="ce7"/>
          <table:table-cell table:style-name="ce7" table:formula="of:=AVERAGE([.B419:.B428])" office:value-type="float" office:value="7.8046" calcext:value-type="float">
            <text:p>7,8046</text:p>
          </table:table-cell>
          <table:table-cell table:style-name="ce7" table:formula="of:=AVERAGE([.C419:.C428])" office:value-type="float" office:value="7.8016" calcext:value-type="float">
            <text:p>7,8016</text:p>
          </table:table-cell>
          <table:table-cell table:style-name="ce7" table:number-columns-repeated="2"/>
          <table:table-cell table:style-name="ce7" table:formula="of:=AVERAGE([.F419:.F428])" office:value-type="float" office:value="1.3185" calcext:value-type="float">
            <text:p>1,3185</text:p>
          </table:table-cell>
          <table:table-cell table:style-name="ce7" table:formula="of:=AVERAGE([.G419:.G428])" office:value-type="float" office:value="1.2992" calcext:value-type="float">
            <text:p>1,2992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 table:number-columns-repeated="2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88.509" calcext:value-type="float">
            <text:p>188,509</text:p>
          </table:table-cell>
          <table:table-cell table:style-name="ce6" office:value-type="float" office:value="179.548" calcext:value-type="float">
            <text:p>179,548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749.874" calcext:value-type="float">
            <text:p>749,874</text:p>
          </table:table-cell>
          <table:table-cell table:style-name="ce6" office:value-type="float" office:value="576.609" calcext:value-type="float">
            <text:p>576,609</text:p>
          </table:table-cell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09.253" calcext:value-type="float">
            <text:p>109,253</text:p>
          </table:table-cell>
          <table:table-cell table:style-name="ce6" office:value-type="float" office:value="73.165" calcext:value-type="float">
            <text:p>73,165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834.803" calcext:value-type="float">
            <text:p>834,803</text:p>
          </table:table-cell>
          <table:table-cell table:style-name="ce6" office:value-type="float" office:value="662.366" calcext:value-type="float">
            <text:p>662,366</text:p>
          </table:table-cell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34.203" calcext:value-type="float">
            <text:p>134,203</text:p>
          </table:table-cell>
          <table:table-cell table:style-name="ce6" office:value-type="float" office:value="101.263" calcext:value-type="float">
            <text:p>101,263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671.002" calcext:value-type="float">
            <text:p>671,002</text:p>
          </table:table-cell>
          <table:table-cell table:style-name="ce6" office:value-type="float" office:value="548.755" calcext:value-type="float">
            <text:p>548,755</text:p>
          </table:table-cell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36.127" calcext:value-type="float">
            <text:p>136,127</text:p>
          </table:table-cell>
          <table:table-cell table:style-name="ce6" office:value-type="float" office:value="135.377" calcext:value-type="float">
            <text:p>135,377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928.094" calcext:value-type="float">
            <text:p>928,094</text:p>
          </table:table-cell>
          <table:table-cell table:style-name="ce6" office:value-type="float" office:value="497.353" calcext:value-type="float">
            <text:p>497,353</text:p>
          </table:table-cell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137.194" calcext:value-type="float">
            <text:p>137,194</text:p>
          </table:table-cell>
          <table:table-cell table:style-name="ce6" office:value-type="float" office:value="90.059" calcext:value-type="float">
            <text:p>90,059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723.263" calcext:value-type="float">
            <text:p>723,263</text:p>
          </table:table-cell>
          <table:table-cell table:style-name="ce6" office:value-type="float" office:value="539.769" calcext:value-type="float">
            <text:p>539,769</text:p>
          </table:table-cell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89.847" calcext:value-type="float">
            <text:p>89,847</text:p>
          </table:table-cell>
          <table:table-cell table:style-name="ce6" office:value-type="float" office:value="127.47" calcext:value-type="float">
            <text:p>127,47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881.253" calcext:value-type="float">
            <text:p>881,253</text:p>
          </table:table-cell>
          <table:table-cell table:style-name="ce6" office:value-type="float" office:value="605.546" calcext:value-type="float">
            <text:p>605,546</text:p>
          </table:table-cell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96.264" calcext:value-type="float">
            <text:p>96,264</text:p>
          </table:table-cell>
          <table:table-cell table:style-name="ce6" office:value-type="float" office:value="101.833" calcext:value-type="float">
            <text:p>101,83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824.073" calcext:value-type="float">
            <text:p>824,073</text:p>
          </table:table-cell>
          <table:table-cell table:style-name="ce6" office:value-type="float" office:value="470.1799" calcext:value-type="float">
            <text:p>470,1799</text:p>
          </table:table-cell>
        </table:table-row>
        <table:table-row table:style-name="ro1">
          <table:table-cell office:value-type="string" calcext:value-type="string">
            <text:p>stock_8</text:p>
          </table:table-cell>
          <table:table-cell table:style-name="ce6" office:value-type="float" office:value="108.733" calcext:value-type="float">
            <text:p>108,733</text:p>
          </table:table-cell>
          <table:table-cell table:style-name="ce6" office:value-type="float" office:value="112.648" calcext:value-type="float">
            <text:p>112,648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965.592" calcext:value-type="float">
            <text:p>965,592</text:p>
          </table:table-cell>
          <table:table-cell table:style-name="ce6" office:value-type="float" office:value="744.049" calcext:value-type="float">
            <text:p>744,049</text:p>
          </table:table-cell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float" office:value="95.038" calcext:value-type="float">
            <text:p>95,038</text:p>
          </table:table-cell>
          <table:table-cell table:style-name="ce6" office:value-type="float" office:value="74.391" calcext:value-type="float">
            <text:p>74,391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870.823" calcext:value-type="float">
            <text:p>870,823</text:p>
          </table:table-cell>
          <table:table-cell table:style-name="ce6" office:value-type="float" office:value="468.963" calcext:value-type="float">
            <text:p>468,963</text:p>
          </table:table-cell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48.969" calcext:value-type="float">
            <text:p>148,969</text:p>
          </table:table-cell>
          <table:table-cell table:style-name="ce6" office:value-type="float" office:value="166.609" calcext:value-type="float">
            <text:p>166,6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976.863" calcext:value-type="float">
            <text:p>976,863</text:p>
          </table:table-cell>
          <table:table-cell table:style-name="ce6" office:value-type="float" office:value="449.424" calcext:value-type="float">
            <text:p>449,424</text:p>
          </table:table-cell>
        </table:table-row>
        <table:table-row table:style-name="ro3">
          <table:table-cell table:style-name="ce4"/>
          <table:table-cell table:style-name="ce7" table:formula="of:=AVERAGE([.B432:.B441])" office:value-type="float" office:value="124.4137" calcext:value-type="float">
            <text:p>124,4137</text:p>
          </table:table-cell>
          <table:table-cell table:style-name="ce7" table:formula="of:=AVERAGE([.C432:.C441])" office:value-type="float" office:value="116.2363" calcext:value-type="float">
            <text:p>116,236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842.564" calcext:value-type="float">
            <text:p>842,564</text:p>
          </table:table-cell>
          <table:table-cell table:style-name="ce7" table:formula="of:=AVERAGE([.G432:.G441])" office:value-type="float" office:value="556.30139" calcext:value-type="float">
            <text:p>556,30139</text:p>
          </table:table-cell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1000</text:p>
          </table:table-cell>
          <table:table-cell table:style-name="ce5" office:value-type="string" calcext:value-type="string">
            <text:p>NC=200</text:p>
          </table:table-cell>
          <table:table-cell table:style-name="ce5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87" calcext:value-type="float">
            <text:p>3,87</text:p>
          </table:table-cell>
          <table:table-cell table:style-name="ce6" office:value-type="float" office:value="3.856" calcext:value-type="float">
            <text:p>3,856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362" calcext:value-type="float">
            <text:p>4,362</text:p>
          </table:table-cell>
          <table:table-cell table:style-name="ce6" office:value-type="float" office:value="4.359" calcext:value-type="float">
            <text:p>4,359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734" calcext:value-type="float">
            <text:p>6,734</text:p>
          </table:table-cell>
          <table:table-cell table:style-name="ce6" office:value-type="float" office:value="6.566" calcext:value-type="float">
            <text:p>6,566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41" calcext:value-type="float">
            <text:p>2,841</text:p>
          </table:table-cell>
          <table:table-cell table:style-name="ce6" office:value-type="float" office:value="2.768" calcext:value-type="float">
            <text:p>2,768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97" calcext:value-type="float">
            <text:p>6,197</text:p>
          </table:table-cell>
          <table:table-cell table:style-name="ce6" office:value-type="float" office:value="6.353" calcext:value-type="float">
            <text:p>6,35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8.003" calcext:value-type="float">
            <text:p>8,003</text:p>
          </table:table-cell>
          <table:table-cell table:style-name="ce6" office:value-type="float" office:value="7.803" calcext:value-type="float">
            <text:p>7,80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251" calcext:value-type="float">
            <text:p>5,251</text:p>
          </table:table-cell>
          <table:table-cell table:style-name="ce6" office:value-type="float" office:value="5.471" calcext:value-type="float">
            <text:p>5,471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4.983" calcext:value-type="float">
            <text:p>4,983</text:p>
          </table:table-cell>
          <table:table-cell table:style-name="ce6" office:value-type="float" office:value="5.092" calcext:value-type="float">
            <text:p>5,092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943" calcext:value-type="float">
            <text:p>2,943</text:p>
          </table:table-cell>
          <table:table-cell table:style-name="ce6" office:value-type="float" office:value="3.024" calcext:value-type="float">
            <text:p>3,024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02" calcext:value-type="float">
            <text:p>4,402</text:p>
          </table:table-cell>
          <table:table-cell table:style-name="ce6" office:value-type="float" office:value="4.543" calcext:value-type="float">
            <text:p>4,543</text:p>
          </table:table-cell>
          <table:table-cell table:style-name="ce6"/>
          <table:table-cell table:style-name="ce8"/>
          <table:table-cell table:style-name="Default" table:number-columns-repeated="2"/>
        </table:table-row>
        <table:table-row table:style-name="ro3">
          <table:table-cell table:style-name="ce4"/>
          <table:table-cell table:style-name="ce7" table:formula="of:=AVERAGE([.B445:.B454])" office:value-type="float" office:value="4.9586" calcext:value-type="float">
            <text:p>4,9586</text:p>
          </table:table-cell>
          <table:table-cell table:style-name="ce7" table:formula="of:=AVERAGE([.C445:.C454])" office:value-type="float" office:value="4.9835" calcext:value-type="float">
            <text:p>4,9835</text:p>
          </table:table-cell>
          <table:table-cell table:style-name="ce7" table:number-columns-repeated="2"/>
          <table:table-cell table:style-name="Default" table:number-columns-repeated="2"/>
        </table:table-row>
        <table:table-row table:style-name="ro4">
          <table:table-cell table:style-name="Default"/>
          <table:table-cell table:style-name="ce8" table:number-columns-repeated="6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2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2"/>
        </table:table-row>
        <table:table-row table:style-name="ro4" table:number-rows-repeated="2">
          <table:table-cell table:style-name="Default" table:number-columns-repeated="5"/>
          <table:table-cell table:style-name="ce8" table:number-columns-repeated="2"/>
        </table:table-row>
        <table:table-row table:style-name="ro4">
          <table:table-cell table:style-name="Default" table:number-columns-repeated="5"/>
          <table:table-cell table:style-name="ce8" table:number-columns-repeated="2"/>
        </table:table-row>
      </table:table>
      <table:table table:name="nc_averages" table:style-name="ta1">
        <table:table-column table:style-name="co10" table:default-cell-style-name="Default"/>
        <table:table-column table:style-name="co11" table:number-columns-repeated="4" table:default-cell-style-name="ce16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8" office:value-type="string" calcext:value-type="string">
            <text:p>NC=200</text:p>
          </table:table-cell>
          <table:table-cell table:style-name="ce18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78" calcext:value-type="percentage">
            <text:p>17,80%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021" calcext:value-type="percentage">
            <text:p>20,21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1936" calcext:value-type="percentage">
            <text:p>19,36%</text:p>
          </table:table-cell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094" calcext:value-type="percentage">
            <text:p>20,94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1781" calcext:value-type="percentage">
            <text:p>17,81%</text:p>
          </table:table-cell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1718" calcext:value-type="percentage">
            <text:p>17,18%</text:p>
          </table:table-cell>
          <table:table-cell office:value-type="percentage" office:value="0.1697" calcext:value-type="percentage">
            <text:p>16,97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784" calcext:value-type="percentage">
            <text:p>17,84%</text:p>
          </table:table-cell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828" calcext:value-type="percentage">
            <text:p>38,28%</text:p>
          </table:table-cell>
          <table:table-cell office:value-type="percentage" office:value="0.3661" calcext:value-type="percentage">
            <text:p>36,61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3617" calcext:value-type="percentage">
            <text:p>36,17%</text:p>
          </table:table-cell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529" calcext:value-type="percentage">
            <text:p>5,29%</text:p>
          </table:table-cell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886" calcext:value-type="percentage">
            <text:p>48,86%</text:p>
          </table:table-cell>
          <table:table-cell office:value-type="percentage" office:value="0.5014" calcext:value-type="percentage">
            <text:p>50,14%</text:p>
          </table:table-cell>
          <table:table-cell office:value-type="percentage" office:value="0.5038" calcext:value-type="percentage">
            <text:p>50,38%</text:p>
          </table:table-cell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4083" calcext:value-type="percentage">
            <text:p>40,83%</text:p>
          </table:table-cell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604" calcext:value-type="percentage">
            <text:p>60,40%</text:p>
          </table:table-cell>
          <table:table-cell office:value-type="percentage" office:value="0.6076" calcext:value-type="percentage">
            <text:p>60,76%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5952" calcext:value-type="percentage">
            <text:p>59,52%</text:p>
          </table:table-cell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11" calcext:value-type="percentage">
            <text:p>21,10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7009" calcext:value-type="percentage">
            <text:p>70,09%</text:p>
          </table:table-cell>
          <table:table-cell office:value-type="percentage" office:value="0.6214" calcext:value-type="percentage">
            <text:p>62,14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162" calcext:value-type="percentage">
            <text:p>51,62%</text:p>
          </table:table-cell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53" calcext:value-type="percentage">
            <text:p>27,53%</text:p>
          </table:table-cell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4239" calcext:value-type="percentage">
            <text:p>42,39%</text:p>
          </table:table-cell>
          <table:table-cell office:value-type="percentage" office:value="0.4008" calcext:value-type="percentage">
            <text:p>40,08%</text:p>
          </table:table-cell>
          <table:table-cell office:value-type="percentage" office:value="0.3808" calcext:value-type="percentage">
            <text:p>38,08%</text:p>
          </table:table-cell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2334" calcext:value-type="percentage">
            <text:p>23,34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59" calcext:value-type="percentage">
            <text:p>21,59%</text:p>
          </table:table-cell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913" calcext:value-type="percentage">
            <text:p>19,13%</text:p>
          </table:table-cell>
          <table:table-cell office:value-type="percentage" office:value="0.1883" calcext:value-type="percentage">
            <text:p>18,83%</text:p>
          </table:table-cell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461" calcext:value-type="percentage">
            <text:p>4,61%</text:p>
          </table:table-cell>
          <table:table-cell table:style-name="ce21" office:value-type="percentage" office:value="0.0461" calcext:value-type="percentage">
            <text:p>4,61%</text:p>
          </table:table-cell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466" calcext:value-type="percentage">
            <text:p>14,66%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183" calcext:value-type="percentage">
            <text:p>11,83%</text:p>
          </table:table-cell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959" calcext:value-type="percentage">
            <text:p>29,59%</text:p>
          </table:table-cell>
          <table:table-cell office:value-type="percentage" office:value="0.3041" calcext:value-type="percentage">
            <text:p>30,41%</text:p>
          </table:table-cell>
          <table:table-cell table:style-name="ce21" office:value-type="percentage" office:value="0.3041" calcext:value-type="percentage">
            <text:p>30,41%</text:p>
          </table:table-cell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2972" calcext:value-type="percentage">
            <text:p>29,72%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243" calcext:value-type="percentage">
            <text:p>22,43%</text:p>
          </table:table-cell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777" calcext:value-type="percentage">
            <text:p>17,77%</text:p>
          </table:table-cell>
          <table:table-cell office:value-type="percentage" office:value="0.1772" calcext:value-type="percentage">
            <text:p>17,72%</text:p>
          </table:table-cell>
          <table:table-cell table:style-name="ce21" office:value-type="percentage" office:value="0.1772" calcext:value-type="percentage">
            <text:p>17,72%</text:p>
          </table:table-cell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553" calcext:value-type="percentage">
            <text:p>15,53%</text:p>
          </table:table-cell>
          <table:table-cell table:style-name="ce21" office:value-type="percentage" office:value="0.1553" calcext:value-type="percentage">
            <text:p>15,53%</text:p>
          </table:table-cell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936" calcext:value-type="percentage">
            <text:p>9,36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1043" calcext:value-type="percentage">
            <text:p>10,43%</text:p>
          </table:table-cell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637" calcext:value-type="percentage">
            <text:p>16,37%</text:p>
          </table:table-cell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366" calcext:value-type="percentage">
            <text:p>23,66%</text:p>
          </table:table-cell>
          <table:table-cell office:value-type="percentage" office:value="0.2359" calcext:value-type="percentage">
            <text:p>23,59%</text:p>
          </table:table-cell>
          <table:table-cell table:style-name="ce21" office:value-type="percentage" office:value="0.2359" calcext:value-type="percentage">
            <text:p>23,59%</text:p>
          </table:table-cell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1" calcext:value-type="percentage">
            <text:p>5,91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446" calcext:value-type="percentage">
            <text:p>4,46%</text:p>
          </table:table-cell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71" calcext:value-type="percentage">
            <text:p>25,71%</text:p>
          </table:table-cell>
          <table:table-cell table:style-name="ce21" office:value-type="percentage" office:value="0.2571" calcext:value-type="percentage">
            <text:p>25,71%</text:p>
          </table:table-cell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office:value-type="percentage" office:value="0.0505" calcext:value-type="percentage">
            <text:p>5,05%</text:p>
          </table:table-cell>
          <table:table-cell table:style-name="ce21" office:value-type="percentage" office:value="0.0505" calcext:value-type="percentage">
            <text:p>5,05%</text:p>
          </table:table-cell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889" calcext:value-type="percentage">
            <text:p>28,89%</text:p>
          </table:table-cell>
          <table:table-cell table:style-name="ce21" office:value-type="percentage" office:value="0.2889" calcext:value-type="percentage">
            <text:p>28,89%</text:p>
          </table:table-cell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521" calcext:value-type="percentage">
            <text:p>35,21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515" calcext:value-type="percentage">
            <text:p>35,15%</text:p>
          </table:table-cell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3195" calcext:value-type="percentage">
            <text:p>31,95%</text:p>
          </table:table-cell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" calcext:value-type="percentage">
            <text:p>24,00%</text:p>
          </table:table-cell>
          <table:table-cell table:style-name="ce21" office:value-type="percentage" office:value="0.24" calcext:value-type="percentage">
            <text:p>24,00%</text:p>
          </table:table-cell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241" calcext:value-type="percentage">
            <text:p>12,41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11" calcext:value-type="percentage">
            <text:p>10,11%</text:p>
          </table:table-cell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103" calcext:value-type="percentage">
            <text:p>41,03%</text:p>
          </table:table-cell>
          <table:table-cell table:style-name="ce21" office:value-type="percentage" office:value="0.4103" calcext:value-type="percentage">
            <text:p>41,03%</text:p>
          </table:table-cell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11" calcext:value-type="percentage">
            <text:p>25,11%</text:p>
          </table:table-cell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218" calcext:value-type="percentage">
            <text:p>22,18%</text:p>
          </table:table-cell>
          <table:table-cell office:value-type="percentage" office:value="0.171" calcext:value-type="percentage">
            <text:p>17,10%</text:p>
          </table:table-cell>
          <table:table-cell office:value-type="percentage" office:value="0.1243" calcext:value-type="percentage">
            <text:p>12,43%</text:p>
          </table:table-cell>
          <table:table-cell table:style-name="ce21" office:value-type="percentage" office:value="0.1243" calcext:value-type="percentage">
            <text:p>12,43%</text:p>
          </table:table-cell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523" calcext:value-type="percentage">
            <text:p>25,23%</text:p>
          </table:table-cell>
          <table:table-cell table:style-name="ce21" office:value-type="percentage" office:value="0.2523" calcext:value-type="percentage">
            <text:p>25,23%</text:p>
          </table:table-cell>
        </table:table-row>
        <table:table-row table:style-name="ro4">
          <table:table-cell office:value-type="string" calcext:value-type="string">
            <text:p>Wdbc</text:p>
          </table:table-cell>
          <table:table-cell table:number-columns-repeated="2" office:value-type="percentage" office:value="0.0454" calcext:value-type="percentage">
            <text:p>4,54%</text:p>
          </table:table-cell>
          <table:table-cell office:value-type="percentage" office:value="0.0419" calcext:value-type="percentage">
            <text:p>4,19%</text:p>
          </table:table-cell>
          <table:table-cell table:style-name="ce21" office:value-type="percentage" office:value="0.0419" calcext:value-type="percentage">
            <text:p>4,19%</text:p>
          </table:table-cell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1059" calcext:value-type="percentage">
            <text:p>10,59%</text:p>
          </table:table-cell>
          <table:table-cell table:style-name="ce21" office:value-type="percentage" office:value="0.1059" calcext:value-type="percentage">
            <text:p>10,59%</text:p>
          </table:table-cell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468" calcext:value-type="percentage">
            <text:p>4,68%</text:p>
          </table:table-cell>
          <table:table-cell table:style-name="ce21" office:value-type="percentage" office:value="0.0468" calcext:value-type="percentage">
            <text:p>4,68%</text:p>
          </table:table-cell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547" calcext:value-type="percentage">
            <text:p>5,47%</text:p>
          </table:table-cell>
          <table:table-cell table:style-name="ce21" office:value-type="percentage" office:value="0.0547" calcext:value-type="percentage">
            <text:p>5,47%</text:p>
          </table:table-cell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82" calcext:value-type="percentage">
            <text:p>1,82%</text:p>
          </table:table-cell>
          <table:table-cell table:style-name="ce21" office:value-type="percentage" office:value="0.0182" calcext:value-type="percentage">
            <text:p>1,82%</text:p>
          </table:table-cell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5">
          <table:table-cell table:style-name="ce14"/>
          <table:table-cell table:style-name="ce17" table:formula="of:=AVERAGE([.B3:.B44])" office:value-type="percentage" office:value="0.233666666666667" calcext:value-type="percentage">
            <text:p>23,37%</text:p>
          </table:table-cell>
          <table:table-cell table:style-name="ce17" table:formula="of:=AVERAGE([.C3:.C44])" office:value-type="percentage" office:value="0.22607380952381" calcext:value-type="percentage">
            <text:p>22,61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5104761904762" calcext:value-type="percentage">
            <text:p>21,51%</text:p>
          </table:table-cell>
        </table:table-row>
        <table:table-row table:style-name="ro1">
          <table:table-cell table:style-name="ce12" table:number-columns-repeated="5"/>
        </table:table-row>
        <table:table-row table:style-name="ro3">
          <table:table-cell table:style-name="ce36" table:number-columns-repeated="2"/>
          <table:table-cell table:style-name="ce42" table:number-columns-repeated="3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NC=100</text:p>
          </table:table-cell>
          <table:table-cell table:style-name="ce12" office:value-type="string" calcext:value-type="string">
            <text:p>NC=200</text:p>
          </table:table-cell>
          <table:table-cell table:style-name="ce12" office:value-type="string" calcext:value-type="string">
            <text:p>NC=500</text:p>
          </table:table-cell>
          <table:table-cell table:style-name="ce12" office:value-type="string" calcext:value-type="string">
            <text:p>NC=1000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3018.4734/417" office:value-type="float" office:value="7.23854532374101" calcext:value-type="float">
            <text:p>7,23854532374101</text:p>
          </table:table-cell>
          <table:table-cell table:style-name="ce13" table:formula="of:=2877.6704/417" office:value-type="float" office:value="6.90088824940048" calcext:value-type="float">
            <text:p>6,90088824940048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9" table:formula="of:=2658.12756/417" office:value-type="float" office:value="6.37440661870504" calcext:value-type="float">
            <text:p>6,37440661870504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94/150" office:value-type="float" office:value="0.00396" calcext:value-type="float">
            <text:p>0,00396</text:p>
          </table:table-cell>
          <table:table-cell table:style-name="ce13" table:formula="of:=0.58927/150" office:value-type="float" office:value="0.00392846666666667" calcext:value-type="float">
            <text:p>0,00392846666666667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3" table:formula="of:=0.58936/150" office:value-type="float" office:value="0.00392906666666667" calcext:value-type="float">
            <text:p>0,00392906666666667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78.327/39" office:value-type="float" office:value="9.70069230769231" calcext:value-type="float">
            <text:p>9,70069230769231</text:p>
          </table:table-cell>
          <table:table-cell table:style-name="ce13" table:formula="of:=373.42/39" office:value-type="float" office:value="9.5748717948718" calcext:value-type="float">
            <text:p>9,5748717948718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9" table:formula="of:=390.7357/39" office:value-type="float" office:value="10.0188641025641" calcext:value-type="float">
            <text:p>10,0188641025641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17612/9" office:value-type="float" office:value="0.0195688888888889" calcext:value-type="float">
            <text:p>0,0195688888888889</text:p>
          </table:table-cell>
          <table:table-cell table:style-name="ce13" table:formula="of:=0.17956/9" office:value-type="float" office:value="0.0199511111111111" calcext:value-type="float">
            <text:p>0,0199511111111111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9" table:formula="of:=0.18796/9" office:value-type="float" office:value="0.0208844444444444" calcext:value-type="float">
            <text:p>0,0208844444444444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027349/4" office:value-type="float" office:value="0.000683725" calcext:value-type="float">
            <text:p>0,000683725</text:p>
          </table:table-cell>
          <table:table-cell table:style-name="ce13" table:formula="of:=0.00241/4" office:value-type="float" office:value="0.0006025" calcext:value-type="float">
            <text:p>0,000602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9" table:formula="of:=0.001966/4" office:value-type="float" office:value="0.0004915" calcext:value-type="float">
            <text:p>0,0004915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1852.912/33" office:value-type="float" office:value="56.1488484848485" calcext:value-type="float">
            <text:p>56,1488484848485</text:p>
          </table:table-cell>
          <table:table-cell table:style-name="ce13" table:formula="of:=1771.6952/33" office:value-type="float" office:value="53.6877333333333" calcext:value-type="float">
            <text:p>53,6877333333333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9" table:formula="of:=1755.743/33" office:value-type="float" office:value="53.2043333333333" calcext:value-type="float">
            <text:p>53,20433333333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1.07305/103" office:value-type="float" office:value="0.0104179611650485" calcext:value-type="float">
            <text:p>0,0104179611650485</text:p>
          </table:table-cell>
          <table:table-cell table:style-name="ce13" table:formula="of:=0.87988/103" office:value-type="float" office:value="0.00854252427184466" calcext:value-type="float">
            <text:p>0,00854252427184466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3" table:formula="of:=0.7557/103" office:value-type="float" office:value="0.0073368932038835" calcext:value-type="float">
            <text:p>0,0073368932038835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8.275/36" office:value-type="float" office:value="0.229861111111111" calcext:value-type="float">
            <text:p>0,229861111111111</text:p>
          </table:table-cell>
          <table:table-cell table:style-name="ce13" table:formula="of:=5.771/36" office:value-type="float" office:value="0.160305555555556" calcext:value-type="float">
            <text:p>0,160305555555556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9" table:formula="of:=5.6117/36" office:value-type="float" office:value="0.155880555555556" calcext:value-type="float">
            <text:p>0,15588055555555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6328/25" office:value-type="float" office:value="0.025312" calcext:value-type="float">
            <text:p>0,025312</text:p>
          </table:table-cell>
          <table:table-cell table:style-name="ce13" table:formula="of:=0.55987/25" office:value-type="float" office:value="0.0223948" calcext:value-type="float">
            <text:p>0,022394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9" table:formula="of:=0.48198/25" office:value-type="float" office:value="0.0192792" calcext:value-type="float">
            <text:p>0,0192792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91/12" office:value-type="float" office:value="0.04925" calcext:value-type="float">
            <text:p>0,04925</text:p>
          </table:table-cell>
          <table:table-cell table:style-name="ce13" table:formula="of:=0.59298/12" office:value-type="float" office:value="0.049415" calcext:value-type="float">
            <text:p>0,049415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9" table:formula="of:=0.61067/12" office:value-type="float" office:value="0.0508891666666667" calcext:value-type="float">
            <text:p>0,0508891666666667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5033/50" office:value-type="float" office:value="0.0070066" calcext:value-type="float">
            <text:p>0,0070066</text:p>
          </table:table-cell>
          <table:table-cell table:style-name="ce13" table:formula="of:=0.3617/50" office:value-type="float" office:value="0.007234" calcext:value-type="float">
            <text:p>0,007234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9" table:formula="of:=0.34259/50" office:value-type="float" office:value="0.0068518" calcext:value-type="float">
            <text:p>0,0068518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524.8582/50" office:value-type="float" office:value="10.497164" calcext:value-type="float">
            <text:p>10,497164</text:p>
          </table:table-cell>
          <table:table-cell table:style-name="ce13" table:formula="of:=545.9489/50" office:value-type="float" office:value="10.918978" calcext:value-type="float">
            <text:p>10,918978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9" table:formula="of:=518.1206/50" office:value-type="float" office:value="10.362412" calcext:value-type="float">
            <text:p>10,362412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5.7251/99" office:value-type="float" office:value="0.0578292929292929" calcext:value-type="float">
            <text:p>0,0578292929292929</text:p>
          </table:table-cell>
          <table:table-cell table:style-name="ce13" table:formula="of:=2.49669/99" office:value-type="float" office:value="0.0252190909090909" calcext:value-type="float">
            <text:p>0,0252190909090909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9" table:formula="of:=1.96189/99" office:value-type="float" office:value="0.0198170707070707" calcext:value-type="float">
            <text:p>0,0198170707070707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362/18" office:value-type="float" office:value="0.0201111111111111" calcext:value-type="float">
            <text:p>0,0201111111111111</text:p>
          </table:table-cell>
          <table:table-cell table:style-name="ce13" table:formula="of:=0.32224/18" office:value-type="float" office:value="0.0179022222222222" calcext:value-type="float">
            <text:p>0,0179022222222222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9" table:formula="of:=0.28052/18" office:value-type="float" office:value="0.0155844444444444" calcext:value-type="float">
            <text:p>0,0155844444444444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36068/6" office:value-type="float" office:value="0.0601133333333333" calcext:value-type="float">
            <text:p>0,0601133333333333</text:p>
          </table:table-cell>
          <table:table-cell table:style-name="ce13" table:formula="of:=0.38/6" office:value-type="float" office:value="0.0633333333333333" calcext:value-type="float">
            <text:p>0,0633333333333333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9" table:formula="of:=0.39467/6" office:value-type="float" office:value="0.0657783333333333" calcext:value-type="float">
            <text:p>0,0657783333333333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4161/104" office:value-type="float" office:value="0.0136163461538462" calcext:value-type="float">
            <text:p>0,0136163461538462</text:p>
          </table:table-cell>
          <table:table-cell table:style-name="ce13" table:formula="of:=0.9077/104" office:value-type="float" office:value="0.00872788461538462" calcext:value-type="float">
            <text:p>0,00872788461538462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9" table:formula="of:=0.9946/104" office:value-type="float" office:value="0.00956346153846154" calcext:value-type="float">
            <text:p>0,00956346153846154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56/13" office:value-type="float" office:value="0.00627384615384615" calcext:value-type="float">
            <text:p>0,00627384615384615</text:p>
          </table:table-cell>
          <table:table-cell table:style-name="ce13" table:formula="of:=0.08203/13" office:value-type="float" office:value="0.00631" calcext:value-type="float">
            <text:p>0,00631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9" table:formula="of:=0.08165/13" office:value-type="float" office:value="0.00628076923076923" calcext:value-type="float">
            <text:p>0,0062807692307692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842.564/165" office:value-type="float" office:value="5.10644848484848" calcext:value-type="float">
            <text:p>5,10644848484848</text:p>
          </table:table-cell>
          <table:table-cell table:style-name="ce13" table:formula="of:=556.30139/165" office:value-type="float" office:value="3.37152357575758" calcext:value-type="float">
            <text:p>3,37152357575758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9" table:formula="of:=380.2022/165" office:value-type="float" office:value="2.30425575757576" calcext:value-type="float">
            <text:p>2,30425575757576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10684/7" office:value-type="float" office:value="0.0152628571428571" calcext:value-type="float">
            <text:p>0,0152628571428571</text:p>
          </table:table-cell>
          <table:table-cell table:style-name="ce13" table:formula="of:=0.114/7" office:value-type="float" office:value="0.0162857142857143" calcext:value-type="float">
            <text:p>0,0162857142857143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9" table:formula="of:=0.10366/7" office:value-type="float" office:value="0.0148085714285714" calcext:value-type="float">
            <text:p>0,0148085714285714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7.46/165" office:value-type="float" office:value="0.0452121212121212" calcext:value-type="float">
            <text:p>0,0452121212121212</text:p>
          </table:table-cell>
          <table:table-cell table:style-name="ce13" table:formula="of:=5.3397/165" office:value-type="float" office:value="0.0323618181818182" calcext:value-type="float">
            <text:p>0,0323618181818182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9" table:formula="of:=3.8798/165" office:value-type="float" office:value="0.0235139393939394" calcext:value-type="float">
            <text:p>0,0235139393939394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16/217" office:value-type="float" office:value="0.0359520737327189" calcext:value-type="float">
            <text:p>0,0359520737327189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9" table:formula="of:=7.8046/217" office:value-type="float" office:value="0.0359658986175115" calcext:value-type="float">
            <text:p>0,0359658986175115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3185/57" office:value-type="float" office:value="0.0231315789473684" calcext:value-type="float">
            <text:p>0,0231315789473684</text:p>
          </table:table-cell>
          <table:table-cell table:style-name="ce13" table:formula="of:=1.2992/57" office:value-type="float" office:value="0.0227929824561404" calcext:value-type="float">
            <text:p>0,0227929824561404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9" table:formula="of:=1.3531/57" office:value-type="float" office:value="0.0237385964912281" calcext:value-type="float">
            <text:p>0,0237385964912281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124.4137/95" office:value-type="float" office:value="1.30961789473684" calcext:value-type="float">
            <text:p>1,30961789473684</text:p>
          </table:table-cell>
          <table:table-cell table:style-name="ce13" table:formula="of:=116.2363/95" office:value-type="float" office:value="1.22354" calcext:value-type="float">
            <text:p>1,22354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9" table:formula="of:=114.7143/95" office:value-type="float" office:value="1.20751894736842" calcext:value-type="float">
            <text:p>1,20751894736842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9586/104" office:value-type="float" office:value="0.0476788461538462" calcext:value-type="float">
            <text:p>0,0476788461538462</text:p>
          </table:table-cell>
          <table:table-cell table:style-name="ce13" table:formula="of:=4.9835/104" office:value-type="float" office:value="0.0479182692307692" calcext:value-type="float">
            <text:p>0,0479182692307692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9" table:formula="of:=4.8966/104" office:value-type="float" office:value="0.0470826923076923" calcext:value-type="float">
            <text:p>0,0470826923076923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51074/13" office:value-type="float" office:value="0.0392876923076923" calcext:value-type="float">
            <text:p>0,0392876923076923</text:p>
          </table:table-cell>
          <table:table-cell table:style-name="ce13" table:formula="of:=0.54037/13" office:value-type="float" office:value="0.0415669230769231" calcext:value-type="float">
            <text:p>0,0415669230769231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9" table:formula="of:=0.51653/13" office:value-type="float" office:value="0.0397330769230769" calcext:value-type="float">
            <text:p>0,0397330769230769</text:p>
          </table:table-cell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5">
          <table:table-cell table:style-name="ce14"/>
          <table:table-cell table:style-name="ce14" table:formula="of:=AVERAGE([.B50:.B74])" office:value-type="float" office:value="3.6284743882438" calcext:value-type="float">
            <text:p>3,6284743882438</text:p>
          </table:table-cell>
          <table:table-cell table:style-name="ce14" table:formula="of:=AVERAGE([.C50:.C74])" office:value-type="float" office:value="3.4507311689205" calcext:value-type="float">
            <text:p>3,4507311689205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36156800962" calcext:value-type="float">
            <text:p>3,36156800962</text:p>
          </table:table-cell>
        </table:table-row>
        <table:table-row table:style-name="ro1">
          <table:table-cell table:style-name="ce12" table:number-columns-repeated="2"/>
          <table:table-cell table:style-name="ce18" table:number-columns-repeated="3"/>
        </table:table-row>
        <table:table-row table:style-name="ro4" table:number-rows-repeated="2">
          <table:table-cell/>
          <table:table-cell table:style-name="Default" table:number-columns-repeated="4"/>
        </table:table-row>
        <table:table-row table:style-name="ro4">
          <table:table-cell office:value-type="string" calcext:value-type="string">
            <text:p>F=4</text:p>
          </table:table-cell>
          <table:table-cell table:style-name="Default" table:number-columns-repeated="4"/>
        </table:table-row>
      </table:table>
      <table:table table:name="Φύλλο6" table:style-name="ta1">
        <table:table-column table:style-name="co9" table:number-columns-repeated="16379" table:default-cell-style-name="Default"/>
        <table:table-row table:style-name="ro4">
          <table:table-cell office:value-type="string" calcext:value-type="string">
            <text:p>nt</text:p>
          </table:table-cell>
          <table:table-cell office:value-type="string" calcext:value-type="string">
            <text:p>ve</text:p>
          </table:table-cell>
          <table:table-cell table:number-columns-repeated="16377"/>
        </table:table-row>
        <table:table-row table:style-name="ro4">
          <table:table-cell office:value-type="float" office:value="0.1197" calcext:value-type="float">
            <text:p>0,1197</text:p>
          </table:table-cell>
          <table:table-cell office:value-type="float" office:value="0.0727" calcext:value-type="float">
            <text:p>0,0727</text:p>
          </table:table-cell>
          <table:table-cell table:number-columns-repeated="16377"/>
        </table:table-row>
        <table:table-row table:style-name="ro4">
          <table:table-cell office:value-type="float" office:value="0.0871" calcext:value-type="float">
            <text:p>0,0871</text:p>
          </table:table-cell>
          <table:table-cell office:value-type="float" office:value="0.0648" calcext:value-type="float">
            <text:p>0,0648</text:p>
          </table:table-cell>
          <table:table-cell table:number-columns-repeated="16377"/>
        </table:table-row>
        <table:table-row table:style-name="ro4">
          <table:table-cell office:value-type="float" office:value="0.151" calcext:value-type="float">
            <text:p>0,151</text:p>
          </table:table-cell>
          <table:table-cell office:value-type="float" office:value="0.289" calcext:value-type="float">
            <text:p>0,289</text:p>
          </table:table-cell>
          <table:table-cell table:number-columns-repeated="16377"/>
        </table:table-row>
        <table:table-row table:style-name="ro4">
          <table:table-cell office:value-type="float" office:value="0.113" calcext:value-type="float">
            <text:p>0,113</text:p>
          </table:table-cell>
          <table:table-cell office:value-type="float" office:value="0.176" calcext:value-type="float">
            <text:p>0,176</text:p>
          </table:table-cell>
          <table:table-cell table:number-columns-repeated="16377"/>
        </table:table-row>
        <table:table-row table:style-name="ro4">
          <table:table-cell office:value-type="float" office:value="0.142" calcext:value-type="float">
            <text:p>0,142</text:p>
          </table:table-cell>
          <table:table-cell office:value-type="float" office:value="0.141" calcext:value-type="float">
            <text:p>0,141</text:p>
          </table:table-cell>
          <table:table-cell table:number-columns-repeated="16377"/>
        </table:table-row>
        <table:table-row table:style-name="ro4">
          <table:table-cell office:value-type="float" office:value="0.115" calcext:value-type="float">
            <text:p>0,115</text:p>
          </table:table-cell>
          <table:table-cell office:value-type="float" office:value="0.202" calcext:value-type="float">
            <text:p>0,202</text:p>
          </table:table-cell>
          <table:table-cell table:number-columns-repeated="16377"/>
        </table:table-row>
        <table:table-row table:style-name="ro4">
          <table:table-cell office:value-type="float" office:value="0.0923" calcext:value-type="float">
            <text:p>0,0923</text:p>
          </table:table-cell>
          <table:table-cell office:value-type="float" office:value="0.1497" calcext:value-type="float">
            <text:p>0,1497</text:p>
          </table:table-cell>
          <table:table-cell table:number-columns-repeated="16377"/>
        </table:table-row>
        <table:table-row table:style-name="ro4">
          <table:table-cell office:value-type="float" office:value="0.084" calcext:value-type="float">
            <text:p>0,084</text:p>
          </table:table-cell>
          <table:table-cell office:value-type="float" office:value="0.865" calcext:value-type="float">
            <text:p>0,865</text:p>
          </table:table-cell>
          <table:table-cell table:number-columns-repeated="16377"/>
        </table:table-row>
        <table:table-row table:style-name="ro4">
          <table:table-cell office:value-type="float" office:value="0.156" calcext:value-type="float">
            <text:p>0,156</text:p>
          </table:table-cell>
          <table:table-cell office:value-type="float" office:value="0.9" calcext:value-type="float">
            <text:p>0,9</text:p>
          </table:table-cell>
          <table:table-cell table:number-columns-repeated="16377"/>
        </table:table-row>
        <table:table-row table:style-name="ro4">
          <table:table-cell office:value-type="float" office:value="0.263" calcext:value-type="float">
            <text:p>0,263</text:p>
          </table:table-cell>
          <table:table-cell office:value-type="float" office:value="0.1278" calcext:value-type="float">
            <text:p>0,1278</text:p>
          </table:table-cell>
          <table:table-cell table:number-columns-repeated="16377"/>
        </table:table-row>
        <table:table-row table:style-name="ro1">
          <table:table-cell table:style-name="ce12" table:formula="of:=AVERAGE([.A2:.A11])" office:value-type="float" office:value="0.13231" calcext:value-type="float">
            <text:p>0,13231</text:p>
          </table:table-cell>
          <table:table-cell table:style-name="ce12" table:formula="of:=AVERAGE([.B2:.B11])" office:value-type="float" office:value="0.2988" calcext:value-type="float">
            <text:p>0,2988</text:p>
          </table:table-cell>
          <table:table-cell table:style-name="ce12" table:number-columns-repeated="16377"/>
        </table:table-row>
        <table:table-row table:style-name="ro4">
          <table:table-cell table:formula="of:=[.A12]/13" office:value-type="float" office:value="0.0101776923076923" calcext:value-type="float">
            <text:p>0,0101776923076923</text:p>
          </table:table-cell>
          <table:table-cell table:formula="of:=[.B12]/13" office:value-type="float" office:value="0.0229846153846154" calcext:value-type="float">
            <text:p>0,0229846153846154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/00/0000</text:date>, <text:time style:data-style-name="N2" text:time-value="17:56:36.85392018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21T22:16:38.886936591</dc:date>
    <meta:editing-duration>P3DT11H3M5S</meta:editing-duration>
    <meta:editing-cycles>1516</meta:editing-cycles>
    <meta:generator>LibreOffice/25.8.7.3$Linux_AARCH64 LibreOffice_project/580$Build-3</meta:generator>
    <meta:document-statistic meta:table-count="6" meta:cell-count="6013" meta:object-count="0"/>
  </office:meta>
</office:document-meta>
</file>