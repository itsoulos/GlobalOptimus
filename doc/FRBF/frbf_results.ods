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149" calcext:value-type="percentage">
            <text:p>1,4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135" calcext:value-type="percentage">
            <text:p>1,35%</text:p>
          </table:table-cell>
          <table:table-cell table:style-name="ce3" office:value-type="percentage" office:value="0.0649" calcext:value-type="percentage">
            <text:p>6,49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064" calcext:value-type="percentage">
            <text:p>10,64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0426" calcext:value-type="percentage">
            <text:p>20,43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54" calcext:value-type="percentage">
            <text:p>5,05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296" calcext:value-type="percentage">
            <text:p>22,96%</text:p>
          </table:table-cell>
          <table:table-cell table:style-name="ce3" office:value-type="percentage" office:value="0.1963" calcext:value-type="percentage">
            <text:p>19,6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852" calcext:value-type="percentage">
            <text:p>18,52%</text:p>
          </table:table-cell>
          <table:table-cell table:style-name="ce3" office:value-type="percentage" office:value="0.1704" calcext:value-type="percentage">
            <text:p>17,04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number-columns-repeated="2"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926" calcext:value-type="percentage">
            <text:p>29,26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 office:value-type="percentage" office:value="0.263" calcext:value-type="percentage">
            <text:p>26,30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7" calcext:value-type="percentage">
            <text:p>33,70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148" calcext:value-type="percentage">
            <text:p>21,48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number-columns-repeated="2" table:style-name="ce3" office:value-type="percentage" office:value="0.2593" calcext:value-type="percentage">
            <text:p>25,93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5593" calcext:value-type="percentage">
            <text:p>15,59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889" calcext:value-type="percentage">
            <text:p>23,89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4357" calcext:value-type="percentage">
            <text:p>43,57%</text:p>
          </table:table-cell>
          <table:table-cell table:style-name="ce3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/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/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/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/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1786" calcext:value-type="percentage">
            <text:p>17,86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/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/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5245" calcext:value-type="percentage">
            <text:p>55,25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4572" calcext:value-type="percentage">
            <text:p>24,57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22" calcext:value-type="percentage">
            <text:p>10,22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table:number-columns-repeated="2"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1065" calcext:value-type="percentage">
            <text:p>10,65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2"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59" calcext:value-type="percentage">
            <text:p>8,59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2"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69" calcext:value-type="percentage">
            <text:p>9,47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54" calcext:value-type="percentage">
            <text:p>10,54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101" calcext:value-type="percentage">
            <text:p>11,01%</text:p>
          </table:table-cell>
          <table:table-cell table:style-name="ce3" office:value-type="percentage" office:value="0.1217" calcext:value-type="percentage">
            <text:p>12,1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928" calcext:value-type="percentage">
            <text:p>19,28%</text:p>
          </table:table-cell>
          <table:table-cell table:style-name="ce3" office:value-type="percentage" office:value="0.2072" calcext:value-type="percentage">
            <text:p>20,72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1942" calcext:value-type="percentage">
            <text:p>19,42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246" calcext:value-type="percentage">
            <text:p>12,46%</text:p>
          </table:table-cell>
          <table:table-cell table:style-name="ce3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928" calcext:value-type="percentage">
            <text:p>29,28%</text:p>
          </table:table-cell>
          <table:table-cell table:style-name="ce3" office:value-type="percentage" office:value="0.2884" calcext:value-type="percentage">
            <text:p>28,84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62" calcext:value-type="percentage">
            <text:p>13,6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78" calcext:value-type="percentage">
            <text:p>17,8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18899" calcext:value-type="percentage">
            <text:p>18,90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3" calcext:value-type="percentage">
            <text:p>5,3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6277" calcext:value-type="percentage">
            <text:p>36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05042" calcext:value-type="percentage">
            <text:p>5,04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43" calcext:value-type="percentage">
            <text:p>37,43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2"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29" calcext:value-type="percentage">
            <text:p>42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4571" calcext:value-type="percentage">
            <text:p>45,71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86" calcext:value-type="percentage">
            <text:p>35,86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43" calcext:value-type="percentage">
            <text:p>35,43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2"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50138" calcext:value-type="percentage">
            <text:p>50,14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398" calcext:value-type="percentage">
            <text:p>39,80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18" calcext:value-type="percentage">
            <text:p>58,18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table:number-columns-repeated="2"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8362" calcext:value-type="percentage">
            <text:p>58,36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14" calcext:value-type="percentage">
            <text:p>21,4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table:number-columns-repeated="2"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175" calcext:value-type="percentage">
            <text:p>17,50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56761" calcext:value-type="percentage">
            <text:p>56,76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367" calcext:value-type="percentage">
            <text:p>27,3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0077" calcext:value-type="percentage">
            <text:p>40,08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999" calcext:value-type="percentage">
            <text:p>22,00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9133" calcext:value-type="percentage">
            <text:p>19,13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table:number-columns-repeated="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4533" calcext:value-type="percentage">
            <text:p>54,53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06" calcext:value-type="percentage">
            <text:p>10,6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43" calcext:value-type="percentage">
            <text:p>15,43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61" calcext:value-type="percentage">
            <text:p>4,61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2829" calcext:value-type="percentage">
            <text:p>12,83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217" calcext:value-type="percentage">
            <text:p>22,17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554" calcext:value-type="percentage">
            <text:p>15,54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928" calcext:value-type="percentage">
            <text:p>19,28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49" calcext:value-type="percentage">
            <text:p>13,4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30412" calcext:value-type="percentage">
            <text:p>30,41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7723" calcext:value-type="percentage">
            <text:p>17,72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26" calcext:value-type="percentage">
            <text:p>15,2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table:number-columns-repeated="2"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5" calcext:value-type="percentage">
            <text:p>27,50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1" calcext:value-type="percentage">
            <text:p>24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5525" calcext:value-type="percentage">
            <text:p>15,53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93" calcext:value-type="percentage">
            <text:p>23,59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612" calcext:value-type="percentage">
            <text:p>5,6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8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09" calcext:value-type="percentage">
            <text:p>21,0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63" calcext:value-type="percentage">
            <text:p>34,63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3203" calcext:value-type="percentage">
            <text:p>32,03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2857" calcext:value-type="percentage">
            <text:p>28,57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2"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892" calcext:value-type="percentage">
            <text:p>28,89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2467" calcext:value-type="percentage">
            <text:p>32,4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2" table:style-name="ce9" office:value-type="percentage" office:value="0.38" calcext:value-type="percentage">
            <text:p>38,0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1" calcext:value-type="percentage">
            <text:p>39,10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55" calcext:value-type="percentage">
            <text:p>40,55%</text:p>
          </table:table-cell>
          <table:table-cell table:style-name="ce9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405" calcext:value-type="percentage">
            <text:p>44,05%</text:p>
          </table:table-cell>
          <table:table-cell table:style-name="ce9" office:value-type="percentage" office:value="0.4445" calcext:value-type="percentage">
            <text:p>44,4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305" calcext:value-type="percentage">
            <text:p>43,05%</text:p>
          </table:table-cell>
          <table:table-cell table:style-name="ce9" office:value-type="percentage" office:value="0.451" calcext:value-type="percentage">
            <text:p>45,1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2" table:style-name="ce9" office:value-type="percentage" office:value="0.41" calcext:value-type="percentage">
            <text:p>41,00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2"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399" calcext:value-type="percentage">
            <text:p>39,90%</text:p>
          </table:table-cell>
          <table:table-cell table:style-name="ce9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15" calcext:value-type="percentage">
            <text:p>39,15%</text:p>
          </table:table-cell>
          <table:table-cell table:style-name="ce9" office:value-type="percentage" office:value="0.3875" calcext:value-type="percentage">
            <text:p>38,7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2" calcext:value-type="percentage">
            <text:p>42,2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325" calcext:value-type="percentage">
            <text:p>43,25%</text:p>
          </table:table-cell>
          <table:table-cell table:style-name="ce9" office:value-type="percentage" office:value="0.435" calcext:value-type="percentage">
            <text:p>43,5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4" calcext:value-type="percentage">
            <text:p>24,00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1025" calcext:value-type="percentage">
            <text:p>41,03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227" calcext:value-type="percentage">
            <text:p>22,7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459" calcext:value-type="percentage">
            <text:p>24,59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76" calcext:value-type="percentage">
            <text:p>26,76%</text:p>
          </table:table-cell>
          <table:table-cell table:style-name="ce9"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905" calcext:value-type="percentage">
            <text:p>29,05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22" calcext:value-type="percentage">
            <text:p>21,22%</text:p>
          </table:table-cell>
          <table:table-cell table:style-name="ce9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2425" calcext:value-type="percentage">
            <text:p>12,43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23" calcext:value-type="percentage">
            <text:p>25,23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table:number-columns-repeated="2"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5" calcext:value-type="percentage">
            <text:p>2,35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table:number-columns-repeated="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353" calcext:value-type="percentage">
            <text:p>3,53%</text:p>
          </table:table-cell>
          <table:table-cell/>
        </table:table-row>
        <table:table-row table:style-name="ro2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194" calcext:value-type="percentage">
            <text:p>4,19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0588" calcext:value-type="percentage">
            <text:p>10,59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734" calcext:value-type="percentage">
            <text:p>73,4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86" calcext:value-type="percentage">
            <text:p>68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2" calcext:value-type="percentage">
            <text:p>63,20%</text:p>
          </table:table-cell>
          <table:table-cell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44" calcext:value-type="percentage">
            <text:p>64,4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66" calcext:value-type="percentage">
            <text:p>66,00%</text:p>
          </table:table-cell>
          <table:table-cell/>
        </table:table-row>
        <table:table-row table:style-name="ro2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84" calcext:value-type="percentage">
            <text:p>68,4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4677" calcext:value-type="percentage">
            <text:p>4,68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6368" calcext:value-type="percentage">
            <text:p>63,68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547" calcext:value-type="percentage">
            <text:p>5,47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182" calcext:value-type="percentage">
            <text:p>1,82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297" calcext:value-type="percentage">
            <text:p>32,97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297" calcext:value-type="float">
            <text:p>4,30E-01</text:p>
          </table:table-cell>
          <table:table-cell table:style-name="ce10" office:value-type="float" office:value="0.406" calcext:value-type="float">
            <text:p>4,0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67" calcext:value-type="float">
            <text:p>8,67E-01</text:p>
          </table:table-cell>
          <table:table-cell table:style-name="ce10" office:value-type="float" office:value="0.886" calcext:value-type="float">
            <text:p>8,86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1" calcext:value-type="float">
            <text:p>1,11E-01</text:p>
          </table:table-cell>
          <table:table-cell table:style-name="ce10" office:value-type="float" office:value="0.128" calcext:value-type="float">
            <text:p>1,28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292:.B301])" office:value-type="float" office:value="0.48198" calcext:value-type="float">
            <text:p>0,48198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9467" calcext:value-type="float">
            <text:p>0,394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99" calcext:value-type="float">
            <text:p>4,60E-01</text:p>
          </table:table-cell>
          <table:table-cell table:style-name="ce10" office:value-type="float" office:value="0.4492" calcext:value-type="float">
            <text:p>4,49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516" calcext:value-type="float">
            <text:p>5,16E-02</text:p>
          </table:table-cell>
          <table:table-cell table:style-name="ce10" office:value-type="float" office:value="0.0673" calcext:value-type="float">
            <text:p>6,7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04:.B313])" office:value-type="float" office:value="0.08165" calcext:value-type="float">
            <text:p>0,08165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366" calcext:value-type="float">
            <text:p>0,10366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69.082" calcext:value-type="float">
            <text:p>2269,082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871.417" calcext:value-type="float">
            <text:p>2871,417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001.615" calcext:value-type="float">
            <text:p>3001,615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26.465" calcext:value-type="float">
            <text:p>2526,465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54.664" calcext:value-type="float">
            <text:p>2754,664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460.266" calcext:value-type="float">
            <text:p>2460,266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88.059" calcext:value-type="float">
            <text:p>2488,05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43.5696" calcext:value-type="float">
            <text:p>3143,5696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506.643" calcext:value-type="float">
            <text:p>2506,643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59.495" calcext:value-type="float">
            <text:p>2559,495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  <table:table-cell table:style-name="ce6"/>
        </table:table-row>
        <table:table-row table:style-name="ro3">
          <table:table-cell table:style-name="ce4"/>
          <table:table-cell table:style-name="ce7" table:formula="of:=AVERAGE([.B317:.B326])" office:value-type="float" office:value="2658.12756" calcext:value-type="float">
            <text:p>2658,12756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  <table:table-cell table:style-name="ce7"/>
        </table:table-row>
        <table:table-row table:style-name="ro3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59.319" calcext:value-type="float">
            <text:p>1959,319</text:p>
          </table:table-cell>
          <table:table-cell table:style-name="ce6" office:value-type="float" office:value="1522.981" calcext:value-type="float">
            <text:p>1522,981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163.913" calcext:value-type="float">
            <text:p>1163,913</text:p>
          </table:table-cell>
          <table:table-cell table:style-name="ce6" office:value-type="float" office:value="888.315" calcext:value-type="float">
            <text:p>888,315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06.645" calcext:value-type="float">
            <text:p>2106,645</text:p>
          </table:table-cell>
          <table:table-cell table:style-name="ce6" office:value-type="float" office:value="1907.829" calcext:value-type="float">
            <text:p>1907,829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372.074" calcext:value-type="float">
            <text:p>2372,074</text:p>
          </table:table-cell>
          <table:table-cell table:style-name="ce6" office:value-type="float" office:value="2554.626" calcext:value-type="float">
            <text:p>2554,626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47.448" calcext:value-type="float">
            <text:p>1347,448</text:p>
          </table:table-cell>
          <table:table-cell table:style-name="ce6" office:value-type="float" office:value="1188.789" calcext:value-type="float">
            <text:p>1188,789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50.447" calcext:value-type="float">
            <text:p>750,447</text:p>
          </table:table-cell>
          <table:table-cell table:style-name="ce6" office:value-type="float" office:value="641.623" calcext:value-type="float">
            <text:p>641,623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54.558" calcext:value-type="float">
            <text:p>1554,558</text:p>
          </table:table-cell>
          <table:table-cell table:style-name="ce6" office:value-type="float" office:value="1512.354" calcext:value-type="float">
            <text:p>1512,35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3.272" calcext:value-type="float">
            <text:p>2683,272</text:p>
          </table:table-cell>
          <table:table-cell table:style-name="ce6" office:value-type="float" office:value="2713.331" calcext:value-type="float">
            <text:p>2713,331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1855.027" calcext:value-type="float">
            <text:p>1855,027</text:p>
          </table:table-cell>
          <table:table-cell table:style-name="ce6" office:value-type="float" office:value="2208.317" calcext:value-type="float">
            <text:p>2208,317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64.727" calcext:value-type="float">
            <text:p>1764,727</text:p>
          </table:table-cell>
          <table:table-cell table:style-name="ce6" office:value-type="float" office:value="1783.144" calcext:value-type="float">
            <text:p>1783,144</text:p>
          </table:table-cell>
          <table:table-cell/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55.743" calcext:value-type="float">
            <text:p>1755,743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798" calcext:value-type="float">
            <text:p>0,5798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  <table:table-cell/>
        </table:table-row>
        <table:table-row table:style-name="ro2">
          <table:table-cell office:value-type="string" calcext:value-type="string">
            <text:p>Airfoil_9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41:.B350])" office:value-type="float" office:value="0.58498" calcext:value-type="float">
            <text:p>0,58498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09" calcext:value-type="float">
            <text:p>0,909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095" calcext:value-type="float">
            <text:p>1,09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91" calcext:value-type="float">
            <text:p>0,691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54:.B363])" office:value-type="float" office:value="0.7884" calcext:value-type="float">
            <text:p>0,7884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186" calcext:value-type="float">
            <text:p>2,186</text:p>
          </table:table-cell>
          <table:table-cell table:style-name="ce6"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979" calcext:value-type="float">
            <text:p>2,979</text:p>
          </table:table-cell>
          <table:table-cell table:style-name="ce6" office:value-type="float" office:value="1.628" calcext:value-type="float">
            <text:p>1,62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865" calcext:value-type="float">
            <text:p>1,865</text:p>
          </table:table-cell>
          <table:table-cell table:style-name="ce6"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299" calcext:value-type="float">
            <text:p>1,7299</text:p>
          </table:table-cell>
          <table:table-cell table:style-name="ce6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976" calcext:value-type="float">
            <text:p>1,976</text:p>
          </table:table-cell>
          <table:table-cell table:style-name="ce6" office:value-type="float" office:value="0.59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48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74" calcext:value-type="float">
            <text:p>3,474</text:p>
          </table:table-cell>
          <table:table-cell table:style-name="ce6"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267" calcext:value-type="float">
            <text:p>0,26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958" calcext:value-type="float">
            <text:p>2,958</text:p>
          </table:table-cell>
          <table:table-cell table:style-name="ce6" office:value-type="float" office:value="0.957" calcext:value-type="float">
            <text:p>0,957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96189" calcext:value-type="float">
            <text:p>1,96189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0.366" calcext:value-type="float">
            <text:p>320,366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31.641" calcext:value-type="float">
            <text:p>631,641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.854" calcext:value-type="float">
            <text:p>1,854</text:p>
          </table:table-cell>
          <table:table-cell table:style-name="ce6" office:value-type="float" office:value="1.391" calcext:value-type="float">
            <text:p>1,39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3.888" calcext:value-type="float">
            <text:p>623,888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93.455" calcext:value-type="float">
            <text:p>393,455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office:value-type="float" office:value="0.6099" calcext:value-type="float">
            <text:p>0,6099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52.84" calcext:value-type="float">
            <text:p>652,84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476.915" calcext:value-type="float">
            <text:p>476,915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62" calcext:value-type="float">
            <text:p>1,162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9.846" calcext:value-type="float">
            <text:p>429,846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05.516" calcext:value-type="float">
            <text:p>505,51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67.851" calcext:value-type="float">
            <text:p>567,851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80:.B389])" office:value-type="float" office:value="518.1206" calcext:value-type="float">
            <text:p>518,1206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9946" calcext:value-type="float">
            <text:p>0,9946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711" calcext:value-type="float">
            <text:p>4,711</text:p>
          </table:table-cell>
          <table:table-cell table:style-name="ce6" office:value-type="float" office:value="3.857" calcext:value-type="float">
            <text:p>3,857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9" calcext:value-type="float">
            <text:p>3,719</text:p>
          </table:table-cell>
          <table:table-cell table:style-name="ce6" office:value-type="float" office:value="3.614" calcext:value-type="float">
            <text:p>3,61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95" calcext:value-type="float">
            <text:p>3,695</text:p>
          </table:table-cell>
          <table:table-cell table:style-name="ce6" office:value-type="float" office:value="3.452" calcext:value-type="float">
            <text:p>3,452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64" calcext:value-type="float">
            <text:p>3,264</text:p>
          </table:table-cell>
          <table:table-cell table:style-name="ce6" office:value-type="float" office:value="3.123" calcext:value-type="float">
            <text:p>3,123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53" calcext:value-type="float">
            <text:p>3,853</text:p>
          </table:table-cell>
          <table:table-cell table:style-name="ce6" office:value-type="float" office:value="3.822" calcext:value-type="float">
            <text:p>3,8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56" calcext:value-type="float">
            <text:p>3,556</text:p>
          </table:table-cell>
          <table:table-cell table:style-name="ce6" office:value-type="float" office:value="3.308" calcext:value-type="float">
            <text:p>3,308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4.833" calcext:value-type="float">
            <text:p>4,833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8798" calcext:value-type="float">
            <text:p>3,8798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508.451" calcext:value-type="float">
            <text:p>508,451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2.354" calcext:value-type="float">
            <text:p>312,354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390.839" calcext:value-type="float">
            <text:p>390,839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42.098" calcext:value-type="float">
            <text:p>542,098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534" calcext:value-type="float">
            <text:p>460,53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94.987" calcext:value-type="float">
            <text:p>294,987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7.559" calcext:value-type="float">
            <text:p>217,559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32.182" calcext:value-type="float">
            <text:p>532,182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06:.B415])" office:value-type="float" office:value="390.7357" calcext:value-type="float">
            <text:p>390,7357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office:value-type="float" office:value="1.176" calcext:value-type="float">
            <text:p>1,17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1.38" calcext:value-type="float">
            <text:p>1,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211" calcext:value-type="float">
            <text:p>1,211</text:p>
          </table:table-cell>
          <table:table-cell table:style-name="ce6" office:value-type="float" office:value="1.274" calcext:value-type="float">
            <text:p>1,27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49" calcext:value-type="float">
            <text:p>1,249</text:p>
          </table:table-cell>
          <table:table-cell table:style-name="ce6" office:value-type="float" office:value="1.448" calcext:value-type="float">
            <text:p>1,44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1.103" calcext:value-type="float">
            <text:p>1,1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13" calcext:value-type="float">
            <text:p>1,613</text:p>
          </table:table-cell>
          <table:table-cell table:style-name="ce6" office:value-type="float" office:value="1.743" calcext:value-type="float">
            <text:p>1,74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25" calcext:value-type="float">
            <text:p>1,425</text:p>
          </table:table-cell>
          <table:table-cell table:style-name="ce6" office:value-type="float" office:value="1.389" calcext:value-type="float">
            <text:p>1,38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07" calcext:value-type="float">
            <text:p>1,307</text:p>
          </table:table-cell>
          <table:table-cell/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531" calcext:value-type="float">
            <text:p>1,3531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6.896" calcext:value-type="float">
            <text:p>176,896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8.008" calcext:value-type="float">
            <text:p>338,008</text:p>
          </table:table-cell>
          <table:table-cell table:style-name="ce6" office:value-type="float" office:value="327.903" calcext:value-type="float">
            <text:p>327,903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  <table:table-cell/>
        </table:table-row>
        <table:table-row table:style-name="ro2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  <table:table-cell/>
        </table:table-row>
        <table:table-row table:style-name="ro2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32:.B441])" office:value-type="float" office:value="114.7143" calcext:value-type="float">
            <text:p>114,7143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0.2022" calcext:value-type="float">
            <text:p>380,2022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16"/>
        <table:table-column table:style-name="co9" table:number-columns-repeated="16379" table:default-cell-style-name="Default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 table:number-columns-repeated="16379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6" calcext:value-type="percentage">
            <text:p>17,60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85" calcext:value-type="percentage">
            <text:p>18,50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13" calcext:value-type="percentage">
            <text:p>20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3497" calcext:value-type="percentage">
            <text:p>34,97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27" calcext:value-type="percentage">
            <text:p>18,2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03" calcext:value-type="percentage">
            <text:p>35,03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376" calcext:value-type="percentage">
            <text:p>3,7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28" calcext:value-type="percentage">
            <text:p>50,2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826" calcext:value-type="percentage">
            <text:p>38,2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61" calcext:value-type="percentage">
            <text:p>59,6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7" calcext:value-type="percentage">
            <text:p>21,7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5365" calcext:value-type="percentage">
            <text:p>53,65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29" calcext:value-type="percentage">
            <text:p>51,29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5392" calcext:value-type="percentage">
            <text:p>53,92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731" calcext:value-type="percentage">
            <text:p>37,3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37" calcext:value-type="percentage">
            <text:p>15,37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8" calcext:value-type="percentage">
            <text:p>9,4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36" calcext:value-type="percentage">
            <text:p>9,3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82" calcext:value-type="percentage">
            <text:p>15,8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71" calcext:value-type="percentage">
            <text:p>23,7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557" calcext:value-type="percentage">
            <text:p>5,5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78" calcext:value-type="percentage">
            <text:p>28,7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2945" calcext:value-type="percentage">
            <text:p>29,45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05" calcext:value-type="percentage">
            <text:p>22,0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4" calcext:value-type="percentage">
            <text:p>10,4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49" calcext:value-type="percentage">
            <text:p>41,49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465" calcext:value-type="percentage">
            <text:p>24,6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1" calcext:value-type="percentage">
            <text:p>10,4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3" calcext:value-type="percentage">
            <text:p>2,3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" calcext:value-type="percentage">
            <text:p>9,50%</text:p>
          </table:table-cell>
          <table:table-cell table:number-columns-repeated="16379"/>
        </table:table-row>
        <table:table-row table:style-name="ro5">
          <table:table-cell table:style-name="ce14"/>
          <table:table-cell table:style-name="ce17" table:formula="of:=AVERAGE([.B3:.B44])" office:value-type="percentage" office:value="0.259278571428571" calcext:value-type="percentage">
            <text:p>25,93%</text:p>
          </table:table-cell>
          <table:table-cell table:style-name="ce17" table:formula="of:=AVERAGE([.C3:.C44])" office:value-type="percentage" office:value="0.228540476190476" calcext:value-type="percentage">
            <text:p>22,85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237380952381" calcext:value-type="percentage">
            <text:p>21,24%</text:p>
          </table:table-cell>
          <table:table-cell table:number-columns-repeated="16379"/>
        </table:table-row>
        <table:table-row table:style-name="ro1">
          <table:table-cell table:style-name="ce12" table:number-columns-repeated="5"/>
          <table:table-cell table:number-columns-repeated="16379"/>
        </table:table-row>
        <table:table-row table:style-name="ro3">
          <table:table-cell table:style-name="ce36"/>
          <table:table-cell table:style-name="ce36" office:value-type="string" calcext:value-type="string">
            <text:p>GAIN</text:p>
          </table:table-cell>
          <table:table-cell table:style-name="ce42" table:formula="of:=([.B45]-[.C45])/[.B45]" office:value-type="percentage" office:value="0.118552393546195" calcext:value-type="percentage">
            <text:p>11,86%</text:p>
          </table:table-cell>
          <table:table-cell table:style-name="ce42" table:formula="of:=([.B45]-[.D45])/[.B45]" office:value-type="percentage" office:value="0.167580374114989" calcext:value-type="percentage">
            <text:p>16,76%</text:p>
          </table:table-cell>
          <table:table-cell table:style-name="ce42" table:formula="of:=([.B45]-[.E45])/[.B45]" office:value-type="percentage" office:value="0.180904891778469" calcext:value-type="percentage">
            <text:p>18,09%</text:p>
          </table:table-cell>
          <table:table-cell table:style-name="ce44" table:number-columns-repeated="16379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4301.5293/417" office:value-type="float" office:value="10.3154179856115" calcext:value-type="float">
            <text:p>10,3154179856115</text:p>
          </table:table-cell>
          <table:table-cell table:style-name="ce13" table:formula="of:=3235.858/417" office:value-type="float" office:value="7.75985131894484" calcext:value-type="float">
            <text:p>7,7598513189448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429.4136/417" office:value-type="float" office:value="5.82593189448441" calcext:value-type="float">
            <text:p>5,82593189448441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7775/150" office:value-type="float" office:value="0.00385166666666667" calcext:value-type="float">
            <text:p>0,00385166666666667</text:p>
          </table:table-cell>
          <table:table-cell table:style-name="ce13" table:formula="of:=0.59957/150" office:value-type="float" office:value="0.00399713333333333" calcext:value-type="float">
            <text:p>0,00399713333333333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6746/150" office:value-type="float" office:value="0.00378306666666667" calcext:value-type="float">
            <text:p>0,00378306666666667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92.4522/39" office:value-type="float" office:value="10.0628769230769" calcext:value-type="float">
            <text:p>10,0628769230769</text:p>
          </table:table-cell>
          <table:table-cell table:style-name="ce13" table:formula="of:=377.4047/39" office:value-type="float" office:value="9.67704358974359" calcext:value-type="float">
            <text:p>9,67704358974359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71.8343/39" office:value-type="float" office:value="9.53421282051282" calcext:value-type="float">
            <text:p>9,53421282051282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25/9" office:value-type="float" office:value="0.025" calcext:value-type="float">
            <text:p>0,025</text:p>
          </table:table-cell>
          <table:table-cell table:style-name="ce13" table:formula="of:=0.18446/9" office:value-type="float" office:value="0.0204955555555556" calcext:value-type="float">
            <text:p>0,0204955555555556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0102/4" office:value-type="float" office:value="0.00255" calcext:value-type="float">
            <text:p>0,00255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39072/4" office:value-type="float" office:value="0.009768" calcext:value-type="float">
            <text:p>0,009768</text:p>
          </table:table-cell>
          <table:table-cell table:style-name="ce13" table:formula="of:=0.0206/4" office:value-type="float" office:value="0.00515" calcext:value-type="float">
            <text:p>0,005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16395/4" office:value-type="float" office:value="0.0409875" calcext:value-type="float">
            <text:p>0,04098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2228.9029/33" office:value-type="float" office:value="67.5425121212121" calcext:value-type="float">
            <text:p>67,5425121212121</text:p>
          </table:table-cell>
          <table:table-cell table:style-name="ce13" table:formula="of:=1968.3891/33" office:value-type="float" office:value="59.6481545454545" calcext:value-type="float">
            <text:p>59,6481545454545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692.1309/33" office:value-type="float" office:value="51.2766939393939" calcext:value-type="float">
            <text:p>51,276693939393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2.83033333333333/103" office:value-type="float" office:value="0.0274789644012945" calcext:value-type="float">
            <text:p>0,0274789644012945</text:p>
          </table:table-cell>
          <table:table-cell table:style-name="ce13" table:formula="of:=2.2736/103" office:value-type="float" office:value="0.022073786407767" calcext:value-type="float">
            <text:p>0,022073786407767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5375/103" office:value-type="float" office:value="0.00521844660194175" calcext:value-type="float">
            <text:p>0,00521844660194175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5.6332/36" office:value-type="float" office:value="0.156477777777778" calcext:value-type="float">
            <text:p>0,156477777777778</text:p>
          </table:table-cell>
          <table:table-cell table:style-name="ce13" table:formula="of:=5.6779/36" office:value-type="float" office:value="0.157719444444444" calcext:value-type="float">
            <text:p>0,157719444444444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92/36" office:value-type="float" office:value="0.160888888888889" calcext:value-type="float">
            <text:p>0,160888888888889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074/25" office:value-type="float" office:value="0.020296" calcext:value-type="float">
            <text:p>0,020296</text:p>
          </table:table-cell>
          <table:table-cell table:style-name="ce13" table:formula="of:=0.4772/25" office:value-type="float" office:value="0.019088" calcext:value-type="float">
            <text:p>0,01908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4236/25" office:value-type="float" office:value="0.016944" calcext:value-type="float">
            <text:p>0,01694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5/12" office:value-type="float" office:value="0.0458333333333333" calcext:value-type="float">
            <text:p>0,0458333333333333</text:p>
          </table:table-cell>
          <table:table-cell table:style-name="ce13" table:formula="of:=0.5644/12" office:value-type="float" office:value="0.0470333333333333" calcext:value-type="float">
            <text:p>0,0470333333333333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355/12" office:value-type="float" office:value="0.0529583333333333" calcext:value-type="float">
            <text:p>0,0529583333333333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66/50" office:value-type="float" office:value="0.00732" calcext:value-type="float">
            <text:p>0,00732</text:p>
          </table:table-cell>
          <table:table-cell table:style-name="ce13" table:formula="of:=0.3585/50" office:value-type="float" office:value="0.00717" calcext:value-type="float">
            <text:p>0,00717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318/50" office:value-type="float" office:value="0.006636" calcext:value-type="float">
            <text:p>0,006636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621.2897/50" office:value-type="float" office:value="12.425794" calcext:value-type="float">
            <text:p>12,425794</text:p>
          </table:table-cell>
          <table:table-cell table:style-name="ce13" table:formula="of:=522.46265/50" office:value-type="float" office:value="10.449253" calcext:value-type="float">
            <text:p>10,449253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84.7715/50" office:value-type="float" office:value="11.69543" calcext:value-type="float">
            <text:p>11,69543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9.4683/99" office:value-type="float" office:value="0.0956393939393939" calcext:value-type="float">
            <text:p>0,0956393939393939</text:p>
          </table:table-cell>
          <table:table-cell table:style-name="ce13" table:formula="of:=4.3839/99" office:value-type="float" office:value="0.0442818181818182" calcext:value-type="float">
            <text:p>0,0442818181818182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0.8865/99" office:value-type="float" office:value="0.00895454545454546" calcext:value-type="float">
            <text:p>0,00895454545454546</text:p>
          </table:table-cell>
          <table:table-cell office:value-type="float" office:value="99" calcext:value-type="float">
            <text:p>9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57257/18" office:value-type="float" office:value="0.0318094444444444" calcext:value-type="float">
            <text:p>0,0318094444444444</text:p>
          </table:table-cell>
          <table:table-cell table:style-name="ce13" table:formula="of:=0.5063/18" office:value-type="float" office:value="0.0281277777777778" calcext:value-type="float">
            <text:p>0,0281277777777778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4347/18" office:value-type="float" office:value="0.0135261111111111" calcext:value-type="float">
            <text:p>0,0135261111111111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0454/6" office:value-type="float" office:value="0.0674233333333333" calcext:value-type="float">
            <text:p>0,0674233333333333</text:p>
          </table:table-cell>
          <table:table-cell table:style-name="ce13" table:formula="of:=0.396/6" office:value-type="float" office:value="0.066" calcext:value-type="float">
            <text:p>0,066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57/6" office:value-type="float" office:value="0.0595" calcext:value-type="float">
            <text:p>0,059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1385/104" office:value-type="float" office:value="0.0109471153846154" calcext:value-type="float">
            <text:p>0,0109471153846154</text:p>
          </table:table-cell>
          <table:table-cell table:style-name="ce13" table:formula="of:=0.95131/104" office:value-type="float" office:value="0.00914721153846154" calcext:value-type="float">
            <text:p>0,00914721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10658/104" office:value-type="float" office:value="0.0106401923076923" calcext:value-type="float">
            <text:p>0,0106401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62/13" office:value-type="float" office:value="0.00627846153846154" calcext:value-type="float">
            <text:p>0,00627846153846154</text:p>
          </table:table-cell>
          <table:table-cell table:style-name="ce13" table:formula="of:=0.08143/13" office:value-type="float" office:value="0.00626384615384615" calcext:value-type="float">
            <text:p>0,00626384615384615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66/13" office:value-type="float" office:value="0.00628153846153846" calcext:value-type="float">
            <text:p>0,00628153846153846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1937.37768/165" office:value-type="float" office:value="11.7416829090909" calcext:value-type="float">
            <text:p>11,7416829090909</text:p>
          </table:table-cell>
          <table:table-cell table:style-name="ce13" table:formula="of:=1759.5029/165" office:value-type="float" office:value="10.6636539393939" calcext:value-type="float">
            <text:p>10,6636539393939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69.54556/165" office:value-type="float" office:value="2.23967006060606" calcext:value-type="float">
            <text:p>2,2396700606060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20136/7" office:value-type="float" office:value="0.0287657142857143" calcext:value-type="float">
            <text:p>0,0287657142857143</text:p>
          </table:table-cell>
          <table:table-cell table:style-name="ce13" table:formula="of:=0.116/7" office:value-type="float" office:value="0.0165714285714286" calcext:value-type="float">
            <text:p>0,0165714285714286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68/7" office:value-type="float" office:value="0.0138285714285714" calcext:value-type="float">
            <text:p>0,01382857142857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19.2794/165" office:value-type="float" office:value="0.116844848484848" calcext:value-type="float">
            <text:p>0,116844848484848</text:p>
          </table:table-cell>
          <table:table-cell table:style-name="ce13" table:formula="of:=17.5382/165" office:value-type="float" office:value="0.106292121212121" calcext:value-type="float">
            <text:p>0,106292121212121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638/165" office:value-type="float" office:value="0.0220484848484849" calcext:value-type="float">
            <text:p>0,0220484848484849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7952/217" office:value-type="float" office:value="0.0359225806451613" calcext:value-type="float">
            <text:p>0,0359225806451613</text:p>
          </table:table-cell>
          <table:table-cell table:style-name="ce13" table:formula="of:=7.8032/217" office:value-type="float" office:value="0.0359594470046083" calcext:value-type="float">
            <text:p>0,0359594470046083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93/217" office:value-type="float" office:value="0.0359875576036866" calcext:value-type="float">
            <text:p>0,0359875576036866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7925/57" office:value-type="float" office:value="0.0314473684210526" calcext:value-type="float">
            <text:p>0,0314473684210526</text:p>
          </table:table-cell>
          <table:table-cell table:style-name="ce13" table:formula="of:=1.43788/57" office:value-type="float" office:value="0.0252259649122807" calcext:value-type="float">
            <text:p>0,0252259649122807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288/57" office:value-type="float" office:value="0.0233122807017544" calcext:value-type="float">
            <text:p>0,0233122807017544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406.64227/95" office:value-type="float" office:value="4.28044494736842" calcext:value-type="float">
            <text:p>4,28044494736842</text:p>
          </table:table-cell>
          <table:table-cell table:style-name="ce13" table:formula="of:=182.75549/95" office:value-type="float" office:value="1.923742" calcext:value-type="float">
            <text:p>1,9237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02.8543/95" office:value-type="float" office:value="1.08267684210526" calcext:value-type="float">
            <text:p>1,08267684210526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30977/104" office:value-type="float" office:value="0.0414400961538462" calcext:value-type="float">
            <text:p>0,0414400961538462</text:p>
          </table:table-cell>
          <table:table-cell table:style-name="ce13" table:formula="of:=4.5481/104" office:value-type="float" office:value="0.0437317307692308" calcext:value-type="float">
            <text:p>0,0437317307692308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5.3638/104" office:value-type="float" office:value="0.051575" calcext:value-type="float">
            <text:p>0,051575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33303/13" office:value-type="float" office:value="0.0256176923076923" calcext:value-type="float">
            <text:p>0,0256176923076923</text:p>
          </table:table-cell>
          <table:table-cell table:style-name="ce13" table:formula="of:=0.4484/13" office:value-type="float" office:value="0.0344923076923077" calcext:value-type="float">
            <text:p>0,0344923076923077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5697/13" office:value-type="float" office:value="0.0351515384615385" calcext:value-type="float">
            <text:p>0,0351515384615385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table:style-name="Default" table:number-columns-repeated="4"/>
          <table:table-cell table:style-name="ce14"/>
          <table:table-cell table:number-columns-repeated="16378"/>
        </table:table-row>
        <table:table-row table:style-name="ro5">
          <table:table-cell table:style-name="ce14"/>
          <table:table-cell table:style-name="ce14" table:formula="of:=AVERAGE([.B50:.B74])" office:value-type="float" office:value="4.6862756270991" calcext:value-type="float">
            <text:p>4,6862756270991</text:p>
          </table:table-cell>
          <table:table-cell table:style-name="ce14" table:formula="of:=AVERAGE([.C50:.C74])" office:value-type="float" office:value="4.03282077201701" calcext:value-type="float">
            <text:p>4,03282077201701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28901550451889" calcext:value-type="float">
            <text:p>3,28901550451889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2" office:value-type="string" calcext:value-type="string">
            <text:p>GAIN</text:p>
          </table:table-cell>
          <table:table-cell table:style-name="ce18" table:formula="of:=([.B77]-[.C77])/[.B77]" office:value-type="percentage" office:value="0.13944012411549" calcext:value-type="percentage">
            <text:p>13,94%</text:p>
          </table:table-cell>
          <table:table-cell table:style-name="ce18" table:formula="of:=([.B77]-[.D77])/[.B77]" office:value-type="percentage" office:value="0.282675666533509" calcext:value-type="percentage">
            <text:p>28,27%</text:p>
          </table:table-cell>
          <table:table-cell table:style-name="ce18" table:formula="of:=([.B77]-[.E77])/[.B77]" office:value-type="percentage" office:value="0.298160038752382" calcext:value-type="percentage">
            <text:p>29,82%</text:p>
          </table:table-cell>
          <table:table-cell table:style-name="ce12" table:number-columns-repeated="16379"/>
        </table:table-row>
      </table:table>
      <table:table table:name="methods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3"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style-name="ce38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REGRESS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table table:name="nc_exp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style-name="ce3" office:value-type="percentage" office:value="0.0459" calcext:value-type="percentage">
            <text:p>4,59%</text:p>
          </table:table-cell>
          <table:table-cell table:style-name="ce3"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style-name="ce3" office:value-type="percentage" office:value="0.0743" calcext:value-type="percentage">
            <text:p>7,43%</text:p>
          </table:table-cell>
          <table:table-cell table:style-name="ce3" office:value-type="percentage" office:value="0.0743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3191" calcext:value-type="percentage">
            <text:p>31,91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0459" calcext:value-type="percentage">
            <text:p>4,59%</text:p>
          </table:table-cell>
          <table:table-cell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2" table:style-name="ce3" office:value-type="percentage" office:value="0.0649" calcext:value-type="percentage">
            <text:p>6,49%</text:p>
          </table:table-cell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style-name="ce3" office:value-type="percentage" office:value="0.0595" calcext:value-type="percentage">
            <text:p>5,95%</text:p>
          </table:table-cell>
          <table:table-cell table:style-name="ce3" office:value-type="percentage" office:value="0.0595" calcext:value-type="percentage">
            <text:p>5,95%</text:p>
          </table:table-cell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191" calcext:value-type="percentage">
            <text:p>31,91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514" calcext:value-type="percentage">
            <text:p>5,14%</text:p>
          </table:table-cell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1915" calcext:value-type="percentage">
            <text:p>19,15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25318" calcext:value-type="percentage">
            <text:p>25,32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878" calcext:value-type="percentage">
            <text:p>5,88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1963" calcext:value-type="percentage">
            <text:p>19,63%</text:p>
          </table:table-cell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1704" calcext:value-type="percentage">
            <text:p>17,04%</text:p>
          </table:table-cell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296" calcext:value-type="percentage">
            <text:p>22,96%</text:p>
          </table:table-cell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741" calcext:value-type="percentage">
            <text:p>27,41%</text:p>
          </table:table-cell>
          <table:table-cell table:style-name="ce3" office:value-type="percentage" office:value="0.2963" calcext:value-type="percentage">
            <text:p>29,63%</text:p>
          </table:table-cell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37" calcext:value-type="percentage">
            <text:p>23,70%</text:p>
          </table:table-cell>
          <table:table-cell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148" calcext:value-type="percentage">
            <text:p>31,48%</text:p>
          </table:table-cell>
          <table:table-cell table:style-name="ce3"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444" calcext:value-type="percentage">
            <text:p>24,44%</text:p>
          </table:table-cell>
          <table:table-cell table:style-name="ce3" office:value-type="percentage" office:value="0.2148" calcext:value-type="percentage">
            <text:p>21,48%</text:p>
          </table:table-cell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style-name="ce3" office:value-type="percentage" office:value="0.263" calcext:value-type="percentage">
            <text:p>26,30%</text:p>
          </table:table-cell>
          <table:table-cell table:style-name="ce3" office:value-type="percentage" office:value="0.2593" calcext:value-type="percentage">
            <text:p>25,93%</text:p>
          </table:table-cell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667" calcext:value-type="percentage">
            <text:p>16,67%</text:p>
          </table:table-cell>
          <table:table-cell table:style-name="ce3" office:value-type="percentage" office:value="0.1259" calcext:value-type="percentage">
            <text:p>12,59%</text:p>
          </table:table-cell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16002" calcext:value-type="percentage">
            <text:p>16,00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777" calcext:value-type="percentage">
            <text:p>23,78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office:value-type="percentage" office:value="0.3429" calcext:value-type="percentage">
            <text:p>34,29%</text:p>
          </table:table-cell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714" calcext:value-type="percentage">
            <text:p>27,14%</text:p>
          </table:table-cell>
          <table:table-cell table:style-name="ce3" office:value-type="percentage" office:value="0.1143" calcext:value-type="percentage">
            <text:p>11,43%</text:p>
          </table:table-cell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percentage" office:value="0.5463" calcext:value-type="percentage">
            <text:p>54,63%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429" calcext:value-type="percentage">
            <text:p>24,29%</text:p>
          </table:table-cell>
          <table:table-cell table:style-name="ce3" office:value-type="percentage" office:value="0.2071" calcext:value-type="percentage">
            <text:p>20,71%</text:p>
          </table:table-cell>
        </table:table-row>
        <table:table-row table:style-name="ro1">
          <table:table-cell office:value-type="string" calcext:value-type="string">
            <text:p>Optdigits_4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214" calcext:value-type="percentage">
            <text:p>12,14%</text:p>
          </table:table-cell>
          <table:table-cell table:style-name="ce3" office:value-type="percentage" office:value="0.1857" calcext:value-type="percentage">
            <text:p>18,57%</text:p>
          </table:table-cell>
        </table:table-row>
        <table:table-row table:style-name="ro1">
          <table:table-cell office:value-type="string" calcext:value-type="string">
            <text:p>Optdigits_5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5286" calcext:value-type="percentage">
            <text:p>52,86%</text:p>
          </table:table-cell>
          <table:table-cell table:style-name="ce3" office:value-type="percentage" office:value="0.3571" calcext:value-type="percentage">
            <text:p>35,71%</text:p>
          </table:table-cell>
        </table:table-row>
        <table:table-row table:style-name="ro1">
          <table:table-cell office:value-type="string" calcext:value-type="string">
            <text:p>Optdigit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ptdigits_7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2429" calcext:value-type="percentage">
            <text:p>24,29%</text:p>
          </table:table-cell>
          <table:table-cell table:style-name="ce3" office:value-type="percentage" office:value="0.2143" calcext:value-type="percentage">
            <text:p>21,43%</text:p>
          </table:table-cell>
        </table:table-row>
        <table:table-row table:style-name="ro1">
          <table:table-cell office:value-type="string" calcext:value-type="string">
            <text:p>Optdigits_8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1786" calcext:value-type="percentage">
            <text:p>17,86%</text:p>
          </table:table-cell>
        </table:table-row>
        <table:table-row table:style-name="ro1">
          <table:table-cell office:value-type="string" calcext:value-type="string">
            <text:p>Optdigits_9</text:p>
          </table:table-cell>
          <table:table-cell office:value-type="percentage" office:value="0.5409" calcext:value-type="percentage">
            <text:p>54,09%</text:p>
          </table:table-cell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3643" calcext:value-type="percentage">
            <text:p>36,43%</text:p>
          </table:table-cell>
          <table:table-cell table:style-name="ce3" office:value-type="percentage" office:value="0.2357" calcext:value-type="percentage">
            <text:p>23,57%</text:p>
          </table:table-cell>
        </table:table-row>
        <table:table-row table:style-name="ro1">
          <table:table-cell office:value-type="string" calcext:value-type="string">
            <text:p>Optdigits_10</text:p>
          </table:table-cell>
          <table:table-cell office:value-type="percentage" office:value="0.5694" calcext:value-type="percentage">
            <text:p>56,94%</text:p>
          </table:table-cell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714" calcext:value-type="percentage">
            <text:p>27,14%</text:p>
          </table:table-cell>
        </table:table-row>
        <table:table-row table:style-name="ro1">
          <table:table-cell table:style-name="ce1"/>
          <table:table-cell table:style-name="ce1" table:formula="of:=AVERAGE([.B26:.B35])" office:value-type="percentage" office:value="0.55319" calcext:value-type="percentage">
            <text:p>55,32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9715" calcext:value-type="percentage">
            <text:p>29,72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348" calcext:value-type="percentage">
            <text:p>13,48%</text:p>
          </table:table-cell>
          <table:table-cell table:style-name="ce3" office:value-type="percentage" office:value="0.1022" calcext:value-type="percentage">
            <text:p>10,22%</text:p>
          </table:table-cell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348" calcext:value-type="percentage">
            <text:p>13,48%</text:p>
          </table:table-cell>
          <table:table-cell table:style-name="ce3" office:value-type="percentage" office:value="0.1065" calcext:value-type="percentage">
            <text:p>10,65%</text:p>
          </table:table-cell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office:value-type="percentage" office:value="0.1196" calcext:value-type="percentage">
            <text:p>11,96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office:value-type="percentage" office:value="0.1413" calcext:value-type="percentage">
            <text:p>14,13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office:value-type="percentage" office:value="0.1326" calcext:value-type="percentage">
            <text:p>13,26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6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office:value-type="percentage" office:value="0.1152" calcext:value-type="percentage">
            <text:p>11,52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office:value-type="percentage" office:value="0.1391" calcext:value-type="percentage">
            <text:p>13,91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office:value-type="percentage" office:value="0.0978" calcext:value-type="percentage">
            <text:p>9,78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9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office:value-type="percentage" office:value="0.1196" calcext:value-type="percentage">
            <text:p>11,9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38:.B47])" office:value-type="percentage" office:value="0.09397" calcext:value-type="percentage">
            <text:p>9,40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2413" calcext:value-type="percentage">
            <text:p>12,41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275" calcext:value-type="percentage">
            <text:p>32,75%</text:p>
          </table:table-cell>
          <table:table-cell table:style-name="ce3"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377" calcext:value-type="percentage">
            <text:p>13,77%</text:p>
          </table:table-cell>
          <table:table-cell table:style-name="ce3" office:value-type="percentage" office:value="0.1217" calcext:value-type="percentage">
            <text:p>12,17%</text:p>
          </table:table-cell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2246" calcext:value-type="percentage">
            <text:p>22,46%</text:p>
          </table:table-cell>
          <table:table-cell table:style-name="ce3" office:value-type="percentage" office:value="0.2072" calcext:value-type="percentage">
            <text:p>20,72%</text:p>
          </table:table-cell>
        </table:table-row>
        <table:table-row table:style-name="ro1">
          <table:table-cell office:value-type="string" calcext:value-type="string">
            <text:p>Appendicitis_4</text:p>
          </table:table-cell>
          <table:table-cell table:number-columns-repeated="2"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229" calcext:value-type="percentage">
            <text:p>22,90%</text:p>
          </table:table-cell>
          <table:table-cell table:style-name="ce3" office:value-type="percentage" office:value="0.1942" calcext:value-type="percentage">
            <text:p>19,42%</text:p>
          </table:table-cell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884" calcext:value-type="percentage">
            <text:p>18,84%</text:p>
          </table:table-cell>
          <table:table-cell table:style-name="ce3" office:value-type="percentage" office:value="0.1348" calcext:value-type="percentage">
            <text:p>13,48%</text:p>
          </table:table-cell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2696" calcext:value-type="percentage">
            <text:p>26,96%</text:p>
          </table:table-cell>
          <table:table-cell table:style-name="ce3" office:value-type="percentage" office:value="0.2014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Appendicitis_7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3261" calcext:value-type="percentage">
            <text:p>32,61%</text:p>
          </table:table-cell>
          <table:table-cell table:style-name="ce3" office:value-type="percentage" office:value="0.2884" calcext:value-type="percentage">
            <text:p>28,84%</text:p>
          </table:table-cell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522" calcext:value-type="percentage">
            <text:p>15,22%</text:p>
          </table:table-cell>
          <table:table-cell table:style-name="ce3" office:value-type="percentage" office:value="0.1362" calcext:value-type="percentage">
            <text:p>13,62%</text:p>
          </table:table-cell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2145" calcext:value-type="percentage">
            <text:p>21,45%</text:p>
          </table:table-cell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2319" calcext:value-type="percentage">
            <text:p>23,19%</text:p>
          </table:table-cell>
          <table:table-cell office:value-type="percentage" office:value="0.1812" calcext:value-type="percentage">
            <text:p>18,12%</text:p>
          </table:table-cell>
        </table:table-row>
        <table:table-row table:style-name="ro1">
          <table:table-cell table:style-name="ce1"/>
          <table:table-cell table:style-name="ce1" table:formula="of:=AVERAGE([.B50:.B59])" office:value-type="percentage" office:value="0.2" calcext:value-type="percentage">
            <text:p>20,0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2387" calcext:value-type="percentage">
            <text:p>23,87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78" calcext:value-type="percentage">
            <text:p>42,78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table:style-name="ce1"/>
          <table:table-cell table:style-name="ce1" table:formula="of:=AVERAGE([.B62:.B71])" office:value-type="percentage" office:value="0.38278" calcext:value-type="percentage">
            <text:p>38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111" calcext:value-type="percentage">
            <text:p>11,10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3943" calcext:value-type="percentage">
            <text:p>39,43%</text:p>
          </table:table-cell>
          <table:table-cell office:value-type="percentage" office:value="0.4229" calcext:value-type="percentage">
            <text:p>42,29%</text:p>
          </table:table-cell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771" calcext:value-type="percentage">
            <text:p>37,71%</text:p>
          </table:table-cell>
          <table:table-cell office:value-type="percentage" office:value="0.4057" calcext:value-type="percentage">
            <text:p>40,57%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029" calcext:value-type="percentage">
            <text:p>30,29%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4914" calcext:value-type="percentage">
            <text:p>49,14%</text:p>
          </table:table-cell>
          <table:table-cell office:value-type="percentage" office:value="0.4571" calcext:value-type="percentage">
            <text:p>45,71%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552" calcext:value-type="percentage">
            <text:p>55,52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543" calcext:value-type="percentage">
            <text:p>35,43%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886" calcext:value-type="percentage">
            <text:p>48,86%</text:p>
          </table:table-cell>
          <table:table-cell office:value-type="percentage" office:value="0.4029" calcext:value-type="percentage">
            <text:p>40,29%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143" calcext:value-type="percentage">
            <text:p>41,43%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14" calcext:value-type="percentage">
            <text:p>33,14%</text:p>
          </table:table-cell>
        </table:table-row>
        <table:table-row table:style-name="ro1">
          <table:table-cell table:style-name="ce1"/>
          <table:table-cell table:style-name="ce1" table:formula="of:=AVERAGE([.B75:.B84])" office:value-type="percentage" office:value="0.48655" calcext:value-type="percentage">
            <text:p>48,66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41685" calcext:value-type="percentage">
            <text:p>41,69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576" calcext:value-type="percentage">
            <text:p>65,76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58" calcext:value-type="percentage">
            <text:p>57,58%</text:p>
          </table:table-cell>
          <table:table-cell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7091" calcext:value-type="percentage">
            <text:p>70,91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242" calcext:value-type="percentage">
            <text:p>42,42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55" calcext:value-type="percentage">
            <text:p>64,55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table:style-name="ce1"/>
          <table:table-cell table:style-name="ce1" table:formula="of:=AVERAGE([.B88:.B97])" office:value-type="percentage" office:value="0.60395" calcext:value-type="percentage">
            <text:p>60,40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25" calcext:value-type="percentage">
            <text:p>22,5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048" calcext:value-type="percentage">
            <text:p>40,48%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19" calcext:value-type="percentage">
            <text:p>81,90%</text:p>
          </table:table-cell>
          <table:table-cell office:value-type="percentage" office:value="0.7476" calcext:value-type="percentage">
            <text:p>74,76%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7095" calcext:value-type="percentage">
            <text:p>70,95%</text:p>
          </table:table-cell>
          <table:table-cell office:value-type="percentage" office:value="0.5286" calcext:value-type="percentage">
            <text:p>52,86%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143" calcext:value-type="percentage">
            <text:p>51,43%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5571" calcext:value-type="percentage">
            <text:p>55,71%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238" calcext:value-type="percentage">
            <text:p>82,38%</text:p>
          </table:table-cell>
          <table:table-cell office:value-type="percentage" office:value="0.5286" calcext:value-type="percentage">
            <text:p>52,86%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5381" calcext:value-type="percentage">
            <text:p>53,81%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3857" calcext:value-type="percentage">
            <text:p>38,57%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619" calcext:value-type="percentage">
            <text:p>86,19%</text:p>
          </table:table-cell>
          <table:table-cell office:value-type="percentage" office:value="0.5571" calcext:value-type="percentage">
            <text:p>55,71%</text:p>
          </table:table-cell>
        </table:table-row>
        <table:table-row table:style-name="ro1">
          <table:table-cell table:style-name="ce1"/>
          <table:table-cell table:style-name="ce1" table:formula="of:=AVERAGE([.B101:.B110])" office:value-type="percentage" office:value="0.17178" calcext:value-type="percentage">
            <text:p>17,18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70094" calcext:value-type="percentage">
            <text:p>70,09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69" calcext:value-type="percentage">
            <text:p>57,69%</text:p>
          </table:table-cell>
          <table:table-cell office:value-type="percentage" office:value="0.3692" calcext:value-type="percentage">
            <text:p>36,92%</text:p>
          </table:table-cell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3867" calcext:value-type="percentage">
            <text:p>38,67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4154" calcext:value-type="percentage">
            <text:p>41,54%</text:p>
          </table:table-cell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2692" calcext:value-type="percentage">
            <text:p>26,92%</text:p>
          </table:table-cell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77" calcext:value-type="percentage">
            <text:p>50,77%</text:p>
          </table:table-cell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846" calcext:value-type="percentage">
            <text:p>38,46%</text:p>
          </table:table-cell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2615" calcext:value-type="percentage">
            <text:p>26,15%</text:p>
          </table:table-cell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692" calcext:value-type="percentage">
            <text:p>36,92%</text:p>
          </table:table-cell>
        </table:table-row>
        <table:table-row table:style-name="ro1">
          <table:table-cell office:value-type="string" calcext:value-type="string">
            <text:p>Haberman_10</text:p>
          </table:table-cell>
          <table:table-cell table:number-columns-repeated="2"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615" calcext:value-type="percentage">
            <text:p>46,15%</text:p>
          </table:table-cell>
        </table:table-row>
        <table:table-row table:style-name="ro1">
          <table:table-cell table:style-name="ce1"/>
          <table:table-cell table:style-name="ce1" table:formula="of:=AVERAGE([.B114:.B123])" office:value-type="percentage" office:value="0.26167" calcext:value-type="percentage">
            <text:p>26,1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1614" calcext:value-type="percentage">
            <text:p>41,61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633" calcext:value-type="percentage">
            <text:p>26,33%</text:p>
          </table:table-cell>
        </table:table-row>
        <table:table-row table:style-name="ro1">
          <table:table-cell office:value-type="string" calcext:value-type="string">
            <text:p>Heart_2</text:p>
          </table:table-cell>
          <table:table-cell table:number-columns-repeated="2"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33" calcext:value-type="percentage">
            <text:p>6,33%</text:p>
          </table:table-cell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table:number-columns-repeated="2" office:value-type="percentage" office:value="0.1967" calcext:value-type="percentage">
            <text:p>19,67%</text:p>
          </table:table-cell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67" calcext:value-type="percentage">
            <text:p>12,67%</text:p>
          </table:table-cell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967" calcext:value-type="percentage">
            <text:p>19,67%</text:p>
          </table:table-cell>
        </table:table-row>
        <table:table-row table:style-name="ro1">
          <table:table-cell table:style-name="ce1"/>
          <table:table-cell table:style-name="ce1" table:formula="of:=AVERAGE([.B127:.B136])" office:value-type="percentage" office:value="0.22852" calcext:value-type="percentage">
            <text:p>22,85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79" calcext:value-type="percentage">
            <text:p>17,90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table:style-name="ce1"/>
          <table:table-cell table:style-name="ce1" table:formula="of:=AVERAGE([.B140:.B149])" office:value-type="percentage" office:value="0.506" calcext:value-type="percentage">
            <text:p>50,60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31" calcext:value-type="percentage">
            <text:p>13,1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43" calcext:value-type="percentage">
            <text:p>11,43%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057" calcext:value-type="percentage">
            <text:p>10,57%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657" calcext:value-type="percentage">
            <text:p>16,57%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261" calcext:value-type="percentage">
            <text:p>2,61%</text:p>
          </table:table-cell>
          <table:table-cell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71" calcext:value-type="percentage">
            <text:p>11,71%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09" calcext:value-type="percentage">
            <text:p>6,09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1514" calcext:value-type="percentage">
            <text:p>15,14%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1543" calcext:value-type="percentage">
            <text:p>15,43%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343" calcext:value-type="percentage">
            <text:p>13,43%</text:p>
          </table:table-cell>
        </table:table-row>
        <table:table-row table:style-name="ro1">
          <table:table-cell table:style-name="ce1"/>
          <table:table-cell table:style-name="ce1" table:formula="of:=AVERAGE([.B153:.B162])" office:value-type="percentage" office:value="0.06654" calcext:value-type="percentage">
            <text:p>6,65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4656" calcext:value-type="percentage">
            <text:p>14,66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33" calcext:value-type="percentage">
            <text:p>21,33%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542" calcext:value-type="percentage">
            <text:p>15,42%</text:p>
          </table:table-cell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2217" calcext:value-type="percentage">
            <text:p>22,17%</text:p>
          </table:table-cell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181" calcext:value-type="percentage">
            <text:p>21,81%</text:p>
          </table:table-cell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289" calcext:value-type="percentage">
            <text:p>12,89%</text:p>
          </table:table-cell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554" calcext:value-type="percentage">
            <text:p>15,54%</text:p>
          </table:table-cell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928" calcext:value-type="percentage">
            <text:p>19,28%</text:p>
          </table:table-cell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952" calcext:value-type="percentage">
            <text:p>19,52%</text:p>
          </table:table-cell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349" calcext:value-type="percentage">
            <text:p>13,49%</text:p>
          </table:table-cell>
        </table:table-row>
        <table:table-row table:style-name="ro1">
          <table:table-cell table:style-name="ce1"/>
          <table:table-cell table:style-name="ce1" table:formula="of:=AVERAGE([.B166:.B175])" office:value-type="percentage" office:value="0.29501" calcext:value-type="percentage">
            <text:p>29,50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8267" calcext:value-type="percentage">
            <text:p>18,27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132" calcext:value-type="percentage">
            <text:p>21,32%</text:p>
          </table:table-cell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645" calcext:value-type="percentage">
            <text:p>26,45%</text:p>
          </table:table-cell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671" calcext:value-type="percentage">
            <text:p>26,71%</text:p>
          </table:table-cell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961" calcext:value-type="percentage">
            <text:p>19,61%</text:p>
          </table:table-cell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526" calcext:value-type="percentage">
            <text:p>15,26%</text:p>
          </table:table-cell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658" calcext:value-type="percentage">
            <text:p>26,58%</text:p>
          </table:table-cell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2"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184" calcext:value-type="percentage">
            <text:p>21,84%</text:p>
          </table:table-cell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724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461" calcext:value-type="percentage">
            <text:p>24,61%</text:p>
          </table:table-cell>
        </table:table-row>
        <table:table-row table:style-name="ro1">
          <table:table-cell table:style-name="ce1"/>
          <table:table-cell table:style-name="ce1" table:formula="of:=AVERAGE([.B179:.B188])" office:value-type="percentage" office:value="0.15947" calcext:value-type="percentage">
            <text:p>15,95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" calcext:value-type="percentage">
            <text:p>23,50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935" calcext:value-type="percentage">
            <text:p>19,35%</text:p>
          </table:table-cell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</table:table-row>
        <table:table-row table:style-name="ro1">
          <table:table-cell table:style-name="ce1"/>
          <table:table-cell table:style-name="ce1" table:formula="of:=AVERAGE([.B192:.B201])" office:value-type="percentage" office:value="0.05906" calcext:value-type="percentage">
            <text:p>5,9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9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117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957" calcext:value-type="percentage">
            <text:p>39,57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463" calcext:value-type="percentage">
            <text:p>34,63%</text:p>
          </table:table-cell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576" calcext:value-type="percentage">
            <text:p>35,76%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Saheart_6</text:p>
          </table:table-cell>
          <table:table-cell table:number-columns-repeated="2"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377" calcext:value-type="percentage">
            <text:p>33,77%</text:p>
          </table:table-cell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2857" calcext:value-type="percentage">
            <text:p>28,57%</text:p>
          </table:table-cell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table:style-name="ce1"/>
          <table:table-cell table:style-name="ce1" table:formula="of:=AVERAGE([.B205:.B214])" office:value-type="percentage" office:value="0.28457" calcext:value-type="percentage">
            <text:p>28,46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33722222222222" calcext:value-type="percentage">
            <text:p>33,3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onar_1</text:p>
          </table:table-cell>
          <table:table-cell table:number-columns-repeated="2"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style-name="ce28" office:value-type="percentage" office:value="0.383" calcext:value-type="percentage">
            <text:p>38,30%</text:p>
          </table:table-cell>
          <table:table-cell table:style-name="ce28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28" office:value-type="percentage" office:value="0.389" calcext:value-type="percentage">
            <text:p>38,90%</text:p>
          </table:table-cell>
          <table:table-cell table:style-name="ce28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28" office:value-type="percentage" office:value="0.394" calcext:value-type="percentage">
            <text:p>39,40%</text:p>
          </table:table-cell>
          <table:table-cell table:style-name="ce28"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28" office:value-type="percentage" office:value="0.4385" calcext:value-type="percentage">
            <text:p>43,85%</text:p>
          </table:table-cell>
          <table:table-cell table:style-name="ce28" office:value-type="percentage" office:value="0.4445" calcext:value-type="percentage">
            <text:p>44,45%</text:p>
          </table:table-cell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28" office:value-type="percentage" office:value="0.432" calcext:value-type="percentage">
            <text:p>43,20%</text:p>
          </table:table-cell>
          <table:table-cell table:style-name="ce28"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style-name="ce28" office:value-type="percentage" office:value="0.411" calcext:value-type="percentage">
            <text:p>41,10%</text:p>
          </table:table-cell>
          <table:table-cell table:style-name="ce28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28" office:value-type="percentage" office:value="0.408" calcext:value-type="percentage">
            <text:p>40,80%</text:p>
          </table:table-cell>
          <table:table-cell table:style-name="ce28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28" office:value-type="percentage" office:value="0.3895" calcext:value-type="percentage">
            <text:p>38,95%</text:p>
          </table:table-cell>
          <table:table-cell table:style-name="ce28" office:value-type="percentage" office:value="0.3875" calcext:value-type="percentage">
            <text:p>38,75%</text:p>
          </table:table-cell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28" office:value-type="percentage" office:value="0.3845" calcext:value-type="percentage">
            <text:p>38,45%</text:p>
          </table:table-cell>
          <table:table-cell table:style-name="ce28" office:value-type="percentage" office:value="0.4255" calcext:value-type="percentage">
            <text:p>42,55%</text:p>
          </table:table-cell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28" office:value-type="percentage" office:value="0.4295" calcext:value-type="percentage">
            <text:p>42,95%</text:p>
          </table:table-cell>
          <table:table-cell table:style-name="ce28" office:value-type="percentage" office:value="0.435" calcext:value-type="percentage">
            <text:p>43,50%</text:p>
          </table:table-cell>
        </table:table-row>
        <table:table-row table:style-name="ro1">
          <table:table-cell table:style-name="ce1"/>
          <table:table-cell table:style-name="ce1" table:formula="of:=AVERAGE([.B217:.B226])" office:value-type="percentage" office:value="0.2575" calcext:value-type="percentage">
            <text:p>25,75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059" calcext:value-type="percentage">
            <text:p>40,59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28" office:value-type="percentage" office:value="0.2703" calcext:value-type="percentage">
            <text:p>27,03%</text:p>
          </table:table-cell>
          <table:table-cell table:style-name="ce28" office:value-type="percentage" office:value="0.2446" calcext:value-type="percentage">
            <text:p>24,46%</text:p>
          </table:table-cell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28" office:value-type="percentage" office:value="0.2338" calcext:value-type="percentage">
            <text:p>23,38%</text:p>
          </table:table-cell>
          <table:table-cell table:style-name="ce28"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28" office:value-type="percentage" office:value="0.2811" calcext:value-type="percentage">
            <text:p>28,11%</text:p>
          </table:table-cell>
          <table:table-cell table:style-name="ce28" office:value-type="percentage" office:value="0.2459" calcext:value-type="percentage">
            <text:p>24,59%</text:p>
          </table:table-cell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28" office:value-type="percentage" office:value="0.2919" calcext:value-type="percentage">
            <text:p>29,19%</text:p>
          </table:table-cell>
          <table:table-cell table:style-name="ce28" office:value-type="percentage" office:value="0.2743" calcext:value-type="percentage">
            <text:p>27,43%</text:p>
          </table:table-cell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28" office:value-type="percentage" office:value="0.2851" calcext:value-type="percentage">
            <text:p>28,51%</text:p>
          </table:table-cell>
          <table:table-cell table:style-name="ce28" office:value-type="percentage" office:value="0.2514" calcext:value-type="percentage">
            <text:p>25,14%</text:p>
          </table:table-cell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28" office:value-type="percentage" office:value="0.2932" calcext:value-type="percentage">
            <text:p>29,32%</text:p>
          </table:table-cell>
          <table:table-cell table:style-name="ce28" office:value-type="percentage" office:value="0.2905" calcext:value-type="percentage">
            <text:p>29,05%</text:p>
          </table:table-cell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28" office:value-type="percentage" office:value="0.3027" calcext:value-type="percentage">
            <text:p>30,27%</text:p>
          </table:table-cell>
          <table:table-cell table:style-name="ce2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28" office:value-type="percentage" office:value="0.2081" calcext:value-type="percentage">
            <text:p>20,81%</text:p>
          </table:table-cell>
          <table:table-cell table:style-name="ce28" office:value-type="percentage" office:value="0.1986" calcext:value-type="percentage">
            <text:p>19,86%</text:p>
          </table:table-cell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number-columns-repeated="2" table:style-name="ce28" office:value-type="percentage" office:value="0.2311" calcext:value-type="percentage">
            <text:p>23,11%</text:p>
          </table:table-cell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28" office:value-type="percentage" office:value="0.1932" calcext:value-type="percentage">
            <text:p>19,32%</text:p>
          </table:table-cell>
          <table:table-cell table:style-name="ce28" office:value-type="percentage" office:value="0.2014" calcext:value-type="percentage">
            <text:p>20,14%</text:p>
          </table:table-cell>
        </table:table-row>
        <table:table-row table:style-name="ro1">
          <table:table-cell table:style-name="ce1"/>
          <table:table-cell table:style-name="ce1" table:formula="of:=AVERAGE([.B230:.B239])" office:value-type="percentage" office:value="0.22175" calcext:value-type="percentage">
            <text:p>22,18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905" calcext:value-type="percentage">
            <text:p>25,91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table:number-columns-repeated="2" office:value-type="percentage" office:value="0.1235" calcext:value-type="percentage">
            <text:p>12,35%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706" calcext:value-type="percentage">
            <text:p>17,06%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471" calcext:value-type="percentage">
            <text:p>4,71%</text:p>
          </table:table-cell>
          <table:table-cell office:value-type="percentage" office:value="0.0235" calcext:value-type="percentage">
            <text:p>2,35%</text:p>
          </table:table-cell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588" calcext:value-type="percentage">
            <text:p>15,88%</text:p>
          </table:table-cell>
        </table:table-row>
        <table:table-row table:style-name="ro1">
          <table:table-cell office:value-type="string" calcext:value-type="string">
            <text:p>Wdbc_6</text:p>
          </table:table-cell>
          <table:table-cell office:value-type="string" calcext:value-type="string">
            <text:p>x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941" calcext:value-type="percentage">
            <text:p>9,41%</text:p>
          </table:table-cell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353" calcext:value-type="percentage">
            <text:p>3,53%</text:p>
          </table:table-cell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06" calcext:value-type="percentage">
            <text:p>7,06%</text:p>
          </table:table-cell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529" calcext:value-type="percentage">
            <text:p>15,29%</text:p>
          </table:table-cell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41" calcext:value-type="percentage">
            <text:p>9,41%</text:p>
          </table:table-cell>
        </table:table-row>
        <table:table-row table:style-name="ro1">
          <table:table-cell table:style-name="ce1"/>
          <table:table-cell table:style-name="ce1" table:formula="of:=AVERAGE([.B242:.B251])" office:value-type="percentage" office:value="0.0477888888888889" calcext:value-type="percentage">
            <text:p>4,78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1001" calcext:value-type="percentage">
            <text:p>11,00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92" calcext:value-type="percentage">
            <text:p>79,20%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8" calcext:value-type="percentage">
            <text:p>70,80%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6" calcext:value-type="percentage">
            <text:p>75,60%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z_f_s_8</text:p>
          </table:table-cell>
          <table:table-cell office:value-type="string" calcext:value-type="string">
            <text:p>x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48" calcext:value-type="percentage">
            <text:p>74,8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table:style-name="ce1"/>
          <table:table-cell table:style-name="ce1" table:formula="of:=AVERAGE([.B255:.B264])" office:value-type="percentage" office:value="0.0549444444444444" calcext:value-type="percentage">
            <text:p>5,49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7082" calcext:value-type="percentage">
            <text:p>70,82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zo_nf_s_3</text:p>
          </table:table-cell>
          <table:table-cell office:value-type="string" calcext:value-type="string">
            <text:p>x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string" calcext:value-type="string">
            <text:p>x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table:style-name="ce1"/>
          <table:table-cell table:style-name="ce1" table:formula="of:=AVERAGE([.B267:.B276])" office:value-type="percentage" office:value="0.0565555555555556" calcext:value-type="percentage">
            <text:p>5,66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255555555555556" calcext:value-type="percentage">
            <text:p>2,56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3</text:p>
          </table:table-cell>
          <table:table-cell office:value-type="percentage" office:value="0.3624" calcext:value-type="percentage">
            <text:p>36,24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timage_4</text:p>
          </table:table-cell>
          <table:table-cell office:value-type="percentage" office:value="0.339" calcext:value-type="percentage">
            <text:p>33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5</text:p>
          </table:table-cell>
          <table:table-cell office:value-type="percentage" office:value="0.3577" calcext:value-type="percentage">
            <text:p>35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6</text:p>
          </table:table-cell>
          <table:table-cell office:value-type="percentage" office:value="0.3624" calcext:value-type="percentage">
            <text:p>36,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7</text:p>
          </table:table-cell>
          <table:table-cell office:value-type="percentage" office:value="0.3313" calcext:value-type="percentage">
            <text:p>33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8</text:p>
          </table:table-cell>
          <table:table-cell office:value-type="percentage" office:value="0.3608" calcext:value-type="percentage">
            <text:p>36,0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9</text:p>
          </table:table-cell>
          <table:table-cell office:value-type="percentage" office:value="0.3499" calcext:value-type="percentage">
            <text:p>34,9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10</text:p>
          </table:table-cell>
          <table:table-cell office:value-type="percentage" office:value="0.3608" calcext:value-type="percentage">
            <text:p>36,0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79:.B288])" office:value-type="percentage" office:value="0.34961" calcext:value-type="percentage">
            <text:p>34,96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96" calcext:value-type="float">
            <text:p>0,496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02" calcext:value-type="float">
            <text:p>4,02E-01</text:p>
          </table:table-cell>
          <table:table-cell table:style-name="ce10" office:value-type="float" office:value="0.406" calcext:value-type="float">
            <text:p>4,06E-01</text:p>
          </table:table-cell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79" calcext:value-type="float">
            <text:p>8,79E-01</text:p>
          </table:table-cell>
          <table:table-cell table:style-name="ce10" office:value-type="float" office:value="0.886" calcext:value-type="float">
            <text:p>8,86E-01</text:p>
          </table:table-cell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698" calcext:value-type="float">
            <text:p>0,1698</text:p>
          </table:table-cell>
          <table:table-cell table:style-name="ce6" office:value-type="float" office:value="0.227" calcext:value-type="float">
            <text:p>0,227</text:p>
          </table:table-cell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string" calcext:value-type="string">
            <text:p>x</text:p>
          </table:table-cell>
          <table:table-cell table:style-name="ce10" office:value-type="float" office:value="0.128" calcext:value-type="float">
            <text:p>1,28E-01</text:p>
          </table:table-cell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</table:table-row>
        <table:table-row table:style-name="ro3">
          <table:table-cell table:style-name="ce4"/>
          <table:table-cell table:style-name="ce7" table:formula="of:=AVERAGE([.B292:.B301])" office:value-type="float" office:value="0.481" calcext:value-type="float">
            <text:p>0,481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425866666666667" calcext:value-type="float">
            <text:p>0,4258666666666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</table:table-row>
        <table:table-row table:style-name="ro3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3" calcext:value-type="float">
            <text:p>4,53E-01</text:p>
          </table:table-cell>
          <table:table-cell table:style-name="ce10" office:value-type="float" office:value="0.4492" calcext:value-type="float">
            <text:p>4,49E-01</text:p>
          </table:table-cell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4" calcext:value-type="float">
            <text:p>0,054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string" calcext:value-type="string">
            <text:p>x</text:p>
          </table:table-cell>
          <table:table-cell table:style-name="ce10" office:value-type="float" office:value="0.0673" calcext:value-type="float">
            <text:p>6,73E-02</text:p>
          </table:table-cell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</table:table-row>
        <table:table-row table:style-name="ro3">
          <table:table-cell table:style-name="ce4"/>
          <table:table-cell table:style-name="ce7" table:formula="of:=AVERAGE([.B304:.B313])" office:value-type="float" office:value="0.0787555555555556" calcext:value-type="float">
            <text:p>0,0787555555555556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8677777777778" calcext:value-type="float">
            <text:p>0,108677777777778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</table:table-row>
        <table:table-row table:style-name="ro1">
          <table:table-cell table:style-name="Default" table:number-columns-repeated="6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704.153" calcext:value-type="float">
            <text:p>2704,153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3511.374" calcext:value-type="float">
            <text:p>3511,374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286.019" calcext:value-type="float">
            <text:p>3286,019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751.937" calcext:value-type="float">
            <text:p>2751,937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3111.179" calcext:value-type="float">
            <text:p>3111,179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906.665" calcext:value-type="float">
            <text:p>2906,665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876.449" calcext:value-type="float">
            <text:p>2876,44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367.648" calcext:value-type="float">
            <text:p>3367,648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868.456" calcext:value-type="float">
            <text:p>2868,456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800.854" calcext:value-type="float">
            <text:p>2800,854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</table:table-row>
        <table:table-row table:style-name="ro3">
          <table:table-cell table:style-name="ce4"/>
          <table:table-cell table:style-name="ce7" table:formula="of:=AVERAGE([.B317:.B326])" office:value-type="float" office:value="3018.4734" calcext:value-type="float">
            <text:p>3018,4734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NC=100</text:p>
          </table:table-cell>
          <table:table-cell table:style-name="ce4" office:value-type="string" calcext:value-type="string">
            <text:p>NC=200</text:p>
          </table:table-cell>
          <table:table-cell table:style-name="ce4"/>
          <table:table-cell table:style-name="ce5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73.451" calcext:value-type="float">
            <text:p>1973,451</text:p>
          </table:table-cell>
          <table:table-cell table:style-name="ce6" office:value-type="float" office:value="1522.981" calcext:value-type="float">
            <text:p>1522,981</text:p>
          </table:table-cell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876.101" calcext:value-type="float">
            <text:p>876,101</text:p>
          </table:table-cell>
          <table:table-cell table:style-name="ce6" office:value-type="float" office:value="888.315" calcext:value-type="float">
            <text:p>888,315</text:p>
          </table:table-cell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58.449" calcext:value-type="float">
            <text:p>2158,449</text:p>
          </table:table-cell>
          <table:table-cell table:style-name="ce6" office:value-type="float" office:value="1907.829" calcext:value-type="float">
            <text:p>1907,829</text:p>
          </table:table-cell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507.499" calcext:value-type="float">
            <text:p>2507,499</text:p>
          </table:table-cell>
          <table:table-cell table:style-name="ce6" office:value-type="float" office:value="2554.626" calcext:value-type="float">
            <text:p>2554,626</text:p>
          </table:table-cell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423.144" calcext:value-type="float">
            <text:p>1423,144</text:p>
          </table:table-cell>
          <table:table-cell table:style-name="ce6" office:value-type="float" office:value="1188.789" calcext:value-type="float">
            <text:p>1188,789</text:p>
          </table:table-cell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679.464" calcext:value-type="float">
            <text:p>679,464</text:p>
          </table:table-cell>
          <table:table-cell table:style-name="ce6" office:value-type="float" office:value="641.623" calcext:value-type="float">
            <text:p>641,623</text:p>
          </table:table-cell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035.756" calcext:value-type="float">
            <text:p>2035,756</text:p>
          </table:table-cell>
          <table:table-cell table:style-name="ce6" office:value-type="float" office:value="1512.354" calcext:value-type="float">
            <text:p>1512,354</text:p>
          </table:table-cell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9.256" calcext:value-type="float">
            <text:p>2689,256</text:p>
          </table:table-cell>
          <table:table-cell table:style-name="ce6" office:value-type="float" office:value="2713.331" calcext:value-type="float">
            <text:p>2713,331</text:p>
          </table:table-cell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45.297" calcext:value-type="float">
            <text:p>2345,297</text:p>
          </table:table-cell>
          <table:table-cell table:style-name="ce6" office:value-type="float" office:value="2208.317" calcext:value-type="float">
            <text:p>2208,317</text:p>
          </table:table-cell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840.703" calcext:value-type="float">
            <text:p>1840,703</text:p>
          </table:table-cell>
          <table:table-cell table:style-name="ce6" office:value-type="float" office:value="1783.144" calcext:value-type="float">
            <text:p>1783,144</text:p>
          </table:table-cell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852.912" calcext:value-type="float">
            <text:p>1852,912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3" calcext:value-type="float">
            <text:p>0,653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607" calcext:value-type="float">
            <text:p>0,607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83" calcext:value-type="float">
            <text:p>0,583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497" calcext:value-type="float">
            <text:p>0,497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58" calcext:value-type="float">
            <text:p>0,558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25" calcext:value-type="float">
            <text:p>0,625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</table:table-row>
        <table:table-row table:style-name="ro3">
          <table:table-cell table:style-name="ce4"/>
          <table:table-cell table:style-name="ce7" table:formula="of:=AVERAGE([.B341:.B350])" office:value-type="float" office:value="0.594" calcext:value-type="float">
            <text:p>0,594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1.001" calcext:value-type="float">
            <text:p>1,001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397" calcext:value-type="float">
            <text:p>1,397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695" calcext:value-type="float">
            <text:p>0,6695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209" calcext:value-type="float">
            <text:p>1,209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974" calcext:value-type="float">
            <text:p>0,974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1.437" calcext:value-type="float">
            <text:p>1,437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1.338" calcext:value-type="float">
            <text:p>1,338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</table:table-row>
        <table:table-row table:style-name="ro3">
          <table:table-cell table:style-name="ce4"/>
          <table:table-cell table:style-name="ce7" table:formula="of:=AVERAGE([.B354:.B363])" office:value-type="float" office:value="1.07305" calcext:value-type="float">
            <text:p>1,07305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7.108" calcext:value-type="float">
            <text:p>7,108</text:p>
          </table:table-cell>
          <table:table-cell table:style-name="ce6" office:value-type="float" office:value="3.285" calcext:value-type="float">
            <text:p>3,285</text:p>
          </table:table-cell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5.975" calcext:value-type="float">
            <text:p>5,975</text:p>
          </table:table-cell>
          <table:table-cell table:style-name="ce6" office:value-type="float" office:value="1.628" calcext:value-type="float">
            <text:p>1,628</text:p>
          </table:table-cell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8.219" calcext:value-type="float">
            <text:p>8,219</text:p>
          </table:table-cell>
          <table:table-cell table:style-name="ce6" office:value-type="float" office:value="0.228" calcext:value-type="float">
            <text:p>0,228</text:p>
          </table:table-cell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57" calcext:value-type="float">
            <text:p>1,757</text:p>
          </table:table-cell>
          <table:table-cell table:style-name="ce6" office:value-type="float" office:value="0.801" calcext:value-type="float">
            <text:p>0,801</text:p>
          </table:table-cell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2.439" calcext:value-type="float">
            <text:p>2,439</text:p>
          </table:table-cell>
          <table:table-cell table:style-name="ce6" office:value-type="float" office:value="0.594" calcext:value-type="float">
            <text:p>0,594</text:p>
          </table:table-cell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1.188" calcext:value-type="float">
            <text:p>1,188</text:p>
          </table:table-cell>
          <table:table-cell table:style-name="ce6" office:value-type="float" office:value="0.487" calcext:value-type="float">
            <text:p>0,487</text:p>
          </table:table-cell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1.635" calcext:value-type="float">
            <text:p>1,635</text:p>
          </table:table-cell>
          <table:table-cell table:style-name="ce6" office:value-type="float" office:value="0.282" calcext:value-type="float">
            <text:p>0,282</text:p>
          </table:table-cell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9.021" calcext:value-type="float">
            <text:p>9,021</text:p>
          </table:table-cell>
          <table:table-cell table:style-name="ce6" office:value-type="float" office:value="0.336" calcext:value-type="float">
            <text:p>0,336</text:p>
          </table:table-cell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9.347" calcext:value-type="float">
            <text:p>9,347</text:p>
          </table:table-cell>
          <table:table-cell table:style-name="ce6" office:value-type="float" office:value="0.267" calcext:value-type="float">
            <text:p>0,267</text:p>
          </table:table-cell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10.562" calcext:value-type="float">
            <text:p>10,562</text:p>
          </table:table-cell>
          <table:table-cell table:style-name="ce6" office:value-type="float" office:value="0.957" calcext:value-type="float">
            <text:p>0,957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5.7251" calcext:value-type="float">
            <text:p>5,7251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9.405" calcext:value-type="float">
            <text:p>329,405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29.649" calcext:value-type="float">
            <text:p>629,649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6.113" calcext:value-type="float">
            <text:p>6,113</text:p>
          </table:table-cell>
          <table:table-cell table:style-name="ce6" office:value-type="float" office:value="1.391" calcext:value-type="float">
            <text:p>1,391</text:p>
          </table:table-cell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33.639" calcext:value-type="float">
            <text:p>633,639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797" calcext:value-type="float">
            <text:p>0,797</text:p>
          </table:table-cell>
          <table:table-cell table:style-name="ce6" office:value-type="float" office:value="0.952" calcext:value-type="float">
            <text:p>0,952</text:p>
          </table:table-cell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417.417" calcext:value-type="float">
            <text:p>417,417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6099" calcext:value-type="float">
            <text:p>0,6099</text:p>
          </table:table-cell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47.949" calcext:value-type="float">
            <text:p>647,949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9" calcext:value-type="float">
            <text:p>0,919</text:p>
          </table:table-cell>
          <table:table-cell table:style-name="ce6"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505.958" calcext:value-type="float">
            <text:p>505,958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.382" calcext:value-type="float">
            <text:p>1,382</text:p>
          </table:table-cell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0.275" calcext:value-type="float">
            <text:p>420,275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612.136" calcext:value-type="float">
            <text:p>612,13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</table:table-row>
        <table:table-row table:style-name="ro3">
          <table:table-cell table:style-name="ce4"/>
          <table:table-cell table:style-name="ce7" table:formula="of:=AVERAGE([.B380:.B389])" office:value-type="float" office:value="530.590666666667" calcext:value-type="float">
            <text:p>530,590666666667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1.451" calcext:value-type="float">
            <text:p>1,451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13.257" calcext:value-type="float">
            <text:p>13,257</text:p>
          </table:table-cell>
          <table:table-cell table:style-name="ce6" office:value-type="float" office:value="3.857" calcext:value-type="float">
            <text:p>3,857</text:p>
          </table:table-cell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6.462" calcext:value-type="float">
            <text:p>6,462</text:p>
          </table:table-cell>
          <table:table-cell table:style-name="ce6" office:value-type="float" office:value="3.614" calcext:value-type="float">
            <text:p>3,614</text:p>
          </table:table-cell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6.916" calcext:value-type="float">
            <text:p>6,916</text:p>
          </table:table-cell>
          <table:table-cell table:style-name="ce6" office:value-type="float" office:value="3.452" calcext:value-type="float">
            <text:p>3,452</text:p>
          </table:table-cell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8.03" calcext:value-type="float">
            <text:p>8,03</text:p>
          </table:table-cell>
          <table:table-cell table:style-name="ce6" office:value-type="float" office:value="3.123" calcext:value-type="float">
            <text:p>3,123</text:p>
          </table:table-cell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7.525" calcext:value-type="float">
            <text:p>7,525</text:p>
          </table:table-cell>
          <table:table-cell table:style-name="ce6" office:value-type="float" office:value="3.822" calcext:value-type="float">
            <text:p>3,822</text:p>
          </table:table-cell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6.363" calcext:value-type="float">
            <text:p>6,363</text:p>
          </table:table-cell>
          <table:table-cell table:style-name="ce6" office:value-type="float" office:value="3.308" calcext:value-type="float">
            <text:p>3,308</text:p>
          </table:table-cell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4.833" calcext:value-type="float">
            <text:p>4,833</text:p>
          </table:table-cell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6.60888888888889" calcext:value-type="float">
            <text:p>6,60888888888889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1"/>
          <table:table-cell table:style-name="ce1" office:value-type="string" calcext:value-type="string">
            <text:p>NC=1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408.394" calcext:value-type="float">
            <text:p>408,394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33.841" calcext:value-type="float">
            <text:p>333,841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03.671" calcext:value-type="float">
            <text:p>403,671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39.026" calcext:value-type="float">
            <text:p>539,026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54.554" calcext:value-type="float">
            <text:p>454,55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310.472" calcext:value-type="float">
            <text:p>310,472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1.032" calcext:value-type="float">
            <text:p>211,032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</table:table-row>
        <table:table-row table:style-name="ro3">
          <table:table-cell table:style-name="ce4"/>
          <table:table-cell table:style-name="ce7" table:formula="of:=AVERAGE([.B406:.B415])" office:value-type="float" office:value="367.704777777778" calcext:value-type="float">
            <text:p>367,704777777778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562" calcext:value-type="float">
            <text:p>1,562</text:p>
          </table:table-cell>
          <table:table-cell table:style-name="ce6" office:value-type="float" office:value="1.535" calcext:value-type="float">
            <text:p>1,535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1.176" calcext:value-type="float">
            <text:p>1,176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56" calcext:value-type="float">
            <text:p>1,456</text:p>
          </table:table-cell>
          <table:table-cell table:style-name="ce6" office:value-type="float" office:value="1.38" calcext:value-type="float">
            <text:p>1,38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165" calcext:value-type="float">
            <text:p>1,165</text:p>
          </table:table-cell>
          <table:table-cell table:style-name="ce6" office:value-type="float" office:value="1.274" calcext:value-type="float">
            <text:p>1,274</text:p>
          </table:table-cell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03" calcext:value-type="float">
            <text:p>1,403</text:p>
          </table:table-cell>
          <table:table-cell table:style-name="ce6" office:value-type="float" office:value="1.448" calcext:value-type="float">
            <text:p>1,448</text:p>
          </table:table-cell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203" calcext:value-type="float">
            <text:p>1,203</text:p>
          </table:table-cell>
          <table:table-cell table:style-name="ce6" office:value-type="float" office:value="1.103" calcext:value-type="float">
            <text:p>1,103</text:p>
          </table:table-cell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1.743" calcext:value-type="float">
            <text:p>1,743</text:p>
          </table:table-cell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28" calcext:value-type="float">
            <text:p>1,128</text:p>
          </table:table-cell>
          <table:table-cell table:style-name="ce6" office:value-type="float" office:value="0.933" calcext:value-type="float">
            <text:p>0,933</text:p>
          </table:table-cell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154" calcext:value-type="float">
            <text:p>1,154</text:p>
          </table:table-cell>
          <table:table-cell table:style-name="ce6" office:value-type="float" office:value="1.389" calcext:value-type="float">
            <text:p>1,389</text:p>
          </table:table-cell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357" calcext:value-type="float">
            <text:p>1,357</text:p>
          </table:table-cell>
          <table:table-cell table:style-name="ce6" office:value-type="float" office:value="1.307" calcext:value-type="float">
            <text:p>1,307</text:p>
          </table:table-cell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185" calcext:value-type="float">
            <text:p>1,3185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327.903" calcext:value-type="float">
            <text:p>327,903</text:p>
          </table:table-cell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</table:table-row>
        <table:table-row table:style-name="ro3">
          <table:table-cell table:style-name="ce4"/>
          <table:table-cell table:style-name="ce7" table:formula="of:=AVERAGE([.B432:.B441])" office:value-type="float" office:value="107.805222222222" calcext:value-type="float">
            <text:p>107,805222222222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4.890444444445" calcext:value-type="float">
            <text:p>384,890444444445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2"/>
        </table:table-row>
        <table:table-row table:style-name="ro4" table:number-rows-repeated="2">
          <table:table-cell table:style-name="Default" table:number-columns-repeated="5"/>
          <table:table-cell table:style-name="ce8" table:number-columns-repeated="2"/>
        </table:table-row>
        <table:table-row table:style-name="ro4">
          <table:table-cell table:style-name="Default" table:number-columns-repeated="5"/>
          <table:table-cell table:style-name="ce8" table:number-columns-repeated="2"/>
        </table:table-row>
      </table:table>
      <table:table table:name="nc_averages" table:style-name="ta1">
        <table:table-column table:style-name="co10" table:default-cell-style-name="Default"/>
        <table:table-column table:style-name="co11" table:default-cell-style-name="ce16"/>
        <table:table-column table:style-name="co11" table:default-cell-style-name="ce21"/>
        <table:table-column table:style-name="co11" table:default-cell-style-name="ce16"/>
        <table:table-column table:style-name="co11" table:default-cell-style-name="ce21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8" office:value-type="string" calcext:value-type="string">
            <text:p>NC=200</text:p>
          </table:table-cell>
          <table:table-cell table:style-name="ce18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" calcext:value-type="percentage">
            <text:p>20,00%</text:p>
          </table:table-cell>
          <table:table-cell table:number-columns-repeated="3" office:value-type="percentage" office:value="0.178" calcext:value-type="percentage">
            <text:p>17,80%</text:p>
          </table:table-cell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2532" calcext:value-type="percentage">
            <text:p>25,32%</text:p>
          </table:table-cell>
          <table:table-cell table:number-columns-repeated="3" office:value-type="percentage" office:value="0.2043" calcext:value-type="percentage">
            <text:p>20,43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387" calcext:value-type="percentage">
            <text:p>23,87%</text:p>
          </table:table-cell>
          <table:table-cell table:number-columns-repeated="3" office:value-type="percentage" office:value="0.189" calcext:value-type="percentage">
            <text:p>18,90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1718" calcext:value-type="percentage">
            <text:p>17,18%</text:p>
          </table:table-cell>
          <table:table-cell table:number-columns-repeated="3" office:value-type="percentage" office:value="0.175" calcext:value-type="percentage">
            <text:p>17,50%</text:p>
          </table:table-cell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828" calcext:value-type="percentage">
            <text:p>38,28%</text:p>
          </table:table-cell>
          <table:table-cell table:number-columns-repeated="3" office:value-type="percentage" office:value="0.3628" calcext:value-type="percentage">
            <text:p>36,28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111" calcext:value-type="percentage">
            <text:p>11,10%</text:p>
          </table:table-cell>
          <table:table-cell table:number-columns-repeated="3" office:value-type="percentage" office:value="0.0504" calcext:value-type="percentage">
            <text:p>5,04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66" calcext:value-type="percentage">
            <text:p>48,66%</text:p>
          </table:table-cell>
          <table:table-cell table:number-columns-repeated="3" office:value-type="percentage" office:value="0.5014" calcext:value-type="percentage">
            <text:p>50,14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4169" calcext:value-type="percentage">
            <text:p>41,69%</text:p>
          </table:table-cell>
          <table:table-cell table:number-columns-repeated="3" office:value-type="percentage" office:value="0.398" calcext:value-type="percentage">
            <text:p>39,80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04" calcext:value-type="percentage">
            <text:p>60,40%</text:p>
          </table:table-cell>
          <table:table-cell table:number-columns-repeated="3" office:value-type="percentage" office:value="0.5836" calcext:value-type="percentage">
            <text:p>58,36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25" calcext:value-type="percentage">
            <text:p>22,50%</text:p>
          </table:table-cell>
          <table:table-cell table:number-columns-repeated="3" office:value-type="percentage" office:value="0.214" calcext:value-type="percentage">
            <text:p>21,40%</text:p>
          </table:table-cell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7009" calcext:value-type="percentage">
            <text:p>70,09%</text:p>
          </table:table-cell>
          <table:table-cell table:number-columns-repeated="3" office:value-type="percentage" office:value="0.5276" calcext:value-type="percentage">
            <text:p>52,76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617" calcext:value-type="percentage">
            <text:p>26,17%</text:p>
          </table:table-cell>
          <table:table-cell table:number-columns-repeated="3" office:value-type="percentage" office:value="0.2737" calcext:value-type="percentage">
            <text:p>27,37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4161" calcext:value-type="percentage">
            <text:p>41,61%</text:p>
          </table:table-cell>
          <table:table-cell table:number-columns-repeated="3" office:value-type="percentage" office:value="0.4008" calcext:value-type="percentage">
            <text:p>40,08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85" calcext:value-type="percentage">
            <text:p>22,85%</text:p>
          </table:table-cell>
          <table:table-cell table:number-columns-repeated="3" office:value-type="percentage" office:value="0.22" calcext:value-type="percentage">
            <text:p>22,00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179" calcext:value-type="percentage">
            <text:p>17,90%</text:p>
          </table:table-cell>
          <table:table-cell table:number-columns-repeated="3" office:value-type="percentage" office:value="0.1913" calcext:value-type="percentage">
            <text:p>19,1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5" calcext:value-type="percentage">
            <text:p>6,65%</text:p>
          </table:table-cell>
          <table:table-cell table:number-columns-repeated="3" office:value-type="percentage" office:value="0.0461" calcext:value-type="percentage">
            <text:p>4,61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466" calcext:value-type="percentage">
            <text:p>14,66%</text:p>
          </table:table-cell>
          <table:table-cell table:number-columns-repeated="3" office:value-type="percentage" office:value="0.1283" calcext:value-type="percentage">
            <text:p>12,83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295" calcext:value-type="percentage">
            <text:p>29,50%</text:p>
          </table:table-cell>
          <table:table-cell table:number-columns-repeated="3" office:value-type="percentage" office:value="0.3041" calcext:value-type="percentage">
            <text:p>30,41%</text:p>
          </table:table-cell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2972" calcext:value-type="percentage">
            <text:p>29,72%</text:p>
          </table:table-cell>
          <table:table-cell table:number-columns-repeated="3" office:value-type="percentage" office:value="0.2457" calcext:value-type="percentage">
            <text:p>24,57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827" calcext:value-type="percentage">
            <text:p>18,27%</text:p>
          </table:table-cell>
          <table:table-cell table:number-columns-repeated="3" office:value-type="percentage" office:value="0.1772" calcext:value-type="percentage">
            <text:p>17,72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595" calcext:value-type="percentage">
            <text:p>15,95%</text:p>
          </table:table-cell>
          <table:table-cell table:number-columns-repeated="3" office:value-type="percentage" office:value="0.1553" calcext:value-type="percentage">
            <text:p>15,53%</text:p>
          </table:table-cell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" calcext:value-type="percentage">
            <text:p>9,40%</text:p>
          </table:table-cell>
          <table:table-cell table:number-columns-repeated="3" office:value-type="percentage" office:value="0.0947" calcext:value-type="percentage">
            <text:p>9,47%</text:p>
          </table:table-cell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16" calcext:value-type="percentage">
            <text:p>16,00%</text:p>
          </table:table-cell>
          <table:table-cell table:number-columns-repeated="3" office:value-type="percentage" office:value="0.1559" calcext:value-type="percentage">
            <text:p>15,59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5" calcext:value-type="percentage">
            <text:p>23,50%</text:p>
          </table:table-cell>
          <table:table-cell table:number-columns-repeated="3" office:value-type="percentage" office:value="0.2359" calcext:value-type="percentage">
            <text:p>23,59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1" calcext:value-type="percentage">
            <text:p>5,91%</text:p>
          </table:table-cell>
          <table:table-cell table:number-columns-repeated="3" office:value-type="percentage" office:value="0.0561" calcext:value-type="percentage">
            <text:p>5,61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table:number-columns-repeated="4" office:value-type="percentage" office:value="0.2571" calcext:value-type="percentage">
            <text:p>25,71%</text:p>
          </table:table-cell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 office:value-type="percentage" office:value="0.0505" calcext:value-type="percentage">
            <text:p>5,05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846" calcext:value-type="percentage">
            <text:p>28,46%</text:p>
          </table:table-cell>
          <table:table-cell table:number-columns-repeated="3" office:value-type="percentage" office:value="0.2889" calcext:value-type="percentage">
            <text:p>28,89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496" calcext:value-type="percentage">
            <text:p>34,96%</text:p>
          </table:table-cell>
          <table:table-cell table:number-columns-repeated="3" office:value-type="percentage" office:value="0.3297" calcext:value-type="percentage">
            <text:p>32,97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table:style-name="ce21" office:value-type="percentage" office:value="0.3247" calcext:value-type="percentage">
            <text:p>32,47%</text:p>
          </table:table-cell>
          <table:table-cell table:number-columns-repeated="3" office:value-type="percentage" office:value="0.3247" calcext:value-type="percentage">
            <text:p>32,47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575" calcext:value-type="percentage">
            <text:p>25,75%</text:p>
          </table:table-cell>
          <table:table-cell table:number-columns-repeated="3" office:value-type="percentage" office:value="0.24" calcext:value-type="percentage">
            <text:p>24,00%</text:p>
          </table:table-cell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241" calcext:value-type="percentage">
            <text:p>12,41%</text:p>
          </table:table-cell>
          <table:table-cell table:number-columns-repeated="3" office:value-type="percentage" office:value="0.1054" calcext:value-type="percentage">
            <text:p>10,54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059" calcext:value-type="percentage">
            <text:p>40,59%</text:p>
          </table:table-cell>
          <table:table-cell table:number-columns-repeated="3" office:value-type="percentage" office:value="0.4103" calcext:value-type="percentage">
            <text:p>41,03%</text:p>
          </table:table-cell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378" calcext:value-type="percentage">
            <text:p>23,78%</text:p>
          </table:table-cell>
          <table:table-cell table:number-columns-repeated="3" office:value-type="percentage" office:value="0.2389" calcext:value-type="percentage">
            <text:p>23,89%</text:p>
          </table:table-cell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218" calcext:value-type="percentage">
            <text:p>22,18%</text:p>
          </table:table-cell>
          <table:table-cell table:number-columns-repeated="3" office:value-type="percentage" office:value="0.1243" calcext:value-type="percentage">
            <text:p>12,43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91" calcext:value-type="percentage">
            <text:p>25,91%</text:p>
          </table:table-cell>
          <table:table-cell table:number-columns-repeated="3" office:value-type="percentage" office:value="0.2523" calcext:value-type="percentage">
            <text:p>25,23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table:style-name="ce21" office:value-type="percentage" office:value="0.0419" calcext:value-type="percentage">
            <text:p>4,19%</text:p>
          </table:table-cell>
          <table:table-cell table:number-columns-repeated="3" office:value-type="percentage" office:value="0.0419" calcext:value-type="percentage">
            <text:p>4,19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" calcext:value-type="percentage">
            <text:p>11,00%</text:p>
          </table:table-cell>
          <table:table-cell table:number-columns-repeated="3" office:value-type="percentage" office:value="0.1059" calcext:value-type="percentage">
            <text:p>10,59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table:style-name="ce21" office:value-type="percentage" office:value="0.0468" calcext:value-type="percentage">
            <text:p>4,68%</text:p>
          </table:table-cell>
          <table:table-cell table:number-columns-repeated="3" office:value-type="percentage" office:value="0.0468" calcext:value-type="percentage">
            <text:p>4,68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table:style-name="ce21" office:value-type="percentage" office:value="0.0547" calcext:value-type="percentage">
            <text:p>5,47%</text:p>
          </table:table-cell>
          <table:table-cell table:number-columns-repeated="3" office:value-type="percentage" office:value="0.0547" calcext:value-type="percentage">
            <text:p>5,47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table:style-name="ce21" office:value-type="percentage" office:value="0.0182" calcext:value-type="percentage">
            <text:p>1,82%</text:p>
          </table:table-cell>
          <table:table-cell table:number-columns-repeated="3" office:value-type="percentage" office:value="0.0182" calcext:value-type="percentage">
            <text:p>1,82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31" calcext:value-type="percentage">
            <text:p>13,10%</text:p>
          </table:table-cell>
          <table:table-cell table:number-columns-repeated="3" office:value-type="percentage" office:value="0.106" calcext:value-type="percentage">
            <text:p>10,60%</text:p>
          </table:table-cell>
        </table:table-row>
        <table:table-row table:style-name="ro5">
          <table:table-cell table:style-name="ce14"/>
          <table:table-cell table:style-name="ce17" table:formula="of:=AVERAGE([.B3:.B44])" office:value-type="percentage" office:value="0.232271428571429" calcext:value-type="percentage">
            <text:p>23,23%</text:p>
          </table:table-cell>
          <table:table-cell table:style-name="ce17" table:formula="of:=AVERAGE([.C3:.C44])" office:value-type="percentage" office:value="0.215828571428571" calcext:value-type="percentage">
            <text:p>21,58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5828571428571" calcext:value-type="percentage">
            <text:p>21,58%</text:p>
          </table:table-cell>
        </table:table-row>
        <table:table-row table:style-name="ro1">
          <table:table-cell table:style-name="ce12" table:number-columns-repeated="5"/>
        </table:table-row>
        <table:table-row table:style-name="ro3">
          <table:table-cell table:style-name="ce36" table:number-columns-repeated="2"/>
          <table:table-cell table:style-name="ce42" table:number-columns-repeated="3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2" office:value-type="string" calcext:value-type="string">
            <text:p>NC=200</text:p>
          </table:table-cell>
          <table:table-cell table:style-name="ce12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3018.4734/417" office:value-type="float" office:value="7.23854532374101" calcext:value-type="float">
            <text:p>7,23854532374101</text:p>
          </table:table-cell>
          <table:table-cell table:style-name="ce19" table:formula="of:=2658.12756/417" office:value-type="float" office:value="6.37440661870504" calcext:value-type="float">
            <text:p>6,3744066187050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9" table:formula="of:=2658.12756/417" office:value-type="float" office:value="6.37440661870504" calcext:value-type="float">
            <text:p>6,37440661870504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94/150" office:value-type="float" office:value="0.00396" calcext:value-type="float">
            <text:p>0,00396</text:p>
          </table:table-cell>
          <table:table-cell table:style-name="ce19" table:formula="of:=0.58498/150" office:value-type="float" office:value="0.00389986666666667" calcext:value-type="float">
            <text:p>0,00389986666666667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9" table:formula="of:=0.58498/150" office:value-type="float" office:value="0.00389986666666667" calcext:value-type="float">
            <text:p>0,00389986666666667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9" table:formula="of:=390.7357/39" office:value-type="float" office:value="10.0188641025641" calcext:value-type="float">
            <text:p>10,0188641025641</text:p>
          </table:table-cell>
          <table:table-cell table:style-name="ce19" table:formula="of:=390.7357/39" office:value-type="float" office:value="10.0188641025641" calcext:value-type="float">
            <text:p>10,0188641025641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9" table:formula="of:=390.7357/39" office:value-type="float" office:value="10.0188641025641" calcext:value-type="float">
            <text:p>10,0188641025641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9" table:formula="of:=0.18796/9" office:value-type="float" office:value="0.0208844444444444" calcext:value-type="float">
            <text:p>0,0208844444444444</text:p>
          </table:table-cell>
          <table:table-cell table:style-name="ce19" table:formula="of:=0.18796/9" office:value-type="float" office:value="0.0208844444444444" calcext:value-type="float">
            <text:p>0,0208844444444444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9" table:formula="of:=0.18796/9" office:value-type="float" office:value="0.0208844444444444" calcext:value-type="float">
            <text:p>0,0208844444444444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table:style-name="ce19" table:formula="of:=0.001966/4" office:value-type="float" office:value="0.0004915" calcext:value-type="float">
            <text:p>0,0004915</text:p>
          </table:table-cell>
          <table:table-cell table:style-name="ce19" table:formula="of:=0.001966/4" office:value-type="float" office:value="0.0004915" calcext:value-type="float">
            <text:p>0,00049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9" table:formula="of:=0.001966/4" office:value-type="float" office:value="0.0004915" calcext:value-type="float">
            <text:p>0,0004915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1852.912/33" office:value-type="float" office:value="56.1488484848485" calcext:value-type="float">
            <text:p>56,1488484848485</text:p>
          </table:table-cell>
          <table:table-cell table:style-name="ce19" table:formula="of:=1755.743/33" office:value-type="float" office:value="53.2043333333333" calcext:value-type="float">
            <text:p>53,2043333333333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9" table:formula="of:=1755.743/33" office:value-type="float" office:value="53.2043333333333" calcext:value-type="float">
            <text:p>53,20433333333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1.07305/103" office:value-type="float" office:value="0.0104179611650485" calcext:value-type="float">
            <text:p>0,0104179611650485</text:p>
          </table:table-cell>
          <table:table-cell table:style-name="ce19" table:formula="of:=0.7884/103" office:value-type="float" office:value="0.00765436893203884" calcext:value-type="float">
            <text:p>0,00765436893203884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9" table:formula="of:=0.7884/103" office:value-type="float" office:value="0.00765436893203884" calcext:value-type="float">
            <text:p>0,00765436893203884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table:style-name="ce19" table:formula="of:=5.6117/36" office:value-type="float" office:value="0.155880555555556" calcext:value-type="float">
            <text:p>0,155880555555556</text:p>
          </table:table-cell>
          <table:table-cell table:style-name="ce19" table:formula="of:=5.6117/36" office:value-type="float" office:value="0.155880555555556" calcext:value-type="float">
            <text:p>0,155880555555556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9" table:formula="of:=5.6117/36" office:value-type="float" office:value="0.155880555555556" calcext:value-type="float">
            <text:p>0,15588055555555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9" table:formula="of:=0.48198/25" office:value-type="float" office:value="0.0192792" calcext:value-type="float">
            <text:p>0,0192792</text:p>
          </table:table-cell>
          <table:table-cell table:style-name="ce19" table:formula="of:=0.48198/25" office:value-type="float" office:value="0.0192792" calcext:value-type="float">
            <text:p>0,0192792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9" table:formula="of:=0.48198/25" office:value-type="float" office:value="0.0192792" calcext:value-type="float">
            <text:p>0,0192792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table:style-name="ce19" table:formula="of:=0.61067/12" office:value-type="float" office:value="0.0508891666666667" calcext:value-type="float">
            <text:p>0,0508891666666667</text:p>
          </table:table-cell>
          <table:table-cell table:style-name="ce19" table:formula="of:=0.61067/12" office:value-type="float" office:value="0.0508891666666667" calcext:value-type="float">
            <text:p>0,0508891666666667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9" table:formula="of:=0.61067/12" office:value-type="float" office:value="0.0508891666666667" calcext:value-type="float">
            <text:p>0,0508891666666667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 table:style-name="ce19" table:formula="of:=0.34259/50" office:value-type="float" office:value="0.0068518" calcext:value-type="float">
            <text:p>0,0068518</text:p>
          </table:table-cell>
          <table:table-cell table:style-name="ce19" table:formula="of:=0.34259/50" office:value-type="float" office:value="0.0068518" calcext:value-type="float">
            <text:p>0,0068518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9" table:formula="of:=0.34259/50" office:value-type="float" office:value="0.0068518" calcext:value-type="float">
            <text:p>0,0068518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 table:style-name="ce19" table:formula="of:=518.1206/50" office:value-type="float" office:value="10.362412" calcext:value-type="float">
            <text:p>10,362412</text:p>
          </table:table-cell>
          <table:table-cell table:style-name="ce19" table:formula="of:=518.1206/50" office:value-type="float" office:value="10.362412" calcext:value-type="float">
            <text:p>10,362412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9" table:formula="of:=518.1206/50" office:value-type="float" office:value="10.362412" calcext:value-type="float">
            <text:p>10,362412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5.7251/99" office:value-type="float" office:value="0.0578292929292929" calcext:value-type="float">
            <text:p>0,0578292929292929</text:p>
          </table:table-cell>
          <table:table-cell table:style-name="ce19" table:formula="of:=1.96189/99" office:value-type="float" office:value="0.0198170707070707" calcext:value-type="float">
            <text:p>0,0198170707070707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9" table:formula="of:=1.96189/99" office:value-type="float" office:value="0.0198170707070707" calcext:value-type="float">
            <text:p>0,0198170707070707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 table:style-name="ce19" table:formula="of:=0.28052/18" office:value-type="float" office:value="0.0155844444444444" calcext:value-type="float">
            <text:p>0,0155844444444444</text:p>
          </table:table-cell>
          <table:table-cell table:style-name="ce19" table:formula="of:=0.28052/18" office:value-type="float" office:value="0.0155844444444444" calcext:value-type="float">
            <text:p>0,0155844444444444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9" table:formula="of:=0.28052/18" office:value-type="float" office:value="0.0155844444444444" calcext:value-type="float">
            <text:p>0,0155844444444444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9" table:formula="of:=0.39467/6" office:value-type="float" office:value="0.0657783333333333" calcext:value-type="float">
            <text:p>0,0657783333333333</text:p>
          </table:table-cell>
          <table:table-cell table:style-name="ce19" table:formula="of:=0.39467/6" office:value-type="float" office:value="0.0657783333333333" calcext:value-type="float">
            <text:p>0,0657783333333333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9" table:formula="of:=0.39467/6" office:value-type="float" office:value="0.0657783333333333" calcext:value-type="float">
            <text:p>0,0657783333333333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table:style-name="ce19" table:formula="of:=0.9946/104" office:value-type="float" office:value="0.00956346153846154" calcext:value-type="float">
            <text:p>0,00956346153846154</text:p>
          </table:table-cell>
          <table:table-cell table:style-name="ce19" table:formula="of:=0.9946/104" office:value-type="float" office:value="0.00956346153846154" calcext:value-type="float">
            <text:p>0,00956346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9" table:formula="of:=0.9946/104" office:value-type="float" office:value="0.00956346153846154" calcext:value-type="float">
            <text:p>0,00956346153846154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9" table:formula="of:=0.08165/13" office:value-type="float" office:value="0.00628076923076923" calcext:value-type="float">
            <text:p>0,00628076923076923</text:p>
          </table:table-cell>
          <table:table-cell table:style-name="ce19" table:formula="of:=0.08165/13" office:value-type="float" office:value="0.00628076923076923" calcext:value-type="float">
            <text:p>0,00628076923076923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9" table:formula="of:=0.08165/13" office:value-type="float" office:value="0.00628076923076923" calcext:value-type="float">
            <text:p>0,0062807692307692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9" table:formula="of:=380.2022/165" office:value-type="float" office:value="2.30425575757576" calcext:value-type="float">
            <text:p>2,30425575757576</text:p>
          </table:table-cell>
          <table:table-cell table:style-name="ce19" table:formula="of:=380.2022/165" office:value-type="float" office:value="2.30425575757576" calcext:value-type="float">
            <text:p>2,30425575757576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9" table:formula="of:=380.2022/165" office:value-type="float" office:value="2.30425575757576" calcext:value-type="float">
            <text:p>2,30425575757576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9" table:formula="of:=0.10366/7" office:value-type="float" office:value="0.0148085714285714" calcext:value-type="float">
            <text:p>0,0148085714285714</text:p>
          </table:table-cell>
          <table:table-cell table:style-name="ce19" table:formula="of:=0.10366/7" office:value-type="float" office:value="0.0148085714285714" calcext:value-type="float">
            <text:p>0,0148085714285714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9" table:formula="of:=0.10366/7" office:value-type="float" office:value="0.0148085714285714" calcext:value-type="float">
            <text:p>0,0148085714285714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 table:style-name="ce19" table:formula="of:=3.8798/165" office:value-type="float" office:value="0.0235139393939394" calcext:value-type="float">
            <text:p>0,0235139393939394</text:p>
          </table:table-cell>
          <table:table-cell table:style-name="ce19" table:formula="of:=3.8798/165" office:value-type="float" office:value="0.0235139393939394" calcext:value-type="float">
            <text:p>0,0235139393939394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9" table:formula="of:=3.8798/165" office:value-type="float" office:value="0.0235139393939394" calcext:value-type="float">
            <text:p>0,0235139393939394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9" table:formula="of:=7.8046/217" office:value-type="float" office:value="0.0359658986175115" calcext:value-type="float">
            <text:p>0,0359658986175115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9" table:formula="of:=7.8046/217" office:value-type="float" office:value="0.0359658986175115" calcext:value-type="float">
            <text:p>0,0359658986175115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3185/57" office:value-type="float" office:value="0.0231315789473684" calcext:value-type="float">
            <text:p>0,0231315789473684</text:p>
          </table:table-cell>
          <table:table-cell table:style-name="ce19" table:formula="of:=1.3531/57" office:value-type="float" office:value="0.0237385964912281" calcext:value-type="float">
            <text:p>0,0237385964912281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9" table:formula="of:=1.3531/57" office:value-type="float" office:value="0.0237385964912281" calcext:value-type="float">
            <text:p>0,0237385964912281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9" table:formula="of:=114.7143/95" office:value-type="float" office:value="1.20751894736842" calcext:value-type="float">
            <text:p>1,20751894736842</text:p>
          </table:table-cell>
          <table:table-cell table:style-name="ce19" table:formula="of:=114.7143/95" office:value-type="float" office:value="1.20751894736842" calcext:value-type="float">
            <text:p>1,207518947368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9" table:formula="of:=114.7143/95" office:value-type="float" office:value="1.20751894736842" calcext:value-type="float">
            <text:p>1,20751894736842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table:style-name="ce19" table:formula="of:=4.8966/104" office:value-type="float" office:value="0.0470826923076923" calcext:value-type="float">
            <text:p>0,0470826923076923</text:p>
          </table:table-cell>
          <table:table-cell table:style-name="ce19" table:formula="of:=4.8966/104" office:value-type="float" office:value="0.0470826923076923" calcext:value-type="float">
            <text:p>0,0470826923076923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9" table:formula="of:=4.8966/104" office:value-type="float" office:value="0.0470826923076923" calcext:value-type="float">
            <text:p>0,0470826923076923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 table:style-name="ce19" table:formula="of:=0.51653/13" office:value-type="float" office:value="0.0397330769230769" calcext:value-type="float">
            <text:p>0,0397330769230769</text:p>
          </table:table-cell>
          <table:table-cell table:style-name="ce19" table:formula="of:=0.51653/13" office:value-type="float" office:value="0.0397330769230769" calcext:value-type="float">
            <text:p>0,0397330769230769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9" table:formula="of:=0.51653/13" office:value-type="float" office:value="0.0397330769230769" calcext:value-type="float">
            <text:p>0,0397330769230769</text:p>
          </table:table-cell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5">
          <table:table-cell table:style-name="ce14"/>
          <table:table-cell table:style-name="ce14" table:formula="of:=AVERAGE([.B50:.B74])" office:value-type="float" office:value="3.51553485212096" calcext:value-type="float">
            <text:p>3,51553485212096</text:p>
          </table:table-cell>
          <table:table-cell table:style-name="ce14" table:formula="of:=AVERAGE([.C50:.C74])" office:value-type="float" office:value="3.36157954064913" calcext:value-type="float">
            <text:p>3,36157954064913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36157954064913" calcext:value-type="float">
            <text:p>3,36157954064913</text:p>
          </table:table-cell>
        </table:table-row>
        <table:table-row table:style-name="ro1">
          <table:table-cell table:style-name="ce12" table:number-columns-repeated="2"/>
          <table:table-cell table:style-name="ce18" table:number-columns-repeated="3"/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4">
          <table:table-cell office:value-type="string" calcext:value-type="string">
            <text:p>F=4</text:p>
          </table:table-cell>
          <table:table-cell table:style-name="Default" table:number-columns-repeated="4"/>
        </table:table-row>
      </table:table>
      <table:table table:name="Φύλλο6" table:style-name="ta1">
        <table:table-column table:style-name="co9" table:number-columns-repeated="16379" table:default-cell-style-name="Default"/>
        <table:table-row table:style-name="ro4">
          <table:table-cell office:value-type="string" calcext:value-type="string">
            <text:p>nt</text:p>
          </table:table-cell>
          <table:table-cell office:value-type="string" calcext:value-type="string">
            <text:p>ve</text:p>
          </table:table-cell>
          <table:table-cell table:number-columns-repeated="16377"/>
        </table:table-row>
        <table:table-row table:style-name="ro4">
          <table:table-cell office:value-type="float" office:value="0.1197" calcext:value-type="float">
            <text:p>0,1197</text:p>
          </table:table-cell>
          <table:table-cell office:value-type="float" office:value="0.0727" calcext:value-type="float">
            <text:p>0,0727</text:p>
          </table:table-cell>
          <table:table-cell table:number-columns-repeated="16377"/>
        </table:table-row>
        <table:table-row table:style-name="ro4">
          <table:table-cell office:value-type="float" office:value="0.0871" calcext:value-type="float">
            <text:p>0,0871</text:p>
          </table:table-cell>
          <table:table-cell office:value-type="float" office:value="0.0648" calcext:value-type="float">
            <text:p>0,0648</text:p>
          </table:table-cell>
          <table:table-cell table:number-columns-repeated="16377"/>
        </table:table-row>
        <table:table-row table:style-name="ro4">
          <table:table-cell office:value-type="float" office:value="0.151" calcext:value-type="float">
            <text:p>0,151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4">
          <table:table-cell office:value-type="float" office:value="0.113" calcext:value-type="float">
            <text:p>0,113</text:p>
          </table:table-cell>
          <table:table-cell office:value-type="float" office:value="0.176" calcext:value-type="float">
            <text:p>0,176</text:p>
          </table:table-cell>
          <table:table-cell table:number-columns-repeated="16377"/>
        </table:table-row>
        <table:table-row table:style-name="ro4">
          <table:table-cell office:value-type="float" office:value="0.142" calcext:value-type="float">
            <text:p>0,142</text:p>
          </table:table-cell>
          <table:table-cell office:value-type="float" office:value="0.141" calcext:value-type="float">
            <text:p>0,141</text:p>
          </table:table-cell>
          <table:table-cell table:number-columns-repeated="16377"/>
        </table:table-row>
        <table:table-row table:style-name="ro4">
          <table:table-cell office:value-type="float" office:value="0.115" calcext:value-type="float">
            <text:p>0,115</text:p>
          </table:table-cell>
          <table:table-cell office:value-type="float" office:value="0.202" calcext:value-type="float">
            <text:p>0,202</text:p>
          </table:table-cell>
          <table:table-cell table:number-columns-repeated="16377"/>
        </table:table-row>
        <table:table-row table:style-name="ro4">
          <table:table-cell office:value-type="float" office:value="0.0923" calcext:value-type="float">
            <text:p>0,0923</text:p>
          </table:table-cell>
          <table:table-cell office:value-type="float" office:value="0.1497" calcext:value-type="float">
            <text:p>0,1497</text:p>
          </table:table-cell>
          <table:table-cell table:number-columns-repeated="16377"/>
        </table:table-row>
        <table:table-row table:style-name="ro4">
          <table:table-cell office:value-type="float" office:value="0.084" calcext:value-type="float">
            <text:p>0,084</text:p>
          </table:table-cell>
          <table:table-cell office:value-type="float" office:value="0.865" calcext:value-type="float">
            <text:p>0,865</text:p>
          </table:table-cell>
          <table:table-cell table:number-columns-repeated="16377"/>
        </table:table-row>
        <table:table-row table:style-name="ro4">
          <table:table-cell office:value-type="float" office:value="0.156" calcext:value-type="float">
            <text:p>0,156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0.1278" calcext:value-type="float">
            <text:p>0,1278</text:p>
          </table:table-cell>
          <table:table-cell table:number-columns-repeated="16377"/>
        </table:table-row>
        <table:table-row table:style-name="ro1">
          <table:table-cell table:style-name="ce12" table:formula="of:=AVERAGE([.A2:.A11])" office:value-type="float" office:value="0.13231" calcext:value-type="float">
            <text:p>0,13231</text:p>
          </table:table-cell>
          <table:table-cell table:style-name="ce12" table:formula="of:=AVERAGE([.B2:.B11])" office:value-type="float" office:value="0.2988" calcext:value-type="float">
            <text:p>0,2988</text:p>
          </table:table-cell>
          <table:table-cell table:style-name="ce12" table:number-columns-repeated="16377"/>
        </table:table-row>
        <table:table-row table:style-name="ro4">
          <table:table-cell table:formula="of:=[.A12]/13" office:value-type="float" office:value="0.0101776923076923" calcext:value-type="float">
            <text:p>0,0101776923076923</text:p>
          </table:table-cell>
          <table:table-cell table:formula="of:=[.B12]/13" office:value-type="float" office:value="0.0229846153846154" calcext:value-type="float">
            <text:p>0,022984615384615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20:58:24.38016259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20T22:52:52.115508766</dc:date>
    <meta:editing-duration>P3DT50M31S</meta:editing-duration>
    <meta:editing-cycles>1265</meta:editing-cycles>
    <meta:generator>LibreOffice/25.2.3.2$Linux_X86_64 LibreOffice_project/520$Build-2</meta:generator>
    <meta:document-statistic meta:table-count="6" meta:cell-count="6018" meta:object-count="0"/>
  </office:meta>
</office:document-meta>
</file>