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28" style:family="table-cell" style:parent-style-name="Default" style:data-style-name="N11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276" calcext:value-type="percentage">
            <text:p>12,76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2" table:style-name="ce3" office:value-type="percentage" office:value="0.0149" calcext:value-type="percentage">
            <text:p>1,49%</text:p>
          </table:table-cell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2" table:style-name="ce3" office:value-type="percentage" office:value="0.0662" calcext:value-type="percentage">
            <text:p>6,62%</text:p>
          </table:table-cell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2" table:style-name="ce3" office:value-type="percentage" office:value="0.0743" calcext:value-type="percentage">
            <text:p>7,43%</text:p>
          </table:table-cell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2" table:style-name="ce3" office:value-type="percentage" office:value="0.0459" calcext:value-type="percentage">
            <text:p>4,59%</text:p>
          </table:table-cell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2"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5</text:p>
          </table:table-cell>
          <table:table-cell table:style-name="ce3" office:value-type="percentage" office:value="0.0135" calcext:value-type="percentage">
            <text:p>1,35%</text:p>
          </table:table-cell>
          <table:table-cell table:style-name="ce3" office:value-type="percentage" office:value="0.0649" calcext:value-type="percentage">
            <text:p>6,49%</text:p>
          </table:table-cell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2" table:style-name="ce3" office:value-type="percentage" office:value="0.0635" calcext:value-type="percentage">
            <text:p>6,35%</text:p>
          </table:table-cell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064" calcext:value-type="percentage">
            <text:p>10,64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2" table:style-name="ce3"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2" table:style-name="ce3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064" calcext:value-type="percentage">
            <text:p>10,64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2" table:style-name="ce3" office:value-type="percentage" office:value="0.0608" calcext:value-type="percentage">
            <text:p>6,08%</text:p>
          </table:table-cell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2" office:value-type="percentage" office:value="0.0554" calcext:value-type="percentage">
            <text:p>5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0426" calcext:value-type="percentage">
            <text:p>20,43%</text:p>
          </table:table-cell>
          <table:table-cell table:style-name="ce1" table:formula="of:=AVERAGE([.C2:.C11])" office:value-type="percentage" office:value="0.20211" calcext:value-type="percentage">
            <text:p>20,21%</text:p>
          </table:table-cell>
          <table:table-cell/>
          <table:table-cell table:style-name="ce1"/>
          <table:table-cell table:style-name="ce1" table:formula="of:=AVERAGE([.F2:.F11])" office:value-type="percentage" office:value="0.05054" calcext:value-type="percentage">
            <text:p>5,05%</text:p>
          </table:table-cell>
          <table:table-cell table:style-name="ce1" table:formula="of:=AVERAGE([.G2:.G11])" office:value-type="percentage" office:value="0.05568" calcext:value-type="percentage">
            <text:p>5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Statheart_1</text:p>
          </table:table-cell>
          <table:table-cell table:style-name="ce3" office:value-type="percentage" office:value="0.2296" calcext:value-type="percentage">
            <text:p>22,96%</text:p>
          </table:table-cell>
          <table:table-cell table:style-name="ce3" office:value-type="percentage" office:value="0.1963" calcext:value-type="percentage">
            <text:p>19,63%</text:p>
          </table:table-cell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22" calcext:value-type="percentage">
            <text:p>17,22%</text:p>
          </table:table-cell>
          <table:table-cell/>
          <table:table-cell office:value-type="string" calcext:value-type="string">
            <text:p>Statheart_2</text:p>
          </table:table-cell>
          <table:table-cell table:style-name="ce3" office:value-type="percentage" office:value="0.1852" calcext:value-type="percentage">
            <text:p>18,52%</text:p>
          </table:table-cell>
          <table:table-cell table:style-name="ce3" office:value-type="percentage" office:value="0.1704" calcext:value-type="percentage">
            <text:p>17,04%</text:p>
          </table:table-cell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44" calcext:value-type="percentage">
            <text:p>14,44%</text:p>
          </table:table-cell>
          <table:table-cell/>
          <table:table-cell office:value-type="string" calcext:value-type="string">
            <text:p>Statheart_3</text:p>
          </table:table-cell>
          <table:table-cell table:number-columns-repeated="2" table:style-name="ce3" office:value-type="percentage" office:value="0.2296" calcext:value-type="percentage">
            <text:p>22,96%</text:p>
          </table:table-cell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4</text:p>
          </table:table-cell>
          <table:table-cell table:style-name="ce3" office:value-type="percentage" office:value="0.2926" calcext:value-type="percentage">
            <text:p>29,26%</text:p>
          </table:table-cell>
          <table:table-cell table:style-name="ce3" office:value-type="percentage" office:value="0.2963" calcext:value-type="percentage">
            <text:p>29,63%</text:p>
          </table:table-cell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 office:value-type="percentage" office:value="0.263" calcext:value-type="percentage">
            <text:p>26,30%</text:p>
          </table:table-cell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Statheart_6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7" calcext:value-type="percentage">
            <text:p>33,70%</text:p>
          </table:table-cell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Statheart_7</text:p>
          </table:table-cell>
          <table:table-cell table:style-name="ce3" office:value-type="percentage" office:value="0.2185" calcext:value-type="percentage">
            <text:p>21,85%</text:p>
          </table:table-cell>
          <table:table-cell table:style-name="ce3" office:value-type="percentage" office:value="0.2148" calcext:value-type="percentage">
            <text:p>21,48%</text:p>
          </table:table-cell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Statheart_8</text:p>
          </table:table-cell>
          <table:table-cell table:number-columns-repeated="2" table:style-name="ce3" office:value-type="percentage" office:value="0.2593" calcext:value-type="percentage">
            <text:p>25,93%</text:p>
          </table:table-cell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Statheart_9</text:p>
          </table:table-cell>
          <table:table-cell table:style-name="ce3" office:value-type="percentage" office:value="0.1556" calcext:value-type="percentage">
            <text:p>15,56%</text:p>
          </table:table-cell>
          <table:table-cell table:style-name="ce3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463" calcext:value-type="percentage">
            <text:p>14,63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15593" calcext:value-type="percentage">
            <text:p>15,59%</text:p>
          </table:table-cell>
          <table:table-cell table:style-name="ce1" table:formula="of:=AVERAGE([.C14:.C23])" office:value-type="percentage" office:value="0.15815" calcext:value-type="percentage">
            <text:p>15,82%</text:p>
          </table:table-cell>
          <table:table-cell/>
          <table:table-cell table:style-name="ce1"/>
          <table:table-cell table:style-name="ce1" table:formula="of:=AVERAGE([.F14:.F23])" office:value-type="percentage" office:value="0.23889" calcext:value-type="percentage">
            <text:p>23,89%</text:p>
          </table:table-cell>
          <table:table-cell table:style-name="ce1" table:formula="of:=AVERAGE([.G14:.G23])" office:value-type="percentage" office:value="0.23259" calcext:value-type="percentage">
            <text:p>23,2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5712" calcext:value-type="percentage">
            <text:p>57,12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4357" calcext:value-type="percentage">
            <text:p>43,57%</text:p>
          </table:table-cell>
          <table:table-cell table:style-name="ce3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516" calcext:value-type="percentage">
            <text:p>55,16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string" calcext:value-type="string">
            <text:p>x</text:p>
          </table:table-cell>
          <table:table-cell office:value-type="percentage" office:value="0.5302" calcext:value-type="percentage">
            <text:p>53,02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/>
          <table:table-cell office:value-type="percentage" office:value="0.5125" calcext:value-type="percentage">
            <text:p>51,25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071" calcext:value-type="percentage">
            <text:p>10,71%</text:p>
          </table:table-cell>
          <table:table-cell table:style-name="ce3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/>
          <table:table-cell office:value-type="percentage" office:value="0.7189" calcext:value-type="percentage">
            <text:p>71,89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/>
          <table:table-cell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1786" calcext:value-type="percentage">
            <text:p>17,86%</text:p>
          </table:table-cell>
          <table:table-cell table:style-name="ce3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/>
          <table:table-cell office:value-type="percentage" office:value="0.5427" calcext:value-type="percentage">
            <text:p>54,27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1786" calcext:value-type="percentage">
            <text:p>17,86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/>
          <table:table-cell office:value-type="percentage" office:value="0.5641" calcext:value-type="percentage">
            <text:p>56,41%</text:p>
          </table:table-cell>
          <table:table-cell/>
          <table:table-cell office:value-type="string" calcext:value-type="string">
            <text:p>Lymography_9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/>
          <table:table-cell office:value-type="percentage" office:value="0.5743" calcext:value-type="percentage">
            <text:p>57,43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:.B35])" office:value-type="percentage" office:value="0.55245" calcext:value-type="percentage">
            <text:p>55,25%</text:p>
          </table:table-cell>
          <table:table-cell table:style-name="ce1" table:formula="of:=AVERAGE([.C26:.C35])" office:value-type="percentage" office:value="0.56029" calcext:value-type="percentage">
            <text:p>56,03%</text:p>
          </table:table-cell>
          <table:table-cell/>
          <table:table-cell table:style-name="ce1"/>
          <table:table-cell table:style-name="ce1" table:formula="of:=AVERAGE([.F26:.F35])" office:value-type="percentage" office:value="0.24572" calcext:value-type="percentage">
            <text:p>24,57%</text:p>
          </table:table-cell>
          <table:table-cell table:style-name="ce1" table:formula="of:=AVERAGE([.G26:.G35])" office:value-type="percentage" office:value="0.23357" calcext:value-type="percentage">
            <text:p>23,3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1042" calcext:value-type="percentage">
            <text:p>10,42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065" calcext:value-type="percentage">
            <text:p>10,65%</text:p>
          </table:table-cell>
          <table:table-cell table:style-name="ce3" office:value-type="percentage" office:value="0.1022" calcext:value-type="percentage">
            <text:p>10,22%</text:p>
          </table:table-cell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table:number-columns-repeated="2"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1065" calcext:value-type="percentage">
            <text:p>10,65%</text:p>
          </table:table-cell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2" office:value-type="percentage" office:value="0.0969" calcext:value-type="percentage">
            <text:p>9,69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59" calcext:value-type="percentage">
            <text:p>8,59%</text:p>
          </table:table-cell>
          <table:table-cell office:value-type="percentage" office:value="0.0896" calcext:value-type="percentage">
            <text:p>8,96%</text:p>
          </table:table-cell>
          <table:table-cell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2"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09469" calcext:value-type="percentage">
            <text:p>9,47%</text:p>
          </table:table-cell>
          <table:table-cell table:style-name="ce1" table:formula="of:=AVERAGE([.C38:.C47])" office:value-type="percentage" office:value="0.09362" calcext:value-type="percentage">
            <text:p>9,36%</text:p>
          </table:table-cell>
          <table:table-cell/>
          <table:table-cell table:style-name="ce1"/>
          <table:table-cell table:style-name="ce1" table:formula="of:=AVERAGE([.F38:.F47])" office:value-type="percentage" office:value="0.1054" calcext:value-type="percentage">
            <text:p>10,54%</text:p>
          </table:table-cell>
          <table:table-cell table:style-name="ce1" table:formula="of:=AVERAGE([.G38:.G47])" office:value-type="percentage" office:value="0.10435" calcext:value-type="percentage">
            <text:p>10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Australian_2</text:p>
          </table:table-cell>
          <table:table-cell table:style-name="ce3" office:value-type="percentage" office:value="0.1101" calcext:value-type="percentage">
            <text:p>11,01%</text:p>
          </table:table-cell>
          <table:table-cell table:style-name="ce3" office:value-type="percentage" office:value="0.1217" calcext:value-type="percentage">
            <text:p>12,17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928" calcext:value-type="percentage">
            <text:p>19,28%</text:p>
          </table:table-cell>
          <table:table-cell table:style-name="ce3" office:value-type="percentage" office:value="0.2072" calcext:value-type="percentage">
            <text:p>20,72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1942" calcext:value-type="percentage">
            <text:p>19,42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246" calcext:value-type="percentage">
            <text:p>12,46%</text:p>
          </table:table-cell>
          <table:table-cell table:style-name="ce3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928" calcext:value-type="percentage">
            <text:p>29,28%</text:p>
          </table:table-cell>
          <table:table-cell table:style-name="ce3" office:value-type="percentage" office:value="0.2884" calcext:value-type="percentage">
            <text:p>28,84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188" calcext:value-type="percentage">
            <text:p>11,88%</text:p>
          </table:table-cell>
          <table:table-cell table:style-name="ce3" office:value-type="percentage" office:value="0.1362" calcext:value-type="percentage">
            <text:p>13,62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0:.B59])" office:value-type="percentage" office:value="0.178" calcext:value-type="percentage">
            <text:p>17,80%</text:p>
          </table:table-cell>
          <table:table-cell table:style-name="ce1" table:formula="of:=AVERAGE([.C50:.C59])" office:value-type="percentage" office:value="0.185" calcext:value-type="percentage">
            <text:p>18,50%</text:p>
          </table:table-cell>
          <table:table-cell/>
          <table:table-cell table:style-name="ce1"/>
          <table:table-cell table:style-name="ce1" table:formula="of:=AVERAGE([.F50:.F59])" office:value-type="percentage" office:value="0.18899" calcext:value-type="percentage">
            <text:p>18,90%</text:p>
          </table:table-cell>
          <table:table-cell table:style-name="ce1" table:formula="of:=AVERAGE([.G50:.G59])" office:value-type="percentage" office:value="0.20129" calcext:value-type="percentage">
            <text:p>20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361" calcext:value-type="percentage">
            <text:p>33,61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417" calcext:value-type="percentage">
            <text:p>34,17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3" calcext:value-type="percentage">
            <text:p>5,3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39" calcext:value-type="percentage">
            <text:p>41,3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2:.B71])" office:value-type="percentage" office:value="0.36277" calcext:value-type="percentage">
            <text:p>36,28%</text:p>
          </table:table-cell>
          <table:table-cell table:style-name="ce1" table:formula="of:=AVERAGE([.C62:.C71])" office:value-type="percentage" office:value="0.34138" calcext:value-type="percentage">
            <text:p>34,14%</text:p>
          </table:table-cell>
          <table:table-cell/>
          <table:table-cell table:style-name="ce1"/>
          <table:table-cell table:style-name="ce1" table:formula="of:=AVERAGE([.F62:.F71])" office:value-type="percentage" office:value="0.05042" calcext:value-type="percentage">
            <text:p>5,04%</text:p>
          </table:table-cell>
          <table:table-cell table:style-name="ce1" table:formula="of:=AVERAGE([.G62:.G71])" office:value-type="percentage" office:value="0.0376" calcext:value-type="percentage">
            <text:p>3,7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379" calcext:value-type="percentage">
            <text:p>6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43" calcext:value-type="percentage">
            <text:p>37,43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2"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29" calcext:value-type="percentage">
            <text:p>42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4571" calcext:value-type="percentage">
            <text:p>45,71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586" calcext:value-type="percentage">
            <text:p>35,86%</text:p>
          </table:table-cell>
          <table:table-cell office:value-type="percentage" office:value="0.3621" calcext:value-type="percentage">
            <text:p>36,21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43" calcext:value-type="percentage">
            <text:p>35,43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029" calcext:value-type="percentage">
            <text:p>40,29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69" calcext:value-type="percentage">
            <text:p>46,90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5:.B84])" office:value-type="percentage" office:value="0.50138" calcext:value-type="percentage">
            <text:p>50,14%</text:p>
          </table:table-cell>
          <table:table-cell table:style-name="ce1" table:formula="of:=AVERAGE([.C75:.C84])" office:value-type="percentage" office:value="0.50277" calcext:value-type="percentage">
            <text:p>50,28%</text:p>
          </table:table-cell>
          <table:table-cell/>
          <table:table-cell table:style-name="ce1"/>
          <table:table-cell table:style-name="ce1" table:formula="of:=AVERAGE([.F75:.F84])" office:value-type="percentage" office:value="0.398" calcext:value-type="percentage">
            <text:p>39,80%</text:p>
          </table:table-cell>
          <table:table-cell table:style-name="ce1" table:formula="of:=AVERAGE([.G75:.G84])" office:value-type="percentage" office:value="0.38258" calcext:value-type="percentage">
            <text:p>38,26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5788" calcext:value-type="percentage">
            <text:p>57,8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697" calcext:value-type="percentage">
            <text:p>66,9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818" calcext:value-type="percentage">
            <text:p>58,18%</text:p>
          </table:table-cell>
          <table:table-cell office:value-type="percentage" office:value="0.6242" calcext:value-type="percentage">
            <text:p>62,42%</text:p>
          </table:table-cell>
          <table:table-cell/>
          <table:table-cell office:value-type="string" calcext:value-type="string">
            <text:p>Fert_4</text:p>
          </table:table-cell>
          <table:table-cell table:number-columns-repeated="2"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table:number-columns-repeated="2" office:value-type="percentage" office:value="0.5545" calcext:value-type="percentage">
            <text:p>55,45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636" calcext:value-type="percentage">
            <text:p>66,36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5879" calcext:value-type="percentage">
            <text:p>58,79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6394" calcext:value-type="percentage">
            <text:p>63,94%</text:p>
          </table:table-cell>
          <table:table-cell/>
          <table:table-cell office:value-type="string" calcext:value-type="string">
            <text:p>Fert_10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88:.B97])" office:value-type="percentage" office:value="0.58362" calcext:value-type="percentage">
            <text:p>58,36%</text:p>
          </table:table-cell>
          <table:table-cell table:style-name="ce1" table:formula="of:=AVERAGE([.C88:.C97])" office:value-type="percentage" office:value="0.59605" calcext:value-type="percentage">
            <text:p>59,61%</text:p>
          </table:table-cell>
          <table:table-cell/>
          <table:table-cell table:style-name="ce1"/>
          <table:table-cell table:style-name="ce1" table:formula="of:=AVERAGE([.F88:.F97])" office:value-type="percentage" office:value="0.214" calcext:value-type="percentage">
            <text:p>21,40%</text:p>
          </table:table-cell>
          <table:table-cell table:style-name="ce1" table:formula="of:=AVERAGE([.G88:.G97])" office:value-type="percentage" office:value="0.217" calcext:value-type="percentage">
            <text:p>21,7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758" calcext:value-type="percentage">
            <text:p>17,5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565" calcext:value-type="percentage">
            <text:p>15,65%</text:p>
          </table:table-cell>
          <table:table-cell/>
          <table:table-cell office:value-type="string" calcext:value-type="string">
            <text:p>Glass_2</text:p>
          </table:table-cell>
          <table:table-cell table:number-columns-repeated="2" office:value-type="percentage" office:value="0.7476" calcext:value-type="percentage">
            <text:p>74,76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306" calcext:value-type="percentage">
            <text:p>23,06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823" calcext:value-type="percentage">
            <text:p>18,2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77" calcext:value-type="percentage">
            <text:p>21,77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381" calcext:value-type="percentage">
            <text:p>53,81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468" calcext:value-type="percentage">
            <text:p>24,68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1:.B110])" office:value-type="percentage" office:value="0.175" calcext:value-type="percentage">
            <text:p>17,50%</text:p>
          </table:table-cell>
          <table:table-cell table:style-name="ce1" table:formula="of:=AVERAGE([.C101:.C110])" office:value-type="percentage" office:value="0.18274" calcext:value-type="percentage">
            <text:p>18,27%</text:p>
          </table:table-cell>
          <table:table-cell/>
          <table:table-cell table:style-name="ce1"/>
          <table:table-cell table:style-name="ce1" table:formula="of:=AVERAGE([.F101:.F110])" office:value-type="percentage" office:value="0.56761" calcext:value-type="percentage">
            <text:p>56,76%</text:p>
          </table:table-cell>
          <table:table-cell table:style-name="ce1" table:formula="of:=AVERAGE([.G101:.G110])" office:value-type="percentage" office:value="0.51286" calcext:value-type="percentage">
            <text:p>51,29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846" calcext:value-type="percentage">
            <text:p>38,46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4:.B123])" office:value-type="percentage" office:value="0.27367" calcext:value-type="percentage">
            <text:p>27,37%</text:p>
          </table:table-cell>
          <table:table-cell table:style-name="ce1" table:formula="of:=AVERAGE([.C114:.C123])" office:value-type="percentage" office:value="0.27132" calcext:value-type="percentage">
            <text:p>27,13%</text:p>
          </table:table-cell>
          <table:table-cell/>
          <table:table-cell table:style-name="ce1"/>
          <table:table-cell table:style-name="ce1" table:formula="of:=AVERAGE([.F114:.F123])" office:value-type="percentage" office:value="0.40077" calcext:value-type="percentage">
            <text:p>40,08%</text:p>
          </table:table-cell>
          <table:table-cell table:style-name="ce1" table:formula="of:=AVERAGE([.G114:.G123])" office:value-type="percentage" office:value="0.37306" calcext:value-type="percentage">
            <text:p>37,3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3" calcext:value-type="percentage">
            <text:p>6,33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481" calcext:value-type="percentage">
            <text:p>24,8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7" calcext:value-type="percentage">
            <text:p>13,70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27:.B136])" office:value-type="percentage" office:value="0.21999" calcext:value-type="percentage">
            <text:p>22,00%</text:p>
          </table:table-cell>
          <table:table-cell table:style-name="ce1" table:formula="of:=AVERAGE([.C127:.C136])" office:value-type="percentage" office:value="0.20851" calcext:value-type="percentage">
            <text:p>20,85%</text:p>
          </table:table-cell>
          <table:table-cell/>
          <table:table-cell table:style-name="ce1"/>
          <table:table-cell table:style-name="ce1" table:formula="of:=AVERAGE([.F127:.F136])" office:value-type="percentage" office:value="0.19133" calcext:value-type="percentage">
            <text:p>19,13%</text:p>
          </table:table-cell>
          <table:table-cell table:style-name="ce1" table:formula="of:=AVERAGE([.G127:.G136])" office:value-type="percentage" office:value="0.19167" calcext:value-type="percentage">
            <text:p>19,17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Zoo_2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Zoo_4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867" calcext:value-type="percentage">
            <text:p>68,6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Zoo_8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Zoo_9</text:p>
          </table:table-cell>
          <table:table-cell table:number-columns-repeated="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0:.B149])" office:value-type="percentage" office:value="0.54533" calcext:value-type="percentage">
            <text:p>54,53%</text:p>
          </table:table-cell>
          <table:table-cell table:style-name="ce1" table:formula="of:=AVERAGE([.C140:.C149])" office:value-type="percentage" office:value="0.512" calcext:value-type="percentage">
            <text:p>51,20%</text:p>
          </table:table-cell>
          <table:table-cell/>
          <table:table-cell table:style-name="ce1"/>
          <table:table-cell table:style-name="ce1" table:formula="of:=AVERAGE([.F140:.F149])" office:value-type="percentage" office:value="0.106" calcext:value-type="percentage">
            <text:p>10,60%</text:p>
          </table:table-cell>
          <table:table-cell table:style-name="ce1" table:formula="of:=AVERAGE([.G140:.G149])"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61" calcext:value-type="percentage">
            <text:p>2,61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43" calcext:value-type="percentage">
            <text:p>15,43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3:.B162])" office:value-type="percentage" office:value="0.0461" calcext:value-type="percentage">
            <text:p>4,61%</text:p>
          </table:table-cell>
          <table:table-cell table:style-name="ce1" table:formula="of:=AVERAGE([.C153:.C162])" office:value-type="percentage" office:value="0.05001" calcext:value-type="percentage">
            <text:p>5,00%</text:p>
          </table:table-cell>
          <table:table-cell/>
          <table:table-cell table:style-name="ce1"/>
          <table:table-cell table:style-name="ce1" table:formula="of:=AVERAGE([.F153:.F162])" office:value-type="percentage" office:value="0.12829" calcext:value-type="percentage">
            <text:p>12,83%</text:p>
          </table:table-cell>
          <table:table-cell table:style-name="ce1" table:formula="of:=AVERAGE([.G153:.G162])" office:value-type="percentage" office:value="0.12428" calcext:value-type="percentage">
            <text:p>12,43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217" calcext:value-type="percentage">
            <text:p>22,17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382" calcext:value-type="percentage">
            <text:p>43,8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059" calcext:value-type="percentage">
            <text:p>30,5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912" calcext:value-type="percentage">
            <text:p>19,1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554" calcext:value-type="percentage">
            <text:p>15,54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71" calcext:value-type="percentage">
            <text:p>34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928" calcext:value-type="percentage">
            <text:p>19,28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265" calcext:value-type="percentage">
            <text:p>22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77" calcext:value-type="percentage">
            <text:p>12,77%</text:p>
          </table:table-cell>
          <table:table-cell office:value-type="percentage" office:value="0.1349" calcext:value-type="percentage">
            <text:p>13,4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66:.B175])" office:value-type="percentage" office:value="0.30412" calcext:value-type="percentage">
            <text:p>30,41%</text:p>
          </table:table-cell>
          <table:table-cell table:style-name="ce1" table:formula="of:=AVERAGE([.C166:.C175])" office:value-type="percentage" office:value="0.29559" calcext:value-type="percentage">
            <text:p>29,56%</text:p>
          </table:table-cell>
          <table:table-cell/>
          <table:table-cell table:style-name="ce1"/>
          <table:table-cell table:style-name="ce1" table:formula="of:=AVERAGE([.F166:.F175])" office:value-type="percentage" office:value="0.17723" calcext:value-type="percentage">
            <text:p>17,72%</text:p>
          </table:table-cell>
          <table:table-cell table:style-name="ce1" table:formula="of:=AVERAGE([.G166:.G175])" office:value-type="percentage" office:value="0.17796" calcext:value-type="percentage">
            <text:p>17,80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132" calcext:value-type="percentage">
            <text:p>21,32%</text:p>
          </table:table-cell>
          <table:table-cell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47" calcext:value-type="percentage">
            <text:p>29,47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26" calcext:value-type="percentage">
            <text:p>15,26%</text:p>
          </table:table-cell>
          <table:table-cell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Pima_7</text:p>
          </table:table-cell>
          <table:table-cell table:number-columns-repeated="2" office:value-type="percentage" office:value="0.2184" calcext:value-type="percentage">
            <text:p>21,84%</text:p>
          </table:table-cell>
          <table:table-cell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5" calcext:value-type="percentage">
            <text:p>27,50%</text:p>
          </table:table-cell>
          <table:table-cell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1" calcext:value-type="percentage">
            <text:p>24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9:.B188])" office:value-type="percentage" office:value="0.15525" calcext:value-type="percentage">
            <text:p>15,53%</text:p>
          </table:table-cell>
          <table:table-cell table:style-name="ce1" table:formula="of:=AVERAGE([.C179:.C188])" office:value-type="percentage" office:value="0.15367" calcext:value-type="percentage">
            <text:p>15,37%</text:p>
          </table:table-cell>
          <table:table-cell/>
          <table:table-cell table:style-name="ce1"/>
          <table:table-cell table:style-name="ce1" table:formula="of:=AVERAGE([.F179:.F188])" office:value-type="percentage" office:value="0.23593" calcext:value-type="percentage">
            <text:p>23,59%</text:p>
          </table:table-cell>
          <table:table-cell table:style-name="ce1" table:formula="of:=AVERAGE([.G179:.G188])" office:value-type="percentage" office:value="0.23712" calcext:value-type="percentage">
            <text:p>23,7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2:.B201])" office:value-type="percentage" office:value="0.05612" calcext:value-type="percentage">
            <text:p>5,61%</text:p>
          </table:table-cell>
          <table:table-cell table:style-name="ce1" table:formula="of:=AVERAGE([.C192:.C201])" office:value-type="percentage" office:value="0.0563" calcext:value-type="percentage">
            <text:p>5,63%</text:p>
          </table:table-cell>
          <table:table-cell/>
          <table:table-cell table:style-name="ce1"/>
          <table:table-cell table:style-name="ce1" table:formula="of:=AVERAGE([.F192:.F201])" office:value-type="percentage" office:value="0.25708" calcext:value-type="percentage">
            <text:p>25,71%</text:p>
          </table:table-cell>
          <table:table-cell table:style-name="ce1" table:formula="of:=AVERAGE([.G192:.G201])" office:value-type="percentage" office:value="0.25645" calcext:value-type="percentage">
            <text:p>25,65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109" calcext:value-type="percentage">
            <text:p>21,0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16" calcext:value-type="percentage">
            <text:p>31,60%</text:p>
          </table:table-cell>
          <table:table-cell office:value-type="percentage" office:value="0.3117" calcext:value-type="percentage">
            <text:p>31,17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63" calcext:value-type="percentage">
            <text:p>34,63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3203" calcext:value-type="percentage">
            <text:p>32,03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5" calcext:value-type="percentage">
            <text:p>35,50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304" calcext:value-type="percentage">
            <text:p>23,0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2857" calcext:value-type="percentage">
            <text:p>28,57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636" calcext:value-type="percentage">
            <text:p>36,36%</text:p>
          </table:table-cell>
          <table:table-cell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2"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9" calcext:value-type="percentage">
            <text:p>32,9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42" calcext:value-type="percentage">
            <text:p>34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5:.B214])" office:value-type="percentage" office:value="0.28892" calcext:value-type="percentage">
            <text:p>28,89%</text:p>
          </table:table-cell>
          <table:table-cell table:style-name="ce1" table:formula="of:=AVERAGE([.C205:.C214])" office:value-type="percentage" office:value="0.28781" calcext:value-type="percentage">
            <text:p>28,78%</text:p>
          </table:table-cell>
          <table:table-cell/>
          <table:table-cell table:style-name="ce1"/>
          <table:table-cell table:style-name="ce1" table:formula="of:=AVERAGE([.F205:.F214])" office:value-type="percentage" office:value="0.32467" calcext:value-type="percentage">
            <text:p>32,47%</text:p>
          </table:table-cell>
          <table:table-cell table:style-name="ce1" table:formula="of:=AVERAGE([.G205:.G214])" office:value-type="percentage" office:value="0.33333" calcext:value-type="percentage">
            <text:p>33,3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2" table:style-name="ce9" office:value-type="percentage" office:value="0.38" calcext:value-type="percentage">
            <text:p>38,00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2</text:p>
          </table:table-cell>
          <table:table-cell table:style-name="ce9" office:value-type="percentage" office:value="0.391" calcext:value-type="percentage">
            <text:p>39,10%</text:p>
          </table:table-cell>
          <table:table-cell table:style-name="ce9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3</text:p>
          </table:table-cell>
          <table:table-cell table:style-name="ce9" office:value-type="percentage" office:value="0.4055" calcext:value-type="percentage">
            <text:p>40,55%</text:p>
          </table:table-cell>
          <table:table-cell table:style-name="ce9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4</text:p>
          </table:table-cell>
          <table:table-cell table:style-name="ce9" office:value-type="percentage" office:value="0.4405" calcext:value-type="percentage">
            <text:p>44,05%</text:p>
          </table:table-cell>
          <table:table-cell table:style-name="ce9" office:value-type="percentage" office:value="0.4445" calcext:value-type="percentage">
            <text:p>44,45%</text:p>
          </table:table-cell>
          <table:table-cell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35" calcext:value-type="percentage">
            <text:p>13,50%</text:p>
          </table:table-cell>
          <table:table-cell/>
          <table:table-cell office:value-type="string" calcext:value-type="string">
            <text:p>Spiral_5</text:p>
          </table:table-cell>
          <table:table-cell table:style-name="ce9" office:value-type="percentage" office:value="0.4305" calcext:value-type="percentage">
            <text:p>43,05%</text:p>
          </table:table-cell>
          <table:table-cell table:style-name="ce9" office:value-type="percentage" office:value="0.451" calcext:value-type="percentage">
            <text:p>45,10%</text:p>
          </table:table-cell>
          <table:table-cell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2" table:style-name="ce9" office:value-type="percentage" office:value="0.41" calcext:value-type="percentage">
            <text:p>41,00%</text:p>
          </table:table-cell>
          <table:table-cell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2"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table:style-name="ce9" office:value-type="percentage" office:value="0.399" calcext:value-type="percentage">
            <text:p>39,90%</text:p>
          </table:table-cell>
          <table:table-cell table:style-name="ce9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Spiral_8</text:p>
          </table:table-cell>
          <table:table-cell table:style-name="ce9" office:value-type="percentage" office:value="0.3915" calcext:value-type="percentage">
            <text:p>39,15%</text:p>
          </table:table-cell>
          <table:table-cell table:style-name="ce9" office:value-type="percentage" office:value="0.3875" calcext:value-type="percentage">
            <text:p>38,75%</text:p>
          </table:table-cell>
          <table:table-cell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9</text:p>
          </table:table-cell>
          <table:table-cell table:style-name="ce9" office:value-type="percentage" office:value="0.422" calcext:value-type="percentage">
            <text:p>42,20%</text:p>
          </table:table-cell>
          <table:table-cell table:style-name="ce9" office:value-type="percentage" office:value="0.4255" calcext:value-type="percentage">
            <text:p>42,55%</text:p>
          </table:table-cell>
          <table:table-cell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Spiral_10</text:p>
          </table:table-cell>
          <table:table-cell table:style-name="ce9" office:value-type="percentage" office:value="0.4325" calcext:value-type="percentage">
            <text:p>43,25%</text:p>
          </table:table-cell>
          <table:table-cell table:style-name="ce9" office:value-type="percentage" office:value="0.435" calcext:value-type="percentage">
            <text:p>43,5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17:.B226])" office:value-type="percentage" office:value="0.24" calcext:value-type="percentage">
            <text:p>24,00%</text:p>
          </table:table-cell>
          <table:table-cell table:style-name="ce1" table:formula="of:=AVERAGE([.C217:.C226])" office:value-type="percentage" office:value="0.2205" calcext:value-type="percentage">
            <text:p>22,05%</text:p>
          </table:table-cell>
          <table:table-cell/>
          <table:table-cell table:style-name="ce1"/>
          <table:table-cell table:style-name="ce1" table:formula="of:=AVERAGE([.F217:.F226])" office:value-type="percentage" office:value="0.41025" calcext:value-type="percentage">
            <text:p>41,03%</text:p>
          </table:table-cell>
          <table:table-cell table:style-name="ce1" table:formula="of:=AVERAGE([.G217:.G226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227" calcext:value-type="percentage">
            <text:p>22,70%</text:p>
          </table:table-cell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649" calcext:value-type="percentage">
            <text:p>26,49%</text:p>
          </table:table-cell>
          <table:table-cell table:style-name="ce9" office:value-type="percentage" office:value="0.2459" calcext:value-type="percentage">
            <text:p>24,59%</text:p>
          </table:table-cell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676" calcext:value-type="percentage">
            <text:p>26,76%</text:p>
          </table:table-cell>
          <table:table-cell table:style-name="ce9"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905" calcext:value-type="percentage">
            <text:p>29,05%</text:p>
          </table:table-cell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784" calcext:value-type="percentage">
            <text:p>27,84%</text:p>
          </table:table-cell>
          <table:table-cell table:style-name="ce9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122" calcext:value-type="percentage">
            <text:p>21,22%</text:p>
          </table:table-cell>
          <table:table-cell table:style-name="ce9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15" calcext:value-type="percentage">
            <text:p>1,50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2014" calcext:value-type="percentage">
            <text:p>20,1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2425" calcext:value-type="percentage">
            <text:p>12,43%</text:p>
          </table:table-cell>
          <table:table-cell table:style-name="ce1" table:formula="of:=AVERAGE([.C230:.C239])" office:value-type="percentage" office:value="0.0425" calcext:value-type="percentage">
            <text:p>4,25%</text:p>
          </table:table-cell>
          <table:table-cell/>
          <table:table-cell table:style-name="ce1"/>
          <table:table-cell table:style-name="ce1" table:formula="of:=AVERAGE([.F230:.F239])" office:value-type="percentage" office:value="0.2523" calcext:value-type="percentage">
            <text:p>25,23%</text:p>
          </table:table-cell>
          <table:table-cell table:style-name="ce1" table:formula="of:=AVERAGE([.G230:.G239])" office:value-type="percentage" office:value="0.24648" calcext:value-type="percentage">
            <text:p>24,6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5" calcext:value-type="percentage">
            <text:p>2,35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5</text:p>
          </table:table-cell>
          <table:table-cell table:number-columns-repeated="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353" calcext:value-type="percentage">
            <text:p>3,53%</text:p>
          </table:table-cell>
          <table:table-cell/>
        </table:table-row>
        <table:table-row table:style-name="ro2">
          <table:table-cell office:value-type="string" calcext:value-type="string">
            <text:p>Wdbc_8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2:.B251])" office:value-type="percentage" office:value="0.04194" calcext:value-type="percentage">
            <text:p>4,19%</text:p>
          </table:table-cell>
          <table:table-cell table:style-name="ce1" table:formula="of:=AVERAGE([.C242:.C251])" office:value-type="percentage" office:value="0.04374" calcext:value-type="percentage">
            <text:p>4,37%</text:p>
          </table:table-cell>
          <table:table-cell/>
          <table:table-cell table:style-name="ce1"/>
          <table:table-cell table:style-name="ce1" table:formula="of:=AVERAGE([.F242:.F251])" office:value-type="percentage" office:value="0.10588" calcext:value-type="percentage">
            <text:p>10,59%</text:p>
          </table:table-cell>
          <table:table-cell table:style-name="ce1" table:formula="of:=AVERAGE([.G242:.G251])"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4" calcext:value-type="percentage">
            <text:p>56,4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734" calcext:value-type="percentage">
            <text:p>73,4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86" calcext:value-type="percentage">
            <text:p>68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2" calcext:value-type="percentage">
            <text:p>63,20%</text:p>
          </table:table-cell>
          <table:table-cell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44" calcext:value-type="percentage">
            <text:p>64,4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76" calcext:value-type="percentage">
            <text:p>76,0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66" calcext:value-type="percentage">
            <text:p>66,00%</text:p>
          </table:table-cell>
          <table:table-cell/>
        </table:table-row>
        <table:table-row table:style-name="ro2">
          <table:table-cell office:value-type="string" calcext:value-type="string">
            <text:p>z_f_s_9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84" calcext:value-type="percentage">
            <text:p>68,40%</text:p>
          </table:table-cell>
          <table:table-cell office:value-type="percentage" office:value="0.718" calcext:value-type="percentage">
            <text:p>71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5:.B264])" office:value-type="percentage" office:value="0.04677" calcext:value-type="percentage">
            <text:p>4,68%</text:p>
          </table:table-cell>
          <table:table-cell table:style-name="ce1" table:formula="of:=AVERAGE([.C255:.C264])" office:value-type="percentage" office:value="0.05366" calcext:value-type="percentage">
            <text:p>5,37%</text:p>
          </table:table-cell>
          <table:table-cell/>
          <table:table-cell table:style-name="ce1"/>
          <table:table-cell table:style-name="ce1" table:formula="of:=AVERAGE([.F255:.F264])" office:value-type="percentage" office:value="0.6368" calcext:value-type="percentage">
            <text:p>63,68%</text:p>
          </table:table-cell>
          <table:table-cell table:style-name="ce1" table:formula="of:=AVERAGE([.G255:.G264])" office:value-type="percentage" office:value="0.6908" calcext:value-type="percentage">
            <text:p>69,0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4" calcext:value-type="percentage">
            <text:p>4,40%</text:p>
          </table:table-cell>
          <table:table-cell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67:.B276])" office:value-type="percentage" office:value="0.0547" calcext:value-type="percentage">
            <text:p>5,47%</text:p>
          </table:table-cell>
          <table:table-cell table:style-name="ce1" table:formula="of:=AVERAGE([.C267:.C276])" office:value-type="percentage" office:value="0.0722" calcext:value-type="percentage">
            <text:p>7,22%</text:p>
          </table:table-cell>
          <table:table-cell/>
          <table:table-cell table:style-name="ce1"/>
          <table:table-cell table:style-name="ce1" table:formula="of:=AVERAGE([.F267:.F276])" office:value-type="percentage" office:value="0.0182" calcext:value-type="percentage">
            <text:p>1,82%</text:p>
          </table:table-cell>
          <table:table-cell table:style-name="ce1" table:formula="of:=AVERAGE([.G267:.G276])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percentage" office:value="0.3297" calcext:value-type="percentage">
            <text:p>32,97%</text:p>
          </table:table-cell>
          <table:table-cell table:style-name="ce1" table:formula="of:=AVERAGE([.C279:.C288])" office:value-type="percentage" office:value="0.3468" calcext:value-type="percentage">
            <text:p>34,68%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28"/>
          <table:covered-table-cell table:style-name="ce1"/>
          <table:table-cell table:style-name="ce1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/>
          <table:table-cell table:style-name="ce6" office:value-type="string" calcext:value-type="string">
            <text:p>MB_1</text:p>
          </table:table-cell>
          <table:table-cell table:style-name="ce10" office:value-type="float" office:value="0.4297" calcext:value-type="float">
            <text:p>4,30E-01</text:p>
          </table:table-cell>
          <table:table-cell table:style-name="ce10" office:value-type="float" office:value="0.406" calcext:value-type="float">
            <text:p>4,06E-01</text:p>
          </table:table-cell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/>
          <table:table-cell table:style-name="ce6" office:value-type="string" calcext:value-type="string">
            <text:p>MB_2</text:p>
          </table:table-cell>
          <table:table-cell table:style-name="ce10" office:value-type="float" office:value="0.867" calcext:value-type="float">
            <text:p>8,67E-01</text:p>
          </table:table-cell>
          <table:table-cell table:style-name="ce10" office:value-type="float" office:value="0.886" calcext:value-type="float">
            <text:p>8,86E-01</text:p>
          </table:table-cell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577" calcext:value-type="float">
            <text:p>0,577</text:p>
          </table:table-cell>
          <table:table-cell table:style-name="ce6"/>
          <table:table-cell table:style-name="ce6" office:value-type="string" calcext:value-type="string">
            <text:p>MB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59" calcext:value-type="float">
            <text:p>0,859</text:p>
          </table:table-cell>
          <table:table-cell table:style-name="ce6"/>
          <table:table-cell table:style-name="ce6" office:value-type="string" calcext:value-type="string">
            <text:p>MB_4</text:p>
          </table:table-cell>
          <table:table-cell table:style-name="ce11" office:value-type="float" office:value="0.111" calcext:value-type="float">
            <text:p>1,11E-01</text:p>
          </table:table-cell>
          <table:table-cell table:style-name="ce10" office:value-type="float" office:value="0.128" calcext:value-type="float">
            <text:p>1,28E-01</text:p>
          </table:table-cell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Default" office:value-type="float" office:value="0.539" calcext:value-type="float">
            <text:p>0,539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/>
          <table:table-cell table:style-name="ce6" office:value-type="string" calcext:value-type="string">
            <text:p>MB_5</text:p>
          </table:table-cell>
          <table:table-cell table:style-name="ce10" office:value-type="float" office:value="0.633" calcext:value-type="float">
            <text:p>6,33E-01</text:p>
          </table:table-cell>
          <table:table-cell table:style-name="ce10" office:value-type="float" office:value="0.598" calcext:value-type="float">
            <text:p>5,98E-01</text:p>
          </table:table-cell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Default" office:value-type="float" office:value="0.223" calcext:value-type="float">
            <text:p>0,22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/>
          <table:table-cell table:style-name="ce6" office:value-type="string" calcext:value-type="string">
            <text:p>MB_6</text:p>
          </table:table-cell>
          <table:table-cell table:style-name="ce10" office:value-type="float" office:value="0.163" calcext:value-type="float">
            <text:p>1,63E-01</text:p>
          </table:table-cell>
          <table:table-cell table:style-name="ce10" office:value-type="float" office:value="0.0866" calcext:value-type="float">
            <text:p>8,66E-02</text:p>
          </table:table-cell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Default" office:value-type="float" office:value="0.366" calcext:value-type="float">
            <text:p>0,366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style-name="ce6" office:value-type="string" calcext:value-type="string">
            <text:p>MB_7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6"/>
          <table:table-cell table:style-name="ce6" office:value-type="string" calcext:value-type="string">
            <text:p>MB_8</text:p>
          </table:table-cell>
          <table:table-cell table:style-name="ce10" office:value-type="float" office:value="0.154" calcext:value-type="float">
            <text:p>1,54E-01</text:p>
          </table:table-cell>
          <table:table-cell table:style-name="ce10" office:value-type="float" office:value="0.256" calcext:value-type="float">
            <text:p>2,56E-01</text:p>
          </table:table-cell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Default" office:value-type="float" office:value="0.243" calcext:value-type="float">
            <text:p>0,24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string" calcext:value-type="string">
            <text:p>MB_9</text:p>
          </table:table-cell>
          <table:table-cell table:style-name="ce10" office:value-type="float" office:value="0.179" calcext:value-type="float">
            <text:p>1,79E-01</text:p>
          </table:table-cell>
          <table:table-cell table:style-name="ce10" office:value-type="float" office:value="0.192" calcext:value-type="float">
            <text:p>1,92E-01</text:p>
          </table:table-cell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MB_10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147" calcext:value-type="float">
            <text:p>0,14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292:.B301])" office:value-type="float" office:value="0.48198" calcext:value-type="float">
            <text:p>0,48198</text:p>
          </table:table-cell>
          <table:table-cell table:style-name="ce7" table:formula="of:=AVERAGE([.C292:.C301])" office:value-type="float" office:value="0.4236" calcext:value-type="float">
            <text:p>0,4236</text:p>
          </table:table-cell>
          <table:table-cell table:style-name="ce7"/>
          <table:table-cell table:style-name="ce5"/>
          <table:table-cell table:style-name="ce5" table:formula="of:=AVERAGE([.F292:.F301])" office:value-type="float" office:value="0.39467" calcext:value-type="float">
            <text:p>0,39467</text:p>
          </table:table-cell>
          <table:table-cell table:style-name="ce11" table:formula="of:=AVERAGE([.G292:.G301])" office:value-type="float" office:value="0.35676" calcext:value-type="float">
            <text:p>3,57E-01</text:p>
          </table:table-cell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1</text:p>
          </table:table-cell>
          <table:table-cell table:style-name="ce10" office:value-type="float" office:value="0.4599" calcext:value-type="float">
            <text:p>4,60E-01</text:p>
          </table:table-cell>
          <table:table-cell table:style-name="ce10" office:value-type="float" office:value="0.4492" calcext:value-type="float">
            <text:p>4,49E-01</text:p>
          </table:table-cell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37" calcext:value-type="float">
            <text:p>0,0537</text:p>
          </table:table-cell>
          <table:table-cell table:style-name="ce6" office:value-type="float" office:value="0.0601" calcext:value-type="float">
            <text:p>0,0601</text:p>
          </table:table-cell>
          <table:table-cell table:style-name="ce6"/>
          <table:table-cell table:style-name="ce6" office:value-type="string" calcext:value-type="string">
            <text:p>PY_2</text:p>
          </table:table-cell>
          <table:table-cell table:style-name="ce11" office:value-type="float" office:value="0.0516" calcext:value-type="float">
            <text:p>5,16E-02</text:p>
          </table:table-cell>
          <table:table-cell table:style-name="ce10" office:value-type="float" office:value="0.0673" calcext:value-type="float">
            <text:p>6,73E-02</text:p>
          </table:table-cell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PY_3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528" calcext:value-type="float">
            <text:p>0,0528</text:p>
          </table:table-cell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9" calcext:value-type="float">
            <text:p>0,0869</text:p>
          </table:table-cell>
          <table:table-cell table:style-name="ce6"/>
          <table:table-cell table:style-name="ce6" office:value-type="string" calcext:value-type="string">
            <text:p>PY_4</text:p>
          </table:table-cell>
          <table:table-cell table:style-name="ce10" office:value-type="float" office:value="0.047" calcext:value-type="float">
            <text:p>4,70E-02</text:p>
          </table:table-cell>
          <table:table-cell table:style-name="ce10" office:value-type="float" office:value="0.037" calcext:value-type="float">
            <text:p>3,70E-02</text:p>
          </table:table-cell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6" office:value-type="float" office:value="0.127" calcext:value-type="float">
            <text:p>0,127</text:p>
          </table:table-cell>
          <table:table-cell table:style-name="ce6"/>
          <table:table-cell table:style-name="ce6" office:value-type="string" calcext:value-type="string">
            <text:p>PY_5</text:p>
          </table:table-cell>
          <table:table-cell table:style-name="ce10" office:value-type="float" office:value="0.0452" calcext:value-type="float">
            <text:p>4,52E-02</text:p>
          </table:table-cell>
          <table:table-cell table:style-name="ce10" office:value-type="float" office:value="0.0233" calcext:value-type="float">
            <text:p>2,33E-02</text:p>
          </table:table-cell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2" calcext:value-type="float">
            <text:p>0,063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/>
          <table:table-cell table:style-name="ce6" office:value-type="string" calcext:value-type="string">
            <text:p>PY_6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10" office:value-type="float" office:value="0.14" calcext:value-type="float">
            <text:p>1,40E-01</text:p>
          </table:table-cell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0275" calcext:value-type="float">
            <text:p>0,0275</text:p>
          </table:table-cell>
          <table:table-cell table:style-name="ce6"/>
          <table:table-cell table:style-name="ce6" office:value-type="string" calcext:value-type="string">
            <text:p>PY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96" calcext:value-type="float">
            <text:p>0,0896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/>
          <table:table-cell table:style-name="ce6" office:value-type="string" calcext:value-type="string">
            <text:p>PY_8</text:p>
          </table:table-cell>
          <table:table-cell table:style-name="ce10" office:value-type="float" office:value="0.0242" calcext:value-type="float">
            <text:p>2,42E-02</text:p>
          </table:table-cell>
          <table:table-cell table:style-name="ce10" office:value-type="float" office:value="0.0393" calcext:value-type="float">
            <text:p>3,93E-02</text:p>
          </table:table-cell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46" calcext:value-type="float">
            <text:p>0,0946</text:p>
          </table:table-cell>
          <table:table-cell table:style-name="ce6"/>
          <table:table-cell table:style-name="ce6" office:value-type="string" calcext:value-type="string">
            <text:p>PY_9</text:p>
          </table:table-cell>
          <table:table-cell table:style-name="ce10" office:value-type="float" office:value="0.0293" calcext:value-type="float">
            <text:p>2,93E-02</text:p>
          </table:table-cell>
          <table:table-cell table:style-name="ce10" office:value-type="float" office:value="0.0272" calcext:value-type="float">
            <text:p>2,72E-02</text:p>
          </table:table-cell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/>
          <table:table-cell table:style-name="ce6" office:value-type="string" calcext:value-type="string">
            <text:p>PY_10</text:p>
          </table:table-cell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0.0226" calcext:value-type="float">
            <text:p>0,022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04:.B313])" office:value-type="float" office:value="0.08165" calcext:value-type="float">
            <text:p>0,08165</text:p>
          </table:table-cell>
          <table:table-cell table:style-name="ce7" table:formula="of:=AVERAGE([.C304:.C313])" office:value-type="float" office:value="0.08166" calcext:value-type="float">
            <text:p>0,08166</text:p>
          </table:table-cell>
          <table:table-cell table:style-name="ce7"/>
          <table:table-cell table:style-name="ce5"/>
          <table:table-cell table:style-name="ce5" table:formula="of:=AVERAGE([.F304:.F313])" office:value-type="float" office:value="0.10366" calcext:value-type="float">
            <text:p>0,10366</text:p>
          </table:table-cell>
          <table:table-cell table:style-name="ce11" table:formula="of:=AVERAGE([.G304:.G313])" office:value-type="float" office:value="0.09677" calcext:value-type="float">
            <text:p>9,68E-0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 table:style-name="ce1"/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2269.082" calcext:value-type="float">
            <text:p>2269,082</text:p>
          </table:table-cell>
          <table:table-cell table:style-name="ce6" office:value-type="float" office:value="2052.171" calcext:value-type="float">
            <text:p>2052,17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0206" calcext:value-type="float">
            <text:p>2,06E-03</text:p>
          </table:table-cell>
          <table:table-cell table:style-name="ce10" office:value-type="float" office:value="0.00119" calcext:value-type="float">
            <text:p>1,19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2871.417" calcext:value-type="float">
            <text:p>2871,417</text:p>
          </table:table-cell>
          <table:table-cell table:style-name="ce6" office:value-type="float" office:value="2462.331" calcext:value-type="float">
            <text:p>2462,33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0419" calcext:value-type="float">
            <text:p>4,19E-04</text:p>
          </table:table-cell>
          <table:table-cell table:style-name="ce10" office:value-type="float" office:value="0.000123" calcext:value-type="float">
            <text:p>1,23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3001.615" calcext:value-type="float">
            <text:p>3001,615</text:p>
          </table:table-cell>
          <table:table-cell table:style-name="ce6" office:value-type="float" office:value="2694.621" calcext:value-type="float">
            <text:p>2694,621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0366" calcext:value-type="float">
            <text:p>0,00366</text:p>
          </table:table-cell>
          <table:table-cell table:style-name="ce6" office:value-type="float" office:value="0.000984" calcext:value-type="float">
            <text:p>0,00098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2526.465" calcext:value-type="float">
            <text:p>2526,465</text:p>
          </table:table-cell>
          <table:table-cell table:style-name="ce6" office:value-type="float" office:value="2380.062" calcext:value-type="float">
            <text:p>2380,062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0895" calcext:value-type="float">
            <text:p>8,95E-04</text:p>
          </table:table-cell>
          <table:table-cell table:style-name="ce10" office:value-type="float" office:value="0.000489" calcext:value-type="float">
            <text:p>4,8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2754.664" calcext:value-type="float">
            <text:p>2754,664</text:p>
          </table:table-cell>
          <table:table-cell table:style-name="ce6" office:value-type="float" office:value="2616.789" calcext:value-type="float">
            <text:p>2616,789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0136" calcext:value-type="float">
            <text:p>1,36E-03</text:p>
          </table:table-cell>
          <table:table-cell table:style-name="ce10" office:value-type="float" office:value="0.00191" calcext:value-type="float">
            <text:p>1,9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2460.266" calcext:value-type="float">
            <text:p>2460,266</text:p>
          </table:table-cell>
          <table:table-cell table:style-name="ce6" office:value-type="float" office:value="2142.921" calcext:value-type="float">
            <text:p>2142,921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000152" calcext:value-type="float">
            <text:p>1,52E-04</text:p>
          </table:table-cell>
          <table:table-cell table:style-name="ce10" office:value-type="float" office:value="0.000179" calcext:value-type="float">
            <text:p>1,79E-0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2488.059" calcext:value-type="float">
            <text:p>2488,059</text:p>
          </table:table-cell>
          <table:table-cell table:style-name="ce6" office:value-type="float" office:value="2308.339" calcext:value-type="float">
            <text:p>2308,339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0.000119" calcext:value-type="float">
            <text:p>0,000119</text:p>
          </table:table-cell>
          <table:table-cell table:style-name="ce6" office:value-type="float" office:value="0.094" calcext:value-type="float">
            <text:p>0,094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3143.5696" calcext:value-type="float">
            <text:p>3143,5696</text:p>
          </table:table-cell>
          <table:table-cell table:style-name="ce6" office:value-type="float" office:value="2785.982" calcext:value-type="float">
            <text:p>2785,982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000555" calcext:value-type="float">
            <text:p>5,55E-04</text:p>
          </table:table-cell>
          <table:table-cell table:style-name="ce10" office:value-type="float" office:value="0.00007961" calcext:value-type="float">
            <text:p>7,96E-05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2506.643" calcext:value-type="float">
            <text:p>2506,643</text:p>
          </table:table-cell>
          <table:table-cell table:style-name="ce6" office:value-type="float" office:value="2451.796" calcext:value-type="float">
            <text:p>2451,796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0.00725" calcext:value-type="float">
            <text:p>7,25E-03</text:p>
          </table:table-cell>
          <table:table-cell table:style-name="ce10" office:value-type="float" office:value="0.00221" calcext:value-type="float">
            <text:p>2,21E-03</text:p>
          </table:table-cell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559.495" calcext:value-type="float">
            <text:p>2559,495</text:p>
          </table:table-cell>
          <table:table-cell table:style-name="ce6" office:value-type="float" office:value="2399.124" calcext:value-type="float">
            <text:p>2399,124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0.00319" calcext:value-type="float">
            <text:p>0,00319</text:p>
          </table:table-cell>
          <table:table-cell table:style-name="ce6" office:value-type="float" office:value="0.000449" calcext:value-type="float">
            <text:p>0,000449</text:p>
          </table:table-cell>
          <table:table-cell table:style-name="ce6"/>
        </table:table-row>
        <table:table-row table:style-name="ro3">
          <table:table-cell table:style-name="ce4"/>
          <table:table-cell table:style-name="ce7" table:formula="of:=AVERAGE([.B317:.B326])" office:value-type="float" office:value="2658.12756" calcext:value-type="float">
            <text:p>2658,12756</text:p>
          </table:table-cell>
          <table:table-cell table:style-name="ce7" table:formula="of:=AVERAGE([.C317:.C326])" office:value-type="float" office:value="2429.4136" calcext:value-type="float">
            <text:p>2429,4136</text:p>
          </table:table-cell>
          <table:table-cell table:style-name="ce7"/>
          <table:table-cell table:style-name="ce5"/>
          <table:table-cell table:style-name="ce5" table:formula="of:=AVERAGE([.F317:.F326])" office:value-type="float" office:value="0.001966" calcext:value-type="float">
            <text:p>0,001966</text:p>
          </table:table-cell>
          <table:table-cell table:style-name="ce11" table:formula="of:=AVERAGE([.G317:.G326])" office:value-type="float" office:value="0.010161361" calcext:value-type="float">
            <text:p>1,02E-02</text:p>
          </table:table-cell>
          <table:table-cell table:style-name="ce7"/>
        </table:table-row>
        <table:table-row table:style-name="ro3">
          <table:table-cell table:style-name="ce4"/>
          <table:table-cell table:style-name="ce4" office:value-type="string" calcext:value-type="string">
            <text:p>f=4</text:p>
          </table:table-cell>
          <table:table-cell table:style-name="ce4" office:value-type="string" calcext:value-type="string">
            <text:p>f=8</text:p>
          </table:table-cell>
          <table:table-cell table:style-name="ce4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1697" calcext:value-type="float">
            <text:p>0,1697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59.319" calcext:value-type="float">
            <text:p>1959,319</text:p>
          </table:table-cell>
          <table:table-cell table:style-name="ce6" office:value-type="float" office:value="1522.981" calcext:value-type="float">
            <text:p>1522,981</text:p>
          </table:table-cell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42" calcext:value-type="float">
            <text:p>0,142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163.913" calcext:value-type="float">
            <text:p>1163,913</text:p>
          </table:table-cell>
          <table:table-cell table:style-name="ce6" office:value-type="float" office:value="888.315" calcext:value-type="float">
            <text:p>888,315</text:p>
          </table:table-cell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06.645" calcext:value-type="float">
            <text:p>2106,645</text:p>
          </table:table-cell>
          <table:table-cell table:style-name="ce6" office:value-type="float" office:value="1907.829" calcext:value-type="float">
            <text:p>1907,829</text:p>
          </table:table-cell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372.074" calcext:value-type="float">
            <text:p>2372,074</text:p>
          </table:table-cell>
          <table:table-cell table:style-name="ce6" office:value-type="float" office:value="2554.626" calcext:value-type="float">
            <text:p>2554,626</text:p>
          </table:table-cell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347.448" calcext:value-type="float">
            <text:p>1347,448</text:p>
          </table:table-cell>
          <table:table-cell table:style-name="ce6" office:value-type="float" office:value="1188.789" calcext:value-type="float">
            <text:p>1188,789</text:p>
          </table:table-cell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299" calcext:value-type="float">
            <text:p>0,1299</text:p>
          </table:table-cell>
          <table:table-cell table:style-name="ce6" office:value-type="float" office:value="0.0907" calcext:value-type="float">
            <text:p>0,0907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750.447" calcext:value-type="float">
            <text:p>750,447</text:p>
          </table:table-cell>
          <table:table-cell table:style-name="ce6" office:value-type="float" office:value="641.623" calcext:value-type="float">
            <text:p>641,623</text:p>
          </table:table-cell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27" calcext:value-type="float">
            <text:p>0,0727</text:p>
          </table:table-cell>
          <table:table-cell table:style-name="ce6" office:value-type="float" office:value="0.0694" calcext:value-type="float">
            <text:p>0,0694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54.558" calcext:value-type="float">
            <text:p>1554,558</text:p>
          </table:table-cell>
          <table:table-cell table:style-name="ce6" office:value-type="float" office:value="1512.354" calcext:value-type="float">
            <text:p>1512,354</text:p>
          </table:table-cell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683.272" calcext:value-type="float">
            <text:p>2683,272</text:p>
          </table:table-cell>
          <table:table-cell table:style-name="ce6" office:value-type="float" office:value="2713.331" calcext:value-type="float">
            <text:p>2713,331</text:p>
          </table:table-cell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1855.027" calcext:value-type="float">
            <text:p>1855,027</text:p>
          </table:table-cell>
          <table:table-cell table:style-name="ce6" office:value-type="float" office:value="2208.317" calcext:value-type="float">
            <text:p>2208,317</text:p>
          </table:table-cell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1764.727" calcext:value-type="float">
            <text:p>1764,727</text:p>
          </table:table-cell>
          <table:table-cell table:style-name="ce6" office:value-type="float" office:value="1783.144" calcext:value-type="float">
            <text:p>1783,144</text:p>
          </table:table-cell>
          <table:table-cell/>
        </table:table-row>
        <table:table-row table:style-name="ro3">
          <table:table-cell table:style-name="ce1"/>
          <table:table-cell table:style-name="ce5" table:formula="of:=AVERAGE([.B329:.B338])" office:value-type="float" office:value="0.18796" calcext:value-type="float">
            <text:p>0,18796</text:p>
          </table:table-cell>
          <table:table-cell table:style-name="ce5" table:formula="of:=AVERAGE([.C329:.C338])" office:value-type="float" office:value="0.16395" calcext:value-type="float">
            <text:p>0,16395</text:p>
          </table:table-cell>
          <table:table-cell table:style-name="ce5"/>
          <table:table-cell table:style-name="ce7"/>
          <table:table-cell table:style-name="ce7" table:formula="of:=AVERAGE([.F329:.F338])" office:value-type="float" office:value="1755.743" calcext:value-type="float">
            <text:p>1755,743</text:p>
          </table:table-cell>
          <table:table-cell table:style-name="ce7" table:formula="of:=AVERAGE([.G329:.G338])" office:value-type="float" office:value="1692.1309" calcext:value-type="float">
            <text:p>1692,1309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652" calcext:value-type="float">
            <text:p>0,652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569" calcext:value-type="float">
            <text:p>0,569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4.597" calcext:value-type="float">
            <text:p>4,597</text:p>
          </table:table-cell>
          <table:table-cell table:style-name="ce6" office:value-type="float" office:value="4.76" calcext:value-type="float">
            <text:p>4,76</text:p>
          </table:table-cell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0.58" calcext:value-type="float">
            <text:p>0,58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5.74" calcext:value-type="float">
            <text:p>5,74</text:p>
          </table:table-cell>
          <table:table-cell table:style-name="ce6" office:value-type="float" office:value="5.77" calcext:value-type="float">
            <text:p>5,77</text:p>
          </table:table-cell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4.19" calcext:value-type="float">
            <text:p>4,19</text:p>
          </table:table-cell>
          <table:table-cell table:style-name="ce6"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34" calcext:value-type="float">
            <text:p>0,534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6.16" calcext:value-type="float">
            <text:p>6,16</text:p>
          </table:table-cell>
          <table:table-cell table:style-name="ce6" office:value-type="float" office:value="6.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467" calcext:value-type="float">
            <text:p>0,467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68" calcext:value-type="float">
            <text:p>8,68</text:p>
          </table:table-cell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8.91" calcext:value-type="float">
            <text:p>8,91</text:p>
          </table:table-cell>
          <table:table-cell table:style-name="ce6"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5798" calcext:value-type="float">
            <text:p>0,5798</text:p>
          </table:table-cell>
          <table:table-cell table:style-name="ce6" office:value-type="float" office:value="0.5296" calcext:value-type="float">
            <text:p>0,5296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4.65" calcext:value-type="float">
            <text:p>4,65</text:p>
          </table:table-cell>
          <table:table-cell/>
        </table:table-row>
        <table:table-row table:style-name="ro2">
          <table:table-cell office:value-type="string" calcext:value-type="string">
            <text:p>Airfoil_9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715" calcext:value-type="float">
            <text:p>0,715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office:value-type="float" office:value="0.616" calcext:value-type="float">
            <text:p>0,61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3.29" calcext:value-type="float">
            <text:p>3,29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41:.B350])" office:value-type="float" office:value="0.58498" calcext:value-type="float">
            <text:p>0,58498</text:p>
          </table:table-cell>
          <table:table-cell table:style-name="ce7" table:formula="of:=AVERAGE([.C341:.C350])" office:value-type="float" office:value="0.56746" calcext:value-type="float">
            <text:p>0,56746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5.12" calcext:value-type="float">
            <text:p>5,12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float" office:value="5.6117" calcext:value-type="float">
            <text:p>5,6117</text:p>
          </table:table-cell>
          <table:table-cell table:style-name="ce7" table:formula="of:=AVERAGE([.G342:.G351])" office:value-type="float" office:value="5.792" calcext:value-type="float">
            <text:p>5,79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909" calcext:value-type="float">
            <text:p>0,909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/>
          <table:table-cell table:style-name="ce6" office:value-type="string" calcext:value-type="string">
            <text:p>Ho_1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89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/>
          <table:table-cell table:style-name="ce6" office:value-type="string" calcext:value-type="string">
            <text:p>Ho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/>
          <table:table-cell table:style-name="ce6" office:value-type="string" calcext:value-type="string">
            <text:p>Ho_3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/>
          <table:table-cell table:style-name="ce6" office:value-type="string" calcext:value-type="string">
            <text:p>Ho_4</text:p>
          </table:table-cell>
          <table:table-cell table:style-name="ce6" office:value-type="float" office:value="0.522" calcext:value-type="float">
            <text:p>0,522</text:p>
          </table:table-cell>
          <table:table-cell table:style-name="ce6" office:value-type="float" office:value="0.468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1.095" calcext:value-type="float">
            <text:p>1,095</text:p>
          </table:table-cell>
          <table:table-cell table:style-name="ce6" office:value-type="float" office:value="0.521" calcext:value-type="float">
            <text:p>0,521</text:p>
          </table:table-cell>
          <table:table-cell table:style-name="ce6"/>
          <table:table-cell table:style-name="ce6" office:value-type="string" calcext:value-type="string">
            <text:p>Ho_5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 office:value-type="float" office:value="0.24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/>
          <table:table-cell table:style-name="ce6" office:value-type="string" calcext:value-type="string">
            <text:p>Ho_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Ho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287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91" calcext:value-type="float">
            <text:p>0,691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/>
          <table:table-cell table:style-name="ce6" office:value-type="string" calcext:value-type="string">
            <text:p>Ho_8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 office:value-type="float" office:value="0.542" calcext:value-type="float">
            <text:p>0,542</text:p>
          </table:table-cell>
          <table:table-cell table:style-name="ce6"/>
          <table:table-cell table:style-name="ce6" office:value-type="string" calcext:value-type="string">
            <text:p>Ho_9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764" calcext:value-type="float">
            <text:p>0,764</text:p>
          </table:table-cell>
          <table:table-cell table:style-name="ce6"/>
          <table:table-cell table:style-name="ce6" office:value-type="string" calcext:value-type="string">
            <text:p>Ho_10</text:p>
          </table:table-cell>
          <table:table-cell table:style-name="ce6" office:value-type="float" office:value="0.2199" calcext:value-type="float">
            <text:p>0,2199</text:p>
          </table:table-cell>
          <table:table-cell table:style-name="ce6" office:value-type="float" office:value="0.2" calcext:value-type="float">
            <text:p>0,2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54:.B363])" office:value-type="float" office:value="0.7884" calcext:value-type="float">
            <text:p>0,7884</text:p>
          </table:table-cell>
          <table:table-cell table:style-name="ce7" table:formula="of:=AVERAGE([.C354:.C363])" office:value-type="float" office:value="0.5375" calcext:value-type="float">
            <text:p>0,5375</text:p>
          </table:table-cell>
          <table:table-cell table:style-name="ce7" table:number-columns-repeated="2"/>
          <table:table-cell table:style-name="ce7" table:formula="of:=AVERAGE([.F354:.F363])" office:value-type="float" office:value="0.34259" calcext:value-type="float">
            <text:p>0,34259</text:p>
          </table:table-cell>
          <table:table-cell table:style-name="ce7" table:formula="of:=AVERAGE([.G354:.G363])" office:value-type="float" office:value="0.3318" calcext:value-type="float">
            <text:p>0,331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3"/>
          <table:table-cell table:style-name="Default" table:number-columns-repeated="3"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186" calcext:value-type="float">
            <text:p>2,186</text:p>
          </table:table-cell>
          <table:table-cell table:style-name="ce6"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27" calcext:value-type="float">
            <text:p>0,527</text:p>
          </table:table-cell>
          <table:table-cell table:style-name="ce6" office:value-type="float" office:value="0.602" calcext:value-type="float">
            <text:p>0,60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979" calcext:value-type="float">
            <text:p>2,979</text:p>
          </table:table-cell>
          <table:table-cell table:style-name="ce6" office:value-type="float" office:value="1.628" calcext:value-type="float">
            <text:p>1,628</text:p>
          </table:table-cell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8797" calcext:value-type="float">
            <text:p>0,8797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865" calcext:value-type="float">
            <text:p>1,865</text:p>
          </table:table-cell>
          <table:table-cell table:style-name="ce6"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1.7299" calcext:value-type="float">
            <text:p>1,7299</text:p>
          </table:table-cell>
          <table:table-cell table:style-name="ce6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1.976" calcext:value-type="float">
            <text:p>1,976</text:p>
          </table:table-cell>
          <table:table-cell table:style-name="ce6" office:value-type="float" office:value="0.59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601" calcext:value-type="float">
            <text:p>0,60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48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35" calcext:value-type="float">
            <text:p>0,435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3.474" calcext:value-type="float">
            <text:p>3,474</text:p>
          </table:table-cell>
          <table:table-cell table:style-name="ce6"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456" calcext:value-type="float">
            <text:p>0,456</text:p>
          </table:table-cell>
          <table:table-cell table:style-name="ce6" office:value-type="float" office:value="0.465" calcext:value-type="float">
            <text:p>0,46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267" calcext:value-type="float">
            <text:p>0,267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67:.B376])" office:value-type="float" office:value="0.61067" calcext:value-type="float">
            <text:p>0,61067</text:p>
          </table:table-cell>
          <table:table-cell table:style-name="ce7" table:formula="of:=AVERAGE([.C367:.C376])" office:value-type="float" office:value="0.6355" calcext:value-type="float">
            <text:p>0,63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958" calcext:value-type="float">
            <text:p>2,958</text:p>
          </table:table-cell>
          <table:table-cell table:style-name="ce6" office:value-type="float" office:value="0.957" calcext:value-type="float">
            <text:p>0,957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float" office:value="1.96189" calcext:value-type="float">
            <text:p>1,96189</text:p>
          </table:table-cell>
          <table:table-cell table:style-name="ce7" table:formula="of:=AVERAGE([.G368:.G377])" office:value-type="float" office:value="0.8865" calcext:value-type="float">
            <text:p>0,8865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320.366" calcext:value-type="float">
            <text:p>320,366</text:p>
          </table:table-cell>
          <table:table-cell table:style-name="ce6" office:value-type="float" office:value="355.736" calcext:value-type="float">
            <text:p>355,73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31.641" calcext:value-type="float">
            <text:p>631,641</text:p>
          </table:table-cell>
          <table:table-cell table:style-name="ce6" office:value-type="float" office:value="775.283" calcext:value-type="float">
            <text:p>775,283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.854" calcext:value-type="float">
            <text:p>1,854</text:p>
          </table:table-cell>
          <table:table-cell table:style-name="ce6" office:value-type="float" office:value="1.391" calcext:value-type="float">
            <text:p>1,391</text:p>
          </table:table-cell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3.888" calcext:value-type="float">
            <text:p>623,888</text:p>
          </table:table-cell>
          <table:table-cell table:style-name="ce6" office:value-type="float" office:value="730.547" calcext:value-type="float">
            <text:p>730,547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952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93.455" calcext:value-type="float">
            <text:p>393,455</text:p>
          </table:table-cell>
          <table:table-cell table:style-name="ce6" office:value-type="float" office:value="647.308" calcext:value-type="float">
            <text:p>647,308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office:value-type="float" office:value="0.6099" calcext:value-type="float">
            <text:p>0,6099</text:p>
          </table:table-cell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652.84" calcext:value-type="float">
            <text:p>652,84</text:p>
          </table:table-cell>
          <table:table-cell table:style-name="ce6" office:value-type="float" office:value="725.344" calcext:value-type="float">
            <text:p>725,34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476.915" calcext:value-type="float">
            <text:p>476,915</text:p>
          </table:table-cell>
          <table:table-cell table:style-name="ce6" office:value-type="float" office:value="725.087" calcext:value-type="float">
            <text:p>725,087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.162" calcext:value-type="float">
            <text:p>1,162</text:p>
          </table:table-cell>
          <table:table-cell table:style-name="ce6" office:value-type="float" office:value="1.382" calcext:value-type="float">
            <text:p>1,382</text:p>
          </table:table-cell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429.846" calcext:value-type="float">
            <text:p>429,846</text:p>
          </table:table-cell>
          <table:table-cell table:style-name="ce6" office:value-type="float" office:value="441.97" calcext:value-type="float">
            <text:p>441,97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office:value-type="float" office:value="505.516" calcext:value-type="float">
            <text:p>505,516</text:p>
          </table:table-cell>
          <table:table-cell table:style-name="ce6" office:value-type="float" office:value="484.522" calcext:value-type="float">
            <text:p>484,52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6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67.851" calcext:value-type="float">
            <text:p>567,851</text:p>
          </table:table-cell>
          <table:table-cell table:style-name="ce6" office:value-type="float" office:value="474.867" calcext:value-type="float">
            <text:p>474,86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1.1199" calcext:value-type="float">
            <text:p>1,1199</text:p>
          </table:table-cell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578.888" calcext:value-type="float">
            <text:p>578,888</text:p>
          </table:table-cell>
          <table:table-cell table:style-name="ce6" office:value-type="float" office:value="487.051" calcext:value-type="float">
            <text:p>487,051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0.969" calcext:value-type="float">
            <text:p>0,969</text:p>
          </table:table-cell>
          <table:table-cell table:style-name="ce6" office:value-type="float" office:value="1.146" calcext:value-type="float">
            <text:p>1,146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80:.B389])" office:value-type="float" office:value="518.1206" calcext:value-type="float">
            <text:p>518,1206</text:p>
          </table:table-cell>
          <table:table-cell table:style-name="ce7" table:formula="of:=AVERAGE([.C380:.C389])" office:value-type="float" office:value="584.7715" calcext:value-type="float">
            <text:p>584,7715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1.151" calcext:value-type="float">
            <text:p>1,1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float" office:value="0.9946" calcext:value-type="float">
            <text:p>0,9946</text:p>
          </table:table-cell>
          <table:table-cell table:style-name="ce7" table:formula="of:=AVERAGE([.G381:.G390])" office:value-type="float" office:value="1.10658" calcext:value-type="float">
            <text:p>1,1065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388" calcext:value-type="float">
            <text:p>0,38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711" calcext:value-type="float">
            <text:p>4,711</text:p>
          </table:table-cell>
          <table:table-cell table:style-name="ce6" office:value-type="float" office:value="3.857" calcext:value-type="float">
            <text:p>3,857</text:p>
          </table:table-cell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9" calcext:value-type="float">
            <text:p>3,719</text:p>
          </table:table-cell>
          <table:table-cell table:style-name="ce6" office:value-type="float" office:value="3.614" calcext:value-type="float">
            <text:p>3,614</text:p>
          </table:table-cell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695" calcext:value-type="float">
            <text:p>3,695</text:p>
          </table:table-cell>
          <table:table-cell table:style-name="ce6" office:value-type="float" office:value="3.452" calcext:value-type="float">
            <text:p>3,452</text:p>
          </table:table-cell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64" calcext:value-type="float">
            <text:p>3,264</text:p>
          </table:table-cell>
          <table:table-cell table:style-name="ce6" office:value-type="float" office:value="3.123" calcext:value-type="float">
            <text:p>3,123</text:p>
          </table:table-cell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853" calcext:value-type="float">
            <text:p>3,853</text:p>
          </table:table-cell>
          <table:table-cell table:style-name="ce6" office:value-type="float" office:value="3.822" calcext:value-type="float">
            <text:p>3,822</text:p>
          </table:table-cell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0902" calcext:value-type="float">
            <text:p>0,0902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556" calcext:value-type="float">
            <text:p>3,556</text:p>
          </table:table-cell>
          <table:table-cell table:style-name="ce6" office:value-type="float" office:value="3.308" calcext:value-type="float">
            <text:p>3,308</text:p>
          </table:table-cell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4.833" calcext:value-type="float">
            <text:p>4,833</text:p>
          </table:table-cell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721" calcext:value-type="float">
            <text:p>3,721</text:p>
          </table:table-cell>
          <table:table-cell table:style-name="ce6"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21" calcext:value-type="float">
            <text:p>0,421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775" calcext:value-type="float">
            <text:p>3,775</text:p>
          </table:table-cell>
          <table:table-cell table:style-name="ce6" office:value-type="float" office:value="3.505" calcext:value-type="float">
            <text:p>3,50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393:.B402])" office:value-type="float" office:value="0.28052" calcext:value-type="float">
            <text:p>0,28052</text:p>
          </table:table-cell>
          <table:table-cell table:style-name="ce7" table:formula="of:=AVERAGE([.C393:.C402])" office:value-type="float" office:value="0.24347" calcext:value-type="float">
            <text:p>0,24347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431" calcext:value-type="float">
            <text:p>3,431</text:p>
          </table:table-cell>
          <table:table-cell table:style-name="ce6" office:value-type="float" office:value="3.251" calcext:value-type="float">
            <text:p>3,251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float" office:value="3.8798" calcext:value-type="float">
            <text:p>3,8798</text:p>
          </table:table-cell>
          <table:table-cell table:style-name="ce7" table:formula="of:=AVERAGE([.G394:.G403])" office:value-type="float" office:value="3.638" calcext:value-type="float">
            <text:p>3,638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1"/>
          <table:table-cell table:style-name="ce1" office:value-type="string" calcext:value-type="string">
            <text:p>f=4</text:p>
          </table:table-cell>
          <table:table-cell table:style-name="ce1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auto_1</text:p>
          </table:table-cell>
          <table:table-cell table:style-name="ce6" office:value-type="float" office:value="508.451" calcext:value-type="float">
            <text:p>508,451</text:p>
          </table:table-cell>
          <table:table-cell table:style-name="ce6" office:value-type="float" office:value="446.233" calcext:value-type="float">
            <text:p>446,233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0937" calcext:value-type="float">
            <text:p>0,0937</text:p>
          </table:table-cell>
          <table:table-cell/>
        </table:table-row>
        <table:table-row table:style-name="ro1">
          <table:table-cell office:value-type="string" calcext:value-type="string">
            <text:p>auto_2</text:p>
          </table:table-cell>
          <table:table-cell table:style-name="ce6" office:value-type="float" office:value="312.354" calcext:value-type="float">
            <text:p>312,354</text:p>
          </table:table-cell>
          <table:table-cell table:style-name="ce6" office:value-type="float" office:value="309.51" calcext:value-type="float">
            <text:p>309,51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656" calcext:value-type="float">
            <text:p>0,0656</text:p>
          </table:table-cell>
          <table:table-cell/>
        </table:table-row>
        <table:table-row table:style-name="ro1">
          <table:table-cell office:value-type="string" calcext:value-type="string">
            <text:p>auto_3</text:p>
          </table:table-cell>
          <table:table-cell table:style-name="ce6" office:value-type="float" office:value="390.839" calcext:value-type="float">
            <text:p>390,839</text:p>
          </table:table-cell>
          <table:table-cell table:style-name="ce6" office:value-type="float" office:value="391.235" calcext:value-type="float">
            <text:p>391,235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0.37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auto_4</text:p>
          </table:table-cell>
          <table:table-cell table:style-name="ce6" office:value-type="float" office:value="542.098" calcext:value-type="float">
            <text:p>542,098</text:p>
          </table:table-cell>
          <table:table-cell table:style-name="ce6" office:value-type="float" office:value="475.559" calcext:value-type="float">
            <text:p>475,559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auto_5</text:p>
          </table:table-cell>
          <table:table-cell table:style-name="ce6" office:value-type="float" office:value="460.534" calcext:value-type="float">
            <text:p>460,534</text:p>
          </table:table-cell>
          <table:table-cell table:style-name="ce6" office:value-type="float" office:value="457.924" calcext:value-type="float">
            <text:p>457,924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auto_6</text:p>
          </table:table-cell>
          <table:table-cell table:style-name="ce6" office:value-type="float" office:value="294.987" calcext:value-type="float">
            <text:p>294,987</text:p>
          </table:table-cell>
          <table:table-cell table:style-name="ce6" office:value-type="float" office:value="181.028" calcext:value-type="float">
            <text:p>181,028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auto_7</text:p>
          </table:table-cell>
          <table:table-cell table:style-name="ce6" office:value-type="float" office:value="217.559" calcext:value-type="float">
            <text:p>217,559</text:p>
          </table:table-cell>
          <table:table-cell table:style-name="ce6" office:value-type="float" office:value="214.955" calcext:value-type="float">
            <text:p>214,955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0988" calcext:value-type="float">
            <text:p>0,0988</text:p>
          </table:table-cell>
          <table:table-cell table:style-name="ce6" office:value-type="float" office:value="0.0754" calcext:value-type="float">
            <text:p>0,0754</text:p>
          </table:table-cell>
          <table:table-cell/>
        </table:table-row>
        <table:table-row table:style-name="ro1">
          <table:table-cell office:value-type="string" calcext:value-type="string">
            <text:p>auto_8</text:p>
          </table:table-cell>
          <table:table-cell table:style-name="ce6" office:value-type="float" office:value="532.182" calcext:value-type="float">
            <text:p>532,182</text:p>
          </table:table-cell>
          <table:table-cell table:style-name="ce6" office:value-type="float" office:value="569.303" calcext:value-type="float">
            <text:p>569,303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string" calcext:value-type="string">
            <text:p>auto_9</text:p>
          </table:table-cell>
          <table:table-cell table:style-name="ce6" office:value-type="float" office:value="311.191" calcext:value-type="float">
            <text:p>311,191</text:p>
          </table:table-cell>
          <table:table-cell table:style-name="ce6" office:value-type="float" office:value="343.523" calcext:value-type="float">
            <text:p>343,523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_10</text:p>
          </table:table-cell>
          <table:table-cell table:style-name="ce6" office:value-type="float" office:value="337.162" calcext:value-type="float">
            <text:p>337,162</text:p>
          </table:table-cell>
          <table:table-cell table:style-name="ce6" office:value-type="float" office:value="329.073" calcext:value-type="float">
            <text:p>329,073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0.225" calcext:value-type="float">
            <text:p>0,225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06:.B415])" office:value-type="float" office:value="390.7357" calcext:value-type="float">
            <text:p>390,7357</text:p>
          </table:table-cell>
          <table:table-cell table:style-name="ce7" table:formula="of:=AVERAGE([.C406:.C415])" office:value-type="float" office:value="371.8343" calcext:value-type="float">
            <text:p>371,8343</text:p>
          </table:table-cell>
          <table:table-cell table:style-name="ce7" table:number-columns-repeated="2"/>
          <table:table-cell table:style-name="ce7" table:formula="of:=AVERAGE([.F406:.F415])" office:value-type="float" office:value="0.51653" calcext:value-type="float">
            <text:p>0,51653</text:p>
          </table:table-cell>
          <table:table-cell table:style-name="ce7" table:formula="of:=AVERAGE([.G406:.G415])" office:value-type="float" office:value="0.45697" calcext:value-type="float">
            <text:p>0,45697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499" calcext:value-type="float">
            <text:p>8,499</text:p>
          </table:table-cell>
          <table:table-cell table:style-name="ce6" office:value-type="float" office:value="8.479" calcext:value-type="float">
            <text:p>8,479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535" calcext:value-type="float">
            <text:p>1,535</text:p>
          </table:table-cell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476" calcext:value-type="float">
            <text:p>7,476</text:p>
          </table:table-cell>
          <table:table-cell table:style-name="ce6" office:value-type="float" office:value="7.479" calcext:value-type="float">
            <text:p>7,479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office:value-type="float" office:value="1.176" calcext:value-type="float">
            <text:p>1,176</text:p>
          </table:table-cell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23" calcext:value-type="float">
            <text:p>9,023</text:p>
          </table:table-cell>
          <table:table-cell table:style-name="ce6" office:value-type="float" office:value="9.03" calcext:value-type="float">
            <text:p>9,03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1.38" calcext:value-type="float">
            <text:p>1,3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88" calcext:value-type="float">
            <text:p>7,588</text:p>
          </table:table-cell>
          <table:table-cell table:style-name="ce6" office:value-type="float" office:value="7.653" calcext:value-type="float">
            <text:p>7,653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211" calcext:value-type="float">
            <text:p>1,211</text:p>
          </table:table-cell>
          <table:table-cell table:style-name="ce6" office:value-type="float" office:value="1.274" calcext:value-type="float">
            <text:p>1,274</text:p>
          </table:table-cell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number-columns-repeated="2" table:style-name="ce6" office:value-type="float" office:value="7.276" calcext:value-type="float">
            <text:p>7,276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249" calcext:value-type="float">
            <text:p>1,249</text:p>
          </table:table-cell>
          <table:table-cell table:style-name="ce6" office:value-type="float" office:value="1.448" calcext:value-type="float">
            <text:p>1,448</text:p>
          </table:table-cell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7.984" calcext:value-type="float">
            <text:p>7,984</text:p>
          </table:table-cell>
          <table:table-cell table:style-name="ce6" office:value-type="float" office:value="7.999" calcext:value-type="float">
            <text:p>7,99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1.103" calcext:value-type="float">
            <text:p>1,10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number-columns-repeated="2" table:style-name="ce6" office:value-type="float" office:value="9.127" calcext:value-type="float">
            <text:p>9,127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13" calcext:value-type="float">
            <text:p>1,613</text:p>
          </table:table-cell>
          <table:table-cell table:style-name="ce6" office:value-type="float" office:value="1.743" calcext:value-type="float">
            <text:p>1,74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363" calcext:value-type="float">
            <text:p>7,363</text:p>
          </table:table-cell>
          <table:table-cell table:style-name="ce6" office:value-type="float" office:value="7.416" calcext:value-type="float">
            <text:p>7,416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0.933" calcext:value-type="float">
            <text:p>0,933</text:p>
          </table:table-cell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487" calcext:value-type="float">
            <text:p>6,487</text:p>
          </table:table-cell>
          <table:table-cell table:style-name="ce6" office:value-type="float" office:value="6.408" calcext:value-type="float">
            <text:p>6,408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25" calcext:value-type="float">
            <text:p>1,425</text:p>
          </table:table-cell>
          <table:table-cell table:style-name="ce6" office:value-type="float" office:value="1.389" calcext:value-type="float">
            <text:p>1,389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223" calcext:value-type="float">
            <text:p>7,223</text:p>
          </table:table-cell>
          <table:table-cell table:style-name="ce6" office:value-type="float" office:value="7.226" calcext:value-type="float">
            <text:p>7,22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63" calcext:value-type="float">
            <text:p>1,563</text:p>
          </table:table-cell>
          <table:table-cell table:style-name="ce6" office:value-type="float" office:value="1.307" calcext:value-type="float">
            <text:p>1,307</text:p>
          </table:table-cell>
          <table:table-cell/>
        </table:table-row>
        <table:table-row table:style-name="ro3">
          <table:table-cell table:style-name="ce7"/>
          <table:table-cell table:style-name="ce7" table:formula="of:=AVERAGE([.B419:.B428])" office:value-type="float" office:value="7.8046" calcext:value-type="float">
            <text:p>7,8046</text:p>
          </table:table-cell>
          <table:table-cell table:style-name="ce7" table:formula="of:=AVERAGE([.C419:.C428])" office:value-type="float" office:value="7.8093" calcext:value-type="float">
            <text:p>7,8093</text:p>
          </table:table-cell>
          <table:table-cell table:style-name="ce7" table:number-columns-repeated="2"/>
          <table:table-cell table:style-name="ce7" table:formula="of:=AVERAGE([.F419:.F428])" office:value-type="float" office:value="1.3531" calcext:value-type="float">
            <text:p>1,3531</text:p>
          </table:table-cell>
          <table:table-cell table:style-name="ce7" table:formula="of:=AVERAGE([.G419:.G428])" office:value-type="float" office:value="1.3288" calcext:value-type="float">
            <text:p>1,3288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 table:number-columns-repeated="2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6.896" calcext:value-type="float">
            <text:p>176,896</text:p>
          </table:table-cell>
          <table:table-cell table:style-name="ce6" office:value-type="float" office:value="92.593" calcext:value-type="float">
            <text:p>92,593</text:p>
          </table:table-cell>
          <table:table-cell table:style-name="ce6"/>
          <table:table-cell table:style-name="ce6" office:value-type="string" calcext:value-type="string">
            <text:p>plastic_1</text:p>
          </table:table-cell>
          <table:table-cell table:style-name="ce6" office:value-type="float" office:value="338.008" calcext:value-type="float">
            <text:p>338,008</text:p>
          </table:table-cell>
          <table:table-cell table:style-name="ce6" office:value-type="float" office:value="327.903" calcext:value-type="float">
            <text:p>327,903</text:p>
          </table:table-cell>
          <table:table-cell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08.663" calcext:value-type="float">
            <text:p>108,663</text:p>
          </table:table-cell>
          <table:table-cell table:style-name="ce6" office:value-type="float" office:value="99.703" calcext:value-type="float">
            <text:p>99,703</text:p>
          </table:table-cell>
          <table:table-cell table:style-name="ce6"/>
          <table:table-cell table:style-name="ce6" office:value-type="string" calcext:value-type="string">
            <text:p>plastic_2</text:p>
          </table:table-cell>
          <table:table-cell table:style-name="ce6" office:value-type="float" office:value="337.962" calcext:value-type="float">
            <text:p>337,962</text:p>
          </table:table-cell>
          <table:table-cell table:style-name="ce6" office:value-type="float" office:value="332.714" calcext:value-type="float">
            <text:p>332,714</text:p>
          </table:table-cell>
          <table:table-cell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10.455" calcext:value-type="float">
            <text:p>110,455</text:p>
          </table:table-cell>
          <table:table-cell table:style-name="ce6" office:value-type="float" office:value="103.948" calcext:value-type="float">
            <text:p>103,948</text:p>
          </table:table-cell>
          <table:table-cell table:style-name="ce6"/>
          <table:table-cell table:style-name="ce6" office:value-type="string" calcext:value-type="string">
            <text:p>plastic_3</text:p>
          </table:table-cell>
          <table:table-cell table:style-name="ce6" office:value-type="float" office:value="357.297" calcext:value-type="float">
            <text:p>357,297</text:p>
          </table:table-cell>
          <table:table-cell table:style-name="ce6" office:value-type="float" office:value="360.8096" calcext:value-type="float">
            <text:p>360,8096</text:p>
          </table:table-cell>
          <table:table-cell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58.743" calcext:value-type="float">
            <text:p>158,743</text:p>
          </table:table-cell>
          <table:table-cell table:style-name="ce6" office:value-type="float" office:value="103.132" calcext:value-type="float">
            <text:p>103,132</text:p>
          </table:table-cell>
          <table:table-cell table:style-name="ce6"/>
          <table:table-cell table:style-name="ce6" office:value-type="string" calcext:value-type="string">
            <text:p>plastic_4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84.364" calcext:value-type="float">
            <text:p>384,364</text:p>
          </table:table-cell>
          <table:table-cell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83.305" calcext:value-type="float">
            <text:p>83,305</text:p>
          </table:table-cell>
          <table:table-cell table:style-name="ce6" office:value-type="float" office:value="91.667" calcext:value-type="float">
            <text:p>91,667</text:p>
          </table:table-cell>
          <table:table-cell table:style-name="ce6"/>
          <table:table-cell table:style-name="ce6" office:value-type="string" calcext:value-type="string">
            <text:p>plastic_5</text:p>
          </table:table-cell>
          <table:table-cell table:style-name="ce6" office:value-type="float" office:value="369.929" calcext:value-type="float">
            <text:p>369,929</text:p>
          </table:table-cell>
          <table:table-cell table:style-name="ce6" office:value-type="float" office:value="357.144" calcext:value-type="float">
            <text:p>357,144</text:p>
          </table:table-cell>
          <table:table-cell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01.716" calcext:value-type="float">
            <text:p>101,716</text:p>
          </table:table-cell>
          <table:table-cell table:style-name="ce6" office:value-type="float" office:value="95.211" calcext:value-type="float">
            <text:p>95,211</text:p>
          </table:table-cell>
          <table:table-cell table:style-name="ce6"/>
          <table:table-cell table:style-name="ce6" office:value-type="string" calcext:value-type="string">
            <text:p>plastic_6</text:p>
          </table:table-cell>
          <table:table-cell table:style-name="ce6" office:value-type="float" office:value="471.002" calcext:value-type="float">
            <text:p>471,002</text:p>
          </table:table-cell>
          <table:table-cell table:style-name="ce6" office:value-type="float" office:value="428.908" calcext:value-type="float">
            <text:p>428,908</text:p>
          </table:table-cell>
          <table:table-cell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84.44" calcext:value-type="float">
            <text:p>84,44</text:p>
          </table:table-cell>
          <table:table-cell table:style-name="ce6" office:value-type="float" office:value="85.723" calcext:value-type="float">
            <text:p>85,723</text:p>
          </table:table-cell>
          <table:table-cell table:style-name="ce6"/>
          <table:table-cell table:style-name="ce6" office:value-type="string" calcext:value-type="string">
            <text:p>plastic_7</text:p>
          </table:table-cell>
          <table:table-cell table:style-name="ce6" office:value-type="float" office:value="343.813" calcext:value-type="float">
            <text:p>343,813</text:p>
          </table:table-cell>
          <table:table-cell table:style-name="ce6" office:value-type="float" office:value="340.821" calcext:value-type="float">
            <text:p>340,821</text:p>
          </table:table-cell>
          <table:table-cell/>
        </table:table-row>
        <table:table-row table:style-name="ro2">
          <table:table-cell office:value-type="string" calcext:value-type="string">
            <text:p>stock_8</text:p>
          </table:table-cell>
          <table:table-cell table:style-name="ce6" office:value-type="float" office:value="109.795" calcext:value-type="float">
            <text:p>109,795</text:p>
          </table:table-cell>
          <table:table-cell table:style-name="ce6" office:value-type="float" office:value="98.391" calcext:value-type="float">
            <text:p>98,391</text:p>
          </table:table-cell>
          <table:table-cell table:style-name="ce6"/>
          <table:table-cell table:style-name="ce6" office:value-type="string" calcext:value-type="string">
            <text:p>plastic_8</text:p>
          </table:table-cell>
          <table:table-cell table:style-name="ce6" office:value-type="float" office:value="421.103" calcext:value-type="float">
            <text:p>421,103</text:p>
          </table:table-cell>
          <table:table-cell table:style-name="ce6" office:value-type="float" office:value="404.336" calcext:value-type="float">
            <text:p>404,336</text:p>
          </table:table-cell>
          <table:table-cell/>
        </table:table-row>
        <table:table-row table:style-name="ro2">
          <table:table-cell office:value-type="string" calcext:value-type="string">
            <text:p>stock_9</text:p>
          </table:table-cell>
          <table:table-cell table:style-name="ce6" office:value-type="float" office:value="87.533" calcext:value-type="float">
            <text:p>87,533</text:p>
          </table:table-cell>
          <table:table-cell table:style-name="ce6" office:value-type="float" office:value="135.066" calcext:value-type="float">
            <text:p>135,066</text:p>
          </table:table-cell>
          <table:table-cell table:style-name="ce6"/>
          <table:table-cell table:style-name="ce6" office:value-type="string" calcext:value-type="string">
            <text:p>plastic_9</text:p>
          </table:table-cell>
          <table:table-cell table:style-name="ce6" office:value-type="float" office:value="409.696" calcext:value-type="float">
            <text:p>409,696</text:p>
          </table:table-cell>
          <table:table-cell table:style-name="ce6" office:value-type="float" office:value="387.365" calcext:value-type="float">
            <text:p>387,365</text:p>
          </table:table-cell>
          <table:table-cell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25.597" calcext:value-type="float">
            <text:p>125,597</text:p>
          </table:table-cell>
          <table:table-cell table:style-name="ce6" office:value-type="float" office:value="123.109" calcext:value-type="float">
            <text:p>123,109</text:p>
          </table:table-cell>
          <table:table-cell table:style-name="ce6"/>
          <table:table-cell table:style-name="ce6" office:value-type="string" calcext:value-type="string">
            <text:p>plastic_10</text:p>
          </table:table-cell>
          <table:table-cell table:style-name="ce6" office:value-type="float" office:value="383.283" calcext:value-type="float">
            <text:p>383,283</text:p>
          </table:table-cell>
          <table:table-cell table:style-name="ce6" office:value-type="float" office:value="371.091" calcext:value-type="float">
            <text:p>371,091</text:p>
          </table:table-cell>
          <table:table-cell/>
        </table:table-row>
        <table:table-row table:style-name="ro3">
          <table:table-cell table:style-name="ce4"/>
          <table:table-cell table:style-name="ce7" table:formula="of:=AVERAGE([.B432:.B441])" office:value-type="float" office:value="114.7143" calcext:value-type="float">
            <text:p>114,7143</text:p>
          </table:table-cell>
          <table:table-cell table:style-name="ce7" table:formula="of:=AVERAGE([.C432:.C441])" office:value-type="float" office:value="102.8543" calcext:value-type="float">
            <text:p>102,8543</text:p>
          </table:table-cell>
          <table:table-cell table:style-name="ce7"/>
          <table:table-cell table:style-name="ce6"/>
          <table:table-cell table:style-name="ce7" table:formula="of:=AVERAGE([.F432:.F441])" office:value-type="float" office:value="380.2022" calcext:value-type="float">
            <text:p>380,2022</text:p>
          </table:table-cell>
          <table:table-cell table:style-name="ce7" table:formula="of:=AVERAGE([.G432:.G441])" office:value-type="float" office:value="369.54556" calcext:value-type="float">
            <text:p>369,54556</text:p>
          </table:table-cell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4</text:p>
          </table:table-cell>
          <table:table-cell table:style-name="ce5" office:value-type="string" calcext:value-type="string">
            <text:p>f=8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4.033" calcext:value-type="float">
            <text:p>4,033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.592" calcext:value-type="float">
            <text:p>4,592</text:p>
          </table:table-cell>
          <table:table-cell table:style-name="ce6" office:value-type="float" office:value="4.362" calcext:value-type="float">
            <text:p>4,36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6.53" calcext:value-type="float">
            <text:p>6,53</text:p>
          </table:table-cell>
          <table:table-cell table:style-name="ce6" office:value-type="float" office:value="7.348" calcext:value-type="float">
            <text:p>7,34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.827" calcext:value-type="float">
            <text:p>2,827</text:p>
          </table:table-cell>
          <table:table-cell table:style-name="ce6" office:value-type="float" office:value="2.878" calcext:value-type="float">
            <text:p>2,87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6.177" calcext:value-type="float">
            <text:p>6,177</text:p>
          </table:table-cell>
          <table:table-cell table:style-name="ce6" office:value-type="float" office:value="6.969" calcext:value-type="float">
            <text:p>6,969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7.387" calcext:value-type="float">
            <text:p>7,387</text:p>
          </table:table-cell>
          <table:table-cell table:style-name="ce6" office:value-type="float" office:value="8.256" calcext:value-type="float">
            <text:p>8,256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5.333" calcext:value-type="float">
            <text:p>5,333</text:p>
          </table:table-cell>
          <table:table-cell table:style-name="ce6" office:value-type="float" office:value="5.967" calcext:value-type="float">
            <text:p>5,967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5.024" calcext:value-type="float">
            <text:p>5,024</text:p>
          </table:table-cell>
          <table:table-cell table:style-name="ce6" office:value-type="float" office:value="4.965" calcext:value-type="float">
            <text:p>4,965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2.894" calcext:value-type="float">
            <text:p>2,894</text:p>
          </table:table-cell>
          <table:table-cell table:style-name="ce6" office:value-type="float" office:value="3.432" calcext:value-type="float">
            <text:p>3,432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.438" calcext:value-type="float">
            <text:p>4,438</text:p>
          </table:table-cell>
          <table:table-cell table:style-name="ce6" office:value-type="float" office:value="5.428" calcext:value-type="float">
            <text:p>5,428</text:p>
          </table:table-cell>
          <table:table-cell table:style-name="ce6"/>
          <table:table-cell table:style-name="ce8"/>
          <table:table-cell table:style-name="Default" table:number-columns-repeated="2"/>
          <table:table-cell/>
        </table:table-row>
        <table:table-row table:style-name="ro3">
          <table:table-cell table:style-name="ce4"/>
          <table:table-cell table:style-name="ce7" table:formula="of:=AVERAGE([.B445:.B454])" office:value-type="float" office:value="4.8966" calcext:value-type="float">
            <text:p>4,8966</text:p>
          </table:table-cell>
          <table:table-cell table:style-name="ce7" table:formula="of:=AVERAGE([.C445:.C454])" office:value-type="float" office:value="5.3638" calcext:value-type="float">
            <text:p>5,3638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16"/>
        <table:table-column table:style-name="co9" table:number-columns-repeated="16379" table:default-cell-style-name="Default"/>
        <table:table-row table:style-name="ro3">
          <table:table-cell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 table:number-columns-repeated="16379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76" calcext:value-type="percentage">
            <text:p>17,60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78" calcext:value-type="percentage">
            <text:p>17,80%</text:p>
          </table:table-cell>
          <table:table-cell office:value-type="percentage" office:value="0.185" calcext:value-type="percentage">
            <text:p>18,50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13" calcext:value-type="percentage">
            <text:p>20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3497" calcext:value-type="percentage">
            <text:p>34,97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27" calcext:value-type="percentage">
            <text:p>18,2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503" calcext:value-type="percentage">
            <text:p>35,03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376" calcext:value-type="percentage">
            <text:p>3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5014" calcext:value-type="percentage">
            <text:p>50,14%</text:p>
          </table:table-cell>
          <table:table-cell office:value-type="percentage" office:value="0.5028" calcext:value-type="percentage">
            <text:p>50,2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826" calcext:value-type="percentage">
            <text:p>38,2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836" calcext:value-type="percentage">
            <text:p>58,36%</text:p>
          </table:table-cell>
          <table:table-cell office:value-type="percentage" office:value="0.5961" calcext:value-type="percentage">
            <text:p>59,6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5365" calcext:value-type="percentage">
            <text:p>53,65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129" calcext:value-type="percentage">
            <text:p>51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5392" calcext:value-type="percentage">
            <text:p>53,92%</text:p>
          </table:table-cell>
          <table:table-cell office:value-type="percentage" office:value="0.4008" calcext:value-type="percentage">
            <text:p>40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13" calcext:value-type="percentage">
            <text:p>19,13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3041" calcext:value-type="percentage">
            <text:p>30,41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office:value-type="percentage" office:value="0.0948" calcext:value-type="percentage">
            <text:p>9,4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36" calcext:value-type="percentage">
            <text:p>9,3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82" calcext:value-type="percentage">
            <text:p>15,8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RING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557" calcext:value-type="percentage">
            <text:p>5,5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78" calcext:value-type="percentage">
            <text:p>28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2945" calcext:value-type="percentage">
            <text:p>29,45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05" calcext:value-type="percentage">
            <text:p>22,05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149" calcext:value-type="percentage">
            <text:p>41,49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2465" calcext:value-type="percentage">
            <text:p>2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041" calcext:value-type="percentage">
            <text:p>10,4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2" calcext:value-type="percentage">
            <text:p>1,82%</text:p>
          </table:table-cell>
          <table:table-cell office:value-type="percentage" office:value="0.023" calcext:value-type="percentage">
            <text:p>2,3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6379"/>
        </table:table-row>
        <table:table-row table:style-name="ro5">
          <table:table-cell table:style-name="ce14"/>
          <table:table-cell table:style-name="ce17" table:formula="of:=AVERAGE([.B3:.B44])" office:value-type="percentage" office:value="0.259278571428571" calcext:value-type="percentage">
            <text:p>25,93%</text:p>
          </table:table-cell>
          <table:table-cell table:style-name="ce17" table:formula="of:=AVERAGE([.C3:.C44])" office:value-type="percentage" office:value="0.228540476190476" calcext:value-type="percentage">
            <text:p>22,85%</text:p>
          </table:table-cell>
          <table:table-cell table:style-name="ce17" table:formula="of:=AVERAGE([.D3:.D44])" office:value-type="percentage" office:value="0.215828571428571" calcext:value-type="percentage">
            <text:p>21,58%</text:p>
          </table:table-cell>
          <table:table-cell table:style-name="ce17" table:formula="of:=AVERAGE([.E3:.E44])" office:value-type="percentage" office:value="0.21237380952381" calcext:value-type="percentage">
            <text:p>21,24%</text:p>
          </table:table-cell>
          <table:table-cell table:number-columns-repeated="16379"/>
        </table:table-row>
        <table:table-row table:style-name="ro1">
          <table:table-cell table:style-name="ce12" table:number-columns-repeated="5"/>
          <table:table-cell table:number-columns-repeated="16379"/>
        </table:table-row>
        <table:table-row table:style-name="ro3">
          <table:table-cell table:style-name="ce36"/>
          <table:table-cell table:style-name="ce36" office:value-type="string" calcext:value-type="string">
            <text:p>GAIN</text:p>
          </table:table-cell>
          <table:table-cell table:style-name="ce42" table:formula="of:=([.B45]-[.C45])/[.B45]" office:value-type="percentage" office:value="0.118552393546195" calcext:value-type="percentage">
            <text:p>11,86%</text:p>
          </table:table-cell>
          <table:table-cell table:style-name="ce42" table:formula="of:=([.B45]-[.D45])/[.B45]" office:value-type="percentage" office:value="0.167580374114989" calcext:value-type="percentage">
            <text:p>16,76%</text:p>
          </table:table-cell>
          <table:table-cell table:style-name="ce42" table:formula="of:=([.B45]-[.E45])/[.B45]" office:value-type="percentage" office:value="0.180904891778469" calcext:value-type="percentage">
            <text:p>18,09%</text:p>
          </table:table-cell>
          <table:table-cell table:style-name="ce44" table:number-columns-repeated="16379"/>
        </table:table-row>
        <table:table-row table:style-name="ro3">
          <table:table-cell/>
          <table:table-cell table:style-name="ce3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3" table:formula="of:=4301.5293/417" office:value-type="float" office:value="10.3154179856115" calcext:value-type="float">
            <text:p>10,3154179856115</text:p>
          </table:table-cell>
          <table:table-cell table:style-name="ce13" table:formula="of:=3235.858/417" office:value-type="float" office:value="7.75985131894484" calcext:value-type="float">
            <text:p>7,75985131894484</text:p>
          </table:table-cell>
          <table:table-cell table:style-name="ce13" table:formula="of:=2658.12756/417" office:value-type="float" office:value="6.37440661870504" calcext:value-type="float">
            <text:p>6,37440661870504</text:p>
          </table:table-cell>
          <table:table-cell table:style-name="ce13" table:formula="of:=2429.4136/417" office:value-type="float" office:value="5.82593189448441" calcext:value-type="float">
            <text:p>5,82593189448441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3" table:formula="of:=0.57775/150" office:value-type="float" office:value="0.00385166666666667" calcext:value-type="float">
            <text:p>0,00385166666666667</text:p>
          </table:table-cell>
          <table:table-cell table:style-name="ce13" table:formula="of:=0.59957/150" office:value-type="float" office:value="0.00399713333333333" calcext:value-type="float">
            <text:p>0,00399713333333333</text:p>
          </table:table-cell>
          <table:table-cell table:style-name="ce13" table:formula="of:=0.58498/150" office:value-type="float" office:value="0.00389986666666667" calcext:value-type="float">
            <text:p>0,00389986666666667</text:p>
          </table:table-cell>
          <table:table-cell table:style-name="ce13" table:formula="of:=0.56746/150" office:value-type="float" office:value="0.00378306666666667" calcext:value-type="float">
            <text:p>0,00378306666666667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 table:formula="of:=392.4522/39" office:value-type="float" office:value="10.0628769230769" calcext:value-type="float">
            <text:p>10,0628769230769</text:p>
          </table:table-cell>
          <table:table-cell table:style-name="ce13" table:formula="of:=377.4047/39" office:value-type="float" office:value="9.67704358974359" calcext:value-type="float">
            <text:p>9,67704358974359</text:p>
          </table:table-cell>
          <table:table-cell table:style-name="ce13" table:formula="of:=390.7357/39" office:value-type="float" office:value="10.0188641025641" calcext:value-type="float">
            <text:p>10,0188641025641</text:p>
          </table:table-cell>
          <table:table-cell table:style-name="ce13" table:formula="of:=371.8343/39" office:value-type="float" office:value="9.53421282051282" calcext:value-type="float">
            <text:p>9,53421282051282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table:formula="of:=0.225/9" office:value-type="float" office:value="0.025" calcext:value-type="float">
            <text:p>0,025</text:p>
          </table:table-cell>
          <table:table-cell table:style-name="ce13" table:formula="of:=0.18446/9" office:value-type="float" office:value="0.0204955555555556" calcext:value-type="float">
            <text:p>0,0204955555555556</text:p>
          </table:table-cell>
          <table:table-cell table:style-name="ce13" table:formula="of:=0.18796/9" office:value-type="float" office:value="0.0208844444444444" calcext:value-type="float">
            <text:p>0,0208844444444444</text:p>
          </table:table-cell>
          <table:table-cell table:style-name="ce13" table:formula="of:=0.0102/4" office:value-type="float" office:value="0.00255" calcext:value-type="float">
            <text:p>0,00255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L</text:p>
          </table:table-cell>
          <table:table-cell table:style-name="ce13" table:formula="of:=0.039072/4" office:value-type="float" office:value="0.009768" calcext:value-type="float">
            <text:p>0,009768</text:p>
          </table:table-cell>
          <table:table-cell table:style-name="ce13" table:formula="of:=0.0206/4" office:value-type="float" office:value="0.00515" calcext:value-type="float">
            <text:p>0,00515</text:p>
          </table:table-cell>
          <table:table-cell table:style-name="ce13" table:formula="of:=0.001966/4" office:value-type="float" office:value="0.0004915" calcext:value-type="float">
            <text:p>0,0004915</text:p>
          </table:table-cell>
          <table:table-cell table:style-name="ce13" table:formula="of:=0.16395/4" office:value-type="float" office:value="0.0409875" calcext:value-type="float">
            <text:p>0,04098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3" table:formula="of:=2228.9029/33" office:value-type="float" office:value="67.5425121212121" calcext:value-type="float">
            <text:p>67,5425121212121</text:p>
          </table:table-cell>
          <table:table-cell table:style-name="ce13" table:formula="of:=1968.3891/33" office:value-type="float" office:value="59.6481545454545" calcext:value-type="float">
            <text:p>59,6481545454545</text:p>
          </table:table-cell>
          <table:table-cell table:style-name="ce13" table:formula="of:=1755.743/33" office:value-type="float" office:value="53.2043333333333" calcext:value-type="float">
            <text:p>53,2043333333333</text:p>
          </table:table-cell>
          <table:table-cell table:style-name="ce13" table:formula="of:=1692.1309/33" office:value-type="float" office:value="51.2766939393939" calcext:value-type="float">
            <text:p>51,276693939393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3" table:formula="of:=2.83033333333333/103" office:value-type="float" office:value="0.0274789644012945" calcext:value-type="float">
            <text:p>0,0274789644012945</text:p>
          </table:table-cell>
          <table:table-cell table:style-name="ce13" table:formula="of:=2.2736/103" office:value-type="float" office:value="0.022073786407767" calcext:value-type="float">
            <text:p>0,022073786407767</text:p>
          </table:table-cell>
          <table:table-cell table:style-name="ce13" table:formula="of:=0.7884/103" office:value-type="float" office:value="0.00765436893203884" calcext:value-type="float">
            <text:p>0,00765436893203884</text:p>
          </table:table-cell>
          <table:table-cell table:style-name="ce13" table:formula="of:=0.5375/103" office:value-type="float" office:value="0.00521844660194175" calcext:value-type="float">
            <text:p>0,00521844660194175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E</text:p>
          </table:table-cell>
          <table:table-cell table:style-name="ce13" table:formula="of:=5.6332/36" office:value-type="float" office:value="0.156477777777778" calcext:value-type="float">
            <text:p>0,156477777777778</text:p>
          </table:table-cell>
          <table:table-cell table:style-name="ce13" table:formula="of:=5.6779/36" office:value-type="float" office:value="0.157719444444444" calcext:value-type="float">
            <text:p>0,157719444444444</text:p>
          </table:table-cell>
          <table:table-cell table:style-name="ce13" table:formula="of:=5.6117/36" office:value-type="float" office:value="0.155880555555556" calcext:value-type="float">
            <text:p>0,155880555555556</text:p>
          </table:table-cell>
          <table:table-cell table:style-name="ce13" table:formula="of:=5.792/36" office:value-type="float" office:value="0.160888888888889" calcext:value-type="float">
            <text:p>0,16088888888888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table:formula="of:=0.5074/25" office:value-type="float" office:value="0.020296" calcext:value-type="float">
            <text:p>0,020296</text:p>
          </table:table-cell>
          <table:table-cell table:style-name="ce13" table:formula="of:=0.4772/25" office:value-type="float" office:value="0.019088" calcext:value-type="float">
            <text:p>0,019088</text:p>
          </table:table-cell>
          <table:table-cell table:style-name="ce13" table:formula="of:=0.48198/25" office:value-type="float" office:value="0.0192792" calcext:value-type="float">
            <text:p>0,0192792</text:p>
          </table:table-cell>
          <table:table-cell table:style-name="ce13" table:formula="of:=0.4236/25" office:value-type="float" office:value="0.016944" calcext:value-type="float">
            <text:p>0,01694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Y</text:p>
          </table:table-cell>
          <table:table-cell table:style-name="ce13" table:formula="of:=0.55/12" office:value-type="float" office:value="0.0458333333333333" calcext:value-type="float">
            <text:p>0,0458333333333333</text:p>
          </table:table-cell>
          <table:table-cell table:style-name="ce13" table:formula="of:=0.5644/12" office:value-type="float" office:value="0.0470333333333333" calcext:value-type="float">
            <text:p>0,0470333333333333</text:p>
          </table:table-cell>
          <table:table-cell table:style-name="ce13" table:formula="of:=0.61067/12" office:value-type="float" office:value="0.0508891666666667" calcext:value-type="float">
            <text:p>0,0508891666666667</text:p>
          </table:table-cell>
          <table:table-cell table:style-name="ce13" table:formula="of:=0.6355/12" office:value-type="float" office:value="0.0529583333333333" calcext:value-type="float">
            <text:p>0,052958333333333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</text:p>
          </table:table-cell>
          <table:table-cell table:style-name="ce13" table:formula="of:=0.366/50" office:value-type="float" office:value="0.00732" calcext:value-type="float">
            <text:p>0,00732</text:p>
          </table:table-cell>
          <table:table-cell table:style-name="ce13" table:formula="of:=0.3585/50" office:value-type="float" office:value="0.00717" calcext:value-type="float">
            <text:p>0,00717</text:p>
          </table:table-cell>
          <table:table-cell table:style-name="ce13" table:formula="of:=0.34259/50" office:value-type="float" office:value="0.0068518" calcext:value-type="float">
            <text:p>0,0068518</text:p>
          </table:table-cell>
          <table:table-cell table:style-name="ce13" table:formula="of:=0.3318/50" office:value-type="float" office:value="0.006636" calcext:value-type="float">
            <text:p>0,006636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3" table:formula="of:=621.2897/50" office:value-type="float" office:value="12.425794" calcext:value-type="float">
            <text:p>12,425794</text:p>
          </table:table-cell>
          <table:table-cell table:style-name="ce13" table:formula="of:=522.46265/50" office:value-type="float" office:value="10.449253" calcext:value-type="float">
            <text:p>10,449253</text:p>
          </table:table-cell>
          <table:table-cell table:style-name="ce13" table:formula="of:=518.1206/50" office:value-type="float" office:value="10.362412" calcext:value-type="float">
            <text:p>10,362412</text:p>
          </table:table-cell>
          <table:table-cell table:style-name="ce13" table:formula="of:=584.7715/50" office:value-type="float" office:value="11.69543" calcext:value-type="float">
            <text:p>11,69543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ASER</text:p>
          </table:table-cell>
          <table:table-cell table:style-name="ce13" table:formula="of:=9.4683/99" office:value-type="float" office:value="0.0956393939393939" calcext:value-type="float">
            <text:p>0,0956393939393939</text:p>
          </table:table-cell>
          <table:table-cell table:style-name="ce13" table:formula="of:=4.3839/99" office:value-type="float" office:value="0.0442818181818182" calcext:value-type="float">
            <text:p>0,0442818181818182</text:p>
          </table:table-cell>
          <table:table-cell table:style-name="ce13" table:formula="of:=1.96189/99" office:value-type="float" office:value="0.0198170707070707" calcext:value-type="float">
            <text:p>0,0198170707070707</text:p>
          </table:table-cell>
          <table:table-cell table:style-name="ce13" table:formula="of:=0.8865/99" office:value-type="float" office:value="0.00895454545454546" calcext:value-type="float">
            <text:p>0,00895454545454546</text:p>
          </table:table-cell>
          <table:table-cell office:value-type="float" office:value="99" calcext:value-type="float">
            <text:p>9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W</text:p>
          </table:table-cell>
          <table:table-cell table:style-name="ce13" table:formula="of:=0.57257/18" office:value-type="float" office:value="0.0318094444444444" calcext:value-type="float">
            <text:p>0,0318094444444444</text:p>
          </table:table-cell>
          <table:table-cell table:style-name="ce13" table:formula="of:=0.5063/18" office:value-type="float" office:value="0.0281277777777778" calcext:value-type="float">
            <text:p>0,0281277777777778</text:p>
          </table:table-cell>
          <table:table-cell table:style-name="ce13" table:formula="of:=0.28052/18" office:value-type="float" office:value="0.0155844444444444" calcext:value-type="float">
            <text:p>0,0155844444444444</text:p>
          </table:table-cell>
          <table:table-cell table:style-name="ce13" table:formula="of:=0.24347/18" office:value-type="float" office:value="0.0135261111111111" calcext:value-type="float">
            <text:p>0,0135261111111111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table:formula="of:=0.40454/6" office:value-type="float" office:value="0.0674233333333333" calcext:value-type="float">
            <text:p>0,0674233333333333</text:p>
          </table:table-cell>
          <table:table-cell table:style-name="ce13" table:formula="of:=0.396/6" office:value-type="float" office:value="0.066" calcext:value-type="float">
            <text:p>0,066</text:p>
          </table:table-cell>
          <table:table-cell table:style-name="ce13" table:formula="of:=0.39467/6" office:value-type="float" office:value="0.0657783333333333" calcext:value-type="float">
            <text:p>0,0657783333333333</text:p>
          </table:table-cell>
          <table:table-cell table:style-name="ce13" table:formula="of:=0.357/6" office:value-type="float" office:value="0.0595" calcext:value-type="float">
            <text:p>0,059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3" table:formula="of:=1.1385/104" office:value-type="float" office:value="0.0109471153846154" calcext:value-type="float">
            <text:p>0,0109471153846154</text:p>
          </table:table-cell>
          <table:table-cell table:style-name="ce13" table:formula="of:=0.95131/104" office:value-type="float" office:value="0.00914721153846154" calcext:value-type="float">
            <text:p>0,00914721153846154</text:p>
          </table:table-cell>
          <table:table-cell table:style-name="ce13" table:formula="of:=0.9946/104" office:value-type="float" office:value="0.00956346153846154" calcext:value-type="float">
            <text:p>0,00956346153846154</text:p>
          </table:table-cell>
          <table:table-cell table:style-name="ce13" table:formula="of:=1.10658/104" office:value-type="float" office:value="0.0106401923076923" calcext:value-type="float">
            <text:p>0,0106401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table:formula="of:=0.08162/13" office:value-type="float" office:value="0.00627846153846154" calcext:value-type="float">
            <text:p>0,00627846153846154</text:p>
          </table:table-cell>
          <table:table-cell table:style-name="ce13" table:formula="of:=0.08143/13" office:value-type="float" office:value="0.00626384615384615" calcext:value-type="float">
            <text:p>0,00626384615384615</text:p>
          </table:table-cell>
          <table:table-cell table:style-name="ce13" table:formula="of:=0.08165/13" office:value-type="float" office:value="0.00628076923076923" calcext:value-type="float">
            <text:p>0,00628076923076923</text:p>
          </table:table-cell>
          <table:table-cell table:style-name="ce13" table:formula="of:=0.08166/13" office:value-type="float" office:value="0.00628153846153846" calcext:value-type="float">
            <text:p>0,00628153846153846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 table:formula="of:=1937.37768/165" office:value-type="float" office:value="11.7416829090909" calcext:value-type="float">
            <text:p>11,7416829090909</text:p>
          </table:table-cell>
          <table:table-cell table:style-name="ce13" table:formula="of:=1759.5029/165" office:value-type="float" office:value="10.6636539393939" calcext:value-type="float">
            <text:p>10,6636539393939</text:p>
          </table:table-cell>
          <table:table-cell table:style-name="ce13" table:formula="of:=380.2022/165" office:value-type="float" office:value="2.30425575757576" calcext:value-type="float">
            <text:p>2,30425575757576</text:p>
          </table:table-cell>
          <table:table-cell table:style-name="ce13" table:formula="of:=369.54556/165" office:value-type="float" office:value="2.23967006060606" calcext:value-type="float">
            <text:p>2,2396700606060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table:formula="of:=0.20136/7" office:value-type="float" office:value="0.0287657142857143" calcext:value-type="float">
            <text:p>0,0287657142857143</text:p>
          </table:table-cell>
          <table:table-cell table:style-name="ce13" table:formula="of:=0.116/7" office:value-type="float" office:value="0.0165714285714286" calcext:value-type="float">
            <text:p>0,0165714285714286</text:p>
          </table:table-cell>
          <table:table-cell table:style-name="ce13" table:formula="of:=0.10366/7" office:value-type="float" office:value="0.0148085714285714" calcext:value-type="float">
            <text:p>0,0148085714285714</text:p>
          </table:table-cell>
          <table:table-cell table:style-name="ce13" table:formula="of:=0.0968/7" office:value-type="float" office:value="0.0138285714285714" calcext:value-type="float">
            <text:p>0,01382857142857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3" table:formula="of:=19.2794/165" office:value-type="float" office:value="0.116844848484848" calcext:value-type="float">
            <text:p>0,116844848484848</text:p>
          </table:table-cell>
          <table:table-cell table:style-name="ce13" table:formula="of:=17.5382/165" office:value-type="float" office:value="0.106292121212121" calcext:value-type="float">
            <text:p>0,106292121212121</text:p>
          </table:table-cell>
          <table:table-cell table:style-name="ce13" table:formula="of:=3.8798/165" office:value-type="float" office:value="0.0235139393939394" calcext:value-type="float">
            <text:p>0,0235139393939394</text:p>
          </table:table-cell>
          <table:table-cell table:style-name="ce13" table:formula="of:=3.638/165" office:value-type="float" office:value="0.0220484848484849" calcext:value-type="float">
            <text:p>0,0220484848484849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QUAKE</text:p>
          </table:table-cell>
          <table:table-cell table:style-name="ce13" table:formula="of:=7.7952/217" office:value-type="float" office:value="0.0359225806451613" calcext:value-type="float">
            <text:p>0,0359225806451613</text:p>
          </table:table-cell>
          <table:table-cell table:style-name="ce13" table:formula="of:=7.8032/217" office:value-type="float" office:value="0.0359594470046083" calcext:value-type="float">
            <text:p>0,0359594470046083</text:p>
          </table:table-cell>
          <table:table-cell table:style-name="ce13" table:formula="of:=7.8046/217" office:value-type="float" office:value="0.0359658986175115" calcext:value-type="float">
            <text:p>0,0359658986175115</text:p>
          </table:table-cell>
          <table:table-cell table:style-name="ce13" table:formula="of:=7.8093/217" office:value-type="float" office:value="0.0359875576036866" calcext:value-type="float">
            <text:p>0,0359875576036866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N</text:p>
          </table:table-cell>
          <table:table-cell table:style-name="ce13" table:formula="of:=1.7925/57" office:value-type="float" office:value="0.0314473684210526" calcext:value-type="float">
            <text:p>0,0314473684210526</text:p>
          </table:table-cell>
          <table:table-cell table:style-name="ce13" table:formula="of:=1.43788/57" office:value-type="float" office:value="0.0252259649122807" calcext:value-type="float">
            <text:p>0,0252259649122807</text:p>
          </table:table-cell>
          <table:table-cell table:style-name="ce13" table:formula="of:=1.3531/57" office:value-type="float" office:value="0.0237385964912281" calcext:value-type="float">
            <text:p>0,0237385964912281</text:p>
          </table:table-cell>
          <table:table-cell table:style-name="ce13" table:formula="of:=1.3288/57" office:value-type="float" office:value="0.0233122807017544" calcext:value-type="float">
            <text:p>0,0233122807017544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 table:formula="of:=406.64227/95" office:value-type="float" office:value="4.28044494736842" calcext:value-type="float">
            <text:p>4,28044494736842</text:p>
          </table:table-cell>
          <table:table-cell table:style-name="ce13" table:formula="of:=182.75549/95" office:value-type="float" office:value="1.923742" calcext:value-type="float">
            <text:p>1,923742</text:p>
          </table:table-cell>
          <table:table-cell table:style-name="ce13" table:formula="of:=114.7143/95" office:value-type="float" office:value="1.20751894736842" calcext:value-type="float">
            <text:p>1,20751894736842</text:p>
          </table:table-cell>
          <table:table-cell table:style-name="ce13" table:formula="of:=102.8543/95" office:value-type="float" office:value="1.08267684210526" calcext:value-type="float">
            <text:p>1,08267684210526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3" table:formula="of:=4.30977/104" office:value-type="float" office:value="0.0414400961538462" calcext:value-type="float">
            <text:p>0,0414400961538462</text:p>
          </table:table-cell>
          <table:table-cell table:style-name="ce13" table:formula="of:=4.5481/104" office:value-type="float" office:value="0.0437317307692308" calcext:value-type="float">
            <text:p>0,0437317307692308</text:p>
          </table:table-cell>
          <table:table-cell table:style-name="ce13" table:formula="of:=4.8966/104" office:value-type="float" office:value="0.0470826923076923" calcext:value-type="float">
            <text:p>0,0470826923076923</text:p>
          </table:table-cell>
          <table:table-cell table:style-name="ce13" table:formula="of:=5.3638/104" office:value-type="float" office:value="0.051575" calcext:value-type="float">
            <text:p>0,051575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E</text:p>
          </table:table-cell>
          <table:table-cell table:style-name="ce13" table:formula="of:=0.33303/13" office:value-type="float" office:value="0.0256176923076923" calcext:value-type="float">
            <text:p>0,0256176923076923</text:p>
          </table:table-cell>
          <table:table-cell table:style-name="ce13" table:formula="of:=0.4484/13" office:value-type="float" office:value="0.0344923076923077" calcext:value-type="float">
            <text:p>0,0344923076923077</text:p>
          </table:table-cell>
          <table:table-cell table:style-name="ce13" table:formula="of:=0.51653/13" office:value-type="float" office:value="0.0397330769230769" calcext:value-type="float">
            <text:p>0,0397330769230769</text:p>
          </table:table-cell>
          <table:table-cell table:style-name="ce13" table:formula="of:=0.45697/13" office:value-type="float" office:value="0.0351515384615385" calcext:value-type="float">
            <text:p>0,0351515384615385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table:style-name="Default" table:number-columns-repeated="4"/>
          <table:table-cell table:style-name="ce14"/>
          <table:table-cell table:number-columns-repeated="16378"/>
        </table:table-row>
        <table:table-row table:style-name="ro5">
          <table:table-cell table:style-name="ce14"/>
          <table:table-cell table:style-name="ce14" table:formula="of:=AVERAGE([.B50:.B74])" office:value-type="float" office:value="4.6862756270991" calcext:value-type="float">
            <text:p>4,6862756270991</text:p>
          </table:table-cell>
          <table:table-cell table:style-name="ce14" table:formula="of:=AVERAGE([.C50:.C74])" office:value-type="float" office:value="4.03282077201701" calcext:value-type="float">
            <text:p>4,03282077201701</text:p>
          </table:table-cell>
          <table:table-cell table:style-name="ce14" table:formula="of:=AVERAGE([.D50:.D74])" office:value-type="float" office:value="3.36157954064913" calcext:value-type="float">
            <text:p>3,36157954064913</text:p>
          </table:table-cell>
          <table:table-cell table:style-name="ce14" table:formula="of:=AVERAGE([.E50:.E74])" office:value-type="float" office:value="3.28901550451889" calcext:value-type="float">
            <text:p>3,28901550451889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GAIN</text:p>
          </table:table-cell>
          <table:table-cell table:style-name="ce18" table:formula="of:=([.B77]-[.C77])/[.B77]" office:value-type="percentage" office:value="0.13944012411549" calcext:value-type="percentage">
            <text:p>13,94%</text:p>
          </table:table-cell>
          <table:table-cell table:style-name="ce18" table:formula="of:=([.B77]-[.D77])/[.B77]" office:value-type="percentage" office:value="0.282675666533509" calcext:value-type="percentage">
            <text:p>28,27%</text:p>
          </table:table-cell>
          <table:table-cell table:style-name="ce18" table:formula="of:=([.B77]-[.E77])/[.B77]" office:value-type="percentage" office:value="0.298160038752382" calcext:value-type="percentage">
            <text:p>29,82%</text:p>
          </table:table-cell>
          <table:table-cell table:style-name="ce12" table:number-columns-repeated="16379"/>
        </table:table-row>
      </table:table>
      <table:table table:name="methods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28"/>
        <table:table-column table:style-name="co11" table:default-cell-style-name="ce16"/>
        <table:table-column table:style-name="co12" table:number-columns-repeated="2" table:default-cell-style-name="ce16"/>
        <table:table-row table:style-name="ro3"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CLASSIFICATION DATASETS</text:p>
          </table:table-cell>
          <table:covered-table-cell table:style-name="ce38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4">
          <table:table-cell office:value-type="string" calcext:value-type="string">
            <text:p>Appendicitis</text:p>
          </table:table-cell>
          <table:table-cell table:style-name="ce28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4">
          <table:table-cell office:value-type="string" calcext:value-type="string">
            <text:p>Australian</text:p>
          </table:table-cell>
          <table:table-cell table:style-name="ce28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4">
          <table:table-cell office:value-type="string" calcext:value-type="string">
            <text:p>Banana</text:p>
          </table:table-cell>
          <table:table-cell table:style-name="ce28"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table:style-name="ce28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4">
          <table:table-cell office:value-type="string" calcext:value-type="string">
            <text:p>Contraceptiv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Dermatology</text:p>
          </table:table-cell>
          <table:table-cell table:style-name="ce28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table:style-name="ce28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table:style-name="ce28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4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table:style-name="ce28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table:style-name="ce28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table:style-name="ce28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4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4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4">
          <table:table-cell office:value-type="string" calcext:value-type="string">
            <text:p>Mammographic</text:p>
          </table:table-cell>
          <table:table-cell table:style-name="ce28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arkinsons</text:p>
          </table:table-cell>
          <table:table-cell table:style-name="ce28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4">
          <table:table-cell office:value-type="string" calcext:value-type="string">
            <text:p>Pima</text:p>
          </table:table-cell>
          <table:table-cell table:style-name="ce28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Popfailures</text:p>
          </table:table-cell>
          <table:table-cell table:style-name="ce28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table:style-name="ce28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4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4">
          <table:table-cell office:value-type="string" calcext:value-type="string">
            <text:p>Saheart</text:p>
          </table:table-cell>
          <table:table-cell table:style-name="ce28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table:style-name="ce28"/>
          <table:table-cell table:number-columns-repeated="6"/>
        </table:table-row>
        <table:table-row table:style-name="ro4">
          <table:table-cell office:value-type="string" calcext:value-type="string">
            <text:p>Segment</text:p>
          </table:table-cell>
          <table:table-cell table:style-name="ce28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4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4">
          <table:table-cell office:value-type="string" calcext:value-type="string">
            <text:p>Spiral</text:p>
          </table:table-cell>
          <table:table-cell table:style-name="ce28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4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table:style-name="ce28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table:style-name="ce28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table:style-name="ce28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table:style-name="ce28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table:style-name="ce28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table:style-name="ce28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5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36" office:value-type="string" calcext:value-type="string" table:number-columns-spanned="3" table:number-rows-spanned="1">
            <text:p>REGRESSION DATASETS</text:p>
          </table:table-cell>
          <table:covered-table-cell table:style-name="ce36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4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4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4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4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4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4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4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4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4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4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4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6"/>
        </table:table-row>
        <table:table-row table:style-name="ro5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table table:name="nc_expers" table:style-name="ta1">
        <table:table-column table:style-name="co9" table:default-cell-style-name="Default"/>
        <table:table-row table:style-name="ro4">
          <table:table-cell/>
        </table:table-row>
      </table:table>
      <table:table table:name="nc_averages" table:style-name="ta1">
        <table:table-column table:style-name="co9" table:default-cell-style-name="Default"/>
        <table:table-row table:style-name="ro4">
          <table:table-cell/>
        </table:table-row>
      </table:table>
      <table:table table:name="Φύλλο6" table:style-name="ta1">
        <table:table-column table:style-name="co9" table:number-columns-repeated="16379" table:default-cell-style-name="Default"/>
        <table:table-row table:style-name="ro4">
          <table:table-cell office:value-type="string" calcext:value-type="string">
            <text:p>nt</text:p>
          </table:table-cell>
          <table:table-cell office:value-type="string" calcext:value-type="string">
            <text:p>ve</text:p>
          </table:table-cell>
          <table:table-cell table:number-columns-repeated="16377"/>
        </table:table-row>
        <table:table-row table:style-name="ro4">
          <table:table-cell office:value-type="float" office:value="0.1197" calcext:value-type="float">
            <text:p>0,1197</text:p>
          </table:table-cell>
          <table:table-cell office:value-type="float" office:value="0.0727" calcext:value-type="float">
            <text:p>0,0727</text:p>
          </table:table-cell>
          <table:table-cell table:number-columns-repeated="16377"/>
        </table:table-row>
        <table:table-row table:style-name="ro4">
          <table:table-cell office:value-type="float" office:value="0.0871" calcext:value-type="float">
            <text:p>0,0871</text:p>
          </table:table-cell>
          <table:table-cell office:value-type="float" office:value="0.0648" calcext:value-type="float">
            <text:p>0,0648</text:p>
          </table:table-cell>
          <table:table-cell table:number-columns-repeated="16377"/>
        </table:table-row>
        <table:table-row table:style-name="ro4">
          <table:table-cell office:value-type="float" office:value="0.151" calcext:value-type="float">
            <text:p>0,151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4">
          <table:table-cell office:value-type="float" office:value="0.113" calcext:value-type="float">
            <text:p>0,113</text:p>
          </table:table-cell>
          <table:table-cell office:value-type="float" office:value="0.176" calcext:value-type="float">
            <text:p>0,176</text:p>
          </table:table-cell>
          <table:table-cell table:number-columns-repeated="16377"/>
        </table:table-row>
        <table:table-row table:style-name="ro4">
          <table:table-cell office:value-type="float" office:value="0.142" calcext:value-type="float">
            <text:p>0,142</text:p>
          </table:table-cell>
          <table:table-cell office:value-type="float" office:value="0.141" calcext:value-type="float">
            <text:p>0,141</text:p>
          </table:table-cell>
          <table:table-cell table:number-columns-repeated="16377"/>
        </table:table-row>
        <table:table-row table:style-name="ro4">
          <table:table-cell office:value-type="float" office:value="0.115" calcext:value-type="float">
            <text:p>0,115</text:p>
          </table:table-cell>
          <table:table-cell office:value-type="float" office:value="0.202" calcext:value-type="float">
            <text:p>0,202</text:p>
          </table:table-cell>
          <table:table-cell table:number-columns-repeated="16377"/>
        </table:table-row>
        <table:table-row table:style-name="ro4">
          <table:table-cell office:value-type="float" office:value="0.0923" calcext:value-type="float">
            <text:p>0,0923</text:p>
          </table:table-cell>
          <table:table-cell office:value-type="float" office:value="0.1497" calcext:value-type="float">
            <text:p>0,1497</text:p>
          </table:table-cell>
          <table:table-cell table:number-columns-repeated="16377"/>
        </table:table-row>
        <table:table-row table:style-name="ro4">
          <table:table-cell office:value-type="float" office:value="0.084" calcext:value-type="float">
            <text:p>0,084</text:p>
          </table:table-cell>
          <table:table-cell office:value-type="float" office:value="0.865" calcext:value-type="float">
            <text:p>0,865</text:p>
          </table:table-cell>
          <table:table-cell table:number-columns-repeated="16377"/>
        </table:table-row>
        <table:table-row table:style-name="ro4">
          <table:table-cell office:value-type="float" office:value="0.156" calcext:value-type="float">
            <text:p>0,156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0.1278" calcext:value-type="float">
            <text:p>0,1278</text:p>
          </table:table-cell>
          <table:table-cell table:number-columns-repeated="16377"/>
        </table:table-row>
        <table:table-row table:style-name="ro1">
          <table:table-cell table:style-name="ce12" table:formula="of:=AVERAGE([.A2:.A11])" office:value-type="float" office:value="0.13231" calcext:value-type="float">
            <text:p>0,13231</text:p>
          </table:table-cell>
          <table:table-cell table:style-name="ce12" table:formula="of:=AVERAGE([.B2:.B11])" office:value-type="float" office:value="0.2988" calcext:value-type="float">
            <text:p>0,2988</text:p>
          </table:table-cell>
          <table:table-cell table:style-name="ce12" table:number-columns-repeated="16377"/>
        </table:table-row>
        <table:table-row table:style-name="ro4">
          <table:table-cell table:formula="of:=[.A12]/13" office:value-type="float" office:value="0.0101776923076923" calcext:value-type="float">
            <text:p>0,0101776923076923</text:p>
          </table:table-cell>
          <table:table-cell table:formula="of:=[.B12]/13" office:value-type="float" office:value="0.0229846153846154" calcext:value-type="float">
            <text:p>0,022984615384615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08:32:09.78922866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9T20:31:49.015122783</dc:date>
    <meta:editing-duration>P2DT22H56M45S</meta:editing-duration>
    <meta:editing-cycles>1181</meta:editing-cycles>
    <meta:generator>LibreOffice/25.2.3.2$Linux_X86_64 LibreOffice_project/520$Build-2</meta:generator>
    <meta:document-statistic meta:table-count="6" meta:cell-count="3298" meta:object-count="0"/>
  </office:meta>
</office:document-meta>
</file>