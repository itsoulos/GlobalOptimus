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0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426" calcext:value-type="percentage">
            <text:p>34,2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style-name="ce3" office:value-type="percentage" office:value="0.5297" calcext:value-type="percentage">
            <text:p>52,9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979" calcext:value-type="percentage">
            <text:p>29,79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table:style-name="ce3" office:value-type="percentage" office:value="0.5135" calcext:value-type="percentage">
            <text:p>51,35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table:style-name="ce3" office:value-type="percentage" office:value="0.4946" calcext:value-type="percentage">
            <text:p>49,4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787" calcext:value-type="percentage">
            <text:p>27,87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table:style-name="ce3" office:value-type="percentage" office:value="0.5284" calcext:value-type="percentage">
            <text:p>52,8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628" calcext:value-type="percentage">
            <text:p>26,28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table:style-name="ce3" office:value-type="percentage" office:value="0.5081" calcext:value-type="percentage">
            <text:p>50,8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3766" calcext:value-type="percentage">
            <text:p>37,66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table:style-name="ce3" office:value-type="percentage" office:value="0.4703" calcext:value-type="percentage">
            <text:p>47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283" calcext:value-type="percentage">
            <text:p>28,30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table:style-name="ce3" office:value-type="percentage" office:value="0.5162" calcext:value-type="percentage">
            <text:p>51,6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043" calcext:value-type="percentage">
            <text:p>30,43%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table:style-name="ce3" office:value-type="percentage" office:value="0.4662" calcext:value-type="percentage">
            <text:p>46,6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063" calcext:value-type="percentage">
            <text:p>30,63%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table:style-name="ce3" office:value-type="percentage" office:value="0.4757" calcext:value-type="percentage">
            <text:p>47,5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1702" calcext:value-type="percentage">
            <text:p>17,02%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5459" calcext:value-type="percentage">
            <text:p>54,59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28926" calcext:value-type="percentage">
            <text:p>28,93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:.F11])" office:value-type="percentage" office:value="0.50486" calcext:value-type="percentage">
            <text:p>50,49%</text:p>
          </table:table-cell>
          <table:table-cell table:style-name="ce1" table:formula="of:=AVERAGE([.G2:.G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2317" calcext:value-type="percentage">
            <text:p>23,17%</text:p>
          </table:table-cell>
          <table:table-cell table:number-columns-repeated="2"/>
          <table:table-cell office:value-type="string" calcext:value-type="string">
            <text:p>Statheart_1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2411" calcext:value-type="percentage">
            <text:p>24,11%</text:p>
          </table:table-cell>
          <table:table-cell table:number-columns-repeated="2"/>
          <table:table-cell office:value-type="string" calcext:value-type="string">
            <text:p>Statheart_2</text:p>
          </table:table-cell>
          <table:table-cell table:style-name="ce3" office:value-type="percentage" office:value="0.237" calcext:value-type="percentage">
            <text:p>23,7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2139" calcext:value-type="percentage">
            <text:p>21,39%</text:p>
          </table:table-cell>
          <table:table-cell table:number-columns-repeated="2"/>
          <table:table-cell office:value-type="string" calcext:value-type="string">
            <text:p>Statheart_3</text:p>
          </table:table-cell>
          <table:table-cell table:style-name="ce3" office:value-type="percentage" office:value="0.3259" calcext:value-type="percentage">
            <text:p>32,5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2433" calcext:value-type="percentage">
            <text:p>24,33%</text:p>
          </table:table-cell>
          <table:table-cell table:number-columns-repeated="2"/>
          <table:table-cell office:value-type="string" calcext:value-type="string">
            <text:p>Statheart_4</text:p>
          </table:table-cell>
          <table:table-cell table:style-name="ce3" office:value-type="percentage" office:value="0.3111" calcext:value-type="percentage">
            <text:p>31,1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table:style-name="ce3" office:value-type="percentage" office:value="0.263" calcext:value-type="percentage">
            <text:p>26,3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table:style-name="ce3" office:value-type="percentage" office:value="0.1889" calcext:value-type="percentage">
            <text:p>18,8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table:style-name="ce3" office:value-type="percentage" office:value="0.1741" calcext:value-type="percentage">
            <text:p>17,4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4:.B23])" office:value-type="percentage" office:value="0.2325" calcext:value-type="percentage">
            <text:p>23,25%</text:p>
          </table:table-cell>
          <table:table-cell table:style-name="ce1" table:formula="of:=AVERAGE([.C14:.C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:.F23])" office:value-type="percentage" office:value="0.25259" calcext:value-type="percentage">
            <text:p>25,26%</text:p>
          </table:table-cell>
          <table:table-cell table:style-name="ce1" table:formula="of:=AVERAGE([.G14:.G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482" calcext:value-type="percentage">
            <text:p>54,82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table:style-name="ce3" office:value-type="percentage" office:value="0.65" calcext:value-type="percentage">
            <text:p>65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555" calcext:value-type="percentage">
            <text:p>55,55%</text:p>
          </table:table-cell>
          <table:table-cell table:number-columns-repeated="2"/>
          <table:table-cell office:value-type="string" calcext:value-type="string">
            <text:p>Lymography_2</text:p>
          </table:table-cell>
          <table:table-cell table:style-name="ce3" office:value-type="percentage" office:value="0.4643" calcext:value-type="percentage">
            <text:p>4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ymography_3</text:p>
          </table:table-cell>
          <table:table-cell table:style-name="ce3" office:value-type="percentage" office:value="0.5429" calcext:value-type="percentage">
            <text:p>54,2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style-name="ce3" office:value-type="percentage" office:value="0.6643" calcext:value-type="percentage">
            <text:p>6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style-name="ce3" office:value-type="percentage" office:value="0.5143" calcext:value-type="percentage">
            <text:p>51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5071" calcext:value-type="percentage">
            <text:p>50,7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7786" calcext:value-type="percentage">
            <text:p>7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6643" calcext:value-type="percentage">
            <text:p>66,43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6:.B35])" office:value-type="percentage" office:value="0.55185" calcext:value-type="percentage">
            <text:p>55,19%</text:p>
          </table:table-cell>
          <table:table-cell table:style-name="ce1" table:formula="of:=AVERAGE([.C26:.C3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:.F35])" office:value-type="percentage" office:value="0.56644" calcext:value-type="percentage">
            <text:p>56,64%</text:p>
          </table:table-cell>
          <table:table-cell table:style-name="ce1" table:formula="of:=AVERAGE([.G26:.G3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366" calcext:value-type="percentage">
            <text:p>13,66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table:style-name="ce3" office:value-type="percentage" office:value="0.1898" calcext:value-type="percentage">
            <text:p>18,98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1137" calcext:value-type="percentage">
            <text:p>11,37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style-name="ce3" office:value-type="percentage" office:value="0.1983" calcext:value-type="percentage">
            <text:p>19,8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426" calcext:value-type="percentage">
            <text:p>14,26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3"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table:number-columns-repeated="3"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12885" calcext:value-type="percentage">
            <text:p>12,89%</text:p>
          </table:table-cell>
          <table:table-cell table:style-name="ce1" table:formula="of:=AVERAGE([.C38:.C4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38:.F47])" office:value-type="percentage" office:value="0.19405" calcext:value-type="percentage">
            <text:p>19,41%</text:p>
          </table:table-cell>
          <table:table-cell table:style-name="ce1" table:formula="of:=AVERAGE([.G38:.G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table:style-name="ce3" office:value-type="percentage" office:value="0.4391" calcext:value-type="percentage">
            <text:p>43,9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table:style-name="ce3" office:value-type="percentage" office:value="0.4826" calcext:value-type="percentage">
            <text:p>48,2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table:style-name="ce3" office:value-type="percentage" office:value="0.5014" calcext:value-type="percentage">
            <text:p>50,1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table:style-name="ce3" office:value-type="percentage" office:value="0.442" calcext:value-type="percentage">
            <text:p>44,2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table:style-name="ce3" office:value-type="percentage" office:value="0.3594" calcext:value-type="percentage">
            <text:p>35,9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Australian_6</text:p>
          </table:table-cell>
          <table:table-cell table:style-name="ce3" office:value-type="percentage" office:value="0.5072" calcext:value-type="percentage">
            <text:p>50,7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table:style-name="ce3" office:value-type="percentage" office:value="0.4014" calcext:value-type="percentage">
            <text:p>40,1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table:style-name="ce3" office:value-type="percentage" office:value="0.5246" calcext:value-type="percentage">
            <text:p>52,4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50:.B59])" office:value-type="percentage" office:value="0.175" calcext:value-type="percentage">
            <text:p>17,50%</text:p>
          </table:table-cell>
          <table:table-cell table:style-name="ce1" table:formula="of:=AVERAGE([.C50:.C5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50:.F59])" office:value-type="percentage" office:value="0.43577" calcext:value-type="percentage">
            <text:p>43,58%</text:p>
          </table:table-cell>
          <table:table-cell table:style-name="ce1" table:formula="of:=AVERAGE([.G50:.G5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44" calcext:value-type="percentage">
            <text:p>34,44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251" calcext:value-type="percentage">
            <text:p>25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361" calcext:value-type="percentage">
            <text:p>43,61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311" calcext:value-type="percentage">
            <text:p>31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286" calcext:value-type="percentage">
            <text:p>28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778" calcext:value-type="percentage">
            <text:p>47,78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284" calcext:value-type="percentage">
            <text:p>28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62:.B71])" office:value-type="percentage" office:value="0.39638" calcext:value-type="percentage">
            <text:p>39,64%</text:p>
          </table:table-cell>
          <table:table-cell table:style-name="ce1" table:formula="of:=AVERAGE([.C62:.C7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62:.F71])" office:value-type="percentage" office:value="0.2752" calcext:value-type="percentage">
            <text:p>27,52%</text:p>
          </table:table-cell>
          <table:table-cell table:style-name="ce1" table:formula="of:=AVERAGE([.G62:.G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414" calcext:value-type="percentage">
            <text:p>64,14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138" calcext:value-type="percentage">
            <text:p>51,38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4257" calcext:value-type="percentage">
            <text:p>42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103" calcext:value-type="percentage">
            <text:p>51,03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724" calcext:value-type="percentage">
            <text:p>57,24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52" calcext:value-type="percentage">
            <text:p>5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4448" calcext:value-type="percentage">
            <text:p>44,48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4029" calcext:value-type="percentage">
            <text:p>40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276" calcext:value-type="percentage">
            <text:p>52,76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3486" calcext:value-type="percentage">
            <text:p>34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172" calcext:value-type="percentage">
            <text:p>51,72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3914" calcext:value-type="percentage">
            <text:p>39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724" calcext:value-type="percentage">
            <text:p>47,2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75:.B84])" office:value-type="percentage" office:value="0.52965" calcext:value-type="percentage">
            <text:p>52,97%</text:p>
          </table:table-cell>
          <table:table-cell table:style-name="ce1" table:formula="of:=AVERAGE([.C75:.C8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75:.F84])" office:value-type="percentage" office:value="0.42257" calcext:value-type="percentage">
            <text:p>42,26%</text:p>
          </table:table-cell>
          <table:table-cell table:style-name="ce1" table:formula="of:=AVERAGE([.G75:.G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788" calcext:value-type="percentage">
            <text:p>57,88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212" calcext:value-type="percentage">
            <text:p>52,12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061" calcext:value-type="percentage">
            <text:p>50,61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182" calcext:value-type="percentage">
            <text:p>61,82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424" calcext:value-type="percentage">
            <text:p>54,24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15" calcext:value-type="percentage">
            <text:p>55,15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273" calcext:value-type="percentage">
            <text:p>62,73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55" calcext:value-type="percentage">
            <text:p>44,55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58" calcext:value-type="percentage">
            <text:p>57,5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697" calcext:value-type="percentage">
            <text:p>56,97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88:.B97])" office:value-type="percentage" office:value="0.55365" calcext:value-type="percentage">
            <text:p>55,37%</text:p>
          </table:table-cell>
          <table:table-cell table:style-name="ce1" table:formula="of:=AVERAGE([.C88:.C9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88:.F97])" office:value-type="percentage" office:value="0.223" calcext:value-type="percentage">
            <text:p>22,30%</text:p>
          </table:table-cell>
          <table:table-cell table:style-name="ce1" table:formula="of:=AVERAGE([.G88:.G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2306" calcext:value-type="percentage">
            <text:p>23,06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4524" calcext:value-type="percentage">
            <text:p>4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806" calcext:value-type="percentage">
            <text:p>18,06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6905" calcext:value-type="percentage">
            <text:p>69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145" calcext:value-type="percentage">
            <text:p>21,45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048" calcext:value-type="percentage">
            <text:p>50,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839" calcext:value-type="percentage">
            <text:p>18,39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274" calcext:value-type="percentage">
            <text:p>22,74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339" calcext:value-type="percentage">
            <text:p>13,39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323" calcext:value-type="percentage">
            <text:p>23,23%</text:p>
          </table:table-cell>
          <table:table-cell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619" calcext:value-type="percentage">
            <text:p>4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79" calcext:value-type="percentage">
            <text:p>17,9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823" calcext:value-type="percentage">
            <text:p>28,23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4429" calcext:value-type="percentage">
            <text:p>4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758" calcext:value-type="percentage">
            <text:p>27,58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6095" calcext:value-type="percentage">
            <text:p>60,95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01:.B110])" office:value-type="percentage" office:value="0.21403" calcext:value-type="percentage">
            <text:p>21,40%</text:p>
          </table:table-cell>
          <table:table-cell table:style-name="ce1" table:formula="of:=AVERAGE([.C101:.C11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01:.F110])" office:value-type="percentage" office:value="0.52573" calcext:value-type="percentage">
            <text:p>52,57%</text:p>
          </table:table-cell>
          <table:table-cell table:style-name="ce1" table:formula="of:=AVERAGE([.G101:.G1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5462" calcext:value-type="percentage">
            <text:p>5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767" calcext:value-type="percentage">
            <text:p>47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4769" calcext:value-type="percentage">
            <text:p>4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4385" calcext:value-type="percentage">
            <text:p>4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4923" calcext:value-type="percentage">
            <text:p>49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846" calcext:value-type="percentage">
            <text:p>58,46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14:.B123])" office:value-type="percentage" office:value="0.28368" calcext:value-type="percentage">
            <text:p>28,37%</text:p>
          </table:table-cell>
          <table:table-cell table:style-name="ce1" table:formula="of:=AVERAGE([.C114:.C1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14:.F123])" office:value-type="percentage" office:value="0.45001" calcext:value-type="percentage">
            <text:p>45,00%</text:p>
          </table:table-cell>
          <table:table-cell table:style-name="ce1" table:formula="of:=AVERAGE([.G114:.G1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office:value-type="percentage" office:value="0.3033" calcext:value-type="percentage">
            <text:p>30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148" calcext:value-type="percentage">
            <text:p>21,48%</text:p>
          </table:table-cell>
          <table:table-cell table:number-columns-repeated="2"/>
          <table:table-cell office:value-type="string" calcext:value-type="string">
            <text:p>HeartAttack_2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407" calcext:value-type="percentage">
            <text:p>24,07%</text:p>
          </table:table-cell>
          <table:table-cell table:number-columns-repeated="2"/>
          <table:table-cell office:value-type="string" calcext:value-type="string">
            <text:p>HeartAttack_3</text:p>
          </table:table-cell>
          <table:table-cell office:value-type="percentage" office:value="0.2867" calcext:value-type="percentage">
            <text:p>28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111" calcext:value-type="percentage">
            <text:p>21,11%</text:p>
          </table:table-cell>
          <table:table-cell table:number-columns-repeated="2"/>
          <table:table-cell office:value-type="string" calcext:value-type="string">
            <text:p>HeartAttack_4</text:p>
          </table:table-cell>
          <table:table-cell office:value-type="percentage" office:value="0.1767" calcext:value-type="percentage">
            <text:p>17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eartAttack_5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eartAttack_6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926" calcext:value-type="percentage">
            <text:p>29,26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office:value-type="percentage" office:value="0.2867" calcext:value-type="percentage">
            <text:p>28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office:value-type="percentage" office:value="0.2267" calcext:value-type="percentage">
            <text:p>22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27:.B136])" office:value-type="percentage" office:value="0.24" calcext:value-type="percentage">
            <text:p>24,00%</text:p>
          </table:table-cell>
          <table:table-cell table:style-name="ce1" table:formula="of:=AVERAGE([.C127:.C13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27:.F136])" office:value-type="percentage" office:value="0.25967" calcext:value-type="percentage">
            <text:p>25,97%</text:p>
          </table:table-cell>
          <table:table-cell table:style-name="ce1" table:formula="of:=AVERAGE([.G127:.G1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Zoo_1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733" calcext:value-type="percentage">
            <text:p>37,33%</text:p>
          </table:table-cell>
          <table:table-cell table:number-columns-repeated="2"/>
          <table:table-cell office:value-type="string" calcext:value-type="string">
            <text:p>Zoo_2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Zoo_3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Zoo_4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Zoo_5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Zoo_6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/>
          <table:table-cell office:value-type="string" calcext:value-type="string">
            <text:p>Zoo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067" calcext:value-type="percentage">
            <text:p>50,67%</text:p>
          </table:table-cell>
          <table:table-cell table:number-columns-repeated="2"/>
          <table:table-cell office:value-type="string" calcext:value-type="string">
            <text:p>Zoo_8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533" calcext:value-type="percentage">
            <text:p>55,33%</text:p>
          </table:table-cell>
          <table:table-cell table:number-columns-repeated="2"/>
          <table:table-cell office:value-type="string" calcext:value-type="string">
            <text:p>Zoo_9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Zoo_10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40:.B149])" office:value-type="percentage" office:value="0.49867" calcext:value-type="percentage">
            <text:p>49,87%</text:p>
          </table:table-cell>
          <table:table-cell table:style-name="ce1" table:formula="of:=AVERAGE([.C140:.C14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0:.F149])" office:value-type="percentage" office:value="0.24" calcext:value-type="percentage">
            <text:p>24,00%</text:p>
          </table:table-cell>
          <table:table-cell table:style-name="ce1" table:formula="of:=AVERAGE([.G140:.G14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783" calcext:value-type="percentage">
            <text:p>7,83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743" calcext:value-type="percentage">
            <text:p>17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043" calcext:value-type="percentage">
            <text:p>10,43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87" calcext:value-type="percentage">
            <text:p>10,87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829" calcext:value-type="percentage">
            <text:p>18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886" calcext:value-type="percentage">
            <text:p>18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1686" calcext:value-type="percentage">
            <text:p>16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2571" calcext:value-type="percentage">
            <text:p>25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53:.B162])" office:value-type="percentage" office:value="0.07564" calcext:value-type="percentage">
            <text:p>7,56%</text:p>
          </table:table-cell>
          <table:table-cell table:style-name="ce1" table:formula="of:=AVERAGE([.C153:.C16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53:.F162])" office:value-type="percentage" office:value="0.17315" calcext:value-type="percentage">
            <text:p>17,32%</text:p>
          </table:table-cell>
          <table:table-cell table:style-name="ce1" table:formula="of:=AVERAGE([.G153:.G1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12" calcext:value-type="percentage">
            <text:p>24,12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518" calcext:value-type="percentage">
            <text:p>15,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12" calcext:value-type="percentage">
            <text:p>44,12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205" calcext:value-type="percentage">
            <text:p>22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554" calcext:value-type="percentage">
            <text:p>15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47" calcext:value-type="percentage">
            <text:p>26,47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675" calcext:value-type="percentage">
            <text:p>16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241" calcext:value-type="percentage">
            <text:p>24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147" calcext:value-type="percentage">
            <text:p>31,47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864" calcext:value-type="percentage">
            <text:p>28,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66:.B175])" office:value-type="percentage" office:value="0.31354" calcext:value-type="percentage">
            <text:p>31,35%</text:p>
          </table:table-cell>
          <table:table-cell table:style-name="ce1" table:formula="of:=AVERAGE([.C166:.C17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66:.F175])" office:value-type="percentage" office:value="0.195822222222222" calcext:value-type="percentage">
            <text:p>19,58%</text:p>
          </table:table-cell>
          <table:table-cell table:style-name="ce1" table:formula="of:=AVERAGE([.G166:.G1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58" calcext:value-type="percentage">
            <text:p>21,58%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office:value-type="percentage" office:value="0.275" calcext:value-type="percentage">
            <text:p>27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office:value-type="percentage" office:value="0.2737" calcext:value-type="percentage">
            <text:p>27,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474" calcext:value-type="percentage">
            <text:p>24,74%</text:p>
          </table:table-cell>
          <table:table-cell table:number-columns-repeated="2"/>
          <table:table-cell office:value-type="string" calcext:value-type="string">
            <text:p>Pima_3</text:p>
          </table:table-cell>
          <table:table-cell office:value-type="percentage" office:value="0.2513" calcext:value-type="percentage">
            <text:p>25,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  <table:table-cell office:value-type="string" calcext:value-type="string">
            <text:p>Pima_4</text:p>
          </table:table-cell>
          <table:table-cell office:value-type="percentage" office:value="0.2276" calcext:value-type="percentage">
            <text:p>22,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21" calcext:value-type="percentage">
            <text:p>24,21%</text:p>
          </table:table-cell>
          <table:table-cell table:number-columns-repeated="2"/>
          <table:table-cell office:value-type="string" calcext:value-type="string">
            <text:p>Pima_5</text:p>
          </table:table-cell>
          <table:table-cell office:value-type="percentage" office:value="0.1842" calcext:value-type="percentage">
            <text:p>18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79" calcext:value-type="percentage">
            <text:p>15,79%</text:p>
          </table:table-cell>
          <table:table-cell table:number-columns-repeated="2"/>
          <table:table-cell office:value-type="string" calcext:value-type="string">
            <text:p>Pima_6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Pima_7</text:p>
          </table:table-cell>
          <table:table-cell office:value-type="percentage" office:value="0.2553" calcext:value-type="percentage">
            <text:p>25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47" calcext:value-type="percentage">
            <text:p>19,47%</text:p>
          </table:table-cell>
          <table:table-cell table:number-columns-repeated="2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16" calcext:value-type="percentage">
            <text:p>23,16%</text:p>
          </table:table-cell>
          <table:table-cell table:number-columns-repeated="2"/>
          <table:table-cell office:value-type="string" calcext:value-type="string">
            <text:p>Pima_9</text:p>
          </table:table-cell>
          <table:table-cell office:value-type="percentage" office:value="0.3895" calcext:value-type="percentage">
            <text:p>38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Pima_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79:.B188])" office:value-type="percentage" office:value="0.19106" calcext:value-type="percentage">
            <text:p>19,11%</text:p>
          </table:table-cell>
          <table:table-cell table:style-name="ce1" table:formula="of:=AVERAGE([.C179:.C18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79:.F188])" office:value-type="percentage" office:value="0.273388888888889" calcext:value-type="percentage">
            <text:p>27,34%</text:p>
          </table:table-cell>
          <table:table-cell table:style-name="ce1" table:formula="of:=AVERAGE([.G179:.G1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468" calcext:value-type="percentage">
            <text:p>34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3887" calcext:value-type="percentage">
            <text:p>38,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163" calcext:value-type="percentage">
            <text:p>16,30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92:.B201])" office:value-type="percentage" office:value="0.14962" calcext:value-type="percentage">
            <text:p>14,96%</text:p>
          </table:table-cell>
          <table:table-cell table:style-name="ce1" table:formula="of:=AVERAGE([.C192:.C20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92:.F201])" office:value-type="percentage" office:value="0.36775" calcext:value-type="percentage">
            <text:p>36,78%</text:p>
          </table:table-cell>
          <table:table-cell table:style-name="ce1" table:formula="of:=AVERAGE([.G192:.G20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587" calcext:value-type="percentage">
            <text:p>25,87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4519" calcext:value-type="percentage">
            <text:p>45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674" calcext:value-type="percentage">
            <text:p>26,74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2957" calcext:value-type="percentage">
            <text:p>29,57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09" calcext:value-type="percentage">
            <text:p>31,09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543" calcext:value-type="percentage">
            <text:p>25,4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152" calcext:value-type="percentage">
            <text:p>31,5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05:.B214])" office:value-type="percentage" office:value="0.29696" calcext:value-type="percentage">
            <text:p>29,70%</text:p>
          </table:table-cell>
          <table:table-cell table:style-name="ce1" table:formula="of:=AVERAGE([.C205:.C21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05:.F214])" office:value-type="percentage" office:value="0.4519" calcext:value-type="percentage">
            <text:p>45,19%</text:p>
          </table:table-cell>
          <table:table-cell table:style-name="ce1" table:formula="of:=AVERAGE([.G205:.G2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204" calcext:value-type="percentage">
            <text:p>20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95" calcext:value-type="percentage">
            <text:p>29,50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75" calcext:value-type="percentage">
            <text:p>27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65" calcext:value-type="percentage">
            <text:p>26,50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85" calcext:value-type="percentage">
            <text:p>38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17:.B226])" office:value-type="percentage" office:value="0.29" calcext:value-type="percentage">
            <text:p>29,00%</text:p>
          </table:table-cell>
          <table:table-cell table:style-name="ce1" table:formula="of:=AVERAGE([.C217:.C22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17:.F226])" office:value-type="percentage" office:value="0.191166666666667" calcext:value-type="percentage">
            <text:p>19,12%</text:p>
          </table:table-cell>
          <table:table-cell table:style-name="ce1" table:formula="of:=AVERAGE([.G217:.G2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25" calcext:value-type="percentage">
            <text:p>12,50%</text:p>
          </table:table-cell>
          <table:table-cell table:number-columns-repeated="2"/>
          <table:table-cell office:value-type="string" calcext:value-type="string">
            <text:p>Transfusion_1</text:p>
          </table:table-cell>
          <table:table-cell table:style-name="ce9" office:value-type="percentage" office:value="0.2216" calcext:value-type="percentage">
            <text:p>22,16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775" calcext:value-type="percentage">
            <text:p>17,75%</text:p>
          </table:table-cell>
          <table:table-cell table:number-columns-repeated="2"/>
          <table:table-cell office:value-type="string" calcext:value-type="string">
            <text:p>Transfusion_2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25" calcext:value-type="percentage">
            <text:p>12,50%</text:p>
          </table:table-cell>
          <table:table-cell table:number-columns-repeated="2"/>
          <table:table-cell office:value-type="string" calcext:value-type="string">
            <text:p>Transfusion_3</text:p>
          </table:table-cell>
          <table:table-cell table:style-name="ce9" office:value-type="percentage" office:value="0.2514" calcext:value-type="percentage">
            <text:p>25,14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table:number-columns-repeated="3"/>
          <table:table-cell office:value-type="string" calcext:value-type="string">
            <text:p>Transfusion_4</text:p>
          </table:table-cell>
          <table:table-cell table:style-name="ce9" office:value-type="percentage" office:value="0.2932" calcext:value-type="percentage">
            <text:p>29,32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table:number-columns-repeated="3"/>
          <table:table-cell office:value-type="string" calcext:value-type="string">
            <text:p>Transfusion_5</text:p>
          </table:table-cell>
          <table:table-cell table:style-name="ce9" office:value-type="percentage" office:value="0.2338" calcext:value-type="percentage">
            <text:p>23,38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table:number-columns-repeated="3"/>
          <table:table-cell office:value-type="string" calcext:value-type="string">
            <text:p>Transfusion_6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3"/>
          <table:table-cell office:value-type="string" calcext:value-type="string">
            <text:p>Transfusion_7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table:number-columns-repeated="3"/>
          <table:table-cell office:value-type="string" calcext:value-type="string">
            <text:p>Transfusion_8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table:number-columns-repeated="3"/>
          <table:table-cell office:value-type="string" calcext:value-type="string">
            <text:p>Transfusion_9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table:number-columns-repeated="3"/>
          <table:table-cell office:value-type="string" calcext:value-type="string">
            <text:p>Transfusion_10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425" calcext:value-type="percentage">
            <text:p>14,25%</text:p>
          </table:table-cell>
          <table:table-cell table:style-name="ce1" table:formula="of:=AVERAGE([.C230:.C23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30:.F239])" office:value-type="percentage" office:value="0.25" calcext:value-type="percentage">
            <text:p>25,00%</text:p>
          </table:table-cell>
          <table:table-cell table:style-name="ce1" table:formula="of:=AVERAGE([.G230:.G23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161" calcext:value-type="percentage">
            <text:p>11,61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176" calcext:value-type="percentage">
            <text:p>21,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14" calcext:value-type="percentage">
            <text:p>2,1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1471" calcext:value-type="percentage">
            <text:p>14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25" calcext:value-type="percentage">
            <text:p>2,5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1529" calcext:value-type="percentage">
            <text:p>15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1" calcext:value-type="percentage">
            <text:p>8,2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176" calcext:value-type="percentage">
            <text:p>11,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office:value-type="percentage" office:value="0.1353" calcext:value-type="percentage">
            <text:p>13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office:value-type="percentage" office:value="0.1235" calcext:value-type="percentage">
            <text:p>12,35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42:.B251])" office:value-type="percentage" office:value="0.0604571428571429" calcext:value-type="percentage">
            <text:p>6,05%</text:p>
          </table:table-cell>
          <table:table-cell table:style-name="ce1" table:formula="of:=AVERAGE([.C242:.C25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42:.F251])" office:value-type="percentage" office:value="0.16352" calcext:value-type="percentage">
            <text:p>16,35%</text:p>
          </table:table-cell>
          <table:table-cell table:style-name="ce1" table:formula="of:=AVERAGE([.G242:.G2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767" calcext:value-type="percentage">
            <text:p>27,67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3933" calcext:value-type="percentage">
            <text:p>39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66" calcext:value-type="percentage">
            <text:p>6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4033" calcext:value-type="percentage">
            <text:p>40,3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2" calcext:value-type="percentage">
            <text:p>22,0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58" calcext:value-type="percentage">
            <text:p>5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3733" calcext:value-type="percentage">
            <text:p>37,33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3967" calcext:value-type="percentage">
            <text:p>39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8" calcext:value-type="percentage">
            <text:p>5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5567" calcext:value-type="percentage">
            <text:p>55,6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55:.B264])" office:value-type="percentage" office:value="0.35667" calcext:value-type="percentage">
            <text:p>35,67%</text:p>
          </table:table-cell>
          <table:table-cell table:style-name="ce1" table:formula="of:=AVERAGE([.C255:.C26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55:.F264])" office:value-type="percentage" office:value="0.604" calcext:value-type="percentage">
            <text:p>60,40%</text:p>
          </table:table-cell>
          <table:table-cell table:style-name="ce1" table:formula="of:=AVERAGE([.G255:.G2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232" calcext:value-type="percentage">
            <text:p>23,2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176" calcext:value-type="percentage">
            <text:p>17,6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134" calcext:value-type="percentage">
            <text:p>1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62" calcext:value-type="percentage">
            <text:p>26,2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162" calcext:value-type="percentage">
            <text:p>16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244" calcext:value-type="percentage">
            <text:p>24,4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144" calcext:value-type="percentage">
            <text:p>14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32" calcext:value-type="percentage">
            <text:p>23,2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154" calcext:value-type="percentage">
            <text:p>15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table:number-columns-repeated="3"/>
          <table:table-cell office:value-type="string" calcext:value-type="string">
            <text:p>zon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9</text:p>
          </table:table-cell>
          <table:table-cell table:number-columns-repeated="3"/>
          <table:table-cell office:value-type="string" calcext:value-type="string">
            <text:p>zon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10</text:p>
          </table:table-cell>
          <table:table-cell table:number-columns-repeated="3"/>
          <table:table-cell office:value-type="string" calcext:value-type="string">
            <text:p>zonf_s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67:.B276])" office:value-type="percentage" office:value="0.229333333333333" calcext:value-type="percentage">
            <text:p>22,93%</text:p>
          </table:table-cell>
          <table:table-cell table:style-name="ce1" table:formula="of:=AVERAGE([.C267:.C2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7:.F276])" office:value-type="percentage" office:value="0.160666666666667" calcext:value-type="percentage">
            <text:p>16,07%</text:p>
          </table:table-cell>
          <table:table-cell table:style-name="ce1" table:formula="of:=AVERAGE([.G267:.G2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string" office:string-value="" calcext:value-type="error">
            <text:p>#DIV/0!</text:p>
          </table:table-cell>
          <table:table-cell table:style-name="ce1" table:formula="of:=AVERAGE([.C279:.C288])" office:value-type="string" office:string-value="" calcext:value-type="error">
            <text:p>#DIV/0!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9"/>
          <table:covered-table-cell table:style-name="ce1"/>
          <table:table-cell table:style-name="ce1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1.456" calcext:value-type="float">
            <text:p>1,456</text:p>
          </table:table-cell>
          <table:table-cell table:style-name="ce6" table:number-columns-repeated="2"/>
          <table:table-cell table:style-name="ce6" office:value-type="string" calcext:value-type="string">
            <text:p>MB_1</text:p>
          </table:table-cell>
          <table:table-cell table:style-name="ce10" office:value-type="float" office:value="0.392" calcext:value-type="float">
            <text:p>3,92E-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1.606" calcext:value-type="float">
            <text:p>1,606</text:p>
          </table:table-cell>
          <table:table-cell table:style-name="ce6" table:number-columns-repeated="2"/>
          <table:table-cell table:style-name="ce6" office:value-type="string" calcext:value-type="string">
            <text:p>MB_2</text:p>
          </table:table-cell>
          <table:table-cell table:style-name="ce10" office:value-type="float" office:value="1.111" calcext:value-type="float">
            <text:p>1,11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4.755" calcext:value-type="float">
            <text:p>14,755</text:p>
          </table:table-cell>
          <table:table-cell table:style-name="ce6" table:number-columns-repeated="2"/>
          <table:table-cell table:style-name="ce6" office:value-type="string" calcext:value-type="string">
            <text:p>MB_3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MB_4</text:p>
          </table:table-cell>
          <table:table-cell table:style-name="ce11" office:value-type="float" office:value="1" calcext:value-type="float">
            <text:p>1,0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4.317" calcext:value-type="float">
            <text:p>4,317</text:p>
          </table:table-cell>
          <table:table-cell table:style-name="ce6" table:number-columns-repeated="2"/>
          <table:table-cell table:style-name="ce6" office:value-type="string" calcext:value-type="string">
            <text:p>MB_5</text:p>
          </table:table-cell>
          <table:table-cell table:style-name="ce10" office:value-type="float" office:value="54.366" calcext:value-type="float">
            <text:p>5,44E+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1.916" calcext:value-type="float">
            <text:p>1,916</text:p>
          </table:table-cell>
          <table:table-cell table:style-name="ce6" table:number-columns-repeated="2"/>
          <table:table-cell table:style-name="ce6" office:value-type="string" calcext:value-type="string">
            <text:p>MB_6</text:p>
          </table:table-cell>
          <table:table-cell table:style-name="ce10" office:value-type="float" office:value="0.147" calcext:value-type="float">
            <text:p>1,47E-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0.449" calcext:value-type="float">
            <text:p>0,449</text:p>
          </table:table-cell>
          <table:table-cell table:style-name="ce6" table:number-columns-repeated="2"/>
          <table:table-cell table:style-name="ce6" office:value-type="string" calcext:value-type="string">
            <text:p>MB_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2.32" calcext:value-type="float">
            <text:p>2,32</text:p>
          </table:table-cell>
          <table:table-cell table:style-name="ce6" table:number-columns-repeated="2"/>
          <table:table-cell table:style-name="ce6" office:value-type="string" calcext:value-type="string">
            <text:p>MB_8</text:p>
          </table:table-cell>
          <table:table-cell table:style-name="ce10" office:value-type="float" office:value="1" calcext:value-type="float">
            <text:p>1,0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4.645" calcext:value-type="float">
            <text:p>4,645</text:p>
          </table:table-cell>
          <table:table-cell table:style-name="ce6" table:number-columns-repeated="2"/>
          <table:table-cell table:style-name="ce6" office:value-type="string" calcext:value-type="string">
            <text:p>MB_9</text:p>
          </table:table-cell>
          <table:table-cell table:style-name="ce10" office:value-type="float" office:value="0.363" calcext:value-type="float">
            <text:p>3,63E-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2.194" calcext:value-type="float">
            <text:p>2,194</text:p>
          </table:table-cell>
          <table:table-cell table:style-name="ce6" table:number-columns-repeated="2"/>
          <table:table-cell table:style-name="ce6" office:value-type="string" calcext:value-type="string">
            <text:p>MB_10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/>
          <table:table-cell/>
        </table:table-row>
        <table:table-row table:style-name="ro2">
          <table:table-cell table:style-name="ce4"/>
          <table:table-cell table:style-name="ce7" table:formula="of:=AVERAGE([.B292:.B301])" office:value-type="float" office:value="4.5658" calcext:value-type="float">
            <text:p>4,5658</text:p>
          </table:table-cell>
          <table:table-cell table:style-name="ce7" table:formula="of:=AVERAGE([.C292:.C301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5.9875" calcext:value-type="float">
            <text:p>5,9875</text:p>
          </table:table-cell>
          <table:table-cell table:style-name="ce11" table:formula="of:=AVERAGE([.G292:.G30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3.232" calcext:value-type="float">
            <text:p>3,232</text:p>
          </table:table-cell>
          <table:table-cell table:style-name="ce6" table:number-columns-repeated="2"/>
          <table:table-cell table:style-name="ce6" office:value-type="string" calcext:value-type="string">
            <text:p>PY_1</text:p>
          </table:table-cell>
          <table:table-cell table:style-name="ce10" office:value-type="float" office:value="13.064" calcext:value-type="float">
            <text:p>1,31E+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4.407" calcext:value-type="float">
            <text:p>4,407</text:p>
          </table:table-cell>
          <table:table-cell table:style-name="ce6" table:number-columns-repeated="2"/>
          <table:table-cell table:style-name="ce6" office:value-type="string" calcext:value-type="string">
            <text:p>PY_2</text:p>
          </table:table-cell>
          <table:table-cell table:style-name="ce11" office:value-type="float" office:value="1" calcext:value-type="float">
            <text:p>1,0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10.514" calcext:value-type="float">
            <text:p>10,514</text:p>
          </table:table-cell>
          <table:table-cell table:style-name="ce6" table:number-columns-repeated="2"/>
          <table:table-cell table:style-name="ce6" office:value-type="string" calcext:value-type="string">
            <text:p>PY_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4.616" calcext:value-type="float">
            <text:p>4,616</text:p>
          </table:table-cell>
          <table:table-cell table:style-name="ce6" table:number-columns-repeated="2"/>
          <table:table-cell table:style-name="ce6" office:value-type="string" calcext:value-type="string">
            <text:p>PY_4</text:p>
          </table:table-cell>
          <table:table-cell table:style-name="ce10" office:value-type="float" office:value="123" calcext:value-type="float">
            <text:p>1,23E+02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style-name="ce6" office:value-type="float" office:value="4.196" calcext:value-type="float">
            <text:p>4,196</text:p>
          </table:table-cell>
          <table:table-cell table:style-name="ce6" table:number-columns-repeated="2"/>
          <table:table-cell table:style-name="ce6" office:value-type="string" calcext:value-type="string">
            <text:p>PY_5</text:p>
          </table:table-cell>
          <table:table-cell table:style-name="ce10" office:value-type="float" office:value="1" calcext:value-type="float">
            <text:p>1,0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5.095" calcext:value-type="float">
            <text:p>5,095</text:p>
          </table:table-cell>
          <table:table-cell table:style-name="ce6" table:number-columns-repeated="2"/>
          <table:table-cell table:style-name="ce6" office:value-type="string" calcext:value-type="string">
            <text:p>PY_6</text:p>
          </table:table-cell>
          <table:table-cell table:style-name="ce10" office:value-type="float" office:value="1.907" calcext:value-type="float">
            <text:p>1,91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13.412" calcext:value-type="float">
            <text:p>13,412</text:p>
          </table:table-cell>
          <table:table-cell table:style-name="ce6" table:number-columns-repeated="2"/>
          <table:table-cell table:style-name="ce6" office:value-type="string" calcext:value-type="string">
            <text:p>PY_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2.647" calcext:value-type="float">
            <text:p>2,647</text:p>
          </table:table-cell>
          <table:table-cell table:style-name="ce6" table:number-columns-repeated="2"/>
          <table:table-cell table:style-name="ce6" office:value-type="string" calcext:value-type="string">
            <text:p>PY_8</text:p>
          </table:table-cell>
          <table:table-cell table:style-name="ce10" office:value-type="float" office:value="6.804" calcext:value-type="float">
            <text:p>6,8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5.858" calcext:value-type="float">
            <text:p>5,858</text:p>
          </table:table-cell>
          <table:table-cell table:style-name="ce6" table:number-columns-repeated="2"/>
          <table:table-cell table:style-name="ce6" office:value-type="string" calcext:value-type="string">
            <text:p>PY_9</text:p>
          </table:table-cell>
          <table:table-cell table:style-name="ce10" office:value-type="float" office:value="1" calcext:value-type="float">
            <text:p>1,00E+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5.59" calcext:value-type="float">
            <text:p>5,59</text:p>
          </table:table-cell>
          <table:table-cell table:style-name="ce6" table:number-columns-repeated="2"/>
          <table:table-cell table:style-name="ce6" office:value-type="string" calcext:value-type="string">
            <text:p>PY_10</text:p>
          </table:table-cell>
          <table:table-cell table:style-name="ce6" office:value-type="float" office:value="5.988" calcext:value-type="float">
            <text:p>5,988</text:p>
          </table:table-cell>
          <table:table-cell table:style-name="ce6"/>
          <table:table-cell/>
        </table:table-row>
        <table:table-row table:style-name="ro2">
          <table:table-cell table:style-name="ce4"/>
          <table:table-cell table:style-name="ce7" table:formula="of:=AVERAGE([.B304:.B313])" office:value-type="float" office:value="5.9567" calcext:value-type="float">
            <text:p>5,9567</text:p>
          </table:table-cell>
          <table:table-cell table:style-name="ce7" table:formula="of:=AVERAGE([.C304:.C313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15.5763" calcext:value-type="float">
            <text:p>15,5763</text:p>
          </table:table-cell>
          <table:table-cell table:style-name="ce11" table:formula="of:=AVERAGE([.G304:.G3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table:number-columns-repeated="3"/>
          <table:table-cell table:style-name="ce6" office:value-type="string" calcext:value-type="string">
            <text:p>BL_2</text:p>
          </table:table-cell>
          <table:table-cell table:style-name="ce10" office:value-type="float" office:value="0.0337" calcext:value-type="float">
            <text:p>3,37E-02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table:number-columns-repeated="3"/>
          <table:table-cell table:style-name="ce6" office:value-type="string" calcext:value-type="string">
            <text:p>BL_3</text:p>
          </table:table-cell>
          <table:table-cell table:style-name="ce6" office:value-type="float" office:value="0.0202" calcext:value-type="float">
            <text:p>0,0202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table:number-columns-repeated="3"/>
          <table:table-cell table:style-name="ce6" office:value-type="string" calcext:value-type="string">
            <text:p>BL_4</text:p>
          </table:table-cell>
          <table:table-cell table:style-name="ce10" office:value-type="float" office:value="0.0202" calcext:value-type="float">
            <text:p>2,02E-02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office:value-type="float" office:value="0.00801" calcext:value-type="float">
            <text:p>8,01E-03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849" calcext:value-type="float">
            <text:p>8,49E-02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129" calcext:value-type="float">
            <text:p>0,0129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635" calcext:value-type="float">
            <text:p>6,35E-03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416" calcext:value-type="float">
            <text:p>4,16E-03</text:p>
          </table:table-cell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445" calcext:value-type="float">
            <text:p>0,0445</text:p>
          </table:table-cell>
          <table:table-cell table:style-name="ce6" table:number-columns-repeated="2"/>
        </table:table-row>
        <table:table-row table:style-name="ro2">
          <table:table-cell table:style-name="ce4"/>
          <table:table-cell table:style-name="ce7" table:formula="of:=AVERAGE([.B317:.B326])" office:value-type="string" office:string-value="" calcext:value-type="error">
            <text:p>#DIV/0!</text:p>
          </table:table-cell>
          <table:table-cell table:style-name="ce7" table:formula="of:=AVERAGE([.C317:.C326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25912" calcext:value-type="float">
            <text:p>0,025912</text:p>
          </table:table-cell>
          <table:table-cell table:style-name="ce11" table:formula="of:=AVERAGE([.G317:.G326])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4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table:number-columns-repeated="3"/>
          <table:table-cell table:style-name="ce6" office:value-type="string" calcext:value-type="string">
            <text:p>Basebal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table:number-columns-repeated="3"/>
          <table:table-cell table:style-name="ce6" office:value-type="string" calcext:value-type="string">
            <text:p>Basebal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table:number-columns-repeated="3"/>
          <table:table-cell table:style-name="ce6" office:value-type="string" calcext:value-type="string">
            <text:p>Basebal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table:number-columns-repeated="3"/>
          <table:table-cell table:style-name="ce6" office:value-type="string" calcext:value-type="string">
            <text:p>Basebal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table:number-columns-repeated="3"/>
          <table:table-cell table:style-name="ce6" office:value-type="string" calcext:value-type="string">
            <text:p>Baseball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table:number-columns-repeated="3"/>
          <table:table-cell table:style-name="ce6" office:value-type="string" calcext:value-type="string">
            <text:p>Basebal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1"/>
          <table:table-cell table:style-name="ce5" table:formula="of:=AVERAGE([.B329:.B338])" office:value-type="float" office:value="0.733666666666667" calcext:value-type="float">
            <text:p>0,733666666666667</text:p>
          </table:table-cell>
          <table:table-cell table:style-name="ce5" table:formula="of:=AVERAGE([.C329:.C338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F329:.F338])" office:value-type="string" office:string-value="" calcext:value-type="error">
            <text:p>#DIV/0!</text:p>
          </table:table-cell>
          <table:table-cell table:style-name="ce7" table:formula="of:=AVERAGE([.G329:.G33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table:number-columns-repeated="3"/>
          <table:table-cell table:style-name="ce6" office:value-type="string" calcext:value-type="string">
            <text:p>Dee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table:number-columns-repeated="3"/>
          <table:table-cell table:style-name="ce6" office:value-type="string" calcext:value-type="string">
            <text:p>De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table:number-columns-repeated="3"/>
          <table:table-cell table:style-name="ce6" office:value-type="string" calcext:value-type="string">
            <text:p>De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3"/>
          <table:table-cell table:style-name="ce6" office:value-type="string" calcext:value-type="string">
            <text:p>De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3"/>
          <table:table-cell table:style-name="ce6" office:value-type="string" calcext:value-type="string">
            <text:p>De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3"/>
          <table:table-cell table:style-name="ce6" office:value-type="string" calcext:value-type="string">
            <text:p>De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3"/>
          <table:table-cell table:style-name="ce6" office:value-type="string" calcext:value-type="string">
            <text:p>De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3"/>
          <table:table-cell table:style-name="ce6" office:value-type="string" calcext:value-type="string">
            <text:p>De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3"/>
          <table:table-cell table:style-name="ce6" office:value-type="string" calcext:value-type="string">
            <text:p>De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41:.B350])" office:value-type="string" office:string-value="" calcext:value-type="error">
            <text:p>#DIV/0!</text:p>
          </table:table-cell>
          <table:table-cell table:style-name="ce7" table:formula="of:=AVERAGE([.C341:.C35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string" office:string-value="" calcext:value-type="error">
            <text:p>#DIV/0!</text:p>
          </table:table-cell>
          <table:table-cell table:style-name="ce7" table:formula="of:=AVERAGE([.G342:.G3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table:number-columns-repeated="3"/>
          <table:table-cell table:style-name="ce6" office:value-type="string" calcext:value-type="string">
            <text:p>Ho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table:number-columns-repeated="3"/>
          <table:table-cell table:style-name="ce6" office:value-type="string" calcext:value-type="string">
            <text:p>Ho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table:number-columns-repeated="3"/>
          <table:table-cell table:style-name="ce6" office:value-type="string" calcext:value-type="string">
            <text:p>Ho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3"/>
          <table:table-cell table:style-name="ce6" office:value-type="string" calcext:value-type="string">
            <text:p>Ho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3"/>
          <table:table-cell table:style-name="ce6" office:value-type="string" calcext:value-type="string">
            <text:p>Ho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3"/>
          <table:table-cell table:style-name="ce6" office:value-type="string" calcext:value-type="string">
            <text:p>Ho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3"/>
          <table:table-cell table:style-name="ce6" office:value-type="string" calcext:value-type="string">
            <text:p>Ho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3"/>
          <table:table-cell table:style-name="ce6" office:value-type="string" calcext:value-type="string">
            <text:p>Ho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3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3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54:.B363])" office:value-type="string" office:string-value="" calcext:value-type="error">
            <text:p>#DIV/0!</text:p>
          </table:table-cell>
          <table:table-cell table:style-name="ce7" table:formula="of:=AVERAGE([.C354:.C363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354:.F363])" office:value-type="string" office:string-value="" calcext:value-type="error">
            <text:p>#DIV/0!</text:p>
          </table:table-cell>
          <table:table-cell table:style-name="ce7" table:formula="of:=AVERAGE([.G354:.G3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67:.B376])" office:value-type="string" office:string-value="" calcext:value-type="error">
            <text:p>#DIV/0!</text:p>
          </table:table-cell>
          <table:table-cell table:style-name="ce7" table:formula="of:=AVERAGE([.C367:.C37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string" office:string-value="" calcext:value-type="error">
            <text:p>#DIV/0!</text:p>
          </table:table-cell>
          <table:table-cell table:style-name="ce7" table:formula="of:=AVERAGE([.G368:.G377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table:number-columns-repeated="3"/>
          <table:table-cell table:style-name="ce6" office:value-type="string" calcext:value-type="string">
            <text:p>Mortgag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table:number-columns-repeated="3"/>
          <table:table-cell table:style-name="ce6" office:value-type="string" calcext:value-type="string">
            <text:p>Mortgag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table:number-columns-repeated="3"/>
          <table:table-cell table:style-name="ce6" office:value-type="string" calcext:value-type="string">
            <text:p>Mortgag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table:number-columns-repeated="3"/>
          <table:table-cell table:style-name="ce6" office:value-type="string" calcext:value-type="string">
            <text:p>Mortgag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table:number-columns-repeated="3"/>
          <table:table-cell table:style-name="ce6" office:value-type="string" calcext:value-type="string">
            <text:p>Mortgag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table:number-columns-repeated="3"/>
          <table:table-cell table:style-name="ce6" office:value-type="string" calcext:value-type="string">
            <text:p>Mortgag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table:number-columns-repeated="3"/>
          <table:table-cell table:style-name="ce6" office:value-type="string" calcext:value-type="string">
            <text:p>Mortgag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table:number-columns-repeated="3"/>
          <table:table-cell table:style-name="ce6" office:value-type="string" calcext:value-type="string">
            <text:p>Mortgag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table:number-columns-repeated="3"/>
          <table:table-cell table:style-name="ce6" office:value-type="string" calcext:value-type="string">
            <text:p>Mortgag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80:.B389])" office:value-type="string" office:string-value="" calcext:value-type="error">
            <text:p>#DIV/0!</text:p>
          </table:table-cell>
          <table:table-cell table:style-name="ce7" table:formula="of:=AVERAGE([.C380:.C38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string" office:string-value="" calcext:value-type="error">
            <text:p>#DIV/0!</text:p>
          </table:table-cell>
          <table:table-cell table:style-name="ce7" table:formula="of:=AVERAGE([.G381:.G390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table:number-columns-repeated="3"/>
          <table:table-cell table:style-name="ce6" office:value-type="string" calcext:value-type="string">
            <text:p>PL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table:number-columns-repeated="3"/>
          <table:table-cell table:style-name="ce6" office:value-type="string" calcext:value-type="string">
            <text:p>P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table:number-columns-repeated="3"/>
          <table:table-cell table:style-name="ce6" office:value-type="string" calcext:value-type="string">
            <text:p>P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table:number-columns-repeated="3"/>
          <table:table-cell table:style-name="ce6" office:value-type="string" calcext:value-type="string">
            <text:p>P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table:number-columns-repeated="3"/>
          <table:table-cell table:style-name="ce6" office:value-type="string" calcext:value-type="string">
            <text:p>P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table:number-columns-repeated="3"/>
          <table:table-cell table:style-name="ce6" office:value-type="string" calcext:value-type="string">
            <text:p>P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table:number-columns-repeated="3"/>
          <table:table-cell table:style-name="ce6" office:value-type="string" calcext:value-type="string">
            <text:p>P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table:number-columns-repeated="3"/>
          <table:table-cell table:style-name="ce6" office:value-type="string" calcext:value-type="string">
            <text:p>P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table:number-columns-repeated="3"/>
          <table:table-cell table:style-name="ce6" office:value-type="string" calcext:value-type="string">
            <text:p>PL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93:.B402])" office:value-type="string" office:string-value="" calcext:value-type="error">
            <text:p>#DIV/0!</text:p>
          </table:table-cell>
          <table:table-cell table:style-name="ce7" table:formula="of:=AVERAGE([.C393:.C402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string" office:string-value="" calcext:value-type="error">
            <text:p>#DIV/0!</text:p>
          </table:table-cell>
          <table:table-cell table:style-name="ce7" table:formula="of:=AVERAGE([.G394:.G403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6" table:number-columns-repeated="3"/>
          <table:table-cell office:value-type="string" calcext:value-type="string">
            <text:p>V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6" table:number-columns-repeated="3"/>
          <table:table-cell office:value-type="string" calcext:value-type="string">
            <text:p>V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6" table:number-columns-repeated="3"/>
          <table:table-cell office:value-type="string" calcext:value-type="string">
            <text:p>V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6" table:number-columns-repeated="3"/>
          <table:table-cell office:value-type="string" calcext:value-type="string">
            <text:p>V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6" table:number-columns-repeated="3"/>
          <table:table-cell office:value-type="string" calcext:value-type="string">
            <text:p>V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6" table:number-columns-repeated="3"/>
          <table:table-cell office:value-type="string" calcext:value-type="string">
            <text:p>V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6" table:number-columns-repeated="3"/>
          <table:table-cell office:value-type="string" calcext:value-type="string">
            <text:p>V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6" table:number-columns-repeated="3"/>
          <table:table-cell office:value-type="string" calcext:value-type="string">
            <text:p>V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6" table:number-columns-repeated="3"/>
          <table:table-cell office:value-type="string" calcext:value-type="string">
            <text:p>VE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6" table:number-columns-repeated="3"/>
          <table:table-cell office:value-type="string" calcext:value-type="string">
            <text:p>V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06:.B415])" office:value-type="string" office:string-value="" calcext:value-type="error">
            <text:p>#DIV/0!</text:p>
          </table:table-cell>
          <table:table-cell table:style-name="ce7" table:formula="of:=AVERAGE([.C406:.C415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06:.F415])" office:value-type="string" office:string-value="" calcext:value-type="error">
            <text:p>#DIV/0!</text:p>
          </table:table-cell>
          <table:table-cell table:style-name="ce7" table:formula="of:=AVERAGE([.G406:.G415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1</text:p>
          </table:table-cell>
          <table:table-cell table:style-name="ce5" table:number-columns-repeated="3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table:number-columns-repeated="3"/>
          <table:table-cell table:style-name="ce6" office:value-type="string" calcext:value-type="string">
            <text:p>Sn_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table:number-columns-repeated="3"/>
          <table:table-cell table:style-name="ce6" office:value-type="string" calcext:value-type="string">
            <text:p>Sn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table:number-columns-repeated="3"/>
          <table:table-cell table:style-name="ce6" office:value-type="string" calcext:value-type="string">
            <text:p>Sn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table:number-columns-repeated="3"/>
          <table:table-cell table:style-name="ce6" office:value-type="string" calcext:value-type="string">
            <text:p>Sn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table:number-columns-repeated="3"/>
          <table:table-cell table:style-name="ce6" office:value-type="string" calcext:value-type="string">
            <text:p>Sn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table:number-columns-repeated="3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table:number-columns-repeated="3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table:number-columns-repeated="3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table:number-columns-repeated="3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table:number-columns-repeated="3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7"/>
          <table:table-cell table:style-name="ce7" table:formula="of:=AVERAGE([.B419:.B428])" office:value-type="string" office:string-value="" calcext:value-type="error">
            <text:p>#DIV/0!</text:p>
          </table:table-cell>
          <table:table-cell table:style-name="ce7" table:formula="of:=AVERAGE([.C419:.C428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19:.F428])" office:value-type="string" office:string-value="" calcext:value-type="error">
            <text:p>#DIV/0!</text:p>
          </table:table-cell>
          <table:table-cell table:style-name="ce7" table:formula="of:=AVERAGE([.G419:.G428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table:number-columns-repeated="3"/>
          <table:table-cell table:style-name="ce6" office:value-type="string" calcext:value-type="string">
            <text:p>TZ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table:number-columns-repeated="3"/>
          <table:table-cell table:style-name="ce6" office:value-type="string" calcext:value-type="string">
            <text:p>TZ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table:number-columns-repeated="3"/>
          <table:table-cell table:style-name="ce6" office:value-type="string" calcext:value-type="string">
            <text:p>TZ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table:number-columns-repeated="3"/>
          <table:table-cell table:style-name="ce6" office:value-type="string" calcext:value-type="string">
            <text:p>TZ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table:number-columns-repeated="3"/>
          <table:table-cell table:style-name="ce6" office:value-type="string" calcext:value-type="string">
            <text:p>TZ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table:number-columns-repeated="3"/>
          <table:table-cell table:style-name="ce6" office:value-type="string" calcext:value-type="string">
            <text:p>TZ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table:number-columns-repeated="3"/>
          <table:table-cell table:style-name="ce6" office:value-type="string" calcext:value-type="string">
            <text:p>TZ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table:number-columns-repeated="3"/>
          <table:table-cell table:style-name="ce6" office:value-type="string" calcext:value-type="string">
            <text:p>TZ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table:number-columns-repeated="3"/>
          <table:table-cell table:style-name="ce6" office:value-type="string" calcext:value-type="string">
            <text:p>TZ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table:number-columns-repeated="3"/>
          <table:table-cell table:style-name="ce6" office:value-type="string" calcext:value-type="string">
            <text:p>TZ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32:.B441])" office:value-type="string" office:string-value="" calcext:value-type="error">
            <text:p>#DIV/0!</text:p>
          </table:table-cell>
          <table:table-cell table:style-name="ce7" table:formula="of:=AVERAGE([.C432:.C441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32:.F441])" office:value-type="string" office:string-value="" calcext:value-type="error">
            <text:p>#DIV/0!</text:p>
          </table:table-cell>
          <table:table-cell table:style-name="ce7" table:formula="of:=AVERAGE([.G432:.G44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7" table:formula="of:=AVERAGE([.B445:.B454])" office:value-type="string" office:string-value="" calcext:value-type="error">
            <text:p>#DIV/0!</text:p>
          </table:table-cell>
          <table:table-cell table:style-name="ce7" table:formula="of:=AVERAGE([.C445:.C454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9"/>
        <table:table-column table:style-name="co9" table:default-cell-style-name="Default"/>
        <table:table-row table:style-name="ro2">
          <table:table-cell/>
          <table:table-cell table:style-name="ce15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6" office:value-type="percentage" office:value="0.2893" calcext:value-type="percentage">
            <text:p>28,93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4358" calcext:value-type="percentage">
            <text:p>43,58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214" calcext:value-type="percentage">
            <text:p>21,40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964" calcext:value-type="percentage">
            <text:p>39,64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2752" calcext:value-type="percentage">
            <text:p>27,52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97" calcext:value-type="percentage">
            <text:p>52,9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4226" calcext:value-type="percentage">
            <text:p>42,26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537" calcext:value-type="percentage">
            <text:p>55,3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23" calcext:value-type="percentage">
            <text:p>22,30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257" calcext:value-type="percentage">
            <text:p>52,57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837" calcext:value-type="percentage">
            <text:p>28,3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2597" calcext:value-type="percentage">
            <text:p>25,9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756" calcext:value-type="percentage">
            <text:p>7,56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732" calcext:value-type="percentage">
            <text:p>17,32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5" calcext:value-type="percentage">
            <text:p>31,35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6" office:value-type="percentage" office:value="0.5664" calcext:value-type="percentage">
            <text:p>56,64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tdigi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911" calcext:value-type="percentage">
            <text:p>19,11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6" office:value-type="percentage" office:value="0.1289" calcext:value-type="percentage">
            <text:p>12,89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6" office:value-type="percentage" office:value="0.2325" calcext:value-type="percentage">
            <text:p>23,25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678" calcext:value-type="percentage">
            <text:p>36,78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6" office:value-type="percentage" office:value="0.5049" calcext:value-type="percentage">
            <text:p>50,49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97" calcext:value-type="percentage">
            <text:p>29,7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at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gme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9" calcext:value-type="percentage">
            <text:p>29,00%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6" office:value-type="percentage" office:value="0.1941" calcext:value-type="percentage">
            <text:p>19,41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6" office:value-type="percentage" office:value="0.2526" calcext:value-type="percentage">
            <text:p>25,26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6" office:value-type="percentage" office:value="0.1425" calcext:value-type="percentage">
            <text:p>14,25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6" office:value-type="percentage" office:value="0.4987" calcext:value-type="percentage">
            <text:p>49,87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Wdb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1635" calcext:value-type="percentage">
            <text:p>16,35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3567" calcext:value-type="percentage">
            <text:p>35,6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604" calcext:value-type="percentage">
            <text:p>60,4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O_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</table:table-row>
        <table:table-row table:style-name="ro4">
          <table:table-cell table:style-name="ce14"/>
          <table:table-cell table:style-name="ce17" table:formula="of:=AVERAGE([.B3:.B47])" office:value-type="percentage" office:value="0.319611764705882" calcext:value-type="percentage">
            <text:p>31,96%</text:p>
          </table:table-cell>
          <table:table-cell table:style-name="ce17" table:formula="of:=AVERAGE([.C3:.C47])" office:value-type="string" office:string-value="" calcext:value-type="error">
            <text:p>#DIV/0!</text:p>
          </table:table-cell>
          <table:table-cell table:style-name="ce17" table:formula="of:=AVERAGE([.D3:.D47])" office:value-type="string" office:string-value="" calcext:value-type="error">
            <text:p>#DIV/0!</text:p>
          </table:table-cell>
          <table:table-cell table:style-name="ce17" table:formula="of:=AVERAGE([.E3:.E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4"/>
          <table:table-cell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4"/>
          <table:table-cell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 table:number-columns-repeated="4"/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table:number-columns-repeated="2"/>
          <table:table-cell table:style-name="Default" table:number-columns-repeated="2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formula="of:=0.025912/4" office:value-type="float" office:value="0.006478" calcext:value-type="float">
            <text:p>0,006478</text:p>
          </table:table-cell>
          <table:table-cell table:style-name="ce13"/>
          <table:table-cell table:style-name="Default" table:number-columns-repeated="2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4"/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table:style-name="Default" table:number-columns-repeated="4"/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table:formula="of:=4.5658/25" office:value-type="float" office:value="0.182632" calcext:value-type="float">
            <text:p>0,182632</text:p>
          </table:table-cell>
          <table:table-cell table:style-name="ce13" table:number-columns-repeated="3"/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 table:number-columns-repeated="4"/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 table:style-name="Default" table:number-columns-repeated="4"/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table:formula="of:=5.9875/6" office:value-type="float" office:value="0.997916666666667" calcext:value-type="float">
            <text:p>0,997916666666667</text:p>
          </table:table-cell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table:formula="of:=5.9567/13" office:value-type="float" office:value="0.458207692307692" calcext:value-type="float">
            <text:p>0,458207692307692</text:p>
          </table:table-cell>
          <table:table-cell table:style-name="ce13" table:number-columns-repeated="3"/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 table:number-columns-repeated="4"/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table:formula="of:=15.5763/7" office:value-type="float" office:value="2.22518571428571" calcext:value-type="float">
            <text:p>2,22518571428571</text:p>
          </table:table-cell>
          <table:table-cell table:style-name="ce13" table:number-columns-repeated="3"/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 table:style-name="Default" table:number-columns-repeated="4"/>
          <table:table-cell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4"/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 table:style-name="Default" table:number-columns-repeated="4"/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 table:style-name="Default" table:number-columns-repeated="4"/>
          <table:table-cell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 table:number-columns-repeated="4"/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 table:style-name="Default" table:number-columns-repeated="4"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4">
          <table:table-cell/>
          <table:table-cell table:style-name="Default" table:number-columns-repeated="4"/>
          <table:table-cell table:style-name="ce14"/>
        </table:table-row>
        <table:table-row table:style-name="ro4">
          <table:table-cell table:style-name="ce14"/>
          <table:table-cell table:style-name="ce14" table:formula="of:=AVERAGE([.B52:.B80])" office:value-type="float" office:value="0.774084014652015" calcext:value-type="float">
            <text:p>0,774084014652015</text:p>
          </table:table-cell>
          <table:table-cell table:style-name="ce14" table:formula="of:=AVERAGE([.C52:.C80])" office:value-type="string" office:string-value="" calcext:value-type="error">
            <text:p>#DIV/0!</text:p>
          </table:table-cell>
          <table:table-cell table:style-name="ce14" table:formula="of:=AVERAGE([.D52:.D80])" office:value-type="string" office:string-value="" calcext:value-type="error">
            <text:p>#DIV/0!</text:p>
          </table:table-cell>
          <table:table-cell table:style-name="ce14" table:formula="of:=AVERAGE([.E52:.E80])" office:value-type="string" office:string-value="" calcext:value-type="error">
            <text:p>#DIV/0!</text:p>
          </table:table-cell>
          <table:table-cell/>
        </table:table-row>
      </table:table>
      <table:table table:name="Φύλλο1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9"/>
        <table:table-column table:style-name="co11" table:default-cell-style-name="ce16"/>
        <table:table-column table:style-name="co12" table:number-columns-repeated="2" table:default-cell-style-name="ce16"/>
        <table:table-row table:style-name="ro2">
          <table:table-cell table:number-columns-repeated="2"/>
          <table:table-cell table:style-name="Default" table:number-columns-repeated="3"/>
          <table:table-cell table:style-name="ce15" office:value-type="string" calcext:value-type="string" table:number-columns-spanned="3" table:number-rows-spanned="1">
            <text:p>CLASSIFICATION DATASETS</text:p>
          </table:table-cell>
          <table:covered-table-cell table:style-name="ce15"/>
          <table:covered-table-cell table:style-name="Default"/>
        </table:table-row>
        <table:table-row table:style-name="ro5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3">
          <table:table-cell office:value-type="string" calcext:value-type="string">
            <text:p>Appendicitis</text:p>
          </table:table-cell>
          <table:table-cell table:style-name="ce9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9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table:style-name="ce9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3">
          <table:table-cell office:value-type="string" calcext:value-type="string">
            <text:p>Banana</text:p>
          </table:table-cell>
          <table:table-cell table:style-name="ce9"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3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table:style-name="ce9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3">
          <table:table-cell office:value-type="string" calcext:value-type="string">
            <text:p>Contraceptive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9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3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9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table:style-name="ce9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3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9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9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9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3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9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3">
          <table:table-cell office:value-type="string" calcext:value-type="string">
            <text:p>Optdigits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9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3">
          <table:table-cell office:value-type="string" calcext:value-type="string">
            <text:p>Pima</text:p>
          </table:table-cell>
          <table:table-cell table:style-name="ce9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Pirvision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Popfailures</text:p>
          </table:table-cell>
          <table:table-cell table:style-name="ce9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table:style-name="ce9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3">
          <table:table-cell office:value-type="string" calcext:value-type="string">
            <text:p>Saheart</text:p>
          </table:table-cell>
          <table:table-cell table:style-name="ce9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Segment</text:p>
          </table:table-cell>
          <table:table-cell table:style-name="ce9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3">
          <table:table-cell office:value-type="string" calcext:value-type="string">
            <text:p>Spiral</text:p>
          </table:table-cell>
          <table:table-cell table:style-name="ce9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3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table:style-name="ce9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table:style-name="ce9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table:style-name="ce9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3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table:style-name="ce9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table:style-name="ce9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table:style-name="ce9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4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0" office:value-type="string" calcext:value-type="string" table:number-columns-spanned="3" table:number-rows-spanned="1">
            <text:p>REGRESSION DATASETS</text:p>
          </table:table-cell>
          <table:covered-table-cell table:style-name="ce20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5">
      <number:number number:decimal-places="3" number:min-decimal-places="3" number:min-integer-digits="1"/>
      <number:text>%</number:text>
    </number:percentage-style>
    <number:percentage-style style:name="N116">
      <number:number number:decimal-places="4" number:min-decimal-places="4" number:min-integer-digits="1"/>
      <number:text>%</number:text>
    </number:percentage-style>
    <number:percentage-style style:name="N117">
      <number:number number:decimal-places="5" number:min-decimal-places="5" number:min-integer-digits="1"/>
      <number:text>%</number:text>
    </number:percentage-style>
    <number:percentage-style style:name="N118">
      <number:number number:decimal-places="6" number:min-decimal-places="6" number:min-integer-digits="1"/>
      <number:text>%</number:text>
    </number:percentage-style>
    <number:percentage-style style:name="N119">
      <number:number number:decimal-places="1" number:min-decimal-places="1" number:min-integer-digits="0"/>
      <number:text>%</number:text>
    </number:percentage-style>
    <number:percentage-style style:name="N120">
      <number:number number:decimal-places="2" number:min-decimal-places="2" number:min-integer-digits="0"/>
      <number:text>%</number:text>
    </number:percentage-style>
    <number:percentage-style style:name="N121">
      <number:number number:decimal-places="3" number:min-decimal-places="3" number:min-integer-digits="0"/>
      <number:text>%</number:text>
    </number:percentage-style>
    <number:percentage-style style:name="N122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2T22:28:32.973131804</dc:date>
    <meta:editing-duration>PT7H50M7S</meta:editing-duration>
    <meta:editing-cycles>137</meta:editing-cycles>
    <meta:generator>LibreOffice/25.2.3.2$Linux_X86_64 LibreOffice_project/520$Build-2</meta:generator>
    <meta:document-statistic meta:table-count="3" meta:cell-count="2118" meta:object-count="0"/>
  </office:meta>
</office:document-meta>
</file>