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6" calcext:value-type="percentage">
            <text:p>12,7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149" calcext:value-type="percentage">
            <text:p>1,4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135" calcext:value-type="percentage">
            <text:p>1,35%</text:p>
          </table:table-cell>
          <table:table-cell table:style-name="ce3" office:value-type="percentage" office:value="0.0649" calcext:value-type="percentage">
            <text:p>6,49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064" calcext:value-type="percentage">
            <text:p>10,64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2"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064" calcext:value-type="percentage">
            <text:p>10,64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0426" calcext:value-type="percentage">
            <text:p>20,43%</text:p>
          </table:table-cell>
          <table:table-cell table:style-name="ce1" table:formula="of:=AVERAGE([.C2:.C11])" office:value-type="percentage" office:value="0.20211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054" calcext:value-type="percentage">
            <text:p>5,05%</text:p>
          </table:table-cell>
          <table:table-cell table:style-name="ce1" table:formula="of:=AVERAGE([.G2:.G11])" office:value-type="percentage" office:value="0.05568" calcext:value-type="percentage">
            <text:p>5,5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296" calcext:value-type="percentage">
            <text:p>22,96%</text:p>
          </table:table-cell>
          <table:table-cell table:style-name="ce3" office:value-type="percentage" office:value="0.1963" calcext:value-type="percentage">
            <text:p>19,63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852" calcext:value-type="percentage">
            <text:p>18,52%</text:p>
          </table:table-cell>
          <table:table-cell table:style-name="ce3" office:value-type="percentage" office:value="0.1704" calcext:value-type="percentage">
            <text:p>17,04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44" calcext:value-type="percentage">
            <text:p>14,44%</text:p>
          </table:table-cell>
          <table:table-cell/>
          <table:table-cell office:value-type="string" calcext:value-type="string">
            <text:p>Statheart_3</text:p>
          </table:table-cell>
          <table:table-cell table:number-columns-repeated="2"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4</text:p>
          </table:table-cell>
          <table:table-cell table:style-name="ce3" office:value-type="percentage" office:value="0.2926" calcext:value-type="percentage">
            <text:p>29,26%</text:p>
          </table:table-cell>
          <table:table-cell table:style-name="ce3" office:value-type="percentage" office:value="0.2963" calcext:value-type="percentage">
            <text:p>29,63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2"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 office:value-type="percentage" office:value="0.263" calcext:value-type="percentage">
            <text:p>26,30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7" calcext:value-type="percentage">
            <text:p>33,70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2148" calcext:value-type="percentage">
            <text:p>21,48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8</text:p>
          </table:table-cell>
          <table:table-cell table:number-columns-repeated="2" table:style-name="ce3" office:value-type="percentage" office:value="0.2593" calcext:value-type="percentage">
            <text:p>25,93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259" calcext:value-type="percentage">
            <text:p>12,59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463" calcext:value-type="percentage">
            <text:p>14,63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5593" calcext:value-type="percentage">
            <text:p>15,59%</text:p>
          </table:table-cell>
          <table:table-cell table:style-name="ce1" table:formula="of:=AVERAGE([.C14:.C23])" office:value-type="percentage" office:value="0.15815" calcext:value-type="percentage">
            <text:p>15,82%</text:p>
          </table:table-cell>
          <table:table-cell/>
          <table:table-cell table:style-name="ce1"/>
          <table:table-cell table:style-name="ce1" table:formula="of:=AVERAGE([.F14:.F23])" office:value-type="percentage" office:value="0.23889" calcext:value-type="percentage">
            <text:p>23,89%</text:p>
          </table:table-cell>
          <table:table-cell table:style-name="ce1" table:formula="of:=AVERAGE([.G14:.G23])" office:value-type="percentage" office:value="0.23259" calcext:value-type="percentage">
            <text:p>23,2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4357" calcext:value-type="percentage">
            <text:p>43,57%</text:p>
          </table:table-cell>
          <table:table-cell table:style-name="ce3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143" calcext:value-type="percentage">
            <text:p>21,43%</text:p>
          </table:table-cell>
          <table:table-cell table:style-name="ce3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string" calcext:value-type="string">
            <text:p>x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/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/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/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/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1786" calcext:value-type="percentage">
            <text:p>17,86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/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/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5245" calcext:value-type="percentage">
            <text:p>55,25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4572" calcext:value-type="percentage">
            <text:p>24,57%</text:p>
          </table:table-cell>
          <table:table-cell table:style-name="ce1" table:formula="of:=AVERAGE([.G26:.G35])" office:value-type="percentage" office:value="0.23357" calcext:value-type="percentage">
            <text:p>23,3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1042" calcext:value-type="percentage">
            <text:p>10,42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22" calcext:value-type="percentage">
            <text:p>10,22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table:number-columns-repeated="2"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43" calcext:value-type="percentage">
            <text:p>10,43%</text:p>
          </table:table-cell>
          <table:table-cell table:style-name="ce3" office:value-type="percentage" office:value="0.1065" calcext:value-type="percentage">
            <text:p>10,65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2"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59" calcext:value-type="percentage">
            <text:p>8,59%</text:p>
          </table:table-cell>
          <table:table-cell office:value-type="percentage" office:value="0.0896" calcext:value-type="percentage">
            <text:p>8,96%</text:p>
          </table:table-cell>
          <table:table-cell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2"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469" calcext:value-type="percentage">
            <text:p>9,47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54" calcext:value-type="percentage">
            <text:p>10,54%</text:p>
          </table:table-cell>
          <table:table-cell table:style-name="ce1" table:formula="of:=AVERAGE([.G38:.G47])" office:value-type="percentage" office:value="0.10435" calcext:value-type="percentage">
            <text:p>10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101" calcext:value-type="percentage">
            <text:p>11,01%</text:p>
          </table:table-cell>
          <table:table-cell table:style-name="ce3" office:value-type="percentage" office:value="0.1217" calcext:value-type="percentage">
            <text:p>12,17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928" calcext:value-type="percentage">
            <text:p>19,28%</text:p>
          </table:table-cell>
          <table:table-cell table:style-name="ce3" office:value-type="percentage" office:value="0.2072" calcext:value-type="percentage">
            <text:p>20,72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1942" calcext:value-type="percentage">
            <text:p>19,42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246" calcext:value-type="percentage">
            <text:p>12,46%</text:p>
          </table:table-cell>
          <table:table-cell table:style-name="ce3"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928" calcext:value-type="percentage">
            <text:p>29,28%</text:p>
          </table:table-cell>
          <table:table-cell table:style-name="ce3" office:value-type="percentage" office:value="0.2884" calcext:value-type="percentage">
            <text:p>28,84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62" calcext:value-type="percentage">
            <text:p>13,62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78" calcext:value-type="percentage">
            <text:p>17,80%</text:p>
          </table:table-cell>
          <table:table-cell table:style-name="ce1" table:formula="of:=AVERAGE([.C50:.C59])" office:value-type="percentage" office:value="0.185" calcext:value-type="percentage">
            <text:p>18,50%</text:p>
          </table:table-cell>
          <table:table-cell/>
          <table:table-cell table:style-name="ce1"/>
          <table:table-cell table:style-name="ce1" table:formula="of:=AVERAGE([.F50:.F59])" office:value-type="percentage" office:value="0.18899" calcext:value-type="percentage">
            <text:p>18,90%</text:p>
          </table:table-cell>
          <table:table-cell table:style-name="ce1" table:formula="of:=AVERAGE([.G50:.G59])" office:value-type="percentage" office:value="0.20129" calcext:value-type="percentage">
            <text:p>20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417" calcext:value-type="percentage">
            <text:p>34,17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3" calcext:value-type="percentage">
            <text:p>5,3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6277" calcext:value-type="percentage">
            <text:p>36,28%</text:p>
          </table:table-cell>
          <table:table-cell table:style-name="ce1" table:formula="of:=AVERAGE([.C62:.C71])" office:value-type="percentage" office:value="0.34138" calcext:value-type="percentage">
            <text:p>34,14%</text:p>
          </table:table-cell>
          <table:table-cell/>
          <table:table-cell table:style-name="ce1"/>
          <table:table-cell table:style-name="ce1" table:formula="of:=AVERAGE([.F62:.F71])" office:value-type="percentage" office:value="0.05042" calcext:value-type="percentage">
            <text:p>5,04%</text:p>
          </table:table-cell>
          <table:table-cell table:style-name="ce1" table:formula="of:=AVERAGE([.G62:.G71])" office:value-type="percentage" office:value="0.0376" calcext:value-type="percentage">
            <text:p>3,7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379" calcext:value-type="percentage">
            <text:p>6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43" calcext:value-type="percentage">
            <text:p>37,43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2"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29" calcext:value-type="percentage">
            <text:p>42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314" calcext:value-type="percentage">
            <text:p>53,14%</text:p>
          </table:table-cell>
          <table:table-cell office:value-type="percentage" office:value="0.4571" calcext:value-type="percentage">
            <text:p>45,71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86" calcext:value-type="percentage">
            <text:p>35,86%</text:p>
          </table:table-cell>
          <table:table-cell office:value-type="percentage" office:value="0.3621" calcext:value-type="percentage">
            <text:p>36,2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6" calcext:value-type="percentage">
            <text:p>36,00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543" calcext:value-type="percentage">
            <text:p>35,43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029" calcext:value-type="percentage">
            <text:p>40,29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143" calcext:value-type="percentage">
            <text:p>41,43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10</text:p>
          </table:table-cell>
          <table:table-cell table:number-columns-repeated="2"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50138" calcext:value-type="percentage">
            <text:p>50,14%</text:p>
          </table:table-cell>
          <table:table-cell table:style-name="ce1" table:formula="of:=AVERAGE([.C75:.C84])" office:value-type="percentage" office:value="0.50277" calcext:value-type="percentage">
            <text:p>50,28%</text:p>
          </table:table-cell>
          <table:table-cell/>
          <table:table-cell table:style-name="ce1"/>
          <table:table-cell table:style-name="ce1" table:formula="of:=AVERAGE([.F75:.F84])" office:value-type="percentage" office:value="0.398" calcext:value-type="percentage">
            <text:p>39,80%</text:p>
          </table:table-cell>
          <table:table-cell table:style-name="ce1" table:formula="of:=AVERAGE([.G75:.G84])" office:value-type="percentage" office:value="0.38258" calcext:value-type="percentage">
            <text:p>38,2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697" calcext:value-type="percentage">
            <text:p>66,9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18" calcext:value-type="percentage">
            <text:p>58,18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table:number-columns-repeated="2" office:value-type="percentage" office:value="0.5545" calcext:value-type="percentage">
            <text:p>55,45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636" calcext:value-type="percentage">
            <text:p>66,3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10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8362" calcext:value-type="percentage">
            <text:p>58,36%</text:p>
          </table:table-cell>
          <table:table-cell table:style-name="ce1" table:formula="of:=AVERAGE([.C88:.C97])" office:value-type="percentage" office:value="0.59605" calcext:value-type="percentage">
            <text:p>59,61%</text:p>
          </table:table-cell>
          <table:table-cell/>
          <table:table-cell table:style-name="ce1"/>
          <table:table-cell table:style-name="ce1" table:formula="of:=AVERAGE([.F88:.F97])" office:value-type="percentage" office:value="0.214" calcext:value-type="percentage">
            <text:p>21,40%</text:p>
          </table:table-cell>
          <table:table-cell table:style-name="ce1" table:formula="of:=AVERAGE([.G88:.G97])" office:value-type="percentage" office:value="0.217" calcext:value-type="percentage">
            <text:p>21,7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2</text:p>
          </table:table-cell>
          <table:table-cell table:number-columns-repeated="2" office:value-type="percentage" office:value="0.7476" calcext:value-type="percentage">
            <text:p>74,76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823" calcext:value-type="percentage">
            <text:p>18,2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77" calcext:value-type="percentage">
            <text:p>21,77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3667" calcext:value-type="percentage">
            <text:p>36,67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306" calcext:value-type="percentage">
            <text:p>23,06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175" calcext:value-type="percentage">
            <text:p>17,50%</text:p>
          </table:table-cell>
          <table:table-cell table:style-name="ce1" table:formula="of:=AVERAGE([.C101:.C110])" office:value-type="percentage" office:value="0.18274" calcext:value-type="percentage">
            <text:p>18,27%</text:p>
          </table:table-cell>
          <table:table-cell/>
          <table:table-cell table:style-name="ce1"/>
          <table:table-cell table:style-name="ce1" table:formula="of:=AVERAGE([.F101:.F110])" office:value-type="percentage" office:value="0.56761" calcext:value-type="percentage">
            <text:p>56,76%</text:p>
          </table:table-cell>
          <table:table-cell table:style-name="ce1" table:formula="of:=AVERAGE([.G101:.G110])" office:value-type="percentage" office:value="0.51286" calcext:value-type="percentage">
            <text:p>51,2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077" calcext:value-type="percentage">
            <text:p>50,77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615" calcext:value-type="percentage">
            <text:p>46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367" calcext:value-type="percentage">
            <text:p>27,37%</text:p>
          </table:table-cell>
          <table:table-cell table:style-name="ce1" table:formula="of:=AVERAGE([.C114:.C123])" office:value-type="percentage" office:value="0.27132" calcext:value-type="percentage">
            <text:p>27,13%</text:p>
          </table:table-cell>
          <table:table-cell/>
          <table:table-cell table:style-name="ce1"/>
          <table:table-cell table:style-name="ce1" table:formula="of:=AVERAGE([.F114:.F123])" office:value-type="percentage" office:value="0.40077" calcext:value-type="percentage">
            <text:p>40,08%</text:p>
          </table:table-cell>
          <table:table-cell table:style-name="ce1" table:formula="of:=AVERAGE([.G114:.G123])" office:value-type="percentage" office:value="0.37306" calcext:value-type="percentage">
            <text:p>37,3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3" calcext:value-type="percentage">
            <text:p>6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67" calcext:value-type="percentage">
            <text:p>12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81" calcext:value-type="percentage">
            <text:p>24,8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7" calcext:value-type="percentage">
            <text:p>13,7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999" calcext:value-type="percentage">
            <text:p>22,00%</text:p>
          </table:table-cell>
          <table:table-cell table:style-name="ce1" table:formula="of:=AVERAGE([.C127:.C136])" office:value-type="percentage" office:value="0.20851" calcext:value-type="percentage">
            <text:p>20,85%</text:p>
          </table:table-cell>
          <table:table-cell/>
          <table:table-cell table:style-name="ce1"/>
          <table:table-cell table:style-name="ce1" table:formula="of:=AVERAGE([.F127:.F136])" office:value-type="percentage" office:value="0.19133" calcext:value-type="percentage">
            <text:p>19,13%</text:p>
          </table:table-cell>
          <table:table-cell table:style-name="ce1" table:formula="of:=AVERAGE([.G127:.G136])" office:value-type="percentage" office:value="0.19167" calcext:value-type="percentage">
            <text:p>19,1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9</text:p>
          </table:table-cell>
          <table:table-cell table:number-columns-repeated="2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4533" calcext:value-type="percentage">
            <text:p>54,53%</text:p>
          </table:table-cell>
          <table:table-cell table:style-name="ce1" table:formula="of:=AVERAGE([.C140:.C149])" office:value-type="percentage" office:value="0.512" calcext:value-type="percentage">
            <text:p>51,20%</text:p>
          </table:table-cell>
          <table:table-cell/>
          <table:table-cell table:style-name="ce1"/>
          <table:table-cell table:style-name="ce1" table:formula="of:=AVERAGE([.F140:.F149])" office:value-type="percentage" office:value="0.106" calcext:value-type="percentage">
            <text:p>10,60%</text:p>
          </table:table-cell>
          <table:table-cell table:style-name="ce1" table:formula="of:=AVERAGE([.G140:.G149])" office:value-type="percentage" office:value="0.095" calcext:value-type="percentage">
            <text:p>9,5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514" calcext:value-type="percentage">
            <text:p>15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543" calcext:value-type="percentage">
            <text:p>15,43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61" calcext:value-type="percentage">
            <text:p>4,61%</text:p>
          </table:table-cell>
          <table:table-cell table:style-name="ce1" table:formula="of:=AVERAGE([.C153:.C162])" office:value-type="percentage" office:value="0.05001" calcext:value-type="percentage">
            <text:p>5,00%</text:p>
          </table:table-cell>
          <table:table-cell/>
          <table:table-cell table:style-name="ce1"/>
          <table:table-cell table:style-name="ce1" table:formula="of:=AVERAGE([.F153:.F162])" office:value-type="percentage" office:value="0.12829" calcext:value-type="percentage">
            <text:p>12,83%</text:p>
          </table:table-cell>
          <table:table-cell table:style-name="ce1" table:formula="of:=AVERAGE([.G153:.G162])" office:value-type="percentage" office:value="0.12428" calcext:value-type="percentage">
            <text:p>12,43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217" calcext:value-type="percentage">
            <text:p>22,17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382" calcext:value-type="percentage">
            <text:p>43,8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912" calcext:value-type="percentage">
            <text:p>19,1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554" calcext:value-type="percentage">
            <text:p>15,54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71" calcext:value-type="percentage">
            <text:p>34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1928" calcext:value-type="percentage">
            <text:p>19,28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65" calcext:value-type="percentage">
            <text:p>22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651" calcext:value-type="percentage">
            <text:p>16,51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49" calcext:value-type="percentage">
            <text:p>13,4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30412" calcext:value-type="percentage">
            <text:p>30,41%</text:p>
          </table:table-cell>
          <table:table-cell table:style-name="ce1" table:formula="of:=AVERAGE([.C166:.C175])" office:value-type="percentage" office:value="0.29559" calcext:value-type="percentage">
            <text:p>29,56%</text:p>
          </table:table-cell>
          <table:table-cell/>
          <table:table-cell table:style-name="ce1"/>
          <table:table-cell table:style-name="ce1" table:formula="of:=AVERAGE([.F166:.F175])" office:value-type="percentage" office:value="0.17723" calcext:value-type="percentage">
            <text:p>17,72%</text:p>
          </table:table-cell>
          <table:table-cell table:style-name="ce1" table:formula="of:=AVERAGE([.G166:.G175])" office:value-type="percentage" office:value="0.17796" calcext:value-type="percentage">
            <text:p>17,8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132" calcext:value-type="percentage">
            <text:p>21,32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47" calcext:value-type="percentage">
            <text:p>29,47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61" calcext:value-type="percentage">
            <text:p>19,61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26" calcext:value-type="percentage">
            <text:p>15,26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7</text:p>
          </table:table-cell>
          <table:table-cell table:number-columns-repeated="2" office:value-type="percentage" office:value="0.2184" calcext:value-type="percentage">
            <text:p>21,84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724" calcext:value-type="percentage">
            <text:p>27,24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5" calcext:value-type="percentage">
            <text:p>27,50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61" calcext:value-type="percentage">
            <text:p>24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5525" calcext:value-type="percentage">
            <text:p>15,53%</text:p>
          </table:table-cell>
          <table:table-cell table:style-name="ce1" table:formula="of:=AVERAGE([.C179:.C188])" office:value-type="percentage" office:value="0.15367" calcext:value-type="percentage">
            <text:p>15,37%</text:p>
          </table:table-cell>
          <table:table-cell/>
          <table:table-cell table:style-name="ce1"/>
          <table:table-cell table:style-name="ce1" table:formula="of:=AVERAGE([.F179:.F188])" office:value-type="percentage" office:value="0.23593" calcext:value-type="percentage">
            <text:p>23,59%</text:p>
          </table:table-cell>
          <table:table-cell table:style-name="ce1" table:formula="of:=AVERAGE([.G179:.G188])" office:value-type="percentage" office:value="0.23712" calcext:value-type="percentage">
            <text:p>23,7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5612" calcext:value-type="percentage">
            <text:p>5,61%</text:p>
          </table:table-cell>
          <table:table-cell table:style-name="ce1" table:formula="of:=AVERAGE([.C192:.C201])" office:value-type="percentage" office:value="0.0563" calcext:value-type="percentage">
            <text:p>5,63%</text:p>
          </table:table-cell>
          <table:table-cell/>
          <table:table-cell table:style-name="ce1"/>
          <table:table-cell table:style-name="ce1" table:formula="of:=AVERAGE([.F192:.F201])" office:value-type="percentage" office:value="0.25708" calcext:value-type="percentage">
            <text:p>25,71%</text:p>
          </table:table-cell>
          <table:table-cell table:style-name="ce1" table:formula="of:=AVERAGE([.G192:.G201])" office:value-type="percentage" office:value="0.25645" calcext:value-type="percentage">
            <text:p>25,6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109" calcext:value-type="percentage">
            <text:p>21,09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63" calcext:value-type="percentage">
            <text:p>34,63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3203" calcext:value-type="percentage">
            <text:p>32,03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2857" calcext:value-type="percentage">
            <text:p>28,57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636" calcext:value-type="percentage">
            <text:p>36,36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2"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9" calcext:value-type="percentage">
            <text:p>32,9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8892" calcext:value-type="percentage">
            <text:p>28,89%</text:p>
          </table:table-cell>
          <table:table-cell table:style-name="ce1" table:formula="of:=AVERAGE([.C205:.C214])" office:value-type="percentage" office:value="0.28781" calcext:value-type="percentage">
            <text:p>28,78%</text:p>
          </table:table-cell>
          <table:table-cell/>
          <table:table-cell table:style-name="ce1"/>
          <table:table-cell table:style-name="ce1" table:formula="of:=AVERAGE([.F205:.F214])" office:value-type="percentage" office:value="0.32467" calcext:value-type="percentage">
            <text:p>32,47%</text:p>
          </table:table-cell>
          <table:table-cell table:style-name="ce1" table:formula="of:=AVERAGE([.G205:.G214])" office:value-type="percentage" office:value="0.33333" calcext:value-type="percentage">
            <text:p>33,3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1</text:p>
          </table:table-cell>
          <table:table-cell table:number-columns-repeated="2" table:style-name="ce9" office:value-type="percentage" office:value="0.38" calcext:value-type="percentage">
            <text:p>38,00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91" calcext:value-type="percentage">
            <text:p>39,10%</text:p>
          </table:table-cell>
          <table:table-cell table:style-name="ce9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4055" calcext:value-type="percentage">
            <text:p>40,55%</text:p>
          </table:table-cell>
          <table:table-cell table:style-name="ce9" office:value-type="percentage" office:value="0.405" calcext:value-type="percentage">
            <text:p>40,5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4405" calcext:value-type="percentage">
            <text:p>44,05%</text:p>
          </table:table-cell>
          <table:table-cell table:style-name="ce9" office:value-type="percentage" office:value="0.4445" calcext:value-type="percentage">
            <text:p>44,45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4305" calcext:value-type="percentage">
            <text:p>43,05%</text:p>
          </table:table-cell>
          <table:table-cell table:style-name="ce9" office:value-type="percentage" office:value="0.451" calcext:value-type="percentage">
            <text:p>45,10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2" table:style-name="ce9" office:value-type="percentage" office:value="0.41" calcext:value-type="percentage">
            <text:p>41,00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2"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399" calcext:value-type="percentage">
            <text:p>39,90%</text:p>
          </table:table-cell>
          <table:table-cell table:style-name="ce9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15" calcext:value-type="percentage">
            <text:p>39,15%</text:p>
          </table:table-cell>
          <table:table-cell table:style-name="ce9" office:value-type="percentage" office:value="0.3875" calcext:value-type="percentage">
            <text:p>38,75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22" calcext:value-type="percentage">
            <text:p>42,20%</text:p>
          </table:table-cell>
          <table:table-cell table:style-name="ce9" office:value-type="percentage" office:value="0.4255" calcext:value-type="percentage">
            <text:p>42,55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325" calcext:value-type="percentage">
            <text:p>43,25%</text:p>
          </table:table-cell>
          <table:table-cell table:style-name="ce9" office:value-type="percentage" office:value="0.435" calcext:value-type="percentage">
            <text:p>43,5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24" calcext:value-type="percentage">
            <text:p>24,00%</text:p>
          </table:table-cell>
          <table:table-cell table:style-name="ce1" table:formula="of:=AVERAGE([.C217:.C226])" office:value-type="percentage" office:value="0.2205" calcext:value-type="percentage">
            <text:p>22,05%</text:p>
          </table:table-cell>
          <table:table-cell/>
          <table:table-cell table:style-name="ce1"/>
          <table:table-cell table:style-name="ce1" table:formula="of:=AVERAGE([.F217:.F226])" office:value-type="percentage" office:value="0.41025" calcext:value-type="percentage">
            <text:p>41,03%</text:p>
          </table:table-cell>
          <table:table-cell table:style-name="ce1" table:formula="of:=AVERAGE([.G217:.G226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392" calcext:value-type="percentage">
            <text:p>23,92%</text:p>
          </table:table-cell>
          <table:table-cell table:style-name="ce9" office:value-type="percentage" office:value="0.227" calcext:value-type="percentage">
            <text:p>22,70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649" calcext:value-type="percentage">
            <text:p>26,49%</text:p>
          </table:table-cell>
          <table:table-cell table:style-name="ce9" office:value-type="percentage" office:value="0.2459" calcext:value-type="percentage">
            <text:p>24,59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676" calcext:value-type="percentage">
            <text:p>26,76%</text:p>
          </table:table-cell>
          <table:table-cell table:style-name="ce9" office:value-type="percentage" office:value="0.2514" calcext:value-type="percentage">
            <text:p>25,14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905" calcext:value-type="percentage">
            <text:p>29,05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784" calcext:value-type="percentage">
            <text:p>27,84%</text:p>
          </table:table-cell>
          <table:table-cell table:style-name="ce9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122" calcext:value-type="percentage">
            <text:p>21,22%</text:p>
          </table:table-cell>
          <table:table-cell table:style-name="ce9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15" calcext:value-type="percentage">
            <text:p>1,50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1959" calcext:value-type="percentage">
            <text:p>19,59%</text:p>
          </table:table-cell>
          <table:table-cell table:style-name="ce9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2425" calcext:value-type="percentage">
            <text:p>12,43%</text:p>
          </table:table-cell>
          <table:table-cell table:style-name="ce1" table:formula="of:=AVERAGE([.C230:.C239])" office:value-type="percentage" office:value="0.0425" calcext:value-type="percentage">
            <text:p>4,25%</text:p>
          </table:table-cell>
          <table:table-cell/>
          <table:table-cell table:style-name="ce1"/>
          <table:table-cell table:style-name="ce1" table:formula="of:=AVERAGE([.F230:.F239])" office:value-type="percentage" office:value="0.2523" calcext:value-type="percentage">
            <text:p>25,23%</text:p>
          </table:table-cell>
          <table:table-cell table:style-name="ce1" table:formula="of:=AVERAGE([.G230:.G239])" office:value-type="percentage" office:value="0.24648" calcext:value-type="percentage">
            <text:p>24,6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35" calcext:value-type="percentage">
            <text:p>12,35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Wine_3</text:p>
          </table:table-cell>
          <table:table-cell table:number-columns-repeated="2"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5" calcext:value-type="percentage">
            <text:p>2,35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table:number-columns-repeated="2" office:value-type="percentage" office:value="0.1588" calcext:value-type="percentage">
            <text:p>15,88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353" calcext:value-type="percentage">
            <text:p>3,53%</text:p>
          </table:table-cell>
          <table:table-cell/>
        </table:table-row>
        <table:table-row table:style-name="ro2">
          <table:table-cell office:value-type="string" calcext:value-type="string">
            <text:p>Wdbc_8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4194" calcext:value-type="percentage">
            <text:p>4,19%</text:p>
          </table:table-cell>
          <table:table-cell table:style-name="ce1" table:formula="of:=AVERAGE([.C242:.C251])" office:value-type="percentage" office:value="0.04374" calcext:value-type="percentage">
            <text:p>4,37%</text:p>
          </table:table-cell>
          <table:table-cell/>
          <table:table-cell table:style-name="ce1"/>
          <table:table-cell table:style-name="ce1" table:formula="of:=AVERAGE([.F242:.F251])" office:value-type="percentage" office:value="0.10588" calcext:value-type="percentage">
            <text:p>10,59%</text:p>
          </table:table-cell>
          <table:table-cell table:style-name="ce1" table:formula="of:=AVERAGE([.G242:.G251])"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734" calcext:value-type="percentage">
            <text:p>73,4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86" calcext:value-type="percentage">
            <text:p>68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32" calcext:value-type="percentage">
            <text:p>63,20%</text:p>
          </table:table-cell>
          <table:table-cell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644" calcext:value-type="percentage">
            <text:p>64,4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66" calcext:value-type="percentage">
            <text:p>66,00%</text:p>
          </table:table-cell>
          <table:table-cell/>
        </table:table-row>
        <table:table-row table:style-name="ro2">
          <table:table-cell office:value-type="string" calcext:value-type="string">
            <text:p>z_f_s_9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84" calcext:value-type="percentage">
            <text:p>68,4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4677" calcext:value-type="percentage">
            <text:p>4,68%</text:p>
          </table:table-cell>
          <table:table-cell table:style-name="ce1" table:formula="of:=AVERAGE([.C255:.C264])" office:value-type="percentage" office:value="0.05366" calcext:value-type="percentage">
            <text:p>5,37%</text:p>
          </table:table-cell>
          <table:table-cell/>
          <table:table-cell table:style-name="ce1"/>
          <table:table-cell table:style-name="ce1" table:formula="of:=AVERAGE([.F255:.F264])" office:value-type="percentage" office:value="0.6368" calcext:value-type="percentage">
            <text:p>63,68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string" calcext:value-type="string">
            <text:p>zonf_s_2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547" calcext:value-type="percentage">
            <text:p>5,47%</text:p>
          </table:table-cell>
          <table:table-cell table:style-name="ce1" table:formula="of:=AVERAGE([.C267:.C276])" office:value-type="percentage" office:value="0.0722" calcext:value-type="percentage">
            <text:p>7,22%</text:p>
          </table:table-cell>
          <table:table-cell/>
          <table:table-cell table:style-name="ce1"/>
          <table:table-cell table:style-name="ce1" table:formula="of:=AVERAGE([.F267:.F276])" office:value-type="percentage" office:value="0.0182" calcext:value-type="percentage">
            <text:p>1,82%</text:p>
          </table:table-cell>
          <table:table-cell table:style-name="ce1" table:formula="of:=AVERAGE([.G267:.G276])" office:value-type="percentage" office:value="0.023" calcext:value-type="percentage">
            <text:p>2,3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297" calcext:value-type="percentage">
            <text:p>32,97%</text:p>
          </table:table-cell>
          <table:table-cell table:style-name="ce1" table:formula="of:=AVERAGE([.C279:.C288])" office:value-type="percentage" office:value="0.3468" calcext:value-type="percentage">
            <text:p>34,68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297" calcext:value-type="float">
            <text:p>4,30E-01</text:p>
          </table:table-cell>
          <table:table-cell table:style-name="ce10" office:value-type="float" office:value="0.406" calcext:value-type="float">
            <text:p>4,06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14" calcext:value-type="float">
            <text:p>0,41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67" calcext:value-type="float">
            <text:p>8,67E-01</text:p>
          </table:table-cell>
          <table:table-cell table:style-name="ce10" office:value-type="float" office:value="0.886" calcext:value-type="float">
            <text:p>8,86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227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59" calcext:value-type="float">
            <text:p>0,85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11" calcext:value-type="float">
            <text:p>1,11E-01</text:p>
          </table:table-cell>
          <table:table-cell table:style-name="ce10" office:value-type="float" office:value="0.128" calcext:value-type="float">
            <text:p>1,28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539" calcext:value-type="float">
            <text:p>0,539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33" calcext:value-type="float">
            <text:p>6,33E-01</text:p>
          </table:table-cell>
          <table:table-cell table:style-name="ce10" office:value-type="float" office:value="0.598" calcext:value-type="float">
            <text:p>5,98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23" calcext:value-type="float">
            <text:p>0,22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63" calcext:value-type="float">
            <text:p>1,63E-01</text:p>
          </table:table-cell>
          <table:table-cell table:style-name="ce10" office:value-type="float" office:value="0.0866" calcext:value-type="float">
            <text:p>8,66E-02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366" calcext:value-type="float">
            <text:p>0,366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0.641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154" calcext:value-type="float">
            <text:p>1,54E-01</text:p>
          </table:table-cell>
          <table:table-cell table:style-name="ce10" office:value-type="float" office:value="0.256" calcext:value-type="float">
            <text:p>2,56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43" calcext:value-type="float">
            <text:p>0,24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9" calcext:value-type="float">
            <text:p>1,79E-01</text:p>
          </table:table-cell>
          <table:table-cell table:style-name="ce10" office:value-type="float" office:value="0.192" calcext:value-type="float">
            <text:p>1,92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147" calcext:value-type="float">
            <text:p>0,14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292:.B301])" office:value-type="float" office:value="0.48198" calcext:value-type="float">
            <text:p>0,48198</text:p>
          </table:table-cell>
          <table:table-cell table:style-name="ce7" table:formula="of:=AVERAGE([.C292:.C301])" office:value-type="float" office:value="0.4236" calcext:value-type="float">
            <text:p>0,4236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9467" calcext:value-type="float">
            <text:p>0,39467</text:p>
          </table:table-cell>
          <table:table-cell table:style-name="ce11" table:formula="of:=AVERAGE([.G292:.G301])" office:value-type="float" office:value="0.35676" calcext:value-type="float">
            <text:p>3,57E-01</text:p>
          </table:table-cell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99" calcext:value-type="float">
            <text:p>4,60E-01</text:p>
          </table:table-cell>
          <table:table-cell table:style-name="ce10" office:value-type="float" office:value="0.4492" calcext:value-type="float">
            <text:p>4,49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 office:value-type="float" office:value="0.0601" calcext:value-type="float">
            <text:p>0,060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516" calcext:value-type="float">
            <text:p>5,16E-02</text:p>
          </table:table-cell>
          <table:table-cell table:style-name="ce10" office:value-type="float" office:value="0.0673" calcext:value-type="float">
            <text:p>6,73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528" calcext:value-type="float">
            <text:p>0,0528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" calcext:value-type="float">
            <text:p>4,70E-02</text:p>
          </table:table-cell>
          <table:table-cell table:style-name="ce10" office:value-type="float" office:value="0.037" calcext:value-type="float">
            <text:p>3,70E-02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52" calcext:value-type="float">
            <text:p>4,52E-02</text:p>
          </table:table-cell>
          <table:table-cell table:style-name="ce10" office:value-type="float" office:value="0.0233" calcext:value-type="float">
            <text:p>2,33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10" office:value-type="float" office:value="0.14" calcext:value-type="float">
            <text:p>1,4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0275" calcext:value-type="float">
            <text:p>0,0275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09" calcext:value-type="float">
            <text:p>0,109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6" calcext:value-type="float">
            <text:p>0,0896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 office:value-type="float" office:value="0.0393" calcext:value-type="float">
            <text:p>3,93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46" calcext:value-type="float">
            <text:p>0,0946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93" calcext:value-type="float">
            <text:p>2,93E-02</text:p>
          </table:table-cell>
          <table:table-cell table:style-name="ce10" office:value-type="float" office:value="0.0272" calcext:value-type="float">
            <text:p>2,72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0.0226" calcext:value-type="float">
            <text:p>0,022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04:.B313])" office:value-type="float" office:value="0.08165" calcext:value-type="float">
            <text:p>0,08165</text:p>
          </table:table-cell>
          <table:table-cell table:style-name="ce7" table:formula="of:=AVERAGE([.C304:.C313])" office:value-type="float" office:value="0.08166" calcext:value-type="float">
            <text:p>0,0816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366" calcext:value-type="float">
            <text:p>0,10366</text:p>
          </table:table-cell>
          <table:table-cell table:style-name="ce11" table:formula="of:=AVERAGE([.G304:.G313])" office:value-type="float" office:value="0.09677" calcext:value-type="float">
            <text:p>9,68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69.082" calcext:value-type="float">
            <text:p>2269,082</text:p>
          </table:table-cell>
          <table:table-cell table:style-name="ce6" office:value-type="float" office:value="2052.171" calcext:value-type="float">
            <text:p>2052,17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206" calcext:value-type="float">
            <text:p>2,06E-03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871.417" calcext:value-type="float">
            <text:p>2871,417</text:p>
          </table:table-cell>
          <table:table-cell table:style-name="ce6" office:value-type="float" office:value="2462.331" calcext:value-type="float">
            <text:p>2462,33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419" calcext:value-type="float">
            <text:p>4,19E-04</text:p>
          </table:table-cell>
          <table:table-cell table:style-name="ce10" office:value-type="float" office:value="0.000123" calcext:value-type="float">
            <text:p>1,23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001.615" calcext:value-type="float">
            <text:p>3001,615</text:p>
          </table:table-cell>
          <table:table-cell table:style-name="ce6" office:value-type="float" office:value="2694.621" calcext:value-type="float">
            <text:p>2694,62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366" calcext:value-type="float">
            <text:p>0,00366</text:p>
          </table:table-cell>
          <table:table-cell table:style-name="ce6" office:value-type="float" office:value="0.000984" calcext:value-type="float">
            <text:p>0,00098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526.465" calcext:value-type="float">
            <text:p>2526,465</text:p>
          </table:table-cell>
          <table:table-cell table:style-name="ce6" office:value-type="float" office:value="2380.062" calcext:value-type="float">
            <text:p>2380,062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895" calcext:value-type="float">
            <text:p>8,95E-04</text:p>
          </table:table-cell>
          <table:table-cell table:style-name="ce10" office:value-type="float" office:value="0.000489" calcext:value-type="float">
            <text:p>4,8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754.664" calcext:value-type="float">
            <text:p>2754,664</text:p>
          </table:table-cell>
          <table:table-cell table:style-name="ce6" office:value-type="float" office:value="2616.789" calcext:value-type="float">
            <text:p>2616,789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191" calcext:value-type="float">
            <text:p>1,9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460.266" calcext:value-type="float">
            <text:p>2460,266</text:p>
          </table:table-cell>
          <table:table-cell table:style-name="ce6" office:value-type="float" office:value="2142.921" calcext:value-type="float">
            <text:p>2142,92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52" calcext:value-type="float">
            <text:p>1,52E-04</text:p>
          </table:table-cell>
          <table:table-cell table:style-name="ce10" office:value-type="float" office:value="0.000179" calcext:value-type="float">
            <text:p>1,7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88.059" calcext:value-type="float">
            <text:p>2488,059</text:p>
          </table:table-cell>
          <table:table-cell table:style-name="ce6" office:value-type="float" office:value="2308.339" calcext:value-type="float">
            <text:p>2308,33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0119" calcext:value-type="float">
            <text:p>0,000119</text:p>
          </table:table-cell>
          <table:table-cell table:style-name="ce6" office:value-type="float" office:value="0.094" calcext:value-type="float">
            <text:p>0,09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143.5696" calcext:value-type="float">
            <text:p>3143,5696</text:p>
          </table:table-cell>
          <table:table-cell table:style-name="ce6" office:value-type="float" office:value="2785.982" calcext:value-type="float">
            <text:p>2785,982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555" calcext:value-type="float">
            <text:p>5,55E-04</text:p>
          </table:table-cell>
          <table:table-cell table:style-name="ce10" office:value-type="float" office:value="0.00007961" calcext:value-type="float">
            <text:p>7,96E-05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506.643" calcext:value-type="float">
            <text:p>2506,643</text:p>
          </table:table-cell>
          <table:table-cell table:style-name="ce6" office:value-type="float" office:value="2451.796" calcext:value-type="float">
            <text:p>2451,796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725" calcext:value-type="float">
            <text:p>7,25E-03</text:p>
          </table:table-cell>
          <table:table-cell table:style-name="ce10" office:value-type="float" office:value="0.00221" calcext:value-type="float">
            <text:p>2,2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59.495" calcext:value-type="float">
            <text:p>2559,495</text:p>
          </table:table-cell>
          <table:table-cell table:style-name="ce6" office:value-type="float" office:value="2399.124" calcext:value-type="float">
            <text:p>2399,124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319" calcext:value-type="float">
            <text:p>0,00319</text:p>
          </table:table-cell>
          <table:table-cell table:style-name="ce6" office:value-type="float" office:value="0.000449" calcext:value-type="float">
            <text:p>0,000449</text:p>
          </table:table-cell>
          <table:table-cell table:style-name="ce6"/>
        </table:table-row>
        <table:table-row table:style-name="ro3">
          <table:table-cell table:style-name="ce4"/>
          <table:table-cell table:style-name="ce7" table:formula="of:=AVERAGE([.B317:.B326])" office:value-type="float" office:value="2658.12756" calcext:value-type="float">
            <text:p>2658,12756</text:p>
          </table:table-cell>
          <table:table-cell table:style-name="ce7" table:formula="of:=AVERAGE([.C317:.C326])" office:value-type="float" office:value="2429.4136" calcext:value-type="float">
            <text:p>2429,413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1966" calcext:value-type="float">
            <text:p>0,001966</text:p>
          </table:table-cell>
          <table:table-cell table:style-name="ce11" table:formula="of:=AVERAGE([.G317:.G326])" office:value-type="float" office:value="0.010161361" calcext:value-type="float">
            <text:p>1,02E-02</text:p>
          </table:table-cell>
          <table:table-cell table:style-name="ce7"/>
        </table:table-row>
        <table:table-row table:style-name="ro3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1697" calcext:value-type="float">
            <text:p>0,1697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59.319" calcext:value-type="float">
            <text:p>1959,319</text:p>
          </table:table-cell>
          <table:table-cell table:style-name="ce6" office:value-type="float" office:value="1522.981" calcext:value-type="float">
            <text:p>1522,981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163.913" calcext:value-type="float">
            <text:p>1163,913</text:p>
          </table:table-cell>
          <table:table-cell table:style-name="ce6" office:value-type="float" office:value="888.315" calcext:value-type="float">
            <text:p>888,315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06.645" calcext:value-type="float">
            <text:p>2106,645</text:p>
          </table:table-cell>
          <table:table-cell table:style-name="ce6" office:value-type="float" office:value="1907.829" calcext:value-type="float">
            <text:p>1907,829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372.074" calcext:value-type="float">
            <text:p>2372,074</text:p>
          </table:table-cell>
          <table:table-cell table:style-name="ce6" office:value-type="float" office:value="2554.626" calcext:value-type="float">
            <text:p>2554,626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47.448" calcext:value-type="float">
            <text:p>1347,448</text:p>
          </table:table-cell>
          <table:table-cell table:style-name="ce6" office:value-type="float" office:value="1188.789" calcext:value-type="float">
            <text:p>1188,789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299" calcext:value-type="float">
            <text:p>0,1299</text:p>
          </table:table-cell>
          <table:table-cell table:style-name="ce6" office:value-type="float" office:value="0.0907" calcext:value-type="float">
            <text:p>0,0907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750.447" calcext:value-type="float">
            <text:p>750,447</text:p>
          </table:table-cell>
          <table:table-cell table:style-name="ce6" office:value-type="float" office:value="641.623" calcext:value-type="float">
            <text:p>641,623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27" calcext:value-type="float">
            <text:p>0,0727</text:p>
          </table:table-cell>
          <table:table-cell table:style-name="ce6" office:value-type="float" office:value="0.0694" calcext:value-type="float">
            <text:p>0,069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54.558" calcext:value-type="float">
            <text:p>1554,558</text:p>
          </table:table-cell>
          <table:table-cell table:style-name="ce6" office:value-type="float" office:value="1512.354" calcext:value-type="float">
            <text:p>1512,354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3.272" calcext:value-type="float">
            <text:p>2683,272</text:p>
          </table:table-cell>
          <table:table-cell table:style-name="ce6" office:value-type="float" office:value="2713.331" calcext:value-type="float">
            <text:p>2713,331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1855.027" calcext:value-type="float">
            <text:p>1855,027</text:p>
          </table:table-cell>
          <table:table-cell table:style-name="ce6" office:value-type="float" office:value="2208.317" calcext:value-type="float">
            <text:p>2208,317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764.727" calcext:value-type="float">
            <text:p>1764,727</text:p>
          </table:table-cell>
          <table:table-cell table:style-name="ce6" office:value-type="float" office:value="1783.144" calcext:value-type="float">
            <text:p>1783,144</text:p>
          </table:table-cell>
          <table:table-cell/>
        </table:table-row>
        <table:table-row table:style-name="ro3">
          <table:table-cell table:style-name="ce1"/>
          <table:table-cell table:style-name="ce5" table:formula="of:=AVERAGE([.B329:.B338])" office:value-type="float" office:value="0.18796" calcext:value-type="float">
            <text:p>0,18796</text:p>
          </table:table-cell>
          <table:table-cell table:style-name="ce5" table:formula="of:=AVERAGE([.C329:.C338])" office:value-type="float" office:value="0.16395" calcext:value-type="float">
            <text:p>0,163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755.743" calcext:value-type="float">
            <text:p>1755,743</text:p>
          </table:table-cell>
          <table:table-cell table:style-name="ce7" table:formula="of:=AVERAGE([.G329:.G338])" office:value-type="float" office:value="1692.1309" calcext:value-type="float">
            <text:p>1692,1309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2" calcext:value-type="float">
            <text:p>0,652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97" calcext:value-type="float">
            <text:p>4,597</text:p>
          </table:table-cell>
          <table:table-cell table:style-name="ce6" office:value-type="float" office:value="4.76" calcext:value-type="float">
            <text:p>4,76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58" calcext:value-type="float">
            <text:p>0,58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5.74" calcext:value-type="float">
            <text:p>5,74</text:p>
          </table:table-cell>
          <table:table-cell table:style-name="ce6" office:value-type="float" office:value="5.77" calcext:value-type="float">
            <text:p>5,77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4" calcext:value-type="float">
            <text:p>0,524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19" calcext:value-type="float">
            <text:p>4,19</text:p>
          </table:table-cell>
          <table:table-cell table:style-name="ce6" office:value-type="float" office:value="4.66" calcext:value-type="float">
            <text:p>4,66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34" calcext:value-type="float">
            <text:p>0,534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16" calcext:value-type="float">
            <text:p>6,16</text:p>
          </table:table-cell>
          <table:table-cell table:style-name="ce6" office:value-type="float" office:value="6.29" calcext:value-type="float">
            <text:p>6,29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68" calcext:value-type="float">
            <text:p>8,68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39" calcext:value-type="float">
            <text:p>0,539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91" calcext:value-type="float">
            <text:p>8,91</text:p>
          </table:table-cell>
          <table:table-cell table:style-name="ce6" office:value-type="float" office:value="9.26" calcext:value-type="float">
            <text:p>9,26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798" calcext:value-type="float">
            <text:p>0,5798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4.65" calcext:value-type="float">
            <text:p>4,65</text:p>
          </table:table-cell>
          <table:table-cell/>
        </table:table-row>
        <table:table-row table:style-name="ro2">
          <table:table-cell office:value-type="string" calcext:value-type="string">
            <text:p>Airfoil_9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715" calcext:value-type="float">
            <text:p>0,715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5.44" calcext:value-type="float">
            <text:p>5,44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3.29" calcext:value-type="float">
            <text:p>3,29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41:.B350])" office:value-type="float" office:value="0.58498" calcext:value-type="float">
            <text:p>0,58498</text:p>
          </table:table-cell>
          <table:table-cell table:style-name="ce7" table:formula="of:=AVERAGE([.C341:.C350])" office:value-type="float" office:value="0.56746" calcext:value-type="float">
            <text:p>0,56746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2" calcext:value-type="float">
            <text:p>5,12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6117" calcext:value-type="float">
            <text:p>5,6117</text:p>
          </table:table-cell>
          <table:table-cell table:style-name="ce7" table:formula="of:=AVERAGE([.G342:.G351])" office:value-type="float" office:value="5.792" calcext:value-type="float">
            <text:p>5,792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909" calcext:value-type="float">
            <text:p>0,909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89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68" calcext:value-type="float">
            <text:p>0,768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2" calcext:value-type="float">
            <text:p>0,522</text:p>
          </table:table-cell>
          <table:table-cell table:style-name="ce6" office:value-type="float" office:value="0.468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095" calcext:value-type="float">
            <text:p>1,095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49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287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691" calcext:value-type="float">
            <text:p>0,691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9" calcext:value-type="float">
            <text:p>0,2199</text:p>
          </table:table-cell>
          <table:table-cell table:style-name="ce6" office:value-type="float" office:value="0.2" calcext:value-type="float">
            <text:p>0,2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54:.B363])" office:value-type="float" office:value="0.7884" calcext:value-type="float">
            <text:p>0,7884</text:p>
          </table:table-cell>
          <table:table-cell table:style-name="ce7" table:formula="of:=AVERAGE([.C354:.C363])" office:value-type="float" office:value="0.5375" calcext:value-type="float">
            <text:p>0,5375</text:p>
          </table:table-cell>
          <table:table-cell table:style-name="ce7" table:number-columns-repeated="2"/>
          <table:table-cell table:style-name="ce7" table:formula="of:=AVERAGE([.F354:.F363])" office:value-type="float" office:value="0.34259" calcext:value-type="float">
            <text:p>0,34259</text:p>
          </table:table-cell>
          <table:table-cell table:style-name="ce7" table:formula="of:=AVERAGE([.G354:.G363])" office:value-type="float" office:value="0.3318" calcext:value-type="float">
            <text:p>0,331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186" calcext:value-type="float">
            <text:p>2,186</text:p>
          </table:table-cell>
          <table:table-cell table:style-name="ce6" office:value-type="float" office:value="3.285" calcext:value-type="float">
            <text:p>3,285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979" calcext:value-type="float">
            <text:p>2,979</text:p>
          </table:table-cell>
          <table:table-cell table:style-name="ce6" office:value-type="float" office:value="1.628" calcext:value-type="float">
            <text:p>1,628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797" calcext:value-type="float">
            <text:p>0,8797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865" calcext:value-type="float">
            <text:p>1,865</text:p>
          </table:table-cell>
          <table:table-cell table:style-name="ce6" office:value-type="float" office:value="0.22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299" calcext:value-type="float">
            <text:p>1,7299</text:p>
          </table:table-cell>
          <table:table-cell table:style-name="ce6" office:value-type="float" office:value="0.801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1.976" calcext:value-type="float">
            <text:p>1,976</text:p>
          </table:table-cell>
          <table:table-cell table:style-name="ce6" office:value-type="float" office:value="0.59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487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931" calcext:value-type="float">
            <text:p>0,931</text:p>
          </table:table-cell>
          <table:table-cell table:style-name="ce6" office:value-type="float" office:value="0.2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3.474" calcext:value-type="float">
            <text:p>3,474</text:p>
          </table:table-cell>
          <table:table-cell table:style-name="ce6" office:value-type="float" office:value="0.33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56" calcext:value-type="float">
            <text:p>0,45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267" calcext:value-type="float">
            <text:p>0,26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67:.B376])" office:value-type="float" office:value="0.61067" calcext:value-type="float">
            <text:p>0,61067</text:p>
          </table:table-cell>
          <table:table-cell table:style-name="ce7" table:formula="of:=AVERAGE([.C367:.C376])" office:value-type="float" office:value="0.6355" calcext:value-type="float">
            <text:p>0,63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958" calcext:value-type="float">
            <text:p>2,958</text:p>
          </table:table-cell>
          <table:table-cell table:style-name="ce6" office:value-type="float" office:value="0.957" calcext:value-type="float">
            <text:p>0,957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96189" calcext:value-type="float">
            <text:p>1,96189</text:p>
          </table:table-cell>
          <table:table-cell table:style-name="ce7" table:formula="of:=AVERAGE([.G368:.G377])" office:value-type="float" office:value="0.8865" calcext:value-type="float">
            <text:p>0,8865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0.366" calcext:value-type="float">
            <text:p>320,366</text:p>
          </table:table-cell>
          <table:table-cell table:style-name="ce6" office:value-type="float" office:value="355.736" calcext:value-type="float">
            <text:p>355,73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31.641" calcext:value-type="float">
            <text:p>631,641</text:p>
          </table:table-cell>
          <table:table-cell table:style-name="ce6" office:value-type="float" office:value="775.283" calcext:value-type="float">
            <text:p>775,28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1.854" calcext:value-type="float">
            <text:p>1,854</text:p>
          </table:table-cell>
          <table:table-cell table:style-name="ce6" office:value-type="float" office:value="1.391" calcext:value-type="float">
            <text:p>1,391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23.888" calcext:value-type="float">
            <text:p>623,888</text:p>
          </table:table-cell>
          <table:table-cell table:style-name="ce6" office:value-type="float" office:value="730.547" calcext:value-type="float">
            <text:p>730,547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952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93.455" calcext:value-type="float">
            <text:p>393,455</text:p>
          </table:table-cell>
          <table:table-cell table:style-name="ce6" office:value-type="float" office:value="647.308" calcext:value-type="float">
            <text:p>647,30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office:value-type="float" office:value="0.6099" calcext:value-type="float">
            <text:p>0,6099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52.84" calcext:value-type="float">
            <text:p>652,84</text:p>
          </table:table-cell>
          <table:table-cell table:style-name="ce6" office:value-type="float" office:value="725.344" calcext:value-type="float">
            <text:p>725,34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4" calcext:value-type="float">
            <text:p>0,914</text:p>
          </table:table-cell>
          <table:table-cell table:style-name="ce6"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476.915" calcext:value-type="float">
            <text:p>476,915</text:p>
          </table:table-cell>
          <table:table-cell table:style-name="ce6" office:value-type="float" office:value="725.087" calcext:value-type="float">
            <text:p>725,08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162" calcext:value-type="float">
            <text:p>1,162</text:p>
          </table:table-cell>
          <table:table-cell table:style-name="ce6" office:value-type="float" office:value="1.382" calcext:value-type="float">
            <text:p>1,382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9.846" calcext:value-type="float">
            <text:p>429,846</text:p>
          </table:table-cell>
          <table:table-cell table:style-name="ce6" office:value-type="float" office:value="441.97" calcext:value-type="float">
            <text:p>441,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238" calcext:value-type="float">
            <text:p>1,238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05.516" calcext:value-type="float">
            <text:p>505,516</text:p>
          </table:table-cell>
          <table:table-cell table:style-name="ce6" office:value-type="float" office:value="484.522" calcext:value-type="float">
            <text:p>484,52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66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67.851" calcext:value-type="float">
            <text:p>567,851</text:p>
          </table:table-cell>
          <table:table-cell table:style-name="ce6" office:value-type="float" office:value="474.867" calcext:value-type="float">
            <text:p>474,86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1.1199" calcext:value-type="float">
            <text:p>1,1199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78.888" calcext:value-type="float">
            <text:p>578,888</text:p>
          </table:table-cell>
          <table:table-cell table:style-name="ce6" office:value-type="float" office:value="487.051" calcext:value-type="float">
            <text:p>487,051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969" calcext:value-type="float">
            <text:p>0,969</text:p>
          </table:table-cell>
          <table:table-cell table:style-name="ce6" office:value-type="float" office:value="1.146" calcext:value-type="float">
            <text:p>1,14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80:.B389])" office:value-type="float" office:value="518.1206" calcext:value-type="float">
            <text:p>518,1206</text:p>
          </table:table-cell>
          <table:table-cell table:style-name="ce7" table:formula="of:=AVERAGE([.C380:.C389])" office:value-type="float" office:value="584.7715" calcext:value-type="float">
            <text:p>584,7715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1.151" calcext:value-type="float">
            <text:p>1,1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0.9946" calcext:value-type="float">
            <text:p>0,9946</text:p>
          </table:table-cell>
          <table:table-cell table:style-name="ce7" table:formula="of:=AVERAGE([.G381:.G390])" office:value-type="float" office:value="1.10658" calcext:value-type="float">
            <text:p>1,1065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711" calcext:value-type="float">
            <text:p>4,711</text:p>
          </table:table-cell>
          <table:table-cell table:style-name="ce6" office:value-type="float" office:value="3.857" calcext:value-type="float">
            <text:p>3,857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9" calcext:value-type="float">
            <text:p>3,719</text:p>
          </table:table-cell>
          <table:table-cell table:style-name="ce6" office:value-type="float" office:value="3.614" calcext:value-type="float">
            <text:p>3,614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95" calcext:value-type="float">
            <text:p>3,695</text:p>
          </table:table-cell>
          <table:table-cell table:style-name="ce6" office:value-type="float" office:value="3.452" calcext:value-type="float">
            <text:p>3,452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64" calcext:value-type="float">
            <text:p>3,264</text:p>
          </table:table-cell>
          <table:table-cell table:style-name="ce6" office:value-type="float" office:value="3.123" calcext:value-type="float">
            <text:p>3,123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53" calcext:value-type="float">
            <text:p>3,853</text:p>
          </table:table-cell>
          <table:table-cell table:style-name="ce6" office:value-type="float" office:value="3.822" calcext:value-type="float">
            <text:p>3,822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02" calcext:value-type="float">
            <text:p>0,0902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56" calcext:value-type="float">
            <text:p>3,556</text:p>
          </table:table-cell>
          <table:table-cell table:style-name="ce6" office:value-type="float" office:value="3.308" calcext:value-type="float">
            <text:p>3,308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4.833" calcext:value-type="float">
            <text:p>4,833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21" calcext:value-type="float">
            <text:p>3,721</text:p>
          </table:table-cell>
          <table:table-cell table:style-name="ce6" office:value-type="float" office:value="3.615" calcext:value-type="float">
            <text:p>3,615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21" calcext:value-type="float">
            <text:p>0,421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75" calcext:value-type="float">
            <text:p>3,775</text:p>
          </table:table-cell>
          <table:table-cell table:style-name="ce6" office:value-type="float" office:value="3.505" calcext:value-type="float">
            <text:p>3,50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93:.B402])" office:value-type="float" office:value="0.28052" calcext:value-type="float">
            <text:p>0,28052</text:p>
          </table:table-cell>
          <table:table-cell table:style-name="ce7" table:formula="of:=AVERAGE([.C393:.C402])" office:value-type="float" office:value="0.24347" calcext:value-type="float">
            <text:p>0,24347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31" calcext:value-type="float">
            <text:p>3,431</text:p>
          </table:table-cell>
          <table:table-cell table:style-name="ce6" office:value-type="float" office:value="3.251" calcext:value-type="float">
            <text:p>3,2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8798" calcext:value-type="float">
            <text:p>3,8798</text:p>
          </table:table-cell>
          <table:table-cell table:style-name="ce7" table:formula="of:=AVERAGE([.G394:.G403])" office:value-type="float" office:value="3.638" calcext:value-type="float">
            <text:p>3,63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508.451" calcext:value-type="float">
            <text:p>508,451</text:p>
          </table:table-cell>
          <table:table-cell table:style-name="ce6" office:value-type="float" office:value="446.233" calcext:value-type="float">
            <text:p>446,233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0937" calcext:value-type="float">
            <text:p>0,0937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12.354" calcext:value-type="float">
            <text:p>312,354</text:p>
          </table:table-cell>
          <table:table-cell table:style-name="ce6" office:value-type="float" office:value="309.51" calcext:value-type="float">
            <text:p>309,51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656" calcext:value-type="float">
            <text:p>0,0656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390.839" calcext:value-type="float">
            <text:p>390,839</text:p>
          </table:table-cell>
          <table:table-cell table:style-name="ce6" office:value-type="float" office:value="391.235" calcext:value-type="float">
            <text:p>391,235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377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42.098" calcext:value-type="float">
            <text:p>542,098</text:p>
          </table:table-cell>
          <table:table-cell table:style-name="ce6" office:value-type="float" office:value="475.559" calcext:value-type="float">
            <text:p>475,55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31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534" calcext:value-type="float">
            <text:p>460,534</text:p>
          </table:table-cell>
          <table:table-cell table:style-name="ce6" office:value-type="float" office:value="457.924" calcext:value-type="float">
            <text:p>457,924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94.987" calcext:value-type="float">
            <text:p>294,987</text:p>
          </table:table-cell>
          <table:table-cell table:style-name="ce6" office:value-type="float" office:value="181.028" calcext:value-type="float">
            <text:p>181,028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7.559" calcext:value-type="float">
            <text:p>217,559</text:p>
          </table:table-cell>
          <table:table-cell table:style-name="ce6" office:value-type="float" office:value="214.955" calcext:value-type="float">
            <text:p>214,955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88" calcext:value-type="float">
            <text:p>0,0988</text:p>
          </table:table-cell>
          <table:table-cell table:style-name="ce6" office:value-type="float" office:value="0.0754" calcext:value-type="float">
            <text:p>0,0754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32.182" calcext:value-type="float">
            <text:p>532,182</text:p>
          </table:table-cell>
          <table:table-cell table:style-name="ce6" office:value-type="float" office:value="569.303" calcext:value-type="float">
            <text:p>569,303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1.191" calcext:value-type="float">
            <text:p>311,191</text:p>
          </table:table-cell>
          <table:table-cell table:style-name="ce6" office:value-type="float" office:value="343.523" calcext:value-type="float">
            <text:p>343,52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7.162" calcext:value-type="float">
            <text:p>337,162</text:p>
          </table:table-cell>
          <table:table-cell table:style-name="ce6" office:value-type="float" office:value="329.073" calcext:value-type="float">
            <text:p>329,07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25" calcext:value-type="float">
            <text:p>0,22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06:.B415])" office:value-type="float" office:value="390.7357" calcext:value-type="float">
            <text:p>390,7357</text:p>
          </table:table-cell>
          <table:table-cell table:style-name="ce7" table:formula="of:=AVERAGE([.C406:.C415])" office:value-type="float" office:value="371.8343" calcext:value-type="float">
            <text:p>371,8343</text:p>
          </table:table-cell>
          <table:table-cell table:style-name="ce7" table:number-columns-repeated="2"/>
          <table:table-cell table:style-name="ce7" table:formula="of:=AVERAGE([.F406:.F415])" office:value-type="float" office:value="0.51653" calcext:value-type="float">
            <text:p>0,51653</text:p>
          </table:table-cell>
          <table:table-cell table:style-name="ce7" table:formula="of:=AVERAGE([.G406:.G415])" office:value-type="float" office:value="0.45697" calcext:value-type="float">
            <text:p>0,45697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479" calcext:value-type="float">
            <text:p>8,479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18" calcext:value-type="float">
            <text:p>1,418</text:p>
          </table:table-cell>
          <table:table-cell table:style-name="ce6" office:value-type="float" office:value="1.535" calcext:value-type="float">
            <text:p>1,53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479" calcext:value-type="float">
            <text:p>7,47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office:value-type="float" office:value="1.176" calcext:value-type="float">
            <text:p>1,176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1.38" calcext:value-type="float">
            <text:p>1,3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211" calcext:value-type="float">
            <text:p>1,211</text:p>
          </table:table-cell>
          <table:table-cell table:style-name="ce6" office:value-type="float" office:value="1.274" calcext:value-type="float">
            <text:p>1,27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249" calcext:value-type="float">
            <text:p>1,249</text:p>
          </table:table-cell>
          <table:table-cell table:style-name="ce6" office:value-type="float" office:value="1.448" calcext:value-type="float">
            <text:p>1,44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02" calcext:value-type="float">
            <text:p>1,02</text:p>
          </table:table-cell>
          <table:table-cell table:style-name="ce6" office:value-type="float" office:value="1.103" calcext:value-type="float">
            <text:p>1,10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13" calcext:value-type="float">
            <text:p>1,613</text:p>
          </table:table-cell>
          <table:table-cell table:style-name="ce6" office:value-type="float" office:value="1.743" calcext:value-type="float">
            <text:p>1,74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51" calcext:value-type="float">
            <text:p>1,151</text:p>
          </table:table-cell>
          <table:table-cell table:style-name="ce6" office:value-type="float" office:value="0.933" calcext:value-type="float">
            <text:p>0,93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25" calcext:value-type="float">
            <text:p>1,425</text:p>
          </table:table-cell>
          <table:table-cell table:style-name="ce6" office:value-type="float" office:value="1.389" calcext:value-type="float">
            <text:p>1,389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563" calcext:value-type="float">
            <text:p>1,563</text:p>
          </table:table-cell>
          <table:table-cell table:style-name="ce6" office:value-type="float" office:value="1.307" calcext:value-type="float">
            <text:p>1,307</text:p>
          </table:table-cell>
          <table:table-cell/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93" calcext:value-type="float">
            <text:p>7,8093</text:p>
          </table:table-cell>
          <table:table-cell table:style-name="ce7" table:number-columns-repeated="2"/>
          <table:table-cell table:style-name="ce7" table:formula="of:=AVERAGE([.F419:.F428])" office:value-type="float" office:value="1.3531" calcext:value-type="float">
            <text:p>1,3531</text:p>
          </table:table-cell>
          <table:table-cell table:style-name="ce7" table:formula="of:=AVERAGE([.G419:.G428])" office:value-type="float" office:value="1.3288" calcext:value-type="float">
            <text:p>1,328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76.896" calcext:value-type="float">
            <text:p>176,896</text:p>
          </table:table-cell>
          <table:table-cell table:style-name="ce6" office:value-type="float" office:value="92.593" calcext:value-type="float">
            <text:p>92,593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38.008" calcext:value-type="float">
            <text:p>338,008</text:p>
          </table:table-cell>
          <table:table-cell table:style-name="ce6" office:value-type="float" office:value="327.903" calcext:value-type="float">
            <text:p>327,903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8.663" calcext:value-type="float">
            <text:p>108,663</text:p>
          </table:table-cell>
          <table:table-cell table:style-name="ce6" office:value-type="float" office:value="99.703" calcext:value-type="float">
            <text:p>99,703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7.962" calcext:value-type="float">
            <text:p>337,962</text:p>
          </table:table-cell>
          <table:table-cell table:style-name="ce6" office:value-type="float" office:value="332.714" calcext:value-type="float">
            <text:p>332,714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0.455" calcext:value-type="float">
            <text:p>110,455</text:p>
          </table:table-cell>
          <table:table-cell table:style-name="ce6" office:value-type="float" office:value="103.948" calcext:value-type="float">
            <text:p>103,9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7.297" calcext:value-type="float">
            <text:p>357,297</text:p>
          </table:table-cell>
          <table:table-cell table:style-name="ce6" office:value-type="float" office:value="360.8096" calcext:value-type="float">
            <text:p>360,8096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58.743" calcext:value-type="float">
            <text:p>158,743</text:p>
          </table:table-cell>
          <table:table-cell table:style-name="ce6" office:value-type="float" office:value="103.132" calcext:value-type="float">
            <text:p>103,13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84.364" calcext:value-type="float">
            <text:p>384,364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83.305" calcext:value-type="float">
            <text:p>83,305</text:p>
          </table:table-cell>
          <table:table-cell table:style-name="ce6" office:value-type="float" office:value="91.667" calcext:value-type="float">
            <text:p>91,667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57.144" calcext:value-type="float">
            <text:p>357,144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01.716" calcext:value-type="float">
            <text:p>101,716</text:p>
          </table:table-cell>
          <table:table-cell table:style-name="ce6" office:value-type="float" office:value="95.211" calcext:value-type="float">
            <text:p>95,211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71.002" calcext:value-type="float">
            <text:p>471,002</text:p>
          </table:table-cell>
          <table:table-cell table:style-name="ce6" office:value-type="float" office:value="428.908" calcext:value-type="float">
            <text:p>428,908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84.44" calcext:value-type="float">
            <text:p>84,44</text:p>
          </table:table-cell>
          <table:table-cell table:style-name="ce6" office:value-type="float" office:value="85.723" calcext:value-type="float">
            <text:p>85,72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3.813" calcext:value-type="float">
            <text:p>343,813</text:p>
          </table:table-cell>
          <table:table-cell table:style-name="ce6" office:value-type="float" office:value="340.821" calcext:value-type="float">
            <text:p>340,821</text:p>
          </table:table-cell>
          <table:table-cell/>
        </table:table-row>
        <table:table-row table:style-name="ro2">
          <table:table-cell office:value-type="string" calcext:value-type="string">
            <text:p>stock_8</text:p>
          </table:table-cell>
          <table:table-cell table:style-name="ce6" office:value-type="float" office:value="109.795" calcext:value-type="float">
            <text:p>109,795</text:p>
          </table:table-cell>
          <table:table-cell table:style-name="ce6" office:value-type="float" office:value="98.391" calcext:value-type="float">
            <text:p>98,391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21.103" calcext:value-type="float">
            <text:p>421,103</text:p>
          </table:table-cell>
          <table:table-cell table:style-name="ce6" office:value-type="float" office:value="404.336" calcext:value-type="float">
            <text:p>404,336</text:p>
          </table:table-cell>
          <table:table-cell/>
        </table:table-row>
        <table:table-row table:style-name="ro2">
          <table:table-cell office:value-type="string" calcext:value-type="string">
            <text:p>stock_9</text:p>
          </table:table-cell>
          <table:table-cell table:style-name="ce6" office:value-type="float" office:value="87.533" calcext:value-type="float">
            <text:p>87,533</text:p>
          </table:table-cell>
          <table:table-cell table:style-name="ce6" office:value-type="float" office:value="135.066" calcext:value-type="float">
            <text:p>135,06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09.696" calcext:value-type="float">
            <text:p>409,696</text:p>
          </table:table-cell>
          <table:table-cell table:style-name="ce6" office:value-type="float" office:value="387.365" calcext:value-type="float">
            <text:p>387,365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25.597" calcext:value-type="float">
            <text:p>125,597</text:p>
          </table:table-cell>
          <table:table-cell table:style-name="ce6" office:value-type="float" office:value="123.109" calcext:value-type="float">
            <text:p>123,1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3.283" calcext:value-type="float">
            <text:p>383,283</text:p>
          </table:table-cell>
          <table:table-cell table:style-name="ce6" office:value-type="float" office:value="371.091" calcext:value-type="float">
            <text:p>371,091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32:.B441])" office:value-type="float" office:value="114.7143" calcext:value-type="float">
            <text:p>114,7143</text:p>
          </table:table-cell>
          <table:table-cell table:style-name="ce7" table:formula="of:=AVERAGE([.C432:.C441])" office:value-type="float" office:value="102.8543" calcext:value-type="float">
            <text:p>102,854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0.2022" calcext:value-type="float">
            <text:p>380,2022</text:p>
          </table:table-cell>
          <table:table-cell table:style-name="ce7" table:formula="of:=AVERAGE([.G432:.G441])" office:value-type="float" office:value="369.54556" calcext:value-type="float">
            <text:p>369,54556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4.033" calcext:value-type="float">
            <text:p>4,03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592" calcext:value-type="float">
            <text:p>4,59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3" calcext:value-type="float">
            <text:p>6,53</text:p>
          </table:table-cell>
          <table:table-cell table:style-name="ce6" office:value-type="float" office:value="7.348" calcext:value-type="float">
            <text:p>7,34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27" calcext:value-type="float">
            <text:p>2,827</text:p>
          </table:table-cell>
          <table:table-cell table:style-name="ce6" office:value-type="float" office:value="2.878" calcext:value-type="float">
            <text:p>2,87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77" calcext:value-type="float">
            <text:p>6,177</text:p>
          </table:table-cell>
          <table:table-cell table:style-name="ce6" office:value-type="float" office:value="6.969" calcext:value-type="float">
            <text:p>6,969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87" calcext:value-type="float">
            <text:p>7,387</text:p>
          </table:table-cell>
          <table:table-cell table:style-name="ce6" office:value-type="float" office:value="8.256" calcext:value-type="float">
            <text:p>8,25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333" calcext:value-type="float">
            <text:p>5,333</text:p>
          </table:table-cell>
          <table:table-cell table:style-name="ce6" office:value-type="float" office:value="5.967" calcext:value-type="float">
            <text:p>5,96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024" calcext:value-type="float">
            <text:p>5,024</text:p>
          </table:table-cell>
          <table:table-cell table:style-name="ce6" office:value-type="float" office:value="4.965" calcext:value-type="float">
            <text:p>4,96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 office:value-type="float" office:value="3.432" calcext:value-type="float">
            <text:p>3,43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38" calcext:value-type="float">
            <text:p>4,438</text:p>
          </table:table-cell>
          <table:table-cell table:style-name="ce6" office:value-type="float" office:value="5.428" calcext:value-type="float">
            <text:p>5,42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3">
          <table:table-cell table:style-name="ce4"/>
          <table:table-cell table:style-name="ce7" table:formula="of:=AVERAGE([.B445:.B454])" office:value-type="float" office:value="4.8966" calcext:value-type="float">
            <text:p>4,8966</text:p>
          </table:table-cell>
          <table:table-cell table:style-name="ce7" table:formula="of:=AVERAGE([.C445:.C454])" office:value-type="float" office:value="5.3638" calcext:value-type="float">
            <text:p>5,3638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16"/>
        <table:table-column table:style-name="co9" table:number-columns-repeated="16379" table:default-cell-style-name="Default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 table:number-columns-repeated="16379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76" calcext:value-type="percentage">
            <text:p>17,60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85" calcext:value-type="percentage">
            <text:p>18,50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13" calcext:value-type="percentage">
            <text:p>20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3497" calcext:value-type="percentage">
            <text:p>34,97%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27" calcext:value-type="percentage">
            <text:p>18,2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03" calcext:value-type="percentage">
            <text:p>35,03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376" calcext:value-type="percentage">
            <text:p>3,7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28" calcext:value-type="percentage">
            <text:p>50,2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826" calcext:value-type="percentage">
            <text:p>38,2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61" calcext:value-type="percentage">
            <text:p>59,6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17" calcext:value-type="percentage">
            <text:p>21,7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5365" calcext:value-type="percentage">
            <text:p>53,65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29" calcext:value-type="percentage">
            <text:p>51,29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5392" calcext:value-type="percentage">
            <text:p>53,92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731" calcext:value-type="percentage">
            <text:p>37,3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003" calcext:value-type="percentage">
            <text:p>20,0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243" calcext:value-type="percentage">
            <text:p>12,4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37" calcext:value-type="percentage">
            <text:p>15,37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8" calcext:value-type="percentage">
            <text:p>9,4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936" calcext:value-type="percentage">
            <text:p>9,3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82" calcext:value-type="percentage">
            <text:p>15,8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71" calcext:value-type="percentage">
            <text:p>23,7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5" calcext:value-type="percentage">
            <text:p>25,6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RING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557" calcext:value-type="percentage">
            <text:p>5,5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78" calcext:value-type="percentage">
            <text:p>28,7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4405" calcext:value-type="percentage">
            <text:p>44,05%</text:p>
          </table:table-cell>
          <table:table-cell office:value-type="percentage" office:value="0.2945" calcext:value-type="percentage">
            <text:p>29,45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05" calcext:value-type="percentage">
            <text:p>22,0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4" calcext:value-type="percentage">
            <text:p>10,4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49" calcext:value-type="percentage">
            <text:p>41,49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2465" calcext:value-type="percentage">
            <text:p>24,6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41" calcext:value-type="percentage">
            <text:p>10,4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2" calcext:value-type="percentage">
            <text:p>1,82%</text:p>
          </table:table-cell>
          <table:table-cell office:value-type="percentage" office:value="0.023" calcext:value-type="percentage">
            <text:p>2,3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" calcext:value-type="percentage">
            <text:p>9,50%</text:p>
          </table:table-cell>
          <table:table-cell table:number-columns-repeated="16379"/>
        </table:table-row>
        <table:table-row table:style-name="ro5">
          <table:table-cell table:style-name="ce14"/>
          <table:table-cell table:style-name="ce17" table:formula="of:=AVERAGE([.B3:.B44])" office:value-type="percentage" office:value="0.259278571428571" calcext:value-type="percentage">
            <text:p>25,93%</text:p>
          </table:table-cell>
          <table:table-cell table:style-name="ce17" table:formula="of:=AVERAGE([.C3:.C44])" office:value-type="percentage" office:value="0.228540476190476" calcext:value-type="percentage">
            <text:p>22,85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237380952381" calcext:value-type="percentage">
            <text:p>21,24%</text:p>
          </table:table-cell>
          <table:table-cell table:number-columns-repeated="16379"/>
        </table:table-row>
        <table:table-row table:style-name="ro1">
          <table:table-cell table:style-name="ce12" table:number-columns-repeated="5"/>
          <table:table-cell table:number-columns-repeated="16379"/>
        </table:table-row>
        <table:table-row table:style-name="ro3">
          <table:table-cell table:style-name="ce36"/>
          <table:table-cell table:style-name="ce36" office:value-type="string" calcext:value-type="string">
            <text:p>GAIN</text:p>
          </table:table-cell>
          <table:table-cell table:style-name="ce42" table:formula="of:=([.B45]-[.C45])/[.B45]" office:value-type="percentage" office:value="0.118552393546195" calcext:value-type="percentage">
            <text:p>11,86%</text:p>
          </table:table-cell>
          <table:table-cell table:style-name="ce42" table:formula="of:=([.B45]-[.D45])/[.B45]" office:value-type="percentage" office:value="0.167580374114989" calcext:value-type="percentage">
            <text:p>16,76%</text:p>
          </table:table-cell>
          <table:table-cell table:style-name="ce42" table:formula="of:=([.B45]-[.E45])/[.B45]" office:value-type="percentage" office:value="0.180904891778469" calcext:value-type="percentage">
            <text:p>18,09%</text:p>
          </table:table-cell>
          <table:table-cell table:style-name="ce44" table:number-columns-repeated="16379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4301.5293/417" office:value-type="float" office:value="10.3154179856115" calcext:value-type="float">
            <text:p>10,3154179856115</text:p>
          </table:table-cell>
          <table:table-cell table:style-name="ce13" table:formula="of:=3235.858/417" office:value-type="float" office:value="7.75985131894484" calcext:value-type="float">
            <text:p>7,75985131894484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3" table:formula="of:=2429.4136/417" office:value-type="float" office:value="5.82593189448441" calcext:value-type="float">
            <text:p>5,82593189448441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7775/150" office:value-type="float" office:value="0.00385166666666667" calcext:value-type="float">
            <text:p>0,00385166666666667</text:p>
          </table:table-cell>
          <table:table-cell table:style-name="ce13" table:formula="of:=0.59957/150" office:value-type="float" office:value="0.00399713333333333" calcext:value-type="float">
            <text:p>0,00399713333333333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6746/150" office:value-type="float" office:value="0.00378306666666667" calcext:value-type="float">
            <text:p>0,00378306666666667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92.4522/39" office:value-type="float" office:value="10.0628769230769" calcext:value-type="float">
            <text:p>10,0628769230769</text:p>
          </table:table-cell>
          <table:table-cell table:style-name="ce13" table:formula="of:=377.4047/39" office:value-type="float" office:value="9.67704358974359" calcext:value-type="float">
            <text:p>9,67704358974359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71.8343/39" office:value-type="float" office:value="9.53421282051282" calcext:value-type="float">
            <text:p>9,53421282051282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225/9" office:value-type="float" office:value="0.025" calcext:value-type="float">
            <text:p>0,025</text:p>
          </table:table-cell>
          <table:table-cell table:style-name="ce13" table:formula="of:=0.18446/9" office:value-type="float" office:value="0.0204955555555556" calcext:value-type="float">
            <text:p>0,0204955555555556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3" table:formula="of:=0.0102/4" office:value-type="float" office:value="0.00255" calcext:value-type="float">
            <text:p>0,00255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39072/4" office:value-type="float" office:value="0.009768" calcext:value-type="float">
            <text:p>0,009768</text:p>
          </table:table-cell>
          <table:table-cell table:style-name="ce13" table:formula="of:=0.0206/4" office:value-type="float" office:value="0.00515" calcext:value-type="float">
            <text:p>0,0051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3" table:formula="of:=0.16395/4" office:value-type="float" office:value="0.0409875" calcext:value-type="float">
            <text:p>0,04098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2228.9029/33" office:value-type="float" office:value="67.5425121212121" calcext:value-type="float">
            <text:p>67,5425121212121</text:p>
          </table:table-cell>
          <table:table-cell table:style-name="ce13" table:formula="of:=1968.3891/33" office:value-type="float" office:value="59.6481545454545" calcext:value-type="float">
            <text:p>59,6481545454545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3" table:formula="of:=1692.1309/33" office:value-type="float" office:value="51.2766939393939" calcext:value-type="float">
            <text:p>51,276693939393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2.83033333333333/103" office:value-type="float" office:value="0.0274789644012945" calcext:value-type="float">
            <text:p>0,0274789644012945</text:p>
          </table:table-cell>
          <table:table-cell table:style-name="ce13" table:formula="of:=2.2736/103" office:value-type="float" office:value="0.022073786407767" calcext:value-type="float">
            <text:p>0,022073786407767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5375/103" office:value-type="float" office:value="0.00521844660194175" calcext:value-type="float">
            <text:p>0,00521844660194175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5.6332/36" office:value-type="float" office:value="0.156477777777778" calcext:value-type="float">
            <text:p>0,156477777777778</text:p>
          </table:table-cell>
          <table:table-cell table:style-name="ce13" table:formula="of:=5.6779/36" office:value-type="float" office:value="0.157719444444444" calcext:value-type="float">
            <text:p>0,157719444444444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3" table:formula="of:=5.792/36" office:value-type="float" office:value="0.160888888888889" calcext:value-type="float">
            <text:p>0,160888888888889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5074/25" office:value-type="float" office:value="0.020296" calcext:value-type="float">
            <text:p>0,020296</text:p>
          </table:table-cell>
          <table:table-cell table:style-name="ce13" table:formula="of:=0.4772/25" office:value-type="float" office:value="0.019088" calcext:value-type="float">
            <text:p>0,01908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3" table:formula="of:=0.4236/25" office:value-type="float" office:value="0.016944" calcext:value-type="float">
            <text:p>0,01694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5/12" office:value-type="float" office:value="0.0458333333333333" calcext:value-type="float">
            <text:p>0,0458333333333333</text:p>
          </table:table-cell>
          <table:table-cell table:style-name="ce13" table:formula="of:=0.5644/12" office:value-type="float" office:value="0.0470333333333333" calcext:value-type="float">
            <text:p>0,0470333333333333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3" table:formula="of:=0.6355/12" office:value-type="float" office:value="0.0529583333333333" calcext:value-type="float">
            <text:p>0,0529583333333333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66/50" office:value-type="float" office:value="0.00732" calcext:value-type="float">
            <text:p>0,00732</text:p>
          </table:table-cell>
          <table:table-cell table:style-name="ce13" table:formula="of:=0.3585/50" office:value-type="float" office:value="0.00717" calcext:value-type="float">
            <text:p>0,00717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3" table:formula="of:=0.3318/50" office:value-type="float" office:value="0.006636" calcext:value-type="float">
            <text:p>0,006636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621.2897/50" office:value-type="float" office:value="12.425794" calcext:value-type="float">
            <text:p>12,425794</text:p>
          </table:table-cell>
          <table:table-cell table:style-name="ce13" table:formula="of:=522.46265/50" office:value-type="float" office:value="10.449253" calcext:value-type="float">
            <text:p>10,449253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84.7715/50" office:value-type="float" office:value="11.69543" calcext:value-type="float">
            <text:p>11,69543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9.4683/99" office:value-type="float" office:value="0.0956393939393939" calcext:value-type="float">
            <text:p>0,0956393939393939</text:p>
          </table:table-cell>
          <table:table-cell table:style-name="ce13" table:formula="of:=4.3839/99" office:value-type="float" office:value="0.0442818181818182" calcext:value-type="float">
            <text:p>0,0442818181818182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0.8865/99" office:value-type="float" office:value="0.00895454545454546" calcext:value-type="float">
            <text:p>0,00895454545454546</text:p>
          </table:table-cell>
          <table:table-cell office:value-type="float" office:value="99" calcext:value-type="float">
            <text:p>9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57257/18" office:value-type="float" office:value="0.0318094444444444" calcext:value-type="float">
            <text:p>0,0318094444444444</text:p>
          </table:table-cell>
          <table:table-cell table:style-name="ce13" table:formula="of:=0.5063/18" office:value-type="float" office:value="0.0281277777777778" calcext:value-type="float">
            <text:p>0,0281277777777778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3" table:formula="of:=0.24347/18" office:value-type="float" office:value="0.0135261111111111" calcext:value-type="float">
            <text:p>0,0135261111111111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40454/6" office:value-type="float" office:value="0.0674233333333333" calcext:value-type="float">
            <text:p>0,0674233333333333</text:p>
          </table:table-cell>
          <table:table-cell table:style-name="ce13" table:formula="of:=0.396/6" office:value-type="float" office:value="0.066" calcext:value-type="float">
            <text:p>0,066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3" table:formula="of:=0.357/6" office:value-type="float" office:value="0.0595" calcext:value-type="float">
            <text:p>0,059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1385/104" office:value-type="float" office:value="0.0109471153846154" calcext:value-type="float">
            <text:p>0,0109471153846154</text:p>
          </table:table-cell>
          <table:table-cell table:style-name="ce13" table:formula="of:=0.95131/104" office:value-type="float" office:value="0.00914721153846154" calcext:value-type="float">
            <text:p>0,00914721153846154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3" table:formula="of:=1.10658/104" office:value-type="float" office:value="0.0106401923076923" calcext:value-type="float">
            <text:p>0,0106401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62/13" office:value-type="float" office:value="0.00627846153846154" calcext:value-type="float">
            <text:p>0,00627846153846154</text:p>
          </table:table-cell>
          <table:table-cell table:style-name="ce13" table:formula="of:=0.08143/13" office:value-type="float" office:value="0.00626384615384615" calcext:value-type="float">
            <text:p>0,00626384615384615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3" table:formula="of:=0.08166/13" office:value-type="float" office:value="0.00628153846153846" calcext:value-type="float">
            <text:p>0,00628153846153846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1937.37768/165" office:value-type="float" office:value="11.7416829090909" calcext:value-type="float">
            <text:p>11,7416829090909</text:p>
          </table:table-cell>
          <table:table-cell table:style-name="ce13" table:formula="of:=1759.5029/165" office:value-type="float" office:value="10.6636539393939" calcext:value-type="float">
            <text:p>10,6636539393939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3" table:formula="of:=369.54556/165" office:value-type="float" office:value="2.23967006060606" calcext:value-type="float">
            <text:p>2,23967006060606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20136/7" office:value-type="float" office:value="0.0287657142857143" calcext:value-type="float">
            <text:p>0,0287657142857143</text:p>
          </table:table-cell>
          <table:table-cell table:style-name="ce13" table:formula="of:=0.116/7" office:value-type="float" office:value="0.0165714285714286" calcext:value-type="float">
            <text:p>0,0165714285714286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3" table:formula="of:=0.0968/7" office:value-type="float" office:value="0.0138285714285714" calcext:value-type="float">
            <text:p>0,013828571428571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19.2794/165" office:value-type="float" office:value="0.116844848484848" calcext:value-type="float">
            <text:p>0,116844848484848</text:p>
          </table:table-cell>
          <table:table-cell table:style-name="ce13" table:formula="of:=17.5382/165" office:value-type="float" office:value="0.106292121212121" calcext:value-type="float">
            <text:p>0,106292121212121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3" table:formula="of:=3.638/165" office:value-type="float" office:value="0.0220484848484849" calcext:value-type="float">
            <text:p>0,0220484848484849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7952/217" office:value-type="float" office:value="0.0359225806451613" calcext:value-type="float">
            <text:p>0,0359225806451613</text:p>
          </table:table-cell>
          <table:table-cell table:style-name="ce13" table:formula="of:=7.8032/217" office:value-type="float" office:value="0.0359594470046083" calcext:value-type="float">
            <text:p>0,0359594470046083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93/217" office:value-type="float" office:value="0.0359875576036866" calcext:value-type="float">
            <text:p>0,0359875576036866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7925/57" office:value-type="float" office:value="0.0314473684210526" calcext:value-type="float">
            <text:p>0,0314473684210526</text:p>
          </table:table-cell>
          <table:table-cell table:style-name="ce13" table:formula="of:=1.43788/57" office:value-type="float" office:value="0.0252259649122807" calcext:value-type="float">
            <text:p>0,0252259649122807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288/57" office:value-type="float" office:value="0.0233122807017544" calcext:value-type="float">
            <text:p>0,0233122807017544</text:p>
          </table:table-cell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406.64227/95" office:value-type="float" office:value="4.28044494736842" calcext:value-type="float">
            <text:p>4,28044494736842</text:p>
          </table:table-cell>
          <table:table-cell table:style-name="ce13" table:formula="of:=182.75549/95" office:value-type="float" office:value="1.923742" calcext:value-type="float">
            <text:p>1,923742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3" table:formula="of:=102.8543/95" office:value-type="float" office:value="1.08267684210526" calcext:value-type="float">
            <text:p>1,08267684210526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30977/104" office:value-type="float" office:value="0.0414400961538462" calcext:value-type="float">
            <text:p>0,0414400961538462</text:p>
          </table:table-cell>
          <table:table-cell table:style-name="ce13" table:formula="of:=4.5481/104" office:value-type="float" office:value="0.0437317307692308" calcext:value-type="float">
            <text:p>0,0437317307692308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3" table:formula="of:=5.3638/104" office:value-type="float" office:value="0.051575" calcext:value-type="float">
            <text:p>0,051575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33303/13" office:value-type="float" office:value="0.0256176923076923" calcext:value-type="float">
            <text:p>0,0256176923076923</text:p>
          </table:table-cell>
          <table:table-cell table:style-name="ce13" table:formula="of:=0.4484/13" office:value-type="float" office:value="0.0344923076923077" calcext:value-type="float">
            <text:p>0,0344923076923077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3" table:formula="of:=0.45697/13" office:value-type="float" office:value="0.0351515384615385" calcext:value-type="float">
            <text:p>0,0351515384615385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number-columns-repeated="16379"/>
        </table:table-row>
        <table:table-row table:style-name="ro5">
          <table:table-cell/>
          <table:table-cell table:style-name="Default" table:number-columns-repeated="4"/>
          <table:table-cell table:style-name="ce14"/>
          <table:table-cell table:number-columns-repeated="16378"/>
        </table:table-row>
        <table:table-row table:style-name="ro5">
          <table:table-cell table:style-name="ce14"/>
          <table:table-cell table:style-name="ce14" table:formula="of:=AVERAGE([.B50:.B74])" office:value-type="float" office:value="4.6862756270991" calcext:value-type="float">
            <text:p>4,6862756270991</text:p>
          </table:table-cell>
          <table:table-cell table:style-name="ce14" table:formula="of:=AVERAGE([.C50:.C74])" office:value-type="float" office:value="4.03282077201701" calcext:value-type="float">
            <text:p>4,03282077201701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28901550451889" calcext:value-type="float">
            <text:p>3,28901550451889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2" office:value-type="string" calcext:value-type="string">
            <text:p>GAIN</text:p>
          </table:table-cell>
          <table:table-cell table:style-name="ce18" table:formula="of:=([.B77]-[.C77])/[.B77]" office:value-type="percentage" office:value="0.13944012411549" calcext:value-type="percentage">
            <text:p>13,94%</text:p>
          </table:table-cell>
          <table:table-cell table:style-name="ce18" table:formula="of:=([.B77]-[.D77])/[.B77]" office:value-type="percentage" office:value="0.282675666533509" calcext:value-type="percentage">
            <text:p>28,27%</text:p>
          </table:table-cell>
          <table:table-cell table:style-name="ce18" table:formula="of:=([.B77]-[.E77])/[.B77]" office:value-type="percentage" office:value="0.298160038752382" calcext:value-type="percentage">
            <text:p>29,82%</text:p>
          </table:table-cell>
          <table:table-cell table:style-name="ce12" table:number-columns-repeated="16379"/>
        </table:table-row>
      </table:table>
      <table:table table:name="methods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3">
          <table:table-cell table:number-columns-repeated="2"/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style-name="ce38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4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4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4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4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4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4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4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4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4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4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REGRESS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5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table table:name="nc_exp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2766" calcext:value-type="percentage">
            <text:p>27,6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0297" calcext:value-type="percentage">
            <text:p>2,97%</text:p>
          </table:table-cell>
          <table:table-cell table:style-name="ce3" office:value-type="percentage" office:value="0.0662" calcext:value-type="percentage">
            <text:p>6,62%</text:p>
          </table:table-cell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0257" calcext:value-type="percentage">
            <text:p>2,57%</text:p>
          </table:table-cell>
          <table:table-cell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527" calcext:value-type="percentage">
            <text:p>5,27%</text:p>
          </table:table-cell>
          <table:table-cell table:style-name="ce3" office:value-type="percentage" office:value="0.0649" calcext:value-type="percentage">
            <text:p>6,49%</text:p>
          </table:table-cell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6</text:p>
          </table:table-cell>
          <table:table-cell table:style-name="ce3" office:value-type="percentage" office:value="0.0378" calcext:value-type="percentage">
            <text:p>3,78%</text:p>
          </table:table-cell>
          <table:table-cell table:style-name="ce3" office:value-type="percentage" office:value="0.0635" calcext:value-type="percentage">
            <text:p>6,35%</text:p>
          </table:table-cell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style-name="ce3" office:value-type="percentage" office:value="0.0122" calcext:value-type="percentage">
            <text:p>1,22%</text:p>
          </table:table-cell>
          <table:table-cell table:style-name="ce3" office:value-type="percentage" office:value="0.0595" calcext:value-type="percentage">
            <text:p>5,95%</text:p>
          </table:table-cell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1936" calcext:value-type="percentage">
            <text:p>19,36%</text:p>
          </table:table-cell>
          <table:table-cell table:style-name="ce1" table:formula="of:=AVERAGE([.C2:.C11])" office:value-type="percentage" office:value="0.20212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4459" calcext:value-type="percentage">
            <text:p>4,46%</text:p>
          </table:table-cell>
          <table:table-cell table:style-name="ce1" table:formula="of:=AVERAGE([.G2:.G11])" office:value-type="percentage" office:value="0.05878" calcext:value-type="percentage">
            <text:p>5,8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074" calcext:value-type="percentage">
            <text:p>20,74%</text:p>
          </table:table-cell>
          <table:table-cell table:style-name="ce3" office:value-type="percentage" office:value="0.2148" calcext:value-type="percentage">
            <text:p>21,48%</text:p>
          </table:table-cell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704" calcext:value-type="percentage">
            <text:p>17,04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407" calcext:value-type="percentage">
            <text:p>14,07%</text:p>
          </table:table-cell>
          <table:table-cell/>
          <table:table-cell office:value-type="string" calcext:value-type="string">
            <text:p>Statheart_3</text:p>
          </table:table-cell>
          <table:table-cell table:style-name="ce3" office:value-type="percentage" office:value="0.2481" calcext:value-type="percentage">
            <text:p>24,81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4</text:p>
          </table:table-cell>
          <table:table-cell table:number-columns-repeated="2"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889" calcext:value-type="percentage">
            <text:p>28,89%</text:p>
          </table:table-cell>
          <table:table-cell table:style-name="ce3" office:value-type="percentage" office:value="0.2815" calcext:value-type="percentage">
            <text:p>28,15%</text:p>
          </table:table-cell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3222" calcext:value-type="percentage">
            <text:p>32,22%</text:p>
          </table:table-cell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2" office:value-type="percentage" office:value="0.1741" calcext:value-type="percentage">
            <text:p>17,41%</text:p>
          </table:table-cell>
          <table:table-cell/>
          <table:table-cell office:value-type="string" calcext:value-type="string">
            <text:p>Statheart_8</text:p>
          </table:table-cell>
          <table:table-cell table:style-name="ce3" office:value-type="percentage" office:value="0.2741" calcext:value-type="percentage">
            <text:p>27,41%</text:p>
          </table:table-cell>
          <table:table-cell table:style-name="ce3" office:value-type="percentage" office:value="0.2704" calcext:value-type="percentage">
            <text:p>27,04%</text:p>
          </table:table-cell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537" calcext:value-type="percentage">
            <text:p>15,37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407" calcext:value-type="percentage">
            <text:p>14,07%</text:p>
          </table:table-cell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93" calcext:value-type="percentage">
            <text:p>25,93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16371" calcext:value-type="percentage">
            <text:p>16,37%</text:p>
          </table:table-cell>
          <table:table-cell table:style-name="ce1" table:formula="of:=AVERAGE([.C14:.C23])" office:value-type="percentage" office:value="0.15538" calcext:value-type="percentage">
            <text:p>15,54%</text:p>
          </table:table-cell>
          <table:table-cell/>
          <table:table-cell table:style-name="ce1"/>
          <table:table-cell table:style-name="ce1" table:formula="of:=AVERAGE([.F14:.F23])" office:value-type="percentage" office:value="0.25112" calcext:value-type="percentage">
            <text:p>25,11%</text:p>
          </table:table-cell>
          <table:table-cell table:style-name="ce1" table:formula="of:=AVERAGE([.G14:.G23])" office:value-type="percentage" office:value="0.24297" calcext:value-type="percentage">
            <text:p>24,3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string" calcext:value-type="string">
            <text:p>x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office:value-type="percentage" office:value="0.3714" calcext:value-type="percentage">
            <text:p>37,14%</text:p>
          </table:table-cell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2857" calcext:value-type="percentage">
            <text:p>28,57%</text:p>
          </table:table-cell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percentage" office:value="0.5463" calcext:value-type="percentage">
            <text:p>54,63%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071" calcext:value-type="percentage">
            <text:p>20,71%</text:p>
          </table:table-cell>
          <table:table-cell table:style-name="ce3" office:value-type="percentage" office:value="0.2786" calcext:value-type="percentage">
            <text:p>27,86%</text:p>
          </table:table-cell>
        </table:table-row>
        <table:table-row table:style-name="ro1">
          <table:table-cell office:value-type="string" calcext:value-type="string">
            <text:p>Optdigits_4</text:p>
          </table:table-cell>
          <table:table-cell office:value-type="percentage" office:value="0.5107" calcext:value-type="percentage">
            <text:p>51,07%</text:p>
          </table:table-cell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214" calcext:value-type="percentage">
            <text:p>12,14%</text:p>
          </table:table-cell>
          <table:table-cell table:style-name="ce3" office:value-type="percentage" office:value="0.1357" calcext:value-type="percentage">
            <text:p>13,57%</text:p>
          </table:table-cell>
        </table:table-row>
        <table:table-row table:style-name="ro1">
          <table:table-cell office:value-type="string" calcext:value-type="string">
            <text:p>Optdigits_5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3929" calcext:value-type="percentage">
            <text:p>39,29%</text:p>
          </table:table-cell>
          <table:table-cell table:style-name="ce3" office:value-type="percentage" office:value="0.4429" calcext:value-type="percentage">
            <text:p>44,29%</text:p>
          </table:table-cell>
        </table:table-row>
        <table:table-row table:style-name="ro1">
          <table:table-cell office:value-type="string" calcext:value-type="string">
            <text:p>Optdigit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571" calcext:value-type="percentage">
            <text:p>25,71%</text:p>
          </table:table-cell>
        </table:table-row>
        <table:table-row table:style-name="ro1">
          <table:table-cell office:value-type="string" calcext:value-type="string">
            <text:p>Optdigits_7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643" calcext:value-type="percentage">
            <text:p>16,43%</text:p>
          </table:table-cell>
          <table:table-cell table:style-name="ce3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Optdigits_8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286" calcext:value-type="percentage">
            <text:p>12,86%</text:p>
          </table:table-cell>
          <table:table-cell table:style-name="ce3"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ptdigits_9</text:p>
          </table:table-cell>
          <table:table-cell office:value-type="percentage" office:value="0.5409" calcext:value-type="percentage">
            <text:p>54,09%</text:p>
          </table:table-cell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3214" calcext:value-type="percentage">
            <text:p>32,14%</text:p>
          </table:table-cell>
        </table:table-row>
        <table:table-row table:style-name="ro1">
          <table:table-cell office:value-type="string" calcext:value-type="string">
            <text:p>Optdigits_10</text:p>
          </table:table-cell>
          <table:table-cell office:value-type="percentage" office:value="0.5694" calcext:value-type="percentage">
            <text:p>56,94%</text:p>
          </table:table-cell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3571" calcext:value-type="percentage">
            <text:p>35,71%</text:p>
          </table:table-cell>
        </table:table-row>
        <table:table-row table:style-name="ro1">
          <table:table-cell table:style-name="ce1"/>
          <table:table-cell table:style-name="ce1" table:formula="of:=AVERAGE([.B26:.B35])" office:value-type="percentage" office:value="0.546844444444445" calcext:value-type="percentage">
            <text:p>54,68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2428" calcext:value-type="percentage">
            <text:p>22,43%</text:p>
          </table:table-cell>
          <table:table-cell table:style-name="ce1" table:formula="of:=AVERAGE([.G26:.G35])" office:value-type="percentage" office:value="0.29785" calcext:value-type="percentage">
            <text:p>29,79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106" calcext:value-type="percentage">
            <text:p>10,60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0957" calcext:value-type="percentage">
            <text:p>9,57%</text:p>
          </table:table-cell>
          <table:table-cell table:style-name="ce3" office:value-type="percentage" office:value="0.1043" calcext:value-type="percentage">
            <text:p>10,43%</text:p>
          </table:table-cell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3</text:p>
          </table:table-cell>
          <table:table-cell table:style-name="ce3"/>
          <table:table-cell table:style-name="ce3" office:value-type="percentage" office:value="0.1197" calcext:value-type="percentage">
            <text:p>11,97%</text:p>
          </table:table-cell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9" calcext:value-type="percentage">
            <text:p>10,79%</text:p>
          </table:table-cell>
          <table:table-cell/>
          <table:table-cell office:value-type="string" calcext:value-type="string">
            <text:p>Spambase_4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5</text:p>
          </table:table-cell>
          <table:table-cell/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Spambase_5</text:p>
          </table:table-cell>
          <table:table-cell table:style-name="ce3"/>
          <table:table-cell table:style-name="ce3" office:value-type="percentage" office:value="0.0935" calcext:value-type="percentage">
            <text:p>9,35%</text:p>
          </table:table-cell>
        </table:table-row>
        <table:table-row table:style-name="ro1">
          <table:table-cell office:value-type="string" calcext:value-type="string">
            <text:p>PageBlocks_6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6</text:p>
          </table:table-cell>
          <table:table-cell table:style-name="ce3"/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7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/>
          <table:table-cell table:style-name="ce3" office:value-type="percentage" office:value="0.1978" calcext:value-type="percentage">
            <text:p>19,78%</text:p>
          </table:table-cell>
        </table:table-row>
        <table:table-row table:style-name="ro1">
          <table:table-cell office:value-type="string" calcext:value-type="string">
            <text:p>PageBlocks_8</text:p>
          </table:table-cell>
          <table:table-cell/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8</text:p>
          </table:table-cell>
          <table:table-cell table:style-name="ce3"/>
          <table:table-cell table:style-name="ce3" office:value-type="percentage" office:value="0.0957" calcext:value-type="percentage">
            <text:p>9,57%</text:p>
          </table:table-cell>
        </table:table-row>
        <table:table-row table:style-name="ro1">
          <table:table-cell office:value-type="string" calcext:value-type="string">
            <text:p>PageBlocks_9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9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10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/>
          <table:table-cell office:value-type="percentage" office:value="0.1239" calcext:value-type="percentage">
            <text:p>12,39%</text:p>
          </table:table-cell>
        </table:table-row>
        <table:table-row table:style-name="ro1">
          <table:table-cell table:style-name="ce1"/>
          <table:table-cell table:style-name="ce1" table:formula="of:=AVERAGE([.B38:.B47])" office:value-type="percentage" office:value="0.10925" calcext:value-type="percentage">
            <text:p>10,93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11" calcext:value-type="percentage">
            <text:p>10,11%</text:p>
          </table:table-cell>
          <table:table-cell table:style-name="ce1" table:formula="of:=AVERAGE([.G38:.G47])" office:value-type="percentage" office:value="0.11741" calcext:value-type="percentage">
            <text:p>11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16" calcext:value-type="percentage">
            <text:p>31,16%</text:p>
          </table:table-cell>
          <table:table-cell table:style-name="ce3" office:value-type="percentage" office:value="0.3159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014" calcext:value-type="percentage">
            <text:p>10,14%</text:p>
          </table:table-cell>
          <table:table-cell table:style-name="ce3" office:value-type="percentage" office:value="0.1203" calcext:value-type="percentage">
            <text:p>12,03%</text:p>
          </table:table-cell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71" calcext:value-type="percentage">
            <text:p>17,10%</text:p>
          </table:table-cell>
          <table:table-cell table:style-name="ce3" office:value-type="percentage" office:value="0.2058" calcext:value-type="percentage">
            <text:p>20,58%</text:p>
          </table:table-cell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913" calcext:value-type="percentage">
            <text:p>19,13%</text:p>
          </table:table-cell>
          <table:table-cell table:style-name="ce3" office:value-type="percentage" office:value="0.1942" calcext:value-type="percentage">
            <text:p>19,42%</text:p>
          </table:table-cell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536" calcext:value-type="percentage">
            <text:p>15,36%</text:p>
          </table:table-cell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681" calcext:value-type="percentage">
            <text:p>16,81%</text:p>
          </table:table-cell>
          <table:table-cell table:style-name="ce3" office:value-type="percentage" office:value="0.2246" calcext:value-type="percentage">
            <text:p>22,46%</text:p>
          </table:table-cell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536" calcext:value-type="percentage">
            <text:p>25,36%</text:p>
          </table:table-cell>
          <table:table-cell table:style-name="ce3" office:value-type="percentage" office:value="0.2957" calcext:value-type="percentage">
            <text:p>29,57%</text:p>
          </table:table-cell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04" calcext:value-type="percentage">
            <text:p>13,04%</text:p>
          </table:table-cell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1971" calcext:value-type="percentage">
            <text:p>19,71%</text:p>
          </table:table-cell>
          <table:table-cell table:style-name="ce3" office:value-type="percentage" office:value="0.2638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899" calcext:value-type="percentage">
            <text:p>18,99%</text:p>
          </table:table-cell>
        </table:table-row>
        <table:table-row table:style-name="ro1">
          <table:table-cell table:style-name="ce1"/>
          <table:table-cell table:style-name="ce1" table:formula="of:=AVERAGE([.B50:.B59])" office:value-type="percentage" office:value="0.154" calcext:value-type="percentage">
            <text:p>15,40%</text:p>
          </table:table-cell>
          <table:table-cell table:style-name="ce1" table:formula="of:=AVERAGE([.C50:.C59])" office:value-type="percentage" office:value="0.194" calcext:value-type="percentage">
            <text:p>19,40%</text:p>
          </table:table-cell>
          <table:table-cell/>
          <table:table-cell table:style-name="ce1"/>
          <table:table-cell table:style-name="ce1" table:formula="of:=AVERAGE([.F50:.F59])" office:value-type="percentage" office:value="0.1781" calcext:value-type="percentage">
            <text:p>17,81%</text:p>
          </table:table-cell>
          <table:table-cell table:style-name="ce1" table:formula="of:=AVERAGE([.G50:.G59])" office:value-type="percentage" office:value="0.20942" calcext:value-type="percentage">
            <text:p>20,9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Bands_5</text:p>
          </table:table-cell>
          <table:table-cell table:number-columns-repeated="2" office:value-type="percentage" office:value="0.4111" calcext:value-type="percentage">
            <text:p>41,11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861" calcext:value-type="percentage">
            <text:p>48,61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861" calcext:value-type="percentage">
            <text:p>28,61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306" calcext:value-type="percentage">
            <text:p>43,06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table:style-name="ce1"/>
          <table:table-cell table:style-name="ce1" table:formula="of:=AVERAGE([.B62:.B71])" office:value-type="percentage" office:value="0.36167" calcext:value-type="percentage">
            <text:p>36,17%</text:p>
          </table:table-cell>
          <table:table-cell table:style-name="ce1" table:formula="of:=AVERAGE([.C62:.C71])" office:value-type="percentage" office:value="0.36611" calcext:value-type="percentage">
            <text:p>36,61%</text:p>
          </table:table-cell>
          <table:table-cell/>
          <table:table-cell table:style-name="ce1"/>
          <table:table-cell table:style-name="ce1" table:formula="of:=AVERAGE([.F62:.F71])" office:value-type="percentage" office:value="0.0529" calcext:value-type="percentage">
            <text:p>5,29%</text:p>
          </table:table-cell>
          <table:table-cell table:style-name="ce1" table:formula="of:=AVERAGE([.G62:.G71])" office:value-type="percentage" office:value="0.0642" calcext:value-type="percentage">
            <text:p>6,4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483" calcext:value-type="percentage">
            <text:p>64,83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069" calcext:value-type="percentage">
            <text:p>50,69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241" calcext:value-type="percentage">
            <text:p>52,41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114" calcext:value-type="percentage">
            <text:p>41,14%</text:p>
          </table:table-cell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414" calcext:value-type="percentage">
            <text:p>54,14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5229" calcext:value-type="percentage">
            <text:p>52,29%</text:p>
          </table:table-cell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414" calcext:value-type="percentage">
            <text:p>34,1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86" calcext:value-type="percentage">
            <text:p>40,86%</text:p>
          </table:table-cell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4029" calcext:value-type="percentage">
            <text:p>40,29%</text:p>
          </table:table-cell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571" calcext:value-type="percentage">
            <text:p>45,71%</text:p>
          </table:table-cell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4543" calcext:value-type="percentage">
            <text:p>45,43%</text:p>
          </table:table-cell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table:style-name="ce1"/>
          <table:table-cell table:style-name="ce1" table:formula="of:=AVERAGE([.B75:.B84])" office:value-type="percentage" office:value="0.5038" calcext:value-type="percentage">
            <text:p>50,38%</text:p>
          </table:table-cell>
          <table:table-cell table:style-name="ce1" table:formula="of:=AVERAGE([.C75:.C84])" office:value-type="percentage" office:value="0.48863" calcext:value-type="percentage">
            <text:p>48,86%</text:p>
          </table:table-cell>
          <table:table-cell/>
          <table:table-cell table:style-name="ce1"/>
          <table:table-cell table:style-name="ce1" table:formula="of:=AVERAGE([.F75:.F84])" office:value-type="percentage" office:value="0.40829" calcext:value-type="percentage">
            <text:p>40,83%</text:p>
          </table:table-cell>
          <table:table-cell table:style-name="ce1" table:formula="of:=AVERAGE([.G75:.G84])" office:value-type="percentage" office:value="0.41944" calcext:value-type="percentage">
            <text:p>41,9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6364" calcext:value-type="percentage">
            <text:p>63,64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182" calcext:value-type="percentage">
            <text:p>51,82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576" calcext:value-type="percentage">
            <text:p>65,76%</text:p>
          </table:table-cell>
          <table:table-cell office:value-type="percentage" office:value="0.6727" calcext:value-type="percentage">
            <text:p>67,2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603" calcext:value-type="percentage">
            <text:p>60,30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879" calcext:value-type="percentage">
            <text:p>68,79%</text:p>
          </table:table-cell>
          <table:table-cell office:value-type="percentage" office:value="0.6818" calcext:value-type="percentage">
            <text:p>68,18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576" calcext:value-type="percentage">
            <text:p>55,76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758" calcext:value-type="percentage">
            <text:p>67,58%</text:p>
          </table:table-cell>
          <table:table-cell office:value-type="percentage" office:value="0.697" calcext:value-type="percentage">
            <text:p>69,70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10</text:p>
          </table:table-cell>
          <table:table-cell table:number-columns-repeated="2" office:value-type="percentage" office:value="0.6545" calcext:value-type="percentage">
            <text:p>65,45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table:style-name="ce1"/>
          <table:table-cell table:style-name="ce1" table:formula="of:=AVERAGE([.B88:.B97])" office:value-type="percentage" office:value="0.59515" calcext:value-type="percentage">
            <text:p>59,52%</text:p>
          </table:table-cell>
          <table:table-cell table:style-name="ce1" table:formula="of:=AVERAGE([.C88:.C97])" office:value-type="percentage" office:value="0.60758" calcext:value-type="percentage">
            <text:p>60,76%</text:p>
          </table:table-cell>
          <table:table-cell/>
          <table:table-cell table:style-name="ce1"/>
          <table:table-cell table:style-name="ce1" table:formula="of:=AVERAGE([.F88:.F97])" office:value-type="percentage" office:value="0.24" calcext:value-type="percentage">
            <text:p>24,00%</text:p>
          </table:table-cell>
          <table:table-cell table:style-name="ce1" table:formula="of:=AVERAGE([.G88:.G97])" office:value-type="percentage" office:value="0.211" calcext:value-type="percentage">
            <text:p>21,1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429" calcext:value-type="percentage">
            <text:p>64,29%</text:p>
          </table:table-cell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468" calcext:value-type="percentage">
            <text:p>14,68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381" calcext:value-type="percentage">
            <text:p>63,81%</text:p>
          </table:table-cell>
          <table:table-cell office:value-type="percentage" office:value="0.7857" calcext:value-type="percentage">
            <text:p>78,57%</text:p>
          </table:table-cell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6857" calcext:value-type="percentage">
            <text:p>68,57%</text:p>
          </table:table-cell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403" calcext:value-type="percentage">
            <text:p>14,03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905" calcext:value-type="percentage">
            <text:p>59,05%</text:p>
          </table:table-cell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871" calcext:value-type="percentage">
            <text:p>18,7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857" calcext:value-type="percentage">
            <text:p>58,57%</text:p>
          </table:table-cell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758" calcext:value-type="percentage">
            <text:p>7,58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286" calcext:value-type="percentage">
            <text:p>52,86%</text:p>
          </table:table-cell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113" calcext:value-type="percentage">
            <text:p>21,13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1452" calcext:value-type="percentage">
            <text:p>14,5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5952" calcext:value-type="percentage">
            <text:p>59,52%</text:p>
          </table:table-cell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4286" calcext:value-type="percentage">
            <text:p>42,86%</text:p>
          </table:table-cell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7381" calcext:value-type="percentage">
            <text:p>73,81%</text:p>
          </table:table-cell>
        </table:table-row>
        <table:table-row table:style-name="ro1">
          <table:table-cell table:style-name="ce1"/>
          <table:table-cell table:style-name="ce1" table:formula="of:=AVERAGE([.B101:.B110])" office:value-type="percentage" office:value="0.17839" calcext:value-type="percentage">
            <text:p>17,84%</text:p>
          </table:table-cell>
          <table:table-cell table:style-name="ce1" table:formula="of:=AVERAGE([.C101:.C110])" office:value-type="percentage" office:value="0.16968" calcext:value-type="percentage">
            <text:p>16,97%</text:p>
          </table:table-cell>
          <table:table-cell/>
          <table:table-cell table:style-name="ce1"/>
          <table:table-cell table:style-name="ce1" table:formula="of:=AVERAGE([.F101:.F110])" office:value-type="percentage" office:value="0.51618" calcext:value-type="percentage">
            <text:p>51,62%</text:p>
          </table:table-cell>
          <table:table-cell table:style-name="ce1" table:formula="of:=AVERAGE([.G101:.G110])" office:value-type="percentage" office:value="0.62143" calcext:value-type="percentage">
            <text:p>62,1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077" calcext:value-type="percentage">
            <text:p>40,77%</text:p>
          </table:table-cell>
          <table:table-cell office:value-type="percentage" office:value="0.5308" calcext:value-type="percentage">
            <text:p>53,08%</text:p>
          </table:table-cell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846" calcext:value-type="percentage">
            <text:p>28,46%</text:p>
          </table:table-cell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154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077" calcext:value-type="percentage">
            <text:p>60,77%</text:p>
          </table:table-cell>
          <table:table-cell office:value-type="percentage" office:value="0.5769" calcext:value-type="percentage">
            <text:p>57,69%</text:p>
          </table:table-cell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5231" calcext:value-type="percentage">
            <text:p>52,31%</text:p>
          </table:table-cell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54" calcext:value-type="percentage">
            <text:p>31,54%</text:p>
          </table:table-cell>
        </table:table-row>
        <table:table-row table:style-name="ro1">
          <table:table-cell office:value-type="string" calcext:value-type="string">
            <text:p>Haberman_9</text:p>
          </table:table-cell>
          <table:table-cell table:number-columns-repeated="2"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769" calcext:value-type="percentage">
            <text:p>47,69%</text:p>
          </table:table-cell>
        </table:table-row>
        <table:table-row table:style-name="ro1">
          <table:table-cell table:style-name="ce1"/>
          <table:table-cell table:style-name="ce1" table:formula="of:=AVERAGE([.B114:.B123])" office:value-type="percentage" office:value="0.27533" calcext:value-type="percentage">
            <text:p>27,53%</text:p>
          </table:table-cell>
          <table:table-cell table:style-name="ce1" table:formula="of:=AVERAGE([.C114:.C123])" office:value-type="percentage" office:value="0.26767" calcext:value-type="percentage">
            <text:p>26,77%</text:p>
          </table:table-cell>
          <table:table-cell/>
          <table:table-cell table:style-name="ce1"/>
          <table:table-cell table:style-name="ce1" table:formula="of:=AVERAGE([.F114:.F123])" office:value-type="percentage" office:value="0.38076" calcext:value-type="percentage">
            <text:p>38,08%</text:p>
          </table:table-cell>
          <table:table-cell table:style-name="ce1" table:formula="of:=AVERAGE([.G114:.G123])" office:value-type="percentage" office:value="0.42385" calcext:value-type="percentage">
            <text:p>42,39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eart_1</text:p>
          </table:table-cell>
          <table:table-cell table:number-columns-repeated="2"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33" calcext:value-type="percentage">
            <text:p>26,33%</text:p>
          </table:table-cell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33" calcext:value-type="percentage">
            <text:p>20,33%</text:p>
          </table:table-cell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table:number-columns-repeated="2"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926" calcext:value-type="percentage">
            <text:p>19,26%</text:p>
          </table:table-cell>
          <table:table-cell/>
          <table:table-cell office:value-type="string" calcext:value-type="string">
            <text:p>HeartAttack_5</text:p>
          </table:table-cell>
          <table:table-cell table:number-columns-repeated="2"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eartAttack_6</text:p>
          </table:table-cell>
          <table:table-cell table:number-columns-repeated="2"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67" calcext:value-type="percentage">
            <text:p>12,67%</text:p>
          </table:table-cell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926" calcext:value-type="percentage">
            <text:p>39,26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667" calcext:value-type="percentage">
            <text:p>16,67%</text:p>
          </table:table-cell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967" calcext:value-type="percentage">
            <text:p>19,67%</text:p>
          </table:table-cell>
        </table:table-row>
        <table:table-row table:style-name="ro1">
          <table:table-cell table:style-name="ce1"/>
          <table:table-cell table:style-name="ce1" table:formula="of:=AVERAGE([.B127:.B136])" office:value-type="percentage" office:value="0.21594" calcext:value-type="percentage">
            <text:p>21,59%</text:p>
          </table:table-cell>
          <table:table-cell table:style-name="ce1" table:formula="of:=AVERAGE([.C127:.C136])" office:value-type="percentage" office:value="0.23335" calcext:value-type="percentage">
            <text:p>23,34%</text:p>
          </table:table-cell>
          <table:table-cell/>
          <table:table-cell table:style-name="ce1"/>
          <table:table-cell table:style-name="ce1" table:formula="of:=AVERAGE([.F127:.F136])" office:value-type="percentage" office:value="0.18833" calcext:value-type="percentage">
            <text:p>18,83%</text:p>
          </table:table-cell>
          <table:table-cell table:style-name="ce1" table:formula="of:=AVERAGE([.G127:.G136])" office:value-type="percentage" office:value="0.18867" calcext:value-type="percentage">
            <text:p>18,8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6" calcext:value-type="percentage">
            <text:p>56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7067" calcext:value-type="percentage">
            <text:p>70,6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2" calcext:value-type="percentage">
            <text:p>62,00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733" calcext:value-type="percentage">
            <text:p>57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5467" calcext:value-type="percentage">
            <text:p>54,67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4133" calcext:value-type="percentage">
            <text:p>41,33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table:style-name="ce1"/>
          <table:table-cell table:style-name="ce1" table:formula="of:=AVERAGE([.B140:.B149])" office:value-type="percentage" office:value="0.506" calcext:value-type="percentage">
            <text:p>50,60%</text:p>
          </table:table-cell>
          <table:table-cell table:style-name="ce1" table:formula="of:=AVERAGE([.C140:.C149])" office:value-type="percentage" office:value="0.50533" calcext:value-type="percentage">
            <text:p>50,53%</text:p>
          </table:table-cell>
          <table:table-cell/>
          <table:table-cell table:style-name="ce1"/>
          <table:table-cell table:style-name="ce1" table:formula="of:=AVERAGE([.F140:.F149])" office:value-type="percentage" office:value="0.104" calcext:value-type="percentage">
            <text:p>10,40%</text:p>
          </table:table-cell>
          <table:table-cell table:style-name="ce1" table:formula="of:=AVERAGE([.G140:.G149])" office:value-type="percentage" office:value="0.119" calcext:value-type="percentage">
            <text:p>11,9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229" calcext:value-type="percentage">
            <text:p>12,29%</text:p>
          </table:table-cell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697" calcext:value-type="percentage">
            <text:p>6,97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1343" calcext:value-type="percentage">
            <text:p>13,43%</text:p>
          </table:table-cell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943" calcext:value-type="percentage">
            <text:p>9,43%</text:p>
          </table:table-cell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2114" calcext:value-type="percentage">
            <text:p>21,14%</text:p>
          </table:table-cell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29" calcext:value-type="percentage">
            <text:p>6,29%</text:p>
          </table:table-cell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71" calcext:value-type="percentage">
            <text:p>23,71%</text:p>
          </table:table-cell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829" calcext:value-type="percentage">
            <text:p>18,29%</text:p>
          </table:table-cell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71" calcext:value-type="percentage">
            <text:p>9,71%</text:p>
          </table:table-cell>
        </table:table-row>
        <table:table-row table:style-name="ro1">
          <table:table-cell table:style-name="ce1"/>
          <table:table-cell table:style-name="ce1" table:formula="of:=AVERAGE([.B153:.B162])" office:value-type="percentage" office:value="0.05347" calcext:value-type="percentage">
            <text:p>5,35%</text:p>
          </table:table-cell>
          <table:table-cell table:style-name="ce1" table:formula="of:=AVERAGE([.C153:.C162])" office:value-type="percentage" office:value="0.06349" calcext:value-type="percentage">
            <text:p>6,35%</text:p>
          </table:table-cell>
          <table:table-cell/>
          <table:table-cell table:style-name="ce1"/>
          <table:table-cell table:style-name="ce1" table:formula="of:=AVERAGE([.F153:.F162])" office:value-type="percentage" office:value="0.11829" calcext:value-type="percentage">
            <text:p>11,83%</text:p>
          </table:table-cell>
          <table:table-cell table:style-name="ce1" table:formula="of:=AVERAGE([.G153:.G162])" office:value-type="percentage" office:value="0.14115" calcext:value-type="percentage">
            <text:p>14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235" calcext:value-type="percentage">
            <text:p>22,35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36" calcext:value-type="percentage">
            <text:p>20,36%</text:p>
          </table:table-cell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441" calcext:value-type="percentage">
            <text:p>24,41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602" calcext:value-type="percentage">
            <text:p>16,02%</text:p>
          </table:table-cell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2824" calcext:value-type="percentage">
            <text:p>2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31" calcext:value-type="percentage">
            <text:p>18,31%</text:p>
          </table:table-cell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29" calcext:value-type="percentage">
            <text:p>45,2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169" calcext:value-type="percentage">
            <text:p>21,69%</text:p>
          </table:table-cell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301" calcext:value-type="percentage">
            <text:p>13,01%</text:p>
          </table:table-cell>
          <table:table-cell office:value-type="percentage" office:value="0.1349" calcext:value-type="percentage">
            <text:p>13,49%</text:p>
          </table:table-cell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711" calcext:value-type="percentage">
            <text:p>17,11%</text:p>
          </table:table-cell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2313" calcext:value-type="percentage">
            <text:p>23,13%</text:p>
          </table:table-cell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2412" calcext:value-type="percentage">
            <text:p>24,12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048" calcext:value-type="percentage">
            <text:p>20,48%</text:p>
          </table:table-cell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86" calcext:value-type="percentage">
            <text:p>13,86%</text:p>
          </table:table-cell>
        </table:table-row>
        <table:table-row table:style-name="ro1">
          <table:table-cell table:style-name="ce1"/>
          <table:table-cell table:style-name="ce1" table:formula="of:=AVERAGE([.B166:.B175])" office:value-type="percentage" office:value="0.29766" calcext:value-type="percentage">
            <text:p>29,77%</text:p>
          </table:table-cell>
          <table:table-cell table:style-name="ce1" table:formula="of:=AVERAGE([.C166:.C175])" office:value-type="percentage" office:value="0.29587" calcext:value-type="percentage">
            <text:p>29,59%</text:p>
          </table:table-cell>
          <table:table-cell/>
          <table:table-cell table:style-name="ce1"/>
          <table:table-cell table:style-name="ce1" table:formula="of:=AVERAGE([.F166:.F175])" office:value-type="percentage" office:value="0.17841" calcext:value-type="percentage">
            <text:p>17,84%</text:p>
          </table:table-cell>
          <table:table-cell table:style-name="ce1" table:formula="of:=AVERAGE([.G166:.G175])" office:value-type="percentage" office:value="0.1777" calcext:value-type="percentage">
            <text:p>17,7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237" calcext:value-type="percentage">
            <text:p>22,37%</text:p>
          </table:table-cell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84" calcext:value-type="percentage">
            <text:p>16,84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447" calcext:value-type="percentage">
            <text:p>24,47%</text:p>
          </table:table-cell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789" calcext:value-type="percentage">
            <text:p>27,89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434" calcext:value-type="percentage">
            <text:p>24,34%</text:p>
          </table:table-cell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1895" calcext:value-type="percentage">
            <text:p>18,95%</text:p>
          </table:table-cell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211" calcext:value-type="percentage">
            <text:p>22,11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1566" calcext:value-type="percentage">
            <text:p>15,66%</text:p>
          </table:table-cell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2868" calcext:value-type="percentage">
            <text:p>28,68%</text:p>
          </table:table-cell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303" calcext:value-type="percentage">
            <text:p>23,03%</text:p>
          </table:table-cell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89" calcext:value-type="percentage">
            <text:p>17,89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605" calcext:value-type="percentage">
            <text:p>26,05%</text:p>
          </table:table-cell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2" office:value-type="percentage" office:value="0.1211" calcext:value-type="percentage">
            <text:p>12,11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842" calcext:value-type="percentage">
            <text:p>28,42%</text:p>
          </table:table-cell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461" calcext:value-type="percentage">
            <text:p>24,61%</text:p>
          </table:table-cell>
        </table:table-row>
        <table:table-row table:style-name="ro1">
          <table:table-cell table:style-name="ce1"/>
          <table:table-cell table:style-name="ce1" table:formula="of:=AVERAGE([.B179:.B188])" office:value-type="percentage" office:value="0.16053" calcext:value-type="percentage">
            <text:p>16,05%</text:p>
          </table:table-cell>
          <table:table-cell table:style-name="ce1" table:formula="of:=AVERAGE([.C179:.C188])" office:value-type="percentage" office:value="0.15684" calcext:value-type="percentage">
            <text:p>15,68%</text:p>
          </table:table-cell>
          <table:table-cell/>
          <table:table-cell table:style-name="ce1"/>
          <table:table-cell table:style-name="ce1" table:formula="of:=AVERAGE([.F179:.F188])" office:value-type="percentage" office:value="0.23225" calcext:value-type="percentage">
            <text:p>23,23%</text:p>
          </table:table-cell>
          <table:table-cell table:style-name="ce1" table:formula="of:=AVERAGE([.G179:.G188])" office:value-type="percentage" office:value="0.23658" calcext:value-type="percentage">
            <text:p>23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952" calcext:value-type="percentage">
            <text:p>19,52%</text:p>
          </table:table-cell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2</text:p>
          </table:table-cell>
          <table:table-cell table:number-columns-repeated="2"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81" calcext:value-type="percentage">
            <text:p>25,81%</text:p>
          </table:table-cell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Regions2_4</text:p>
          </table:table-cell>
          <table:table-cell table:number-columns-repeated="2"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97" calcext:value-type="percentage">
            <text:p>30,97%</text:p>
          </table:table-cell>
          <table:table-cell office:value-type="percentage" office:value="0.3065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903" calcext:value-type="percentage">
            <text:p>29,03%</text:p>
          </table:table-cell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2" office:value-type="percentage" office:value="0.3226" calcext:value-type="percentage">
            <text:p>32,26%</text:p>
          </table:table-cell>
        </table:table-row>
        <table:table-row table:style-name="ro1">
          <table:table-cell table:style-name="ce1"/>
          <table:table-cell table:style-name="ce1" table:formula="of:=AVERAGE([.B192:.B201])" office:value-type="percentage" office:value="0.05461" calcext:value-type="percentage">
            <text:p>5,46%</text:p>
          </table:table-cell>
          <table:table-cell table:style-name="ce1" table:formula="of:=AVERAGE([.C192:.C201])" office:value-type="percentage" office:value="0.06334" calcext:value-type="percentage">
            <text:p>6,33%</text:p>
          </table:table-cell>
          <table:table-cell/>
          <table:table-cell table:style-name="ce1"/>
          <table:table-cell table:style-name="ce1" table:formula="of:=AVERAGE([.F192:.F201])" office:value-type="percentage" office:value="0.25429" calcext:value-type="percentage">
            <text:p>25,43%</text:p>
          </table:table-cell>
          <table:table-cell table:style-name="ce1" table:formula="of:=AVERAGE([.G192:.G201])" office:value-type="percentage" office:value="0.25662" calcext:value-type="percentage">
            <text:p>25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1957" calcext:value-type="percentage">
            <text:p>19,57%</text:p>
          </table:table-cell>
          <table:table-cell office:value-type="percentage" office:value="0.2087" calcext:value-type="percentage">
            <text:p>20,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413" calcext:value-type="percentage">
            <text:p>34,1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891" calcext:value-type="percentage">
            <text:p>38,91%</text:p>
          </table:table-cell>
          <table:table-cell office:value-type="percentage" office:value="0.3848" calcext:value-type="percentage">
            <text:p>38,48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239" calcext:value-type="percentage">
            <text:p>32,39%</text:p>
          </table:table-cell>
          <table:table-cell office:value-type="percentage" office:value="0.3283" calcext:value-type="percentage">
            <text:p>32,8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77" calcext:value-type="percentage">
            <text:p>33,77%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63" calcext:value-type="percentage">
            <text:p>2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3377" calcext:value-type="percentage">
            <text:p>33,77%</text:p>
          </table:table-cell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761" calcext:value-type="percentage">
            <text:p>27,61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table:style-name="ce1"/>
          <table:table-cell table:style-name="ce1" table:formula="of:=AVERAGE([.B205:.B214])" office:value-type="percentage" office:value="0.28935" calcext:value-type="percentage">
            <text:p>28,94%</text:p>
          </table:table-cell>
          <table:table-cell table:style-name="ce1" table:formula="of:=AVERAGE([.C205:.C214])" office:value-type="percentage" office:value="0.27999" calcext:value-type="percentage">
            <text:p>28,00%</text:p>
          </table:table-cell>
          <table:table-cell/>
          <table:table-cell table:style-name="ce1"/>
          <table:table-cell table:style-name="ce1" table:formula="of:=AVERAGE([.F205:.F214])" office:value-type="percentage" office:value="0.31947" calcext:value-type="percentage">
            <text:p>31,95%</text:p>
          </table:table-cell>
          <table:table-cell table:style-name="ce1" table:formula="of:=AVERAGE([.G205:.G214])" office:value-type="percentage" office:value="0.32728" calcext:value-type="percentage">
            <text:p>32,7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Spiral_1</text:p>
          </table:table-cell>
          <table:table-cell table:style-name="ce28" office:value-type="percentage" office:value="0.3805" calcext:value-type="percentage">
            <text:p>38,05%</text:p>
          </table:table-cell>
          <table:table-cell table:style-name="ce28"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2</text:p>
          </table:table-cell>
          <table:table-cell table:style-name="ce28" office:value-type="percentage" office:value="0.39" calcext:value-type="percentage">
            <text:p>39,00%</text:p>
          </table:table-cell>
          <table:table-cell table:style-name="ce28" office:value-type="percentage" office:value="0.3875" calcext:value-type="percentage">
            <text:p>38,75%</text:p>
          </table:table-cell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3</text:p>
          </table:table-cell>
          <table:table-cell table:style-name="ce28" office:value-type="percentage" office:value="0.407" calcext:value-type="percentage">
            <text:p>40,70%</text:p>
          </table:table-cell>
          <table:table-cell table:style-name="ce28"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4</text:p>
          </table:table-cell>
          <table:table-cell table:style-name="ce28" office:value-type="percentage" office:value="0.4425" calcext:value-type="percentage">
            <text:p>44,25%</text:p>
          </table:table-cell>
          <table:table-cell table:style-name="ce28" office:value-type="percentage" office:value="0.4445" calcext:value-type="percentage">
            <text:p>44,45%</text:p>
          </table:table-cell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Spiral_5</text:p>
          </table:table-cell>
          <table:table-cell table:style-name="ce28" office:value-type="percentage" office:value="0.4515" calcext:value-type="percentage">
            <text:p>45,15%</text:p>
          </table:table-cell>
          <table:table-cell table:style-name="ce28"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75" calcext:value-type="percentage">
            <text:p>17,50%</text:p>
          </table:table-cell>
          <table:table-cell/>
          <table:table-cell office:value-type="string" calcext:value-type="string">
            <text:p>Spiral_6</text:p>
          </table:table-cell>
          <table:table-cell table:style-name="ce28" office:value-type="percentage" office:value="0.3845" calcext:value-type="percentage">
            <text:p>38,45%</text:p>
          </table:table-cell>
          <table:table-cell table:style-name="ce28" office:value-type="percentage" office:value="0.4125" calcext:value-type="percentage">
            <text:p>41,25%</text:p>
          </table:table-cell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7</text:p>
          </table:table-cell>
          <table:table-cell table:style-name="ce28" office:value-type="percentage" office:value="0.4205" calcext:value-type="percentage">
            <text:p>42,05%</text:p>
          </table:table-cell>
          <table:table-cell table:style-name="ce28" office:value-type="percentage" office:value="0.4145" calcext:value-type="percentage">
            <text:p>41,45%</text:p>
          </table:table-cell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8</text:p>
          </table:table-cell>
          <table:table-cell table:style-name="ce28" office:value-type="percentage" office:value="0.3685" calcext:value-type="percentage">
            <text:p>36,85%</text:p>
          </table:table-cell>
          <table:table-cell table:style-name="ce28"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9</text:p>
          </table:table-cell>
          <table:table-cell table:style-name="ce28" office:value-type="percentage" office:value="0.4325" calcext:value-type="percentage">
            <text:p>43,25%</text:p>
          </table:table-cell>
          <table:table-cell table:style-name="ce28"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10</text:p>
          </table:table-cell>
          <table:table-cell table:style-name="ce28" office:value-type="percentage" office:value="0.4335" calcext:value-type="percentage">
            <text:p>43,35%</text:p>
          </table:table-cell>
          <table:table-cell table:style-name="ce28" office:value-type="percentage" office:value="0.434" calcext:value-type="percentage">
            <text:p>43,40%</text:p>
          </table:table-cell>
        </table:table-row>
        <table:table-row table:style-name="ro1">
          <table:table-cell table:style-name="ce1"/>
          <table:table-cell table:style-name="ce1" table:formula="of:=AVERAGE([.B217:.B226])" office:value-type="percentage" office:value="0.2295" calcext:value-type="percentage">
            <text:p>22,95%</text:p>
          </table:table-cell>
          <table:table-cell table:style-name="ce1" table:formula="of:=AVERAGE([.C217:.C226])" office:value-type="percentage" office:value="0.25" calcext:value-type="percentage">
            <text:p>25,00%</text:p>
          </table:table-cell>
          <table:table-cell/>
          <table:table-cell table:style-name="ce1"/>
          <table:table-cell table:style-name="ce1" table:formula="of:=AVERAGE([.F217:.F226])" office:value-type="percentage" office:value="0.4111" calcext:value-type="percentage">
            <text:p>41,11%</text:p>
          </table:table-cell>
          <table:table-cell table:style-name="ce1" table:formula="of:=AVERAGE([.G217:.G226])" office:value-type="percentage" office:value="0.4139" calcext:value-type="percentage">
            <text:p>41,39%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825" calcext:value-type="percentage">
            <text:p>18,25%</text:p>
          </table:table-cell>
          <table:table-cell/>
          <table:table-cell office:value-type="string" calcext:value-type="string">
            <text:p>Transfusion_1</text:p>
          </table:table-cell>
          <table:table-cell table:style-name="ce28" office:value-type="percentage" office:value="0.2689" calcext:value-type="percentage">
            <text:p>26,89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215" calcext:value-type="percentage">
            <text:p>21,50%</text:p>
          </table:table-cell>
          <table:table-cell/>
          <table:table-cell office:value-type="string" calcext:value-type="string">
            <text:p>Transfusion_2</text:p>
          </table:table-cell>
          <table:table-cell table:style-name="ce28" office:value-type="percentage" office:value="0.2351" calcext:value-type="percentage">
            <text:p>23,51%</text:p>
          </table:table-cell>
          <table:table-cell table:style-name="ce28" office:value-type="percentage" office:value="0.2378" calcext:value-type="percentage">
            <text:p>23,78%</text:p>
          </table:table-cell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Transfusion_3</text:p>
          </table:table-cell>
          <table:table-cell table:style-name="ce28" office:value-type="percentage" office:value="0.2676" calcext:value-type="percentage">
            <text:p>26,76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55" calcext:value-type="percentage">
            <text:p>15,50%</text:p>
          </table:table-cell>
          <table:table-cell/>
          <table:table-cell office:value-type="string" calcext:value-type="string">
            <text:p>Transfusion_4</text:p>
          </table:table-cell>
          <table:table-cell table:style-name="ce28" office:value-type="percentage" office:value="0.2811" calcext:value-type="percentage">
            <text:p>28,11%</text:p>
          </table:table-cell>
          <table:table-cell table:style-name="ce28" office:value-type="percentage" office:value="0.2932" calcext:value-type="percentage">
            <text:p>29,32%</text:p>
          </table:table-cell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475" calcext:value-type="percentage">
            <text:p>14,75%</text:p>
          </table:table-cell>
          <table:table-cell office:value-type="percentage" office:value="0.2175" calcext:value-type="percentage">
            <text:p>21,75%</text:p>
          </table:table-cell>
          <table:table-cell/>
          <table:table-cell office:value-type="string" calcext:value-type="string">
            <text:p>Transfusion_5</text:p>
          </table:table-cell>
          <table:table-cell table:style-name="ce28" office:value-type="percentage" office:value="0.2608" calcext:value-type="percentage">
            <text:p>26,08%</text:p>
          </table:table-cell>
          <table:table-cell table:style-name="ce28"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Transfusion_6</text:p>
          </table:table-cell>
          <table:table-cell table:style-name="ce28" office:value-type="percentage" office:value="0.2838" calcext:value-type="percentage">
            <text:p>28,38%</text:p>
          </table:table-cell>
          <table:table-cell table:style-name="ce28" office:value-type="percentage" office:value="0.2851" calcext:value-type="percentage">
            <text:p>28,51%</text:p>
          </table:table-cell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2125" calcext:value-type="percentage">
            <text:p>21,25%</text:p>
          </table:table-cell>
          <table:table-cell/>
          <table:table-cell office:value-type="string" calcext:value-type="string">
            <text:p>Transfusion_7</text:p>
          </table:table-cell>
          <table:table-cell table:style-name="ce28" office:value-type="percentage" office:value="0.3014" calcext:value-type="percentage">
            <text:p>30,14%</text:p>
          </table:table-cell>
          <table:table-cell table:style-name="ce28" office:value-type="percentage" office:value="0.3054" calcext:value-type="percentage">
            <text:p>30,54%</text:p>
          </table:table-cell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Transfusion_8</text:p>
          </table:table-cell>
          <table:table-cell table:style-name="ce28" office:value-type="percentage" office:value="0.2068" calcext:value-type="percentage">
            <text:p>20,68%</text:p>
          </table:table-cell>
          <table:table-cell table:style-name="ce28" office:value-type="percentage" office:value="0.2081" calcext:value-type="percentage">
            <text:p>20,81%</text:p>
          </table:table-cell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Transfusion_9</text:p>
          </table:table-cell>
          <table:table-cell table:style-name="ce28" office:value-type="percentage" office:value="0.2297" calcext:value-type="percentage">
            <text:p>22,97%</text:p>
          </table:table-cell>
          <table:table-cell table:style-name="ce28" office:value-type="percentage" office:value="0.2311" calcext:value-type="percentage">
            <text:p>23,11%</text:p>
          </table:table-cell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85" calcext:value-type="percentage">
            <text:p>8,50%</text:p>
          </table:table-cell>
          <table:table-cell/>
          <table:table-cell office:value-type="string" calcext:value-type="string">
            <text:p>Transfusion_10</text:p>
          </table:table-cell>
          <table:table-cell table:style-name="ce28" office:value-type="percentage" office:value="0.1986" calcext:value-type="percentage">
            <text:p>19,86%</text:p>
          </table:table-cell>
          <table:table-cell table:style-name="ce28" office:value-type="percentage" office:value="0.1932" calcext:value-type="percentage">
            <text:p>19,32%</text:p>
          </table:table-cell>
        </table:table-row>
        <table:table-row table:style-name="ro1">
          <table:table-cell table:style-name="ce1"/>
          <table:table-cell table:style-name="ce1" table:formula="of:=AVERAGE([.B230:.B239])" office:value-type="percentage" office:value="0.1145" calcext:value-type="percentage">
            <text:p>11,45%</text:p>
          </table:table-cell>
          <table:table-cell table:style-name="ce1" table:formula="of:=AVERAGE([.C230:.C239])" office:value-type="percentage" office:value="0.171" calcext:value-type="percentage">
            <text:p>17,10%</text:p>
          </table:table-cell>
          <table:table-cell/>
          <table:table-cell table:style-name="ce1"/>
          <table:table-cell table:style-name="ce1" table:formula="of:=AVERAGE([.F230:.F239])" office:value-type="percentage" office:value="0.25338" calcext:value-type="percentage">
            <text:p>25,34%</text:p>
          </table:table-cell>
          <table:table-cell table:style-name="ce1" table:formula="of:=AVERAGE([.G230:.G239])" office:value-type="percentage" office:value="0.25741" calcext:value-type="percentage">
            <text:p>25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882" calcext:value-type="percentage">
            <text:p>8,82%</text:p>
          </table:table-cell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054" calcext:value-type="percentage">
            <text:p>10,54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161" calcext:value-type="percentage">
            <text:p>1,61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36" calcext:value-type="percentage">
            <text:p>5,36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294" calcext:value-type="percentage">
            <text:p>12,94%</text:p>
          </table:table-cell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2"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1647" calcext:value-type="percentage">
            <text:p>16,47%</text:p>
          </table:table-cell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1118" calcext:value-type="percentage">
            <text:p>11,18%</text:p>
          </table:table-cell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1706" calcext:value-type="percentage">
            <text:p>17,06%</text:p>
          </table:table-cell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Wine_10</text:p>
          </table:table-cell>
          <table:table-cell table:number-columns-repeated="2" office:value-type="percentage" office:value="0.0765" calcext:value-type="percentage">
            <text:p>7,65%</text:p>
          </table:table-cell>
        </table:table-row>
        <table:table-row table:style-name="ro1">
          <table:table-cell table:style-name="ce1"/>
          <table:table-cell table:style-name="ce1" table:formula="of:=AVERAGE([.B242:.B251])" office:value-type="percentage" office:value="0.04745" calcext:value-type="percentage">
            <text:p>4,75%</text:p>
          </table:table-cell>
          <table:table-cell table:style-name="ce1" table:formula="of:=AVERAGE([.C242:.C251])" office:value-type="percentage" office:value="0.04537" calcext:value-type="percentage">
            <text:p>4,54%</text:p>
          </table:table-cell>
          <table:table-cell/>
          <table:table-cell table:style-name="ce1"/>
          <table:table-cell table:style-name="ce1" table:formula="of:=AVERAGE([.F242:.F251])" office:value-type="percentage" office:value="0.10706" calcext:value-type="percentage">
            <text:p>10,71%</text:p>
          </table:table-cell>
          <table:table-cell table:style-name="ce1" table:formula="of:=AVERAGE([.G242:.G251])" office:value-type="percentage" office:value="0.10117" calcext:value-type="percentage">
            <text:p>10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92" calcext:value-type="percentage">
            <text:p>79,20%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738" calcext:value-type="percentage">
            <text:p>73,80%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08" calcext:value-type="percentage">
            <text:p>70,80%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56" calcext:value-type="percentage">
            <text:p>75,60%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2"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48" calcext:value-type="percentage">
            <text:p>74,8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table:style-name="ce1"/>
          <table:table-cell table:style-name="ce1" table:formula="of:=AVERAGE([.B255:.B264])" office:value-type="percentage" office:value="0.06066" calcext:value-type="percentage">
            <text:p>6,07%</text:p>
          </table:table-cell>
          <table:table-cell table:style-name="ce1" table:formula="of:=AVERAGE([.C255:.C264])" office:value-type="percentage" office:value="0.05433" calcext:value-type="percentage">
            <text:p>5,43%</text:p>
          </table:table-cell>
          <table:table-cell/>
          <table:table-cell table:style-name="ce1"/>
          <table:table-cell table:style-name="ce1" table:formula="of:=AVERAGE([.F255:.F264])" office:value-type="percentage" office:value="0.7082" calcext:value-type="percentage">
            <text:p>70,82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6" calcext:value-type="percentage">
            <text:p>3,6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zonf_s_3</text:p>
          </table:table-cell>
          <table:table-cell table:number-columns-repeated="2"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zo_nf_s_4</text:p>
          </table:table-cell>
          <table:table-cell table:number-columns-repeated="2"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8" calcext:value-type="percentage">
            <text:p>1,80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176" calcext:value-type="percentage">
            <text:p>17,60%</text:p>
          </table:table-cell>
          <table:table-cell/>
          <table:table-cell office:value-type="string" calcext:value-type="string">
            <text:p>zonf_s_6</text:p>
          </table:table-cell>
          <table:table-cell table:number-columns-repeated="2"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02" calcext:value-type="percentage">
            <text:p>10,2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table:style-name="ce1"/>
          <table:table-cell table:style-name="ce1" table:formula="of:=AVERAGE([.B267:.B276])" office:value-type="percentage" office:value="0.05698" calcext:value-type="percentage">
            <text:p>5,70%</text:p>
          </table:table-cell>
          <table:table-cell table:style-name="ce1" table:formula="of:=AVERAGE([.C267:.C276])" office:value-type="percentage" office:value="0.0734" calcext:value-type="percentage">
            <text:p>7,34%</text:p>
          </table:table-cell>
          <table:table-cell/>
          <table:table-cell table:style-name="ce1"/>
          <table:table-cell table:style-name="ce1" table:formula="of:=AVERAGE([.F267:.F276])" office:value-type="percentage" office:value="0.026" calcext:value-type="percentage">
            <text:p>2,60%</text:p>
          </table:table-cell>
          <table:table-cell table:style-name="ce1" table:formula="of:=AVERAGE([.G267:.G276])" office:value-type="percentage" office:value="0.0252" calcext:value-type="percentage">
            <text:p>2,52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406" calcext:value-type="percentage">
            <text:p>34,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2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ce28" office:value-type="percentage" office:value="0.3904" calcext:value-type="percentage">
            <text:p>39,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4</text:p>
          </table:table-cell>
          <table:table-cell/>
          <table:table-cell office:value-type="percentage" office:value="0.3717" calcext:value-type="percentage">
            <text:p>37,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5</text:p>
          </table:table-cell>
          <table:table-cell/>
          <table:table-cell office:value-type="percentage" office:value="0.3499" calcext:value-type="percentage">
            <text:p>34,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6</text:p>
          </table:table-cell>
          <table:table-cell/>
          <table:table-cell office:value-type="percentage" office:value="0.3188" calcext:value-type="percentage">
            <text:p>31,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7</text:p>
          </table:table-cell>
          <table:table-cell/>
          <table:table-cell office:value-type="percentage" office:value="0.3328" calcext:value-type="percentage">
            <text:p>33,2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8</text:p>
          </table:table-cell>
          <table:table-cell/>
          <table:table-cell office:value-type="percentage" office:value="0.3624" calcext:value-type="percentage">
            <text:p>36,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9</text:p>
          </table:table-cell>
          <table:table-cell/>
          <table:table-cell office:value-type="percentage" office:value="0.3313" calcext:value-type="percentage">
            <text:p>33,1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10</text:p>
          </table:table-cell>
          <table:table-cell/>
          <table:table-cell office:value-type="percentage" office:value="0.3639" calcext:value-type="percentage">
            <text:p>36,39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AVERAGE([.B279:.B288])" office:value-type="percentage" office:value="0.3515" calcext:value-type="percentage">
            <text:p>35,15%</text:p>
          </table:table-cell>
          <table:table-cell table:style-name="ce1" table:formula="of:=AVERAGE([.C279:.C288])" office:value-type="percentage" office:value="0.35211" calcext:value-type="percentage">
            <text:p>35,21%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351" calcext:value-type="float">
            <text:p>0,351</text:p>
          </table:table-cell>
          <table:table-cell table:style-name="ce6" office:value-type="float" office:value="0.365" calcext:value-type="float">
            <text:p>0,365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37" calcext:value-type="float">
            <text:p>4,37E-01</text:p>
          </table:table-cell>
          <table:table-cell table:style-name="ce10" office:value-type="float" office:value="0.402" calcext:value-type="float">
            <text:p>4,02E-01</text:p>
          </table:table-cell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351" calcext:value-type="float">
            <text:p>0,351</text:p>
          </table:table-cell>
          <table:table-cell table:style-name="ce6" office:value-type="float" office:value="0.481" calcext:value-type="float">
            <text:p>0,481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19" calcext:value-type="float">
            <text:p>8,19E-01</text:p>
          </table:table-cell>
          <table:table-cell table:style-name="ce10" office:value-type="float" office:value="0.865" calcext:value-type="float">
            <text:p>8,65E-01</text:p>
          </table:table-cell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483" calcext:value-type="float">
            <text:p>0,483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office:value-type="float" office:value="0.133" calcext:value-type="float">
            <text:p>0,133</text:p>
          </table:table-cell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13" calcext:value-type="float">
            <text:p>1,13E-01</text:p>
          </table:table-cell>
          <table:table-cell table:style-name="ce10" office:value-type="float" office:value="0.198" calcext:value-type="float">
            <text:p>1,98E-01</text:p>
          </table:table-cell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434" calcext:value-type="float">
            <text:p>0,434</text:p>
          </table:table-cell>
          <table:table-cell table:style-name="ce6" office:value-type="float" office:value="0.6" calcext:value-type="float">
            <text:p>0,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22" calcext:value-type="float">
            <text:p>6,22E-01</text:p>
          </table:table-cell>
          <table:table-cell table:style-name="ce10" office:value-type="float" office:value="0.671" calcext:value-type="float">
            <text:p>6,71E-01</text:p>
          </table:table-cell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89" calcext:value-type="float">
            <text:p>0,289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596" calcext:value-type="float">
            <text:p>1,60E-01</text:p>
          </table:table-cell>
          <table:table-cell table:style-name="ce10" office:value-type="float" office:value="0.146" calcext:value-type="float">
            <text:p>1,46E-01</text:p>
          </table:table-cell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205" calcext:value-type="float">
            <text:p>0,205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0.867" calcext:value-type="float">
            <text:p>0,867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0249" calcext:value-type="float">
            <text:p>0,0249</text:p>
          </table:table-cell>
          <table:table-cell table:style-name="ce6" office:value-type="float" office:value="0.888" calcext:value-type="float">
            <text:p>0,888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3" calcext:value-type="float">
            <text:p>3,00E-01</text:p>
          </table:table-cell>
          <table:table-cell table:style-name="ce10" office:value-type="float" office:value="0.193" calcext:value-type="float">
            <text:p>1,93E-01</text:p>
          </table:table-cell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667" calcext:value-type="float">
            <text:p>0,667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2" calcext:value-type="float">
            <text:p>2,00E-01</text:p>
          </table:table-cell>
          <table:table-cell table:style-name="ce10" office:value-type="float" office:value="0.121" calcext:value-type="float">
            <text:p>1,21E-01</text:p>
          </table:table-cell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33" calcext:value-type="float">
            <text:p>0,33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13" calcext:value-type="float">
            <text:p>0,213</text:p>
          </table:table-cell>
          <table:table-cell table:style-name="ce6" office:value-type="float" office:value="0.23" calcext:value-type="float">
            <text:p>0,23</text:p>
          </table:table-cell>
        </table:table-row>
        <table:table-row table:style-name="ro3">
          <table:table-cell table:style-name="ce4"/>
          <table:table-cell table:style-name="ce7" table:formula="of:=AVERAGE([.B292:.B301])" office:value-type="float" office:value="0.39889" calcext:value-type="float">
            <text:p>0,39889</text:p>
          </table:table-cell>
          <table:table-cell table:style-name="ce7" table:formula="of:=AVERAGE([.C292:.C301])" office:value-type="float" office:value="0.55987" calcext:value-type="float">
            <text:p>0,55987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8986" calcext:value-type="float">
            <text:p>0,38986</text:p>
          </table:table-cell>
          <table:table-cell table:style-name="ce11" table:formula="of:=AVERAGE([.G292:.G301])" office:value-type="float" office:value="0.3799" calcext:value-type="float">
            <text:p>3,80E-01</text:p>
          </table:table-cell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375" calcext:value-type="float">
            <text:p>3,75E-01</text:p>
          </table:table-cell>
          <table:table-cell table:style-name="ce10" office:value-type="float" office:value="0.5" calcext:value-type="float">
            <text:p>5,00E-01</text:p>
          </table:table-cell>
        </table:table-row>
        <table:table-row table:style-name="ro1">
          <table:table-cell office:value-type="string" calcext:value-type="string">
            <text:p>NT_2</text:p>
          </table:table-cell>
          <table:table-cell table:number-columns-repeated="2" table:style-name="ce6" office:value-type="float" office:value="0.0537" calcext:value-type="float">
            <text:p>0,0537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475" calcext:value-type="float">
            <text:p>4,75E-02</text:p>
          </table:table-cell>
          <table:table-cell table:style-name="ce10" office:value-type="float" office:value="0.0736" calcext:value-type="float">
            <text:p>7,36E-02</text:p>
          </table:table-cell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97" calcext:value-type="float">
            <text:p>0,1097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0815" calcext:value-type="float">
            <text:p>0,0815</text:p>
          </table:table-cell>
          <table:table-cell table:style-name="ce6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 office:value-type="float" office:value="0.0876" calcext:value-type="float">
            <text:p>0,0876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8" calcext:value-type="float">
            <text:p>4,78E-02</text:p>
          </table:table-cell>
          <table:table-cell table:style-name="ce10" office:value-type="float" office:value="0.0429" calcext:value-type="float">
            <text:p>4,29E-02</text:p>
          </table:table-cell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91" calcext:value-type="float">
            <text:p>4,91E-02</text:p>
          </table:table-cell>
          <table:table-cell table:style-name="ce10" office:value-type="float" office:value="0.0473" calcext:value-type="float">
            <text:p>4,73E-02</text:p>
          </table:table-cell>
        </table:table-row>
        <table:table-row table:style-name="ro1">
          <table:table-cell office:value-type="string" calcext:value-type="string">
            <text:p>NT_6</text:p>
          </table:table-cell>
          <table:table-cell table:number-columns-repeated="2"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498" calcext:value-type="float">
            <text:p>1,50E-01</text:p>
          </table:table-cell>
          <table:table-cell table:style-name="ce10" office:value-type="float" office:value="0.118" calcext:value-type="float">
            <text:p>1,18E-01</text:p>
          </table:table-cell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74" calcext:value-type="float">
            <text:p>0,0374</text:p>
          </table:table-cell>
          <table:table-cell table:style-name="ce6" office:value-type="float" office:value="0.0388" calcext:value-type="float">
            <text:p>0,0388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3" calcext:value-type="float">
            <text:p>0,113</text:p>
          </table:table-cell>
          <table:table-cell table:style-name="ce6"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901" calcext:value-type="float">
            <text:p>0,0901</text:p>
          </table:table-cell>
          <table:table-cell table:style-name="ce6" office:value-type="float" office:value="0.09" calcext:value-type="float">
            <text:p>0,09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33" calcext:value-type="float">
            <text:p>2,33E-02</text:p>
          </table:table-cell>
          <table:table-cell table:style-name="ce10" office:value-type="float" office:value="0.0284" calcext:value-type="float">
            <text:p>2,84E-02</text:p>
          </table:table-cell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59" calcext:value-type="float">
            <text:p>0,0959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33" calcext:value-type="float">
            <text:p>2,33E-02</text:p>
          </table:table-cell>
          <table:table-cell table:style-name="ce10" office:value-type="float" office:value="0.0543" calcext:value-type="float">
            <text:p>5,43E-02</text:p>
          </table:table-cell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61" calcext:value-type="float">
            <text:p>0,0461</text:p>
          </table:table-cell>
          <table:table-cell table:style-name="ce6" office:value-type="float" office:value="0.0423" calcext:value-type="float">
            <text:p>0,0423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" calcext:value-type="float">
            <text:p>0,032</text:p>
          </table:table-cell>
          <table:table-cell table:style-name="ce6" office:value-type="float" office:value="0.0321" calcext:value-type="float">
            <text:p>0,0321</text:p>
          </table:table-cell>
        </table:table-row>
        <table:table-row table:style-name="ro3">
          <table:table-cell table:style-name="ce4"/>
          <table:table-cell table:style-name="ce7" table:formula="of:=AVERAGE([.B304:.B313])" office:value-type="float" office:value="0.08159" calcext:value-type="float">
            <text:p>0,08159</text:p>
          </table:table-cell>
          <table:table-cell table:style-name="ce7" table:formula="of:=AVERAGE([.C304:.C313])" office:value-type="float" office:value="0.08203" calcext:value-type="float">
            <text:p>0,08203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09423" calcext:value-type="float">
            <text:p>0,09423</text:p>
          </table:table-cell>
          <table:table-cell table:style-name="ce11" table:formula="of:=AVERAGE([.G304:.G313])" office:value-type="float" office:value="0.11406" calcext:value-type="float">
            <text:p>1,14E-01</text:p>
          </table:table-cell>
        </table:table-row>
        <table:table-row table:style-name="ro1">
          <table:table-cell table:style-name="Default" table:number-columns-repeated="6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25.239" calcext:value-type="float">
            <text:p>2225,239</text:p>
          </table:table-cell>
          <table:table-cell table:style-name="ce6" office:value-type="float" office:value="2488.966" calcext:value-type="float">
            <text:p>2488,966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18" calcext:value-type="float">
            <text:p>1,80E-03</text:p>
          </table:table-cell>
          <table:table-cell table:style-name="ce10" office:value-type="float" office:value="0.00619" calcext:value-type="float">
            <text:p>6,19E-03</text:p>
          </table:table-cell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769.296" calcext:value-type="float">
            <text:p>2769,296</text:p>
          </table:table-cell>
          <table:table-cell table:style-name="ce6" office:value-type="float" office:value="3234.763" calcext:value-type="float">
            <text:p>3234,763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151" calcext:value-type="float">
            <text:p>1,51E-04</text:p>
          </table:table-cell>
          <table:table-cell table:style-name="ce10" office:value-type="float" office:value="0.00024" calcext:value-type="float">
            <text:p>2,40E-04</text:p>
          </table:table-cell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2919.215" calcext:value-type="float">
            <text:p>2919,215</text:p>
          </table:table-cell>
          <table:table-cell table:style-name="ce6" office:value-type="float" office:value="3162.861" calcext:value-type="float">
            <text:p>3162,86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285" calcext:value-type="float">
            <text:p>0,00285</text:p>
          </table:table-cell>
          <table:table-cell table:style-name="ce6" office:value-type="float" office:value="0.0058" calcext:value-type="float">
            <text:p>0,0058</text:p>
          </table:table-cell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483.608" calcext:value-type="float">
            <text:p>2483,608</text:p>
          </table:table-cell>
          <table:table-cell table:style-name="ce6" office:value-type="float" office:value="2685.587" calcext:value-type="float">
            <text:p>2685,587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954" calcext:value-type="float">
            <text:p>9,54E-04</text:p>
          </table:table-cell>
          <table:table-cell table:style-name="ce10" office:value-type="float" office:value="0.00175" calcext:value-type="float">
            <text:p>1,75E-03</text:p>
          </table:table-cell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695.583" calcext:value-type="float">
            <text:p>2695,583</text:p>
          </table:table-cell>
          <table:table-cell table:style-name="ce6" office:value-type="float" office:value="2922.704" calcext:value-type="float">
            <text:p>2922,704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074" calcext:value-type="float">
            <text:p>7,40E-04</text:p>
          </table:table-cell>
          <table:table-cell table:style-name="ce10" office:value-type="float" office:value="0.00282" calcext:value-type="float">
            <text:p>2,82E-03</text:p>
          </table:table-cell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242.578" calcext:value-type="float">
            <text:p>2242,578</text:p>
          </table:table-cell>
          <table:table-cell table:style-name="ce6" office:value-type="float" office:value="2919.348" calcext:value-type="float">
            <text:p>2919,348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19" calcext:value-type="float">
            <text:p>1,19E-04</text:p>
          </table:table-cell>
          <table:table-cell table:style-name="ce10" office:value-type="float" office:value="0.000417" calcext:value-type="float">
            <text:p>4,17E-04</text:p>
          </table:table-cell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13.101" calcext:value-type="float">
            <text:p>2413,101</text:p>
          </table:table-cell>
          <table:table-cell table:style-name="ce6" office:value-type="float" office:value="2608.345" calcext:value-type="float">
            <text:p>2608,345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10" office:value-type="float" office:value="0.0000664" calcext:value-type="float">
            <text:p>6,64E-05</text:p>
          </table:table-cell>
          <table:table-cell table:style-name="ce6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2922.594" calcext:value-type="float">
            <text:p>2922,594</text:p>
          </table:table-cell>
          <table:table-cell table:style-name="ce6" office:value-type="float" office:value="3405.391" calcext:value-type="float">
            <text:p>3405,391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0578" calcext:value-type="float">
            <text:p>5,78E-05</text:p>
          </table:table-cell>
          <table:table-cell table:style-name="ce10" office:value-type="float" office:value="0.00067" calcext:value-type="float">
            <text:p>6,70E-04</text:p>
          </table:table-cell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379.76" calcext:value-type="float">
            <text:p>2379,76</text:p>
          </table:table-cell>
          <table:table-cell table:style-name="ce6" office:value-type="float" office:value="2641.373" calcext:value-type="float">
            <text:p>2641,373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137" calcext:value-type="float">
            <text:p>1,37E-03</text:p>
          </table:table-cell>
          <table:table-cell table:style-name="ce10" office:value-type="float" office:value="0.00262" calcext:value-type="float">
            <text:p>2,62E-03</text:p>
          </table:table-cell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28.661" calcext:value-type="float">
            <text:p>2528,661</text:p>
          </table:table-cell>
          <table:table-cell table:style-name="ce6" office:value-type="float" office:value="2707.366" calcext:value-type="float">
            <text:p>2707,366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115" calcext:value-type="float">
            <text:p>0,00115</text:p>
          </table:table-cell>
          <table:table-cell table:style-name="ce6" office:value-type="float" office:value="0.00231" calcext:value-type="float">
            <text:p>0,00231</text:p>
          </table:table-cell>
        </table:table-row>
        <table:table-row table:style-name="ro3">
          <table:table-cell table:style-name="ce4"/>
          <table:table-cell table:style-name="ce7" table:formula="of:=AVERAGE([.B317:.B326])" office:value-type="float" office:value="2557.9635" calcext:value-type="float">
            <text:p>2557,9635</text:p>
          </table:table-cell>
          <table:table-cell table:style-name="ce7" table:formula="of:=AVERAGE([.C317:.C326])" office:value-type="float" office:value="2877.6704" calcext:value-type="float">
            <text:p>2877,6704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092582" calcext:value-type="float">
            <text:p>0,00092582</text:p>
          </table:table-cell>
          <table:table-cell table:style-name="ce11" table:formula="of:=AVERAGE([.G317:.G326])" office:value-type="float" office:value="0.0024097" calcext:value-type="float">
            <text:p>2,41E-03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  <table:table-cell table:style-name="ce4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office:value-type="float" office:value="0.246" calcext:value-type="float">
            <text:p>0,246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847.837" calcext:value-type="float">
            <text:p>1847,837</text:p>
          </table:table-cell>
          <table:table-cell table:style-name="ce6" office:value-type="float" office:value="1857.95" calcext:value-type="float">
            <text:p>1857,95</text:p>
          </table:table-cell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223" calcext:value-type="float">
            <text:p>0,223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005.373" calcext:value-type="float">
            <text:p>1005,373</text:p>
          </table:table-cell>
          <table:table-cell table:style-name="ce6" office:value-type="float" office:value="958.275" calcext:value-type="float">
            <text:p>958,275</text:p>
          </table:table-cell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 office:value-type="float" office:value="0.1496" calcext:value-type="float">
            <text:p>0,149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1927.967" calcext:value-type="float">
            <text:p>1927,967</text:p>
          </table:table-cell>
          <table:table-cell table:style-name="ce6" office:value-type="float" office:value="2155.326" calcext:value-type="float">
            <text:p>2155,326</text:p>
          </table:table-cell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4" calcext:value-type="float">
            <text:p>0,344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971.604" calcext:value-type="float">
            <text:p>2971,604</text:p>
          </table:table-cell>
          <table:table-cell table:style-name="ce6" office:value-type="float" office:value="2402.069" calcext:value-type="float">
            <text:p>2402,069</text:p>
          </table:table-cell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338" calcext:value-type="float">
            <text:p>0,338</text:p>
          </table:table-cell>
          <table:table-cell table:style-name="ce6" office:value-type="float" office:value="0.343" calcext:value-type="float">
            <text:p>0,34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19.251" calcext:value-type="float">
            <text:p>1319,251</text:p>
          </table:table-cell>
          <table:table-cell table:style-name="ce6" office:value-type="float" office:value="1385.471" calcext:value-type="float">
            <text:p>1385,471</text:p>
          </table:table-cell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698.307" calcext:value-type="float">
            <text:p>698,307</text:p>
          </table:table-cell>
          <table:table-cell table:style-name="ce6" office:value-type="float" office:value="704.963" calcext:value-type="float">
            <text:p>704,963</text:p>
          </table:table-cell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85" calcext:value-type="float">
            <text:p>0,0785</text:p>
          </table:table-cell>
          <table:table-cell table:style-name="ce6" office:value-type="float" office:value="0.067" calcext:value-type="float">
            <text:p>0,06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982.343" calcext:value-type="float">
            <text:p>1982,343</text:p>
          </table:table-cell>
          <table:table-cell table:style-name="ce6" office:value-type="float" office:value="1973.622" calcext:value-type="float">
            <text:p>1973,622</text:p>
          </table:table-cell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9.256" calcext:value-type="float">
            <text:p>2689,256</text:p>
          </table:table-cell>
          <table:table-cell table:style-name="ce6" office:value-type="float" office:value="2582.138" calcext:value-type="float">
            <text:p>2582,138</text:p>
          </table:table-cell>
        </table:table-row>
        <table:table-row table:style-name="ro2">
          <table:table-cell office:value-type="string" calcext:value-type="string">
            <text:p>BK_9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45.297" calcext:value-type="float">
            <text:p>2345,297</text:p>
          </table:table-cell>
          <table:table-cell table:style-name="ce6" office:value-type="float" office:value="2015.852" calcext:value-type="float">
            <text:p>2015,852</text:p>
          </table:table-cell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33" calcext:value-type="float">
            <text:p>0,133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840.703" calcext:value-type="float">
            <text:p>1840,703</text:p>
          </table:table-cell>
          <table:table-cell table:style-name="ce6" office:value-type="float" office:value="1681.286" calcext:value-type="float">
            <text:p>1681,286</text:p>
          </table:table-cell>
        </table:table-row>
        <table:table-row table:style-name="ro3">
          <table:table-cell table:style-name="ce1"/>
          <table:table-cell table:style-name="ce5" table:formula="of:=AVERAGE([.B329:.B338])" office:value-type="float" office:value="0.19925" calcext:value-type="float">
            <text:p>0,19925</text:p>
          </table:table-cell>
          <table:table-cell table:style-name="ce5" table:formula="of:=AVERAGE([.C329:.C338])" office:value-type="float" office:value="0.17956" calcext:value-type="float">
            <text:p>0,17956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862.7938" calcext:value-type="float">
            <text:p>1862,7938</text:p>
          </table:table-cell>
          <table:table-cell table:style-name="ce7" table:formula="of:=AVERAGE([.G329:.G338])" office:value-type="float" office:value="1771.6952" calcext:value-type="float">
            <text:p>1771,6952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39" calcext:value-type="float">
            <text:p>0,639</text:p>
          </table:table-cell>
          <table:table-cell table:style-name="ce6" office:value-type="float" office:value="0.682" calcext:value-type="float">
            <text:p>0,68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609" calcext:value-type="float">
            <text:p>0,609</text:p>
          </table:table-cell>
          <table:table-cell table:style-name="ce6" office:value-type="float" office:value="0.583" calcext:value-type="float">
            <text:p>0,583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78" calcext:value-type="float">
            <text:p>4,78</text:p>
          </table:table-cell>
          <table:table-cell table:style-name="ce6"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6.55" calcext:value-type="float">
            <text:p>6,55</text:p>
          </table:table-cell>
          <table:table-cell table:style-name="ce6"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28" calcext:value-type="float">
            <text:p>4,28</text:p>
          </table:table-cell>
          <table:table-cell table:style-name="ce6"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7.05" calcext:value-type="float">
            <text:p>7,05</text:p>
          </table:table-cell>
          <table:table-cell table:style-name="ce6" office:value-type="float" office:value="6.84" calcext:value-type="float">
            <text:p>6,84</text:p>
          </table:table-cell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79" calcext:value-type="float">
            <text:p>7,79</text:p>
          </table:table-cell>
          <table:table-cell table:style-name="ce6"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508" calcext:value-type="float">
            <text:p>0,508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39" calcext:value-type="float">
            <text:p>8,39</text:p>
          </table:table-cell>
          <table:table-cell table:style-name="ce6"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85" calcext:value-type="float">
            <text:p>0,585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19" calcext:value-type="float">
            <text:p>5,19</text:p>
          </table:table-cell>
          <table:table-cell table:style-name="ce6"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304" calcext:value-type="float">
            <text:p>5,304</text:p>
          </table:table-cell>
          <table:table-cell table:style-name="ce6" office:value-type="float" office:value="5.53" calcext:value-type="float">
            <text:p>5,53</text:p>
          </table:table-cell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6" calcext:value-type="float">
            <text:p>0,636</text:p>
          </table:table-cell>
          <table:table-cell table:style-name="ce6" office:value-type="float" office:value="0.642" calcext:value-type="float">
            <text:p>0,642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24" calcext:value-type="float">
            <text:p>3,24</text:p>
          </table:table-cell>
          <table:table-cell table:style-name="ce6" office:value-type="float" office:value="3.11" calcext:value-type="float">
            <text:p>3,11</text:p>
          </table:table-cell>
        </table:table-row>
        <table:table-row table:style-name="ro3">
          <table:table-cell table:style-name="ce4"/>
          <table:table-cell table:style-name="ce7" table:formula="of:=AVERAGE([.B341:.B350])" office:value-type="float" office:value="0.58936" calcext:value-type="float">
            <text:p>0,58936</text:p>
          </table:table-cell>
          <table:table-cell table:style-name="ce7" table:formula="of:=AVERAGE([.C341:.C350])" office:value-type="float" office:value="0.58927" calcext:value-type="float">
            <text:p>0,58927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5" calcext:value-type="float">
            <text:p>5,15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7704" calcext:value-type="float">
            <text:p>5,7704</text:p>
          </table:table-cell>
          <table:table-cell table:style-name="ce7" table:formula="of:=AVERAGE([.G342:.G351])" office:value-type="float" office:value="5.771" calcext:value-type="float">
            <text:p>5,77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763" calcext:value-type="float">
            <text:p>0,763</text:p>
          </table:table-cell>
          <table:table-cell table:style-name="ce6" office:value-type="float" office:value="0.819" calcext:value-type="float">
            <text:p>0,819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195" calcext:value-type="float">
            <text:p>0,195</text:p>
          </table:table-cell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34" calcext:value-type="float">
            <text:p>0,734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office:value-type="float" office:value="0.299" calcext:value-type="float">
            <text:p>0,299</text:p>
          </table:table-cell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63" calcext:value-type="float">
            <text:p>0,663</text:p>
          </table:table-cell>
          <table:table-cell table:style-name="ce6" office:value-type="float" office:value="0.678" calcext:value-type="float">
            <text:p>0,67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834" calcext:value-type="float">
            <text:p>0,834</text:p>
          </table:table-cell>
          <table:table-cell table:style-name="ce6" office:value-type="float" office:value="0.678" calcext:value-type="float">
            <text:p>0,678</text:p>
          </table:table-cell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0.733" calcext:value-type="float">
            <text:p>0,733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465" calcext:value-type="float">
            <text:p>0,465</text:p>
          </table:table-cell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0.872" calcext:value-type="float">
            <text:p>0,872</text:p>
          </table:table-cell>
          <table:table-cell table:style-name="ce6" office:value-type="float" office:value="1.204" calcext:value-type="float">
            <text:p>1,204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51" calcext:value-type="float">
            <text:p>0,251</text:p>
          </table:table-cell>
          <table:table-cell table:style-name="ce6" office:value-type="float" office:value="0.219" calcext:value-type="float">
            <text:p>0,219</text:p>
          </table:table-cell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9688" calcext:value-type="float">
            <text:p>0,9688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432" calcext:value-type="float">
            <text:p>0,432</text:p>
          </table:table-cell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0.803" calcext:value-type="float">
            <text:p>0,803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 office:value-type="float" office:value="0.424" calcext:value-type="float">
            <text:p>0,424</text:p>
          </table:table-cell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758" calcext:value-type="float">
            <text:p>0,758</text:p>
          </table:table-cell>
          <table:table-cell table:style-name="ce6" office:value-type="float" office:value="0.917" calcext:value-type="float">
            <text:p>0,9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53" calcext:value-type="float">
            <text:p>0,253</text:p>
          </table:table-cell>
          <table:table-cell table:style-name="ce6" office:value-type="float" office:value="0.201" calcext:value-type="float">
            <text:p>0,201</text:p>
          </table:table-cell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0.489" calcext:value-type="float">
            <text:p>0,489</text:p>
          </table:table-cell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748" calcext:value-type="float">
            <text:p>0,748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65" calcext:value-type="float">
            <text:p>0,265</text:p>
          </table:table-cell>
          <table:table-cell table:style-name="ce6" office:value-type="float" office:value="0.215" calcext:value-type="float">
            <text:p>0,215</text:p>
          </table:table-cell>
        </table:table-row>
        <table:table-row table:style-name="ro3">
          <table:table-cell table:style-name="ce4"/>
          <table:table-cell table:style-name="ce7" table:formula="of:=AVERAGE([.B354:.B363])" office:value-type="float" office:value="0.7557" calcext:value-type="float">
            <text:p>0,7557</text:p>
          </table:table-cell>
          <table:table-cell table:style-name="ce7" table:formula="of:=AVERAGE([.C354:.C363])" office:value-type="float" office:value="0.87988" calcext:value-type="float">
            <text:p>0,87988</text:p>
          </table:table-cell>
          <table:table-cell table:style-name="ce7" table:number-columns-repeated="2"/>
          <table:table-cell table:style-name="ce7" table:formula="of:=AVERAGE([.F354:.F363])" office:value-type="float" office:value="0.3906" calcext:value-type="float">
            <text:p>0,3906</text:p>
          </table:table-cell>
          <table:table-cell table:style-name="ce7" table:formula="of:=AVERAGE([.G354:.G363])" office:value-type="float" office:value="0.3617" calcext:value-type="float">
            <text:p>0,3617</text:p>
          </table:table-cell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1397" calcext:value-type="float">
            <text:p>1,1397</text:p>
          </table:table-cell>
          <table:table-cell table:style-name="ce6" office:value-type="float" office:value="1.072" calcext:value-type="float">
            <text:p>1,07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366" calcext:value-type="float">
            <text:p>0,366</text:p>
          </table:table-cell>
          <table:table-cell table:style-name="ce6" office:value-type="float" office:value="0.283" calcext:value-type="float">
            <text:p>0,28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469" calcext:value-type="float">
            <text:p>0,469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274" calcext:value-type="float">
            <text:p>0,274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98" calcext:value-type="float">
            <text:p>0,98</text:p>
          </table:table-cell>
          <table:table-cell table:style-name="ce6" office:value-type="float" office:value="2.682" calcext:value-type="float">
            <text:p>2,682</text:p>
          </table:table-cell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922" calcext:value-type="float">
            <text:p>0,922</text:p>
          </table:table-cell>
          <table:table-cell table:style-name="ce6" office:value-type="float" office:value="0.784" calcext:value-type="float">
            <text:p>0,784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544" calcext:value-type="float">
            <text:p>0,544</text:p>
          </table:table-cell>
          <table:table-cell table:style-name="ce6" office:value-type="float" office:value="3.183" calcext:value-type="float">
            <text:p>3,183</text:p>
          </table:table-cell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216" calcext:value-type="float">
            <text:p>1,216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2.917" calcext:value-type="float">
            <text:p>2,917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63" calcext:value-type="float">
            <text:p>0,363</text:p>
          </table:table-cell>
          <table:table-cell table:style-name="ce6" office:value-type="float" office:value="0.362" calcext:value-type="float">
            <text:p>0,362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2.299" calcext:value-type="float">
            <text:p>2,299</text:p>
          </table:table-cell>
          <table:table-cell table:style-name="ce6"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556" calcext:value-type="float">
            <text:p>0,556</text:p>
          </table:table-cell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63" calcext:value-type="float">
            <text:p>0,463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5.105" calcext:value-type="float">
            <text:p>5,105</text:p>
          </table:table-cell>
          <table:table-cell table:style-name="ce6" office:value-type="float" office:value="1.281" calcext:value-type="float">
            <text:p>1,281</text:p>
          </table:table-cell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08" calcext:value-type="float">
            <text:p>0,408</text:p>
          </table:table-cell>
          <table:table-cell table:style-name="ce6" office:value-type="float" office:value="0.4498" calcext:value-type="float">
            <text:p>0,4498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1.694" calcext:value-type="float">
            <text:p>1,694</text:p>
          </table:table-cell>
          <table:table-cell table:style-name="ce6" office:value-type="float" office:value="3.6399" calcext:value-type="float">
            <text:p>3,6399</text:p>
          </table:table-cell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399" calcext:value-type="float">
            <text:p>0,399</text:p>
          </table:table-cell>
          <table:table-cell table:style-name="ce6" office:value-type="float" office:value="0.42" calcext:value-type="float">
            <text:p>0,42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1.157" calcext:value-type="float">
            <text:p>1,157</text:p>
          </table:table-cell>
          <table:table-cell table:style-name="ce6" office:value-type="float" office:value="3.669" calcext:value-type="float">
            <text:p>3,669</text:p>
          </table:table-cell>
        </table:table-row>
        <table:table-row table:style-name="ro3">
          <table:table-cell table:style-name="ce4"/>
          <table:table-cell table:style-name="ce7" table:formula="of:=AVERAGE([.B367:.B376])" office:value-type="float" office:value="0.61667" calcext:value-type="float">
            <text:p>0,61667</text:p>
          </table:table-cell>
          <table:table-cell table:style-name="ce7" table:formula="of:=AVERAGE([.C367:.C376])" office:value-type="float" office:value="0.59298" calcext:value-type="float">
            <text:p>0,59298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1.417" calcext:value-type="float">
            <text:p>1,417</text:p>
          </table:table-cell>
          <table:table-cell table:style-name="ce6" office:value-type="float" office:value="3.191" calcext:value-type="float">
            <text:p>3,19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703" calcext:value-type="float">
            <text:p>1,703</text:p>
          </table:table-cell>
          <table:table-cell table:style-name="ce7" table:formula="of:=AVERAGE([.G368:.G377])" office:value-type="float" office:value="2.49669" calcext:value-type="float">
            <text:p>2,49669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98.634" calcext:value-type="float">
            <text:p>398,634</text:p>
          </table:table-cell>
          <table:table-cell table:style-name="ce6" office:value-type="float" office:value="340.435" calcext:value-type="float">
            <text:p>340,435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921.677" calcext:value-type="float">
            <text:p>921,677</text:p>
          </table:table-cell>
          <table:table-cell table:style-name="ce6" office:value-type="float" office:value="625.765" calcext:value-type="float">
            <text:p>625,765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2.713" calcext:value-type="float">
            <text:p>2,713</text:p>
          </table:table-cell>
          <table:table-cell table:style-name="ce6" office:value-type="float" office:value="1.984" calcext:value-type="float">
            <text:p>1,984</text:p>
          </table:table-cell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39.7096" calcext:value-type="float">
            <text:p>639,7096</text:p>
          </table:table-cell>
          <table:table-cell table:style-name="ce6" office:value-type="float" office:value="700.214" calcext:value-type="float">
            <text:p>700,214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7599" calcext:value-type="float">
            <text:p>0,7599</text:p>
          </table:table-cell>
          <table:table-cell table:style-name="ce6"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525.445" calcext:value-type="float">
            <text:p>525,445</text:p>
          </table:table-cell>
          <table:table-cell table:style-name="ce6" office:value-type="float" office:value="586.238" calcext:value-type="float">
            <text:p>586,23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576" calcext:value-type="float">
            <text:p>0,576</text:p>
          </table:table-cell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867.139" calcext:value-type="float">
            <text:p>867,139</text:p>
          </table:table-cell>
          <table:table-cell table:style-name="ce6" office:value-type="float" office:value="617.542" calcext:value-type="float">
            <text:p>617,542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41" calcext:value-type="float">
            <text:p>0,941</text:p>
          </table:table-cell>
          <table:table-cell table:style-name="ce6"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575.775" calcext:value-type="float">
            <text:p>575,775</text:p>
          </table:table-cell>
          <table:table-cell table:style-name="ce6" office:value-type="float" office:value="755.416" calcext:value-type="float">
            <text:p>755,416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061" calcext:value-type="float">
            <text:p>1,061</text:p>
          </table:table-cell>
          <table:table-cell table:style-name="ce6" office:value-type="float" office:value="0.889" calcext:value-type="float">
            <text:p>0,889</text:p>
          </table:table-cell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58.224" calcext:value-type="float">
            <text:p>458,224</text:p>
          </table:table-cell>
          <table:table-cell table:style-name="ce6" office:value-type="float" office:value="423.94" calcext:value-type="float">
            <text:p>423,94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 office:value-type="float" office:value="1.014" calcext:value-type="float">
            <text:p>1,014</text:p>
          </table:table-cell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30.177" calcext:value-type="float">
            <text:p>530,177</text:p>
          </table:table-cell>
          <table:table-cell table:style-name="ce6" office:value-type="float" office:value="358.844" calcext:value-type="float">
            <text:p>358,844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13" calcext:value-type="float">
            <text:p>0,813</text:p>
          </table:table-cell>
          <table:table-cell table:style-name="ce6" office:value-type="float" office:value="0.737" calcext:value-type="float">
            <text:p>0,737</text:p>
          </table:table-cell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47.643" calcext:value-type="float">
            <text:p>547,643</text:p>
          </table:table-cell>
          <table:table-cell table:style-name="ce6" office:value-type="float" office:value="434.163" calcext:value-type="float">
            <text:p>434,163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3" calcext:value-type="float">
            <text:p>0,903</text:p>
          </table:table-cell>
          <table:table-cell table:style-name="ce6" office:value-type="float" office:value="0.878" calcext:value-type="float">
            <text:p>0,878</text:p>
          </table:table-cell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07.651" calcext:value-type="float">
            <text:p>507,651</text:p>
          </table:table-cell>
          <table:table-cell table:style-name="ce6" office:value-type="float" office:value="616.932" calcext:value-type="float">
            <text:p>616,932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.112" calcext:value-type="float">
            <text:p>1,112</text:p>
          </table:table-cell>
          <table:table-cell table:style-name="ce6" office:value-type="float" office:value="1.024" calcext:value-type="float">
            <text:p>1,024</text:p>
          </table:table-cell>
        </table:table-row>
        <table:table-row table:style-name="ro3">
          <table:table-cell table:style-name="ce4"/>
          <table:table-cell table:style-name="ce7" table:formula="of:=AVERAGE([.B380:.B389])" office:value-type="float" office:value="597.20746" calcext:value-type="float">
            <text:p>597,20746</text:p>
          </table:table-cell>
          <table:table-cell table:style-name="ce7" table:formula="of:=AVERAGE([.C380:.C389])" office:value-type="float" office:value="545.9489" calcext:value-type="float">
            <text:p>545,9489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32" calcext:value-type="float">
            <text:p>0,932</text:p>
          </table:table-cell>
          <table:table-cell table:style-name="ce6" office:value-type="float" office:value="1.033" calcext:value-type="float">
            <text:p>1,033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1.08559" calcext:value-type="float">
            <text:p>1,08559</text:p>
          </table:table-cell>
          <table:table-cell table:style-name="ce7" table:formula="of:=AVERAGE([.G381:.G390])" office:value-type="float" office:value="0.9077" calcext:value-type="float">
            <text:p>0,90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404" calcext:value-type="float">
            <text:p>0,404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354" calcext:value-type="float">
            <text:p>0,354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88" calcext:value-type="float">
            <text:p>3,88</text:p>
          </table:table-cell>
          <table:table-cell table:style-name="ce6" office:value-type="float" office:value="10.518" calcext:value-type="float">
            <text:p>10,518</text:p>
          </table:table-cell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303" calcext:value-type="float">
            <text:p>0,303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2" calcext:value-type="float">
            <text:p>3,72</text:p>
          </table:table-cell>
          <table:table-cell table:style-name="ce6" office:value-type="float" office:value="4.899" calcext:value-type="float">
            <text:p>4,899</text:p>
          </table:table-cell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76" calcext:value-type="float">
            <text:p>3,676</text:p>
          </table:table-cell>
          <table:table-cell table:style-name="ce6" office:value-type="float" office:value="4.195" calcext:value-type="float">
            <text:p>4,195</text:p>
          </table:table-cell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3" calcext:value-type="float">
            <text:p>0,13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82" calcext:value-type="float">
            <text:p>3,282</text:p>
          </table:table-cell>
          <table:table-cell table:style-name="ce6" office:value-type="float" office:value="4.554" calcext:value-type="float">
            <text:p>4,554</text:p>
          </table:table-cell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82" calcext:value-type="float">
            <text:p>3,882</text:p>
          </table:table-cell>
          <table:table-cell table:style-name="ce6" office:value-type="float" office:value="4.531" calcext:value-type="float">
            <text:p>4,531</text:p>
          </table:table-cell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839" calcext:value-type="float">
            <text:p>0,0839</text:p>
          </table:table-cell>
          <table:table-cell table:style-name="ce6" office:value-type="float" office:value="0.0914" calcext:value-type="float">
            <text:p>0,0914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62" calcext:value-type="float">
            <text:p>3,562</text:p>
          </table:table-cell>
          <table:table-cell table:style-name="ce6" office:value-type="float" office:value="4.613" calcext:value-type="float">
            <text:p>4,613</text:p>
          </table:table-cell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74" calcext:value-type="float">
            <text:p>0,374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8" calcext:value-type="float">
            <text:p>5,08</text:p>
          </table:table-cell>
          <table:table-cell table:style-name="ce6" office:value-type="float" office:value="5.34" calcext:value-type="float">
            <text:p>5,34</text:p>
          </table:table-cell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6" calcext:value-type="float">
            <text:p>0,26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13" calcext:value-type="float">
            <text:p>3,713</text:p>
          </table:table-cell>
          <table:table-cell table:style-name="ce6" office:value-type="float" office:value="4.645" calcext:value-type="float">
            <text:p>4,645</text:p>
          </table:table-cell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309" calcext:value-type="float">
            <text:p>0,309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13" calcext:value-type="float">
            <text:p>3,713</text:p>
          </table:table-cell>
          <table:table-cell table:style-name="ce6" office:value-type="float" office:value="5.771" calcext:value-type="float">
            <text:p>5,771</text:p>
          </table:table-cell>
        </table:table-row>
        <table:table-row table:style-name="ro3">
          <table:table-cell table:style-name="ce4"/>
          <table:table-cell table:style-name="ce7" table:formula="of:=AVERAGE([.B393:.B402])" office:value-type="float" office:value="0.26059" calcext:value-type="float">
            <text:p>0,26059</text:p>
          </table:table-cell>
          <table:table-cell table:style-name="ce7" table:formula="of:=AVERAGE([.C393:.C402])" office:value-type="float" office:value="0.32224" calcext:value-type="float">
            <text:p>0,32224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16" calcext:value-type="float">
            <text:p>3,416</text:p>
          </table:table-cell>
          <table:table-cell table:style-name="ce6" office:value-type="float" office:value="4.331" calcext:value-type="float">
            <text:p>4,33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7924" calcext:value-type="float">
            <text:p>3,7924</text:p>
          </table:table-cell>
          <table:table-cell table:style-name="ce7" table:formula="of:=AVERAGE([.G394:.G403])" office:value-type="float" office:value="5.3397" calcext:value-type="float">
            <text:p>5,339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496.723" calcext:value-type="float">
            <text:p>496,723</text:p>
          </table:table-cell>
          <table:table-cell table:style-name="ce6" office:value-type="float" office:value="472.294" calcext:value-type="float">
            <text:p>472,294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07.876" calcext:value-type="float">
            <text:p>307,876</text:p>
          </table:table-cell>
          <table:table-cell table:style-name="ce6" office:value-type="float" office:value="321.309" calcext:value-type="float">
            <text:p>321,309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41" calcext:value-type="float">
            <text:p>0,0741</text:p>
          </table:table-cell>
          <table:table-cell table:style-name="ce6" office:value-type="float" office:value="0.0708" calcext:value-type="float">
            <text:p>0,0708</text:p>
          </table:table-cell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404.588" calcext:value-type="float">
            <text:p>404,588</text:p>
          </table:table-cell>
          <table:table-cell table:style-name="ce6" office:value-type="float" office:value="396.707" calcext:value-type="float">
            <text:p>396,707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17.802" calcext:value-type="float">
            <text:p>517,802</text:p>
          </table:table-cell>
          <table:table-cell table:style-name="ce6" office:value-type="float" office:value="545.418" calcext:value-type="float">
            <text:p>545,418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303" calcext:value-type="float">
            <text:p>0,303</text:p>
          </table:table-cell>
          <table:table-cell table:style-name="ce6" office:value-type="float" office:value="0.378" calcext:value-type="float">
            <text:p>0,378</text:p>
          </table:table-cell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64" calcext:value-type="float">
            <text:p>460,64</text:p>
          </table:table-cell>
          <table:table-cell table:style-name="ce6" office:value-type="float" office:value="450.463" calcext:value-type="float">
            <text:p>450,463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44.87" calcext:value-type="float">
            <text:p>244,87</text:p>
          </table:table-cell>
          <table:table-cell table:style-name="ce6" office:value-type="float" office:value="180.351" calcext:value-type="float">
            <text:p>180,351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4" calcext:value-type="float">
            <text:p>0,334</text:p>
          </table:table-cell>
          <table:table-cell table:style-name="ce6" office:value-type="float" office:value="0.291" calcext:value-type="float">
            <text:p>0,291</text:p>
          </table:table-cell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06.954" calcext:value-type="float">
            <text:p>206,954</text:p>
          </table:table-cell>
          <table:table-cell table:style-name="ce6" office:value-type="float" office:value="206.288" calcext:value-type="float">
            <text:p>206,288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75" calcext:value-type="float">
            <text:p>0,0975</text:p>
          </table:table-cell>
          <table:table-cell table:style-name="ce6" office:value-type="float" office:value="0.0889" calcext:value-type="float">
            <text:p>0,0889</text:p>
          </table:table-cell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56.708" calcext:value-type="float">
            <text:p>556,708</text:p>
          </table:table-cell>
          <table:table-cell table:style-name="ce6" office:value-type="float" office:value="516.378" calcext:value-type="float">
            <text:p>516,378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1.692" calcext:value-type="float">
            <text:p>1,692</text:p>
          </table:table-cell>
          <table:table-cell table:style-name="ce6" office:value-type="float" office:value="2.264" calcext:value-type="float">
            <text:p>2,264</text:p>
          </table:table-cell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21.446" calcext:value-type="float">
            <text:p>321,446</text:p>
          </table:table-cell>
          <table:table-cell table:style-name="ce6" office:value-type="float" office:value="316.133" calcext:value-type="float">
            <text:p>316,13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135" calcext:value-type="float">
            <text:p>1,135</text:p>
          </table:table-cell>
          <table:table-cell table:style-name="ce6" office:value-type="float" office:value="1.258" calcext:value-type="float">
            <text:p>1,258</text:p>
          </table:table-cell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6.12" calcext:value-type="float">
            <text:p>336,12</text:p>
          </table:table-cell>
          <table:table-cell table:style-name="ce6" office:value-type="float" office:value="328.859" calcext:value-type="float">
            <text:p>328,859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6" calcext:value-type="float">
            <text:p>0,236</text:p>
          </table:table-cell>
          <table:table-cell table:style-name="ce6" office:value-type="float" office:value="0.253" calcext:value-type="float">
            <text:p>0,253</text:p>
          </table:table-cell>
        </table:table-row>
        <table:table-row table:style-name="ro3">
          <table:table-cell table:style-name="ce4"/>
          <table:table-cell table:style-name="ce7" table:formula="of:=AVERAGE([.B406:.B415])" office:value-type="float" office:value="385.3727" calcext:value-type="float">
            <text:p>385,3727</text:p>
          </table:table-cell>
          <table:table-cell table:style-name="ce7" table:formula="of:=AVERAGE([.C406:.C415])" office:value-type="float" office:value="373.42" calcext:value-type="float">
            <text:p>373,42</text:p>
          </table:table-cell>
          <table:table-cell table:style-name="ce7" table:number-columns-repeated="2"/>
          <table:table-cell table:style-name="ce7" table:formula="of:=AVERAGE([.F406:.F415])" office:value-type="float" office:value="0.44866" calcext:value-type="float">
            <text:p>0,44866</text:p>
          </table:table-cell>
          <table:table-cell table:style-name="ce7" table:formula="of:=AVERAGE([.G406:.G415])" office:value-type="float" office:value="0.54037" calcext:value-type="float">
            <text:p>0,54037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74" calcext:value-type="float">
            <text:p>8,474</text:p>
          </table:table-cell>
          <table:table-cell table:style-name="ce6" office:value-type="float" office:value="8.5" calcext:value-type="float">
            <text:p>8,5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537" calcext:value-type="float">
            <text:p>1,537</text:p>
          </table:table-cell>
          <table:table-cell table:style-name="ce6" office:value-type="float" office:value="1.649" calcext:value-type="float">
            <text:p>1,649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65" calcext:value-type="float">
            <text:p>7,465</text:p>
          </table:table-cell>
          <table:table-cell table:style-name="ce6" office:value-type="float" office:value="7.396" calcext:value-type="float">
            <text:p>7,396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053" calcext:value-type="float">
            <text:p>1,053</text:p>
          </table:table-cell>
          <table:table-cell table:style-name="ce6" office:value-type="float" office:value="1.306" calcext:value-type="float">
            <text:p>1,306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9" calcext:value-type="float">
            <text:p>9,029</text:p>
          </table:table-cell>
          <table:table-cell table:style-name="ce6" office:value-type="float" office:value="9.079" calcext:value-type="float">
            <text:p>9,079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545" calcext:value-type="float">
            <text:p>1,545</text:p>
          </table:table-cell>
          <table:table-cell table:style-name="ce6" office:value-type="float" office:value="1.305" calcext:value-type="float">
            <text:p>1,305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6" calcext:value-type="float">
            <text:p>7,586</text:p>
          </table:table-cell>
          <table:table-cell table:style-name="ce6" office:value-type="float" office:value="7.563" calcext:value-type="float">
            <text:p>7,56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389" calcext:value-type="float">
            <text:p>1,389</text:p>
          </table:table-cell>
          <table:table-cell table:style-name="ce6" office:value-type="float" office:value="1.192" calcext:value-type="float">
            <text:p>1,192</text:p>
          </table:table-cell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286" calcext:value-type="float">
            <text:p>7,286</text:p>
          </table:table-cell>
          <table:table-cell table:style-name="ce6" office:value-type="float" office:value="7.301" calcext:value-type="float">
            <text:p>7,301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457" calcext:value-type="float">
            <text:p>1,457</text:p>
          </table:table-cell>
          <table:table-cell table:style-name="ce6" office:value-type="float" office:value="1.095" calcext:value-type="float">
            <text:p>1,095</text:p>
          </table:table-cell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026" calcext:value-type="float">
            <text:p>8,026</text:p>
          </table:table-cell>
          <table:table-cell table:style-name="ce6" office:value-type="float" office:value="7.995" calcext:value-type="float">
            <text:p>7,995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551" calcext:value-type="float">
            <text:p>1,551</text:p>
          </table:table-cell>
          <table:table-cell table:style-name="ce6" office:value-type="float" office:value="1.296" calcext:value-type="float">
            <text:p>1,296</text:p>
          </table:table-cell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245" calcext:value-type="float">
            <text:p>9,245</text:p>
          </table:table-cell>
          <table:table-cell table:style-name="ce6" office:value-type="float" office:value="9.146" calcext:value-type="float">
            <text:p>9,146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91" calcext:value-type="float">
            <text:p>1,691</text:p>
          </table:table-cell>
          <table:table-cell table:style-name="ce6" office:value-type="float" office:value="1.634" calcext:value-type="float">
            <text:p>1,634</text:p>
          </table:table-cell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85" calcext:value-type="float">
            <text:p>7,385</text:p>
          </table:table-cell>
          <table:table-cell table:style-name="ce6" office:value-type="float" office:value="7.331" calcext:value-type="float">
            <text:p>7,331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014" calcext:value-type="float">
            <text:p>1,014</text:p>
          </table:table-cell>
          <table:table-cell table:style-name="ce6" office:value-type="float" office:value="1.132" calcext:value-type="float">
            <text:p>1,132</text:p>
          </table:table-cell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56" calcext:value-type="float">
            <text:p>6,56</text:p>
          </table:table-cell>
          <table:table-cell table:style-name="ce6" office:value-type="float" office:value="6.43" calcext:value-type="float">
            <text:p>6,43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53" calcext:value-type="float">
            <text:p>1,453</text:p>
          </table:table-cell>
          <table:table-cell table:style-name="ce6" office:value-type="float" office:value="1.247" calcext:value-type="float">
            <text:p>1,247</text:p>
          </table:table-cell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195" calcext:value-type="float">
            <text:p>7,195</text:p>
          </table:table-cell>
          <table:table-cell table:style-name="ce6" office:value-type="float" office:value="7.275" calcext:value-type="float">
            <text:p>7,275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1.136" calcext:value-type="float">
            <text:p>1,136</text:p>
          </table:table-cell>
        </table:table-row>
        <table:table-row table:style-name="ro3">
          <table:table-cell table:style-name="ce7"/>
          <table:table-cell table:style-name="ce7" table:formula="of:=AVERAGE([.B419:.B428])" office:value-type="float" office:value="7.8251" calcext:value-type="float">
            <text:p>7,8251</text:p>
          </table:table-cell>
          <table:table-cell table:style-name="ce7" table:formula="of:=AVERAGE([.C419:.C428])" office:value-type="float" office:value="7.8016" calcext:value-type="float">
            <text:p>7,8016</text:p>
          </table:table-cell>
          <table:table-cell table:style-name="ce7" table:number-columns-repeated="2"/>
          <table:table-cell table:style-name="ce7" table:formula="of:=AVERAGE([.F419:.F428])" office:value-type="float" office:value="1.3744" calcext:value-type="float">
            <text:p>1,3744</text:p>
          </table:table-cell>
          <table:table-cell table:style-name="ce7" table:formula="of:=AVERAGE([.G419:.G428])" office:value-type="float" office:value="1.2992" calcext:value-type="float">
            <text:p>1,2992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55.517" calcext:value-type="float">
            <text:p>155,517</text:p>
          </table:table-cell>
          <table:table-cell table:style-name="ce6" office:value-type="float" office:value="179.548" calcext:value-type="float">
            <text:p>179,548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75.169" calcext:value-type="float">
            <text:p>375,169</text:p>
          </table:table-cell>
          <table:table-cell table:style-name="ce6" office:value-type="float" office:value="576.609" calcext:value-type="float">
            <text:p>576,609</text:p>
          </table:table-cell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22.246" calcext:value-type="float">
            <text:p>122,246</text:p>
          </table:table-cell>
          <table:table-cell table:style-name="ce6" office:value-type="float" office:value="73.165" calcext:value-type="float">
            <text:p>73,165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3.192" calcext:value-type="float">
            <text:p>333,192</text:p>
          </table:table-cell>
          <table:table-cell table:style-name="ce6" office:value-type="float" office:value="662.366" calcext:value-type="float">
            <text:p>662,366</text:p>
          </table:table-cell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2.325" calcext:value-type="float">
            <text:p>112,325</text:p>
          </table:table-cell>
          <table:table-cell table:style-name="ce6" office:value-type="float" office:value="101.263" calcext:value-type="float">
            <text:p>101,263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61.549" calcext:value-type="float">
            <text:p>361,549</text:p>
          </table:table-cell>
          <table:table-cell table:style-name="ce6" office:value-type="float" office:value="548.755" calcext:value-type="float">
            <text:p>548,755</text:p>
          </table:table-cell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35.748" calcext:value-type="float">
            <text:p>135,748</text:p>
          </table:table-cell>
          <table:table-cell table:style-name="ce6" office:value-type="float" office:value="135.377" calcext:value-type="float">
            <text:p>135,377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407.58" calcext:value-type="float">
            <text:p>407,58</text:p>
          </table:table-cell>
          <table:table-cell table:style-name="ce6" office:value-type="float" office:value="497.353" calcext:value-type="float">
            <text:p>497,353</text:p>
          </table:table-cell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126.829" calcext:value-type="float">
            <text:p>126,829</text:p>
          </table:table-cell>
          <table:table-cell table:style-name="ce6" office:value-type="float" office:value="90.059" calcext:value-type="float">
            <text:p>90,059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865" calcext:value-type="float">
            <text:p>369,865</text:p>
          </table:table-cell>
          <table:table-cell table:style-name="ce6" office:value-type="float" office:value="539.769" calcext:value-type="float">
            <text:p>539,769</text:p>
          </table:table-cell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14.332" calcext:value-type="float">
            <text:p>114,332</text:p>
          </table:table-cell>
          <table:table-cell table:style-name="ce6" office:value-type="float" office:value="127.47" calcext:value-type="float">
            <text:p>127,47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25.371" calcext:value-type="float">
            <text:p>425,371</text:p>
          </table:table-cell>
          <table:table-cell table:style-name="ce6" office:value-type="float" office:value="605.546" calcext:value-type="float">
            <text:p>605,546</text:p>
          </table:table-cell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125.05" calcext:value-type="float">
            <text:p>125,05</text:p>
          </table:table-cell>
          <table:table-cell table:style-name="ce6" office:value-type="float" office:value="101.833" calcext:value-type="float">
            <text:p>101,83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5.752" calcext:value-type="float">
            <text:p>345,752</text:p>
          </table:table-cell>
          <table:table-cell table:style-name="ce6" office:value-type="float" office:value="470.1799" calcext:value-type="float">
            <text:p>470,1799</text:p>
          </table:table-cell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108.017" calcext:value-type="float">
            <text:p>108,017</text:p>
          </table:table-cell>
          <table:table-cell table:style-name="ce6" office:value-type="float" office:value="112.648" calcext:value-type="float">
            <text:p>112,648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16.56" calcext:value-type="float">
            <text:p>416,56</text:p>
          </table:table-cell>
          <table:table-cell table:style-name="ce6" office:value-type="float" office:value="744.049" calcext:value-type="float">
            <text:p>744,049</text:p>
          </table:table-cell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190.672" calcext:value-type="float">
            <text:p>190,672</text:p>
          </table:table-cell>
          <table:table-cell table:style-name="ce6" office:value-type="float" office:value="74.391" calcext:value-type="float">
            <text:p>74,391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17.727" calcext:value-type="float">
            <text:p>417,727</text:p>
          </table:table-cell>
          <table:table-cell table:style-name="ce6" office:value-type="float" office:value="468.963" calcext:value-type="float">
            <text:p>468,963</text:p>
          </table:table-cell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18.006" calcext:value-type="float">
            <text:p>118,006</text:p>
          </table:table-cell>
          <table:table-cell table:style-name="ce6" office:value-type="float" office:value="166.609" calcext:value-type="float">
            <text:p>166,6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0.435" calcext:value-type="float">
            <text:p>380,435</text:p>
          </table:table-cell>
          <table:table-cell table:style-name="ce6" office:value-type="float" office:value="449.424" calcext:value-type="float">
            <text:p>449,424</text:p>
          </table:table-cell>
        </table:table-row>
        <table:table-row table:style-name="ro3">
          <table:table-cell table:style-name="ce4"/>
          <table:table-cell table:style-name="ce7" table:formula="of:=AVERAGE([.B432:.B441])" office:value-type="float" office:value="130.8742" calcext:value-type="float">
            <text:p>130,8742</text:p>
          </table:table-cell>
          <table:table-cell table:style-name="ce7" table:formula="of:=AVERAGE([.C432:.C441])" office:value-type="float" office:value="116.2363" calcext:value-type="float">
            <text:p>116,236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3.32" calcext:value-type="float">
            <text:p>383,32</text:p>
          </table:table-cell>
          <table:table-cell table:style-name="ce7" table:formula="of:=AVERAGE([.G432:.G441])" office:value-type="float" office:value="556.30139" calcext:value-type="float">
            <text:p>556,30139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852" calcext:value-type="float">
            <text:p>3,852</text:p>
          </table:table-cell>
          <table:table-cell table:style-name="ce6" office:value-type="float" office:value="3.856" calcext:value-type="float">
            <text:p>3,85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257" calcext:value-type="float">
            <text:p>4,257</text:p>
          </table:table-cell>
          <table:table-cell table:style-name="ce6" office:value-type="float" office:value="4.359" calcext:value-type="float">
            <text:p>4,359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54" calcext:value-type="float">
            <text:p>6,554</text:p>
          </table:table-cell>
          <table:table-cell table:style-name="ce6" office:value-type="float" office:value="6.566" calcext:value-type="float">
            <text:p>6,56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37" calcext:value-type="float">
            <text:p>2,837</text:p>
          </table:table-cell>
          <table:table-cell table:style-name="ce6" office:value-type="float" office:value="2.768" calcext:value-type="float">
            <text:p>2,768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64" calcext:value-type="float">
            <text:p>6,164</text:p>
          </table:table-cell>
          <table:table-cell table:style-name="ce6" office:value-type="float" office:value="6.353" calcext:value-type="float">
            <text:p>6,35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79" calcext:value-type="float">
            <text:p>7,79</text:p>
          </table:table-cell>
          <table:table-cell table:style-name="ce6" office:value-type="float" office:value="7.803" calcext:value-type="float">
            <text:p>7,80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094" calcext:value-type="float">
            <text:p>5,094</text:p>
          </table:table-cell>
          <table:table-cell table:style-name="ce6" office:value-type="float" office:value="5.471" calcext:value-type="float">
            <text:p>5,471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116" calcext:value-type="float">
            <text:p>5,116</text:p>
          </table:table-cell>
          <table:table-cell table:style-name="ce6" office:value-type="float" office:value="5.092" calcext:value-type="float">
            <text:p>5,092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62" calcext:value-type="float">
            <text:p>2,862</text:p>
          </table:table-cell>
          <table:table-cell table:style-name="ce6" office:value-type="float" office:value="3.024" calcext:value-type="float">
            <text:p>3,024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3.856" calcext:value-type="float">
            <text:p>3,856</text:p>
          </table:table-cell>
          <table:table-cell table:style-name="ce6" office:value-type="float" office:value="4.543" calcext:value-type="float">
            <text:p>4,54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3">
          <table:table-cell table:style-name="ce4"/>
          <table:table-cell table:style-name="ce7" table:formula="of:=AVERAGE([.B445:.B454])" office:value-type="float" office:value="4.8382" calcext:value-type="float">
            <text:p>4,8382</text:p>
          </table:table-cell>
          <table:table-cell table:style-name="ce7" table:formula="of:=AVERAGE([.C445:.C454])" office:value-type="float" office:value="4.9835" calcext:value-type="float">
            <text:p>4,9835</text:p>
          </table:table-cell>
          <table:table-cell table:style-name="ce7" table:number-columns-repeated="2"/>
          <table:table-cell table:style-name="Default" table:number-columns-repeated="2"/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2"/>
        </table:table-row>
        <table:table-row table:style-name="ro4" table:number-rows-repeated="2">
          <table:table-cell table:style-name="Default" table:number-columns-repeated="5"/>
          <table:table-cell table:style-name="ce8" table:number-columns-repeated="2"/>
        </table:table-row>
        <table:table-row table:style-name="ro4">
          <table:table-cell table:style-name="Default" table:number-columns-repeated="5"/>
          <table:table-cell table:style-name="ce8" table:number-columns-repeated="2"/>
        </table:table-row>
      </table:table>
      <table:table table:name="nc_averages" table:style-name="ta1">
        <table:table-column table:style-name="co10" table:default-cell-style-name="Default"/>
        <table:table-column table:style-name="co11" table:number-columns-repeated="4" table:default-cell-style-name="ce16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8" office:value-type="string" calcext:value-type="string">
            <text:p>NC=200</text:p>
          </table:table-cell>
          <table:table-cell table:style-name="ce18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021" calcext:value-type="percentage">
            <text:p>20,21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1936" calcext:value-type="percentage">
            <text:p>19,36%</text:p>
          </table:table-cell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1781" calcext:value-type="percentage">
            <text:p>17,81%</text:p>
          </table:table-cell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1718" calcext:value-type="percentage">
            <text:p>17,18%</text:p>
          </table:table-cell>
          <table:table-cell office:value-type="percentage" office:value="0.1697" calcext:value-type="percentage">
            <text:p>16,97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784" calcext:value-type="percentage">
            <text:p>17,84%</text:p>
          </table:table-cell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828" calcext:value-type="percentage">
            <text:p>38,28%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617" calcext:value-type="percentage">
            <text:p>36,17%</text:p>
          </table:table-cell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529" calcext:value-type="percentage">
            <text:p>5,29%</text:p>
          </table:table-cell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886" calcext:value-type="percentage">
            <text:p>48,86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38" calcext:value-type="percentage">
            <text:p>50,38%</text:p>
          </table:table-cell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4083" calcext:value-type="percentage">
            <text:p>40,83%</text:p>
          </table:table-cell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604" calcext:value-type="percentage">
            <text:p>60,40%</text:p>
          </table:table-cell>
          <table:table-cell office:value-type="percentage" office:value="0.6076" calcext:value-type="percentage">
            <text:p>60,7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52" calcext:value-type="percentage">
            <text:p>59,52%</text:p>
          </table:table-cell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11" calcext:value-type="percentage">
            <text:p>21,1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7009" calcext:value-type="percentage">
            <text:p>70,09%</text:p>
          </table:table-cell>
          <table:table-cell office:value-type="percentage" office:value="0.6214" calcext:value-type="percentage">
            <text:p>62,14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62" calcext:value-type="percentage">
            <text:p>51,62%</text:p>
          </table:table-cell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53" calcext:value-type="percentage">
            <text:p>27,53%</text:p>
          </table:table-cell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4239" calcext:value-type="percentage">
            <text:p>42,39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808" calcext:value-type="percentage">
            <text:p>38,08%</text:p>
          </table:table-cell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334" calcext:value-type="percentage">
            <text:p>23,34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9" calcext:value-type="percentage">
            <text:p>21,59%</text:p>
          </table:table-cell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883" calcext:value-type="percentage">
            <text:p>18,83%</text:p>
          </table:table-cell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35" calcext:value-type="percentage">
            <text:p>5,35%</text:p>
          </table:table-cell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183" calcext:value-type="percentage">
            <text:p>11,83%</text:p>
          </table:table-cell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959" calcext:value-type="percentage">
            <text:p>29,59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77" calcext:value-type="percentage">
            <text:p>29,77%</text:p>
          </table:table-cell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243" calcext:value-type="percentage">
            <text:p>22,43%</text:p>
          </table:table-cell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777" calcext:value-type="percentage">
            <text:p>17,77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4" calcext:value-type="percentage">
            <text:p>17,84%</text:p>
          </table:table-cell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605" calcext:value-type="percentage">
            <text:p>16,05%</text:p>
          </table:table-cell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36" calcext:value-type="percentage">
            <text:p>9,36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043" calcext:value-type="percentage">
            <text:p>10,43%</text:p>
          </table:table-cell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637" calcext:value-type="percentage">
            <text:p>16,37%</text:p>
          </table:table-cell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23" calcext:value-type="percentage">
            <text:p>23,23%</text:p>
          </table:table-cell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46" calcext:value-type="percentage">
            <text:p>5,46%</text:p>
          </table:table-cell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43" calcext:value-type="percentage">
            <text:p>25,43%</text:p>
          </table:table-cell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446" calcext:value-type="percentage">
            <text:p>4,46%</text:p>
          </table:table-cell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94" calcext:value-type="percentage">
            <text:p>28,94%</text:p>
          </table:table-cell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521" calcext:value-type="percentage">
            <text:p>35,2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515" calcext:value-type="percentage">
            <text:p>35,15%</text:p>
          </table:table-cell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195" calcext:value-type="percentage">
            <text:p>31,95%</text:p>
          </table:table-cell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95" calcext:value-type="percentage">
            <text:p>22,95%</text:p>
          </table:table-cell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11" calcext:value-type="percentage">
            <text:p>10,11%</text:p>
          </table:table-cell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11" calcext:value-type="percentage">
            <text:p>41,11%</text:p>
          </table:table-cell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11" calcext:value-type="percentage">
            <text:p>25,11%</text:p>
          </table:table-cell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218" calcext:value-type="percentage">
            <text:p>22,18%</text:p>
          </table:table-cell>
          <table:table-cell office:value-type="percentage" office:value="0.171" calcext:value-type="percentage">
            <text:p>17,10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45" calcext:value-type="percentage">
            <text:p>11,45%</text:p>
          </table:table-cell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2534" calcext:value-type="percentage">
            <text:p>25,34%</text:p>
          </table:table-cell>
        </table:table-row>
        <table:table-row table:style-name="ro4">
          <table:table-cell office:value-type="string" calcext:value-type="string">
            <text:p>Wdbc</text:p>
          </table:table-cell>
          <table:table-cell table:number-columns-repeated="2" office:value-type="percentage" office:value="0.0454" calcext:value-type="percentage">
            <text:p>4,54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75" calcext:value-type="percentage">
            <text:p>4,75%</text:p>
          </table:table-cell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71" calcext:value-type="percentage">
            <text:p>10,71%</text:p>
          </table:table-cell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607" calcext:value-type="percentage">
            <text:p>6,07%</text:p>
          </table:table-cell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82" calcext:value-type="percentage">
            <text:p>1,82%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5">
          <table:table-cell table:style-name="ce14"/>
          <table:table-cell table:style-name="ce17" table:formula="of:=AVERAGE([.B3:.B44])" office:value-type="percentage" office:value="0.233666666666667" calcext:value-type="percentage">
            <text:p>23,37%</text:p>
          </table:table-cell>
          <table:table-cell table:style-name="ce17" table:formula="of:=AVERAGE([.C3:.C44])" office:value-type="percentage" office:value="0.22607380952381" calcext:value-type="percentage">
            <text:p>22,61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5533333333333" calcext:value-type="percentage">
            <text:p>21,55%</text:p>
          </table:table-cell>
        </table:table-row>
        <table:table-row table:style-name="ro1">
          <table:table-cell table:style-name="ce12" table:number-columns-repeated="5"/>
        </table:table-row>
        <table:table-row table:style-name="ro3">
          <table:table-cell table:style-name="ce36" table:number-columns-repeated="2"/>
          <table:table-cell table:style-name="ce42" table:number-columns-repeated="3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2" office:value-type="string" calcext:value-type="string">
            <text:p>NC=200</text:p>
          </table:table-cell>
          <table:table-cell table:style-name="ce12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3018.4734/417" office:value-type="float" office:value="7.23854532374101" calcext:value-type="float">
            <text:p>7,23854532374101</text:p>
          </table:table-cell>
          <table:table-cell table:style-name="ce13" table:formula="of:=2877.6704/417" office:value-type="float" office:value="6.90088824940048" calcext:value-type="float">
            <text:p>6,90088824940048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3" table:formula="of:=2557.9635/417" office:value-type="float" office:value="6.13420503597122" calcext:value-type="float">
            <text:p>6,13420503597122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94/150" office:value-type="float" office:value="0.00396" calcext:value-type="float">
            <text:p>0,00396</text:p>
          </table:table-cell>
          <table:table-cell table:style-name="ce13" table:formula="of:=0.58927/150" office:value-type="float" office:value="0.00392846666666667" calcext:value-type="float">
            <text:p>0,00392846666666667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8936/150" office:value-type="float" office:value="0.00392906666666667" calcext:value-type="float">
            <text:p>0,00392906666666667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78.327/39" office:value-type="float" office:value="9.70069230769231" calcext:value-type="float">
            <text:p>9,70069230769231</text:p>
          </table:table-cell>
          <table:table-cell table:style-name="ce13" table:formula="of:=373.42/39" office:value-type="float" office:value="9.5748717948718" calcext:value-type="float">
            <text:p>9,5748717948718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85.3727/39" office:value-type="float" office:value="9.88135128205128" calcext:value-type="float">
            <text:p>9,88135128205128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17612/9" office:value-type="float" office:value="0.0195688888888889" calcext:value-type="float">
            <text:p>0,0195688888888889</text:p>
          </table:table-cell>
          <table:table-cell table:style-name="ce13" table:formula="of:=0.17956/9" office:value-type="float" office:value="0.0199511111111111" calcext:value-type="float">
            <text:p>0,0199511111111111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3" table:formula="of:=0.19925/9" office:value-type="float" office:value="0.0221388888888889" calcext:value-type="float">
            <text:p>0,022138888888888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027349/4" office:value-type="float" office:value="0.000683725" calcext:value-type="float">
            <text:p>0,000683725</text:p>
          </table:table-cell>
          <table:table-cell table:style-name="ce13" table:formula="of:=0.00241/4" office:value-type="float" office:value="0.0006025" calcext:value-type="float">
            <text:p>0,000602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3" table:formula="of:=0.00092582/4" office:value-type="float" office:value="0.000231455" calcext:value-type="float">
            <text:p>0,000231455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1852.912/33" office:value-type="float" office:value="56.1488484848485" calcext:value-type="float">
            <text:p>56,1488484848485</text:p>
          </table:table-cell>
          <table:table-cell table:style-name="ce13" table:formula="of:=1771.6952/33" office:value-type="float" office:value="53.6877333333333" calcext:value-type="float">
            <text:p>53,6877333333333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3" table:formula="of:=1862.7938/33" office:value-type="float" office:value="56.448296969697" calcext:value-type="float">
            <text:p>56,448296969697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1.07305/103" office:value-type="float" office:value="0.0104179611650485" calcext:value-type="float">
            <text:p>0,0104179611650485</text:p>
          </table:table-cell>
          <table:table-cell table:style-name="ce13" table:formula="of:=0.87988/103" office:value-type="float" office:value="0.00854252427184466" calcext:value-type="float">
            <text:p>0,00854252427184466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7557/103" office:value-type="float" office:value="0.0073368932038835" calcext:value-type="float">
            <text:p>0,0073368932038835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8.275/36" office:value-type="float" office:value="0.229861111111111" calcext:value-type="float">
            <text:p>0,229861111111111</text:p>
          </table:table-cell>
          <table:table-cell table:style-name="ce13" table:formula="of:=5.771/36" office:value-type="float" office:value="0.160305555555556" calcext:value-type="float">
            <text:p>0,160305555555556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3" table:formula="of:=5.7704/36" office:value-type="float" office:value="0.160288888888889" calcext:value-type="float">
            <text:p>0,160288888888889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6328/25" office:value-type="float" office:value="0.025312" calcext:value-type="float">
            <text:p>0,025312</text:p>
          </table:table-cell>
          <table:table-cell table:style-name="ce13" table:formula="of:=0.55987/25" office:value-type="float" office:value="0.0223948" calcext:value-type="float">
            <text:p>0,022394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3" table:formula="of:=0.39889/25" office:value-type="float" office:value="0.0159556" calcext:value-type="float">
            <text:p>0,0159556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91/12" office:value-type="float" office:value="0.04925" calcext:value-type="float">
            <text:p>0,04925</text:p>
          </table:table-cell>
          <table:table-cell table:style-name="ce13" table:formula="of:=0.59298/12" office:value-type="float" office:value="0.049415" calcext:value-type="float">
            <text:p>0,049415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3" table:formula="of:=0.61667/12" office:value-type="float" office:value="0.0513891666666667" calcext:value-type="float">
            <text:p>0,0513891666666667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5033/50" office:value-type="float" office:value="0.0070066" calcext:value-type="float">
            <text:p>0,0070066</text:p>
          </table:table-cell>
          <table:table-cell table:style-name="ce13" table:formula="of:=0.3617/50" office:value-type="float" office:value="0.007234" calcext:value-type="float">
            <text:p>0,007234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3" table:formula="of:=0.3906/50" office:value-type="float" office:value="0.007812" calcext:value-type="float">
            <text:p>0,007812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524.8582/50" office:value-type="float" office:value="10.497164" calcext:value-type="float">
            <text:p>10,497164</text:p>
          </table:table-cell>
          <table:table-cell table:style-name="ce13" table:formula="of:=545.9489/50" office:value-type="float" office:value="10.918978" calcext:value-type="float">
            <text:p>10,918978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97.20746/50" office:value-type="float" office:value="11.9441492" calcext:value-type="float">
            <text:p>11,9441492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5.7251/99" office:value-type="float" office:value="0.0578292929292929" calcext:value-type="float">
            <text:p>0,0578292929292929</text:p>
          </table:table-cell>
          <table:table-cell table:style-name="ce13" table:formula="of:=2.49669/99" office:value-type="float" office:value="0.0252190909090909" calcext:value-type="float">
            <text:p>0,0252190909090909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1.703/99" office:value-type="float" office:value="0.0172020202020202" calcext:value-type="float">
            <text:p>0,0172020202020202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362/18" office:value-type="float" office:value="0.0201111111111111" calcext:value-type="float">
            <text:p>0,0201111111111111</text:p>
          </table:table-cell>
          <table:table-cell table:style-name="ce13" table:formula="of:=0.32224/18" office:value-type="float" office:value="0.0179022222222222" calcext:value-type="float">
            <text:p>0,0179022222222222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3" table:formula="of:=0.26059/18" office:value-type="float" office:value="0.0144772222222222" calcext:value-type="float">
            <text:p>0,0144772222222222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36068/6" office:value-type="float" office:value="0.0601133333333333" calcext:value-type="float">
            <text:p>0,0601133333333333</text:p>
          </table:table-cell>
          <table:table-cell table:style-name="ce13" table:formula="of:=0.38/6" office:value-type="float" office:value="0.0633333333333333" calcext:value-type="float">
            <text:p>0,0633333333333333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3" table:formula="of:=0.38986/6" office:value-type="float" office:value="0.0649766666666667" calcext:value-type="float">
            <text:p>0,0649766666666667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4161/104" office:value-type="float" office:value="0.0136163461538462" calcext:value-type="float">
            <text:p>0,0136163461538462</text:p>
          </table:table-cell>
          <table:table-cell table:style-name="ce13" table:formula="of:=0.9077/104" office:value-type="float" office:value="0.00872788461538462" calcext:value-type="float">
            <text:p>0,00872788461538462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3" table:formula="of:=1.08559/104" office:value-type="float" office:value="0.0104383653846154" calcext:value-type="float">
            <text:p>0,0104383653846154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56/13" office:value-type="float" office:value="0.00627384615384615" calcext:value-type="float">
            <text:p>0,00627384615384615</text:p>
          </table:table-cell>
          <table:table-cell table:style-name="ce13" table:formula="of:=0.08203/13" office:value-type="float" office:value="0.00631" calcext:value-type="float">
            <text:p>0,00631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3" table:formula="of:=0.08159/13" office:value-type="float" office:value="0.00627615384615385" calcext:value-type="float">
            <text:p>0,00627615384615385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842.564/165" office:value-type="float" office:value="5.10644848484848" calcext:value-type="float">
            <text:p>5,10644848484848</text:p>
          </table:table-cell>
          <table:table-cell table:style-name="ce13" table:formula="of:=556.30139/165" office:value-type="float" office:value="3.37152357575758" calcext:value-type="float">
            <text:p>3,37152357575758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3" table:formula="of:=383.32/165" office:value-type="float" office:value="2.32315151515152" calcext:value-type="float">
            <text:p>2,32315151515152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10684/7" office:value-type="float" office:value="0.0152628571428571" calcext:value-type="float">
            <text:p>0,0152628571428571</text:p>
          </table:table-cell>
          <table:table-cell table:style-name="ce13" table:formula="of:=0.114/7" office:value-type="float" office:value="0.0162857142857143" calcext:value-type="float">
            <text:p>0,0162857142857143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3" table:formula="of:=0.09423/7" office:value-type="float" office:value="0.0134614285714286" calcext:value-type="float">
            <text:p>0,0134614285714286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7.46/165" office:value-type="float" office:value="0.0452121212121212" calcext:value-type="float">
            <text:p>0,0452121212121212</text:p>
          </table:table-cell>
          <table:table-cell table:style-name="ce13" table:formula="of:=5.3397/165" office:value-type="float" office:value="0.0323618181818182" calcext:value-type="float">
            <text:p>0,0323618181818182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3" table:formula="of:=3.7924/165" office:value-type="float" office:value="0.0229842424242424" calcext:value-type="float">
            <text:p>0,0229842424242424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16/217" office:value-type="float" office:value="0.0359520737327189" calcext:value-type="float">
            <text:p>0,0359520737327189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251/217" office:value-type="float" office:value="0.0360603686635945" calcext:value-type="float">
            <text:p>0,0360603686635945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3185/57" office:value-type="float" office:value="0.0231315789473684" calcext:value-type="float">
            <text:p>0,0231315789473684</text:p>
          </table:table-cell>
          <table:table-cell table:style-name="ce13" table:formula="of:=1.2992/57" office:value-type="float" office:value="0.0227929824561404" calcext:value-type="float">
            <text:p>0,0227929824561404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744/57" office:value-type="float" office:value="0.0241122807017544" calcext:value-type="float">
            <text:p>0,0241122807017544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124.4137/95" office:value-type="float" office:value="1.30961789473684" calcext:value-type="float">
            <text:p>1,30961789473684</text:p>
          </table:table-cell>
          <table:table-cell table:style-name="ce13" table:formula="of:=116.2363/95" office:value-type="float" office:value="1.22354" calcext:value-type="float">
            <text:p>1,22354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3" table:formula="of:=130.8742/95" office:value-type="float" office:value="1.37762315789474" calcext:value-type="float">
            <text:p>1,37762315789474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9586/104" office:value-type="float" office:value="0.0476788461538462" calcext:value-type="float">
            <text:p>0,0476788461538462</text:p>
          </table:table-cell>
          <table:table-cell table:style-name="ce13" table:formula="of:=4.9835/104" office:value-type="float" office:value="0.0479182692307692" calcext:value-type="float">
            <text:p>0,0479182692307692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3" table:formula="of:=4.8382/104" office:value-type="float" office:value="0.0465211538461538" calcext:value-type="float">
            <text:p>0,0465211538461538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51074/13" office:value-type="float" office:value="0.0392876923076923" calcext:value-type="float">
            <text:p>0,0392876923076923</text:p>
          </table:table-cell>
          <table:table-cell table:style-name="ce13" table:formula="of:=0.54037/13" office:value-type="float" office:value="0.0415669230769231" calcext:value-type="float">
            <text:p>0,0415669230769231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3" table:formula="of:=0.44866/13" office:value-type="float" office:value="0.0345123076923077" calcext:value-type="float">
            <text:p>0,0345123076923077</text:p>
          </table:table-cell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5">
          <table:table-cell table:style-name="ce14"/>
          <table:table-cell table:style-name="ce14" table:formula="of:=AVERAGE([.B50:.B74])" office:value-type="float" office:value="3.6284743882438" calcext:value-type="float">
            <text:p>3,6284743882438</text:p>
          </table:table-cell>
          <table:table-cell table:style-name="ce14" table:formula="of:=AVERAGE([.C50:.C74])" office:value-type="float" office:value="3.4507311689205" calcext:value-type="float">
            <text:p>3,4507311689205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54675525321208" calcext:value-type="float">
            <text:p>3,54675525321208</text:p>
          </table:table-cell>
        </table:table-row>
        <table:table-row table:style-name="ro1">
          <table:table-cell table:style-name="ce12" table:number-columns-repeated="2"/>
          <table:table-cell table:style-name="ce18" table:number-columns-repeated="3"/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4">
          <table:table-cell office:value-type="string" calcext:value-type="string">
            <text:p>F=4</text:p>
          </table:table-cell>
          <table:table-cell table:style-name="Default" table:number-columns-repeated="4"/>
        </table:table-row>
      </table:table>
      <table:table table:name="Φύλλο6" table:style-name="ta1">
        <table:table-column table:style-name="co9" table:number-columns-repeated="16379" table:default-cell-style-name="Default"/>
        <table:table-row table:style-name="ro4">
          <table:table-cell office:value-type="string" calcext:value-type="string">
            <text:p>nt</text:p>
          </table:table-cell>
          <table:table-cell office:value-type="string" calcext:value-type="string">
            <text:p>ve</text:p>
          </table:table-cell>
          <table:table-cell table:number-columns-repeated="16377"/>
        </table:table-row>
        <table:table-row table:style-name="ro4">
          <table:table-cell office:value-type="float" office:value="0.1197" calcext:value-type="float">
            <text:p>0,1197</text:p>
          </table:table-cell>
          <table:table-cell office:value-type="float" office:value="0.0727" calcext:value-type="float">
            <text:p>0,0727</text:p>
          </table:table-cell>
          <table:table-cell table:number-columns-repeated="16377"/>
        </table:table-row>
        <table:table-row table:style-name="ro4">
          <table:table-cell office:value-type="float" office:value="0.0871" calcext:value-type="float">
            <text:p>0,0871</text:p>
          </table:table-cell>
          <table:table-cell office:value-type="float" office:value="0.0648" calcext:value-type="float">
            <text:p>0,0648</text:p>
          </table:table-cell>
          <table:table-cell table:number-columns-repeated="16377"/>
        </table:table-row>
        <table:table-row table:style-name="ro4">
          <table:table-cell office:value-type="float" office:value="0.151" calcext:value-type="float">
            <text:p>0,151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4">
          <table:table-cell office:value-type="float" office:value="0.113" calcext:value-type="float">
            <text:p>0,113</text:p>
          </table:table-cell>
          <table:table-cell office:value-type="float" office:value="0.176" calcext:value-type="float">
            <text:p>0,176</text:p>
          </table:table-cell>
          <table:table-cell table:number-columns-repeated="16377"/>
        </table:table-row>
        <table:table-row table:style-name="ro4">
          <table:table-cell office:value-type="float" office:value="0.142" calcext:value-type="float">
            <text:p>0,142</text:p>
          </table:table-cell>
          <table:table-cell office:value-type="float" office:value="0.141" calcext:value-type="float">
            <text:p>0,141</text:p>
          </table:table-cell>
          <table:table-cell table:number-columns-repeated="16377"/>
        </table:table-row>
        <table:table-row table:style-name="ro4">
          <table:table-cell office:value-type="float" office:value="0.115" calcext:value-type="float">
            <text:p>0,115</text:p>
          </table:table-cell>
          <table:table-cell office:value-type="float" office:value="0.202" calcext:value-type="float">
            <text:p>0,202</text:p>
          </table:table-cell>
          <table:table-cell table:number-columns-repeated="16377"/>
        </table:table-row>
        <table:table-row table:style-name="ro4">
          <table:table-cell office:value-type="float" office:value="0.0923" calcext:value-type="float">
            <text:p>0,0923</text:p>
          </table:table-cell>
          <table:table-cell office:value-type="float" office:value="0.1497" calcext:value-type="float">
            <text:p>0,1497</text:p>
          </table:table-cell>
          <table:table-cell table:number-columns-repeated="16377"/>
        </table:table-row>
        <table:table-row table:style-name="ro4">
          <table:table-cell office:value-type="float" office:value="0.084" calcext:value-type="float">
            <text:p>0,084</text:p>
          </table:table-cell>
          <table:table-cell office:value-type="float" office:value="0.865" calcext:value-type="float">
            <text:p>0,865</text:p>
          </table:table-cell>
          <table:table-cell table:number-columns-repeated="16377"/>
        </table:table-row>
        <table:table-row table:style-name="ro4">
          <table:table-cell office:value-type="float" office:value="0.156" calcext:value-type="float">
            <text:p>0,156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4">
          <table:table-cell office:value-type="float" office:value="0.263" calcext:value-type="float">
            <text:p>0,263</text:p>
          </table:table-cell>
          <table:table-cell office:value-type="float" office:value="0.1278" calcext:value-type="float">
            <text:p>0,1278</text:p>
          </table:table-cell>
          <table:table-cell table:number-columns-repeated="16377"/>
        </table:table-row>
        <table:table-row table:style-name="ro1">
          <table:table-cell table:style-name="ce12" table:formula="of:=AVERAGE([.A2:.A11])" office:value-type="float" office:value="0.13231" calcext:value-type="float">
            <text:p>0,13231</text:p>
          </table:table-cell>
          <table:table-cell table:style-name="ce12" table:formula="of:=AVERAGE([.B2:.B11])" office:value-type="float" office:value="0.2988" calcext:value-type="float">
            <text:p>0,2988</text:p>
          </table:table-cell>
          <table:table-cell table:style-name="ce12" table:number-columns-repeated="16377"/>
        </table:table-row>
        <table:table-row table:style-name="ro4">
          <table:table-cell table:formula="of:=[.A12]/13" office:value-type="float" office:value="0.0101776923076923" calcext:value-type="float">
            <text:p>0,0101776923076923</text:p>
          </table:table-cell>
          <table:table-cell table:formula="of:=[.B12]/13" office:value-type="float" office:value="0.0229846153846154" calcext:value-type="float">
            <text:p>0,0229846153846154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7:15:31.18866248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22T20:42:27.959683685</dc:date>
    <meta:editing-duration>P3DT17H15M28S</meta:editing-duration>
    <meta:editing-cycles>1635</meta:editing-cycles>
    <meta:generator>LibreOffice/25.2.3.2$Linux_X86_64 LibreOffice_project/520$Build-2</meta:generator>
    <meta:document-statistic meta:table-count="6" meta:cell-count="6013" meta:object-count="0"/>
  </office:meta>
</office:document-meta>
</file>